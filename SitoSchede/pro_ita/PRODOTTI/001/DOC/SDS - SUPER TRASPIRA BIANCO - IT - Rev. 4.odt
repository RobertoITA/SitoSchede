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1000000012883BC24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8080"/>
    </style:style>
    <style:style style:name="P4" style:family="paragraph">
      <loext:graphic-properties draw:fill="solid" draw:fill-color="#f5f5f5"/>
    </style:style>
    <style:style style:name="P5" style:family="paragraph">
      <loext:graphic-properties draw:fill="solid" draw:fill-color="#ffffff"/>
    </style:style>
    <style:style style:name="T1" style:family="text">
      <style:text-properties fo:color="#000000" loext:opacity="100%" fo:font-family="Arial" fo:font-size="8pt" fo:font-weight="normal" style:font-family-asian="Arial" style:font-size-asian="8pt" style:font-weight-asian="normal" style:font-family-complex="Arial" style:font-size-complex="8pt" style:font-weight-complex="normal"/>
    </style:style>
    <style:style style:name="T2" style:family="text">
      <style:text-properties fo:color="#000000" loext:opacity="100%" fo:font-family="Arial" fo:font-size="7.90000009536743pt" fo:font-weight="normal" style:font-family-asian="Arial" style:font-size-asian="7.90000009536743pt" style:font-weight-asian="normal" style:font-family-complex="Arial" style:font-size-complex="7.90000009536743pt" style:font-weight-complex="normal"/>
    </style:style>
    <style:style style:name="T3" style:family="text">
      <style:text-properties fo:color="#000000" loext:opacity="100%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loext:opacity="100%" fo:font-family="Arial" fo:font-size="11pt" fo:font-weight="bold" style:font-family-asian="Arial" style:font-size-asian="11pt" style:font-weight-asian="bold" style:font-family-complex="Arial" style:font-size-complex="11pt" style:font-weight-complex="bold"/>
    </style:style>
    <style:style style:name="T5" style:family="text">
      <style:text-properties fo:color="#000000" loext:opacity="100%" fo:font-family="Arial" fo:font-size="8pt" fo:font-style="italic" fo:font-weight="normal" style:font-family-asian="Arial" style:font-size-asian="8pt" style:font-style-asian="italic" style:font-weight-asian="normal" style:font-family-complex="Arial" style:font-size-complex="8pt" style:font-style-complex="italic" style:font-weight-complex="normal"/>
    </style:style>
    <style:style style:name="T6" style:family="text">
      <style:text-properties fo:color="#000000" loext:opacity="100%" fo:font-family="Arial" fo:font-size="9pt" fo:font-weight="bold" style:font-family-asian="Arial" style:font-size-asian="9pt" style:font-weight-asian="bold" style:font-family-complex="Arial" style:font-size-complex="9pt" style:font-weight-complex="bold"/>
    </style:style>
    <style:style style:name="T7" style:family="text">
      <style:text-properties fo:color="#000000" loext:opacity="100%" fo:font-family="Arial" fo:font-size="5pt" fo:font-weight="normal" style:font-family-asian="Arial" style:font-size-asian="5pt" style:font-weight-asian="normal" style:font-family-complex="Arial" style:font-size-complex="5pt" style:font-weight-complex="normal"/>
    </style:style>
    <style:style style:name="T8" style:family="text">
      <style:text-properties fo:color="#000000" loext:opacity="100%" fo:font-family="Arial" fo:font-size="5.5pt" fo:font-weight="normal" style:font-family-asian="Arial" style:font-size-asian="5.5pt" style:font-weight-asian="normal" style:font-family-complex="Arial" style:font-size-complex="5.5pt" style:font-weight-complex="normal"/>
    </style:style>
    <style:style style:name="T9" style:family="text">
      <style:text-properties fo:color="#000000" loext:opacity="100%" fo:font-family="Arial" fo:font-size="18.5pt" fo:font-weight="bold" style:font-family-asian="Arial" style:font-size-asian="18.5pt" style:font-weight-asian="bold" style:font-family-complex="Arial" style:font-size-complex="18.5pt" style:font-weight-complex="bold"/>
    </style:style>
    <style:style style:name="T10" style:family="text">
      <style:text-properties fo:color="#000000" loext:opacity="100%" fo:font-family="Arial" fo:font-size="15.5pt" fo:font-weight="bold" style:font-family-asian="Arial" style:font-size-asian="15.5pt" style:font-weight-asian="bold" style:font-family-complex="Arial" style:font-size-complex="15.5pt" style:font-weight-complex="bold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in" svg:stroke-color="#000000" draw:stroke-linejoin="miter" svg:stroke-linecap="butt" draw:fill="none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8080" draw:stroke-linejoin="miter" svg:stroke-linecap="butt" draw:fill="solid" draw:fill-color="#008080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in" svg:stroke-color="#d3d3d3" draw:stroke-linejoin="miter" svg:stroke-linecap="butt" draw:fill="none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f5f5f5" draw:stroke-linejoin="miter" svg:stroke-linecap="butt" draw:fill="solid" draw:fill-color="#f5f5f5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in" svg:stroke-color="#ffffff" draw:stroke-linejoin="miter" svg:stroke-linecap="butt" draw:fill="solid" draw:fill-color="#ffffff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5" draw:z-index="1094" draw:name="Shape529" draw:style-name="gr1" draw:text-style-name="P2" svg:width="0.0661in" svg:height="0.1287in" svg:x="2.8602in" svg:y="10.611in">
        <draw:text-box>
          <text:p><text:span text:style-name="T1">&gt;</text:span></text:p>
        </draw:text-box>
      </draw:frame>
      <draw:frame text:anchor-type="page" text:anchor-page-number="5" draw:z-index="1093" draw:name="Shape531" draw:style-name="gr1" draw:text-style-name="P2" svg:width="0.1268in" svg:height="0.1287in" svg:x="3.8701in" svg:y="10.6134in">
        <draw:text-box>
          <text:p><text:span text:style-name="T1">°C</text:span></text:p>
        </draw:text-box>
      </draw:frame>
      <draw:frame text:anchor-type="page" text:anchor-page-number="5" draw:z-index="1092" draw:name="Shape530" draw:style-name="gr1" draw:text-style-name="P2" svg:width="0.1252in" svg:height="0.1287in" svg:x="3.0898in" svg:y="10.611in">
        <draw:text-box>
          <text:p><text:span text:style-name="T1">60</text:span></text:p>
        </draw:text-box>
      </draw:frame>
      <draw:frame text:anchor-type="page" text:anchor-page-number="5" draw:z-index="1091" draw:name="Shape528" draw:style-name="gr1" draw:text-style-name="P2" svg:width="1.1197in" svg:height="0.1287in" svg:x="0.5201in" svg:y="10.611in">
        <draw:text-box>
          <text:p><text:span text:style-name="T1">Punto di infiammabilità</text:span></text:p>
        </draw:text-box>
      </draw:frame>
      <draw:frame text:anchor-type="page" text:anchor-page-number="5" draw:z-index="1090" draw:name="Shape527" draw:style-name="gr1" draw:text-style-name="P2" svg:width="0.7433in" svg:height="0.1287in" svg:x="3.0898in" svg:y="10.478in">
        <draw:text-box>
          <text:p><text:span text:style-name="T1">non disponibile</text:span></text:p>
        </draw:text-box>
      </draw:frame>
      <draw:frame text:anchor-type="page" text:anchor-page-number="5" draw:z-index="1089" draw:name="Shape526" draw:style-name="gr1" draw:text-style-name="P2" svg:width="1.3421in" svg:height="0.1287in" svg:x="0.5201in" svg:y="10.4756in">
        <draw:text-box>
          <text:p><text:span text:style-name="T1">Limite superiore esplosività</text:span></text:p>
        </draw:text-box>
      </draw:frame>
      <draw:frame text:anchor-type="page" text:anchor-page-number="5" draw:z-index="1088" draw:name="Shape525" draw:style-name="gr1" draw:text-style-name="P2" svg:width="0.7433in" svg:height="0.1287in" svg:x="3.0898in" svg:y="10.3425in">
        <draw:text-box>
          <text:p><text:span text:style-name="T1">non disponibile</text:span></text:p>
        </draw:text-box>
      </draw:frame>
      <draw:frame text:anchor-type="page" text:anchor-page-number="5" draw:z-index="1087" draw:name="Shape524" draw:style-name="gr1" draw:text-style-name="P2" svg:width="1.2803in" svg:height="0.1287in" svg:x="0.5201in" svg:y="10.3402in">
        <draw:text-box>
          <text:p><text:span text:style-name="T1">Limite inferiore esplosività</text:span></text:p>
        </draw:text-box>
      </draw:frame>
      <draw:frame text:anchor-type="page" text:anchor-page-number="5" draw:z-index="1086" draw:name="Shape523" draw:style-name="gr1" draw:text-style-name="P2" svg:width="0.8421in" svg:height="0.1287in" svg:x="3.0898in" svg:y="10.2055in">
        <draw:text-box>
          <text:p><text:span text:style-name="T1">non infiammabile</text:span></text:p>
        </draw:text-box>
      </draw:frame>
      <draw:frame text:anchor-type="page" text:anchor-page-number="10" draw:z-index="1085" draw:name="Shape977" draw:style-name="gr1" draw:text-style-name="P2" svg:width="3.8669in" svg:height="0.1276in" svg:x="0.5201in" svg:y="10.6134in">
        <draw:text-box>
          <text:p><text:span text:style-name="T2">- EC50: Concentrazione che dà effetto al 50% della popolazione soggetta a test</text:span></text:p>
        </draw:text-box>
      </draw:frame>
      <draw:frame text:anchor-type="page" text:anchor-page-number="5" draw:z-index="1084" draw:name="Shape522" draw:style-name="gr1" draw:text-style-name="P2" svg:width="0.687in" svg:height="0.1287in" svg:x="0.5201in" svg:y="10.2055in">
        <draw:text-box>
          <text:p><text:span text:style-name="T1">Infiammabilità</text:span></text:p>
        </draw:text-box>
      </draw:frame>
      <draw:frame text:anchor-type="page" text:anchor-page-number="5" draw:z-index="1083" draw:name="Shape521" draw:style-name="gr1" draw:text-style-name="P2" svg:width="2.0161in" svg:height="0.1287in" svg:x="5.1917in" svg:y="10.0701in">
        <draw:text-box>
          <text:p><text:span text:style-name="T1">Punto <text:s text:c="3"/>di <text:s text:c="3"/>ebollizione <text:s/>iniziale: <text:s/>100 <text:s/>°C</text:span></text:p>
        </draw:text-box>
      </draw:frame>
      <draw:frame text:anchor-type="page" text:anchor-page-number="10" draw:z-index="1082" draw:name="Shape976" draw:style-name="gr1" draw:text-style-name="P2" svg:width="1.8106in" svg:height="0.1276in" svg:x="0.5201in" svg:y="10.478in">
        <draw:text-box>
          <text:p><text:span text:style-name="T2">- DNEL: Livello derivato senza effetto</text:span></text:p>
        </draw:text-box>
      </draw:frame>
      <draw:frame text:anchor-type="page" text:anchor-page-number="5" draw:z-index="1081" draw:name="Shape517" draw:style-name="gr1" draw:text-style-name="P2" svg:width="0.0661in" svg:height="0.1287in" svg:x="2.8602in" svg:y="9.9346in">
        <draw:text-box>
          <text:p><text:span text:style-name="T1">&gt;</text:span></text:p>
        </draw:text-box>
      </draw:frame>
      <draw:frame text:anchor-type="page" text:anchor-page-number="10" draw:z-index="1080" draw:name="Shape975" draw:style-name="gr1" draw:text-style-name="P2" svg:width="1.8012in" svg:height="0.1276in" svg:x="0.5201in" svg:y="10.3429in">
        <draw:text-box>
          <text:p><text:span text:style-name="T2">- CLP: Regolamento (CE) 1272/2008</text:span></text:p>
        </draw:text-box>
      </draw:frame>
      <draw:frame text:anchor-type="page" text:anchor-page-number="5" draw:z-index="1079" draw:name="Shape519" draw:style-name="gr1" draw:text-style-name="P2" svg:width="0.8913in" svg:height="0.1287in" svg:x="5.1917in" svg:y="9.9346in">
        <draw:text-box>
          <text:p><text:span text:style-name="T1">Sostanza:ACQUA</text:span></text:p>
        </draw:text-box>
      </draw:frame>
      <draw:frame text:anchor-type="page" text:anchor-page-number="10" draw:z-index="1078" draw:name="Shape974" draw:style-name="gr1" draw:text-style-name="P2" svg:width="3.7831in" svg:height="0.1276in" svg:x="0.5201in" svg:y="10.2075in">
        <draw:text-box>
          <text:p><text:span text:style-name="T2">- CE: Numero identificativo in ESIS (archivio europeo delle sostanze esistenti)</text:span></text:p>
        </draw:text-box>
      </draw:frame>
      <draw:frame text:anchor-type="page" text:anchor-page-number="5" draw:z-index="1077" draw:name="Shape520" draw:style-name="gr1" draw:text-style-name="P2" svg:width="0.1268in" svg:height="0.1287in" svg:x="3.8701in" svg:y="9.9366in">
        <draw:text-box>
          <text:p><text:span text:style-name="T1">°C</text:span></text:p>
        </draw:text-box>
      </draw:frame>
      <draw:frame text:anchor-type="page" text:anchor-page-number="10" draw:z-index="1076" draw:name="Shape973" draw:style-name="gr1" draw:text-style-name="P2" svg:width="2.2642in" svg:height="0.1276in" svg:x="0.5201in" svg:y="10.072in">
        <draw:text-box>
          <text:p><text:span text:style-name="T2">- CAS: Numero del Chemical Abstract Service </text:span></text:p>
        </draw:text-box>
      </draw:frame>
      <draw:frame text:anchor-type="page" text:anchor-page-number="5" draw:z-index="1075" draw:name="Shape518" draw:style-name="gr1" draw:text-style-name="P2" svg:width="0.187in" svg:height="0.1287in" svg:x="3.0898in" svg:y="9.9346in">
        <draw:text-box>
          <text:p><text:span text:style-name="T1">100</text:span></text:p>
        </draw:text-box>
      </draw:frame>
      <draw:frame text:anchor-type="page" text:anchor-page-number="10" draw:z-index="1074" draw:name="Shape972" draw:style-name="gr1" draw:text-style-name="P2" svg:width="1.6598in" svg:height="0.1276in" svg:x="0.5201in" svg:y="9.9366in">
        <draw:text-box>
          <text:p><text:span text:style-name="T2">- ATE / STA: Stima Tossicità Acuta</text:span></text:p>
        </draw:text-box>
      </draw:frame>
      <draw:frame text:anchor-type="page" text:anchor-page-number="5" draw:z-index="1073" draw:name="Shape516" draw:style-name="gr1" draw:text-style-name="P2" svg:width="1.3358in" svg:height="0.1287in" svg:x="0.5201in" svg:y="9.9346in">
        <draw:text-box>
          <text:p><text:span text:style-name="T1">Punto di ebollizione iniziale</text:span></text:p>
        </draw:text-box>
      </draw:frame>
      <draw:frame text:anchor-type="page" text:anchor-page-number="10" draw:z-index="1072" draw:name="Shape971" draw:style-name="gr1" draw:text-style-name="P2" svg:width="3.4898in" svg:height="0.1276in" svg:x="0.5201in" svg:y="9.802in">
        <draw:text-box>
          <text:p><text:span text:style-name="T2">- ADR: Accordo europeo per il trasporto delle merci pericolose su strada</text:span></text:p>
        </draw:text-box>
      </draw:frame>
      <draw:frame text:anchor-type="page" text:anchor-page-number="5" draw:z-index="1071" draw:name="Shape515" draw:style-name="gr1" draw:text-style-name="P2" svg:width="0.7433in" svg:height="0.1287in" svg:x="3.0898in" svg:y="9.8016in">
        <draw:text-box>
          <text:p><text:span text:style-name="T1">non disponibile</text:span></text:p>
        </draw:text-box>
      </draw:frame>
      <draw:frame text:anchor-type="page" text:anchor-page-number="10" draw:z-index="1070" draw:name="Shape970" draw:style-name="gr1" draw:text-style-name="P2" svg:width="0.5567in" svg:height="0.1276in" svg:x="0.5201in" svg:y="9.6665in">
        <draw:text-box>
          <text:p><text:span text:style-name="T2">LEGENDA:</text:span></text:p>
        </draw:text-box>
      </draw:frame>
      <draw:frame text:anchor-type="page" text:anchor-page-number="10" draw:z-index="1069" draw:name="Shape968" draw:style-name="gr1" draw:text-style-name="P2" svg:width="0.5571in" svg:height="0.1287in" svg:x="2.0807in" svg:y="9.3937in">
        <draw:text-box>
          <text:p><text:span text:style-name="T1">Costruzioni</text:span></text:p>
        </draw:text-box>
      </draw:frame>
      <draw:frame text:anchor-type="page" text:anchor-page-number="5" draw:z-index="1068" draw:name="Shape514" draw:style-name="gr1" draw:text-style-name="P2" svg:width="1.7378in" svg:height="0.1287in" svg:x="0.5201in" svg:y="9.7992in">
        <draw:text-box>
          <text:p><text:span text:style-name="T1">Punto di fusione o di congelamento</text:span></text:p>
        </draw:text-box>
      </draw:frame>
      <draw:frame text:anchor-type="page" text:anchor-page-number="10" draw:z-index="1067" draw:name="Shape967" draw:style-name="gr1" draw:text-style-name="P2" svg:width="0.1559in" svg:height="0.1287in" svg:x="0.6756in" svg:y="9.3937in">
        <draw:text-box>
          <text:p><text:span text:style-name="T3">SU</text:span></text:p>
        </draw:text-box>
      </draw:frame>
      <draw:frame text:anchor-type="page" text:anchor-page-number="5" draw:z-index="1066" draw:name="Shape513" draw:style-name="gr1" draw:text-style-name="P2" svg:width="0.2303in" svg:height="0.1287in" svg:x="3.0898in" svg:y="9.6646in">
        <draw:text-box>
          <text:p><text:span text:style-name="T1">lieve</text:span></text:p>
        </draw:text-box>
      </draw:frame>
      <draw:frame text:anchor-type="page" text:anchor-page-number="10" draw:z-index="1065" draw:name="Shape969" draw:style-name="gr1" draw:text-style-name="P2" svg:width="0.124in" svg:height="0.1276in" svg:x="1.061in" svg:y="9.3937in">
        <draw:text-box>
          <text:p><text:span text:style-name="T2">19</text:span></text:p>
        </draw:text-box>
      </draw:frame>
      <draw:frame text:anchor-type="page" text:anchor-page-number="5" draw:z-index="1064" draw:name="Shape512" draw:style-name="gr1" draw:text-style-name="P2" svg:width="0.3106in" svg:height="0.1287in" svg:x="0.5201in" svg:y="9.6646in">
        <draw:text-box>
          <text:p><text:span text:style-name="T1">Odore</text:span></text:p>
        </draw:text-box>
      </draw:frame>
      <draw:frame text:anchor-type="page" text:anchor-page-number="10" draw:z-index="1063" draw:name="Shape966" draw:style-name="gr1" draw:text-style-name="P2" svg:width="1.1071in" svg:height="0.1287in" svg:x="2.0807in" svg:y="9.2583in">
        <draw:text-box>
          <text:p><text:span text:style-name="T1">compresa la pesatura)</text:span></text:p>
        </draw:text-box>
      </draw:frame>
      <draw:frame text:anchor-type="page" text:anchor-page-number="5" draw:z-index="1062" draw:name="Shape511" draw:style-name="gr1" draw:text-style-name="P2" svg:width="0.3287in" svg:height="0.1287in" svg:x="3.0898in" svg:y="9.5291in">
        <draw:text-box>
          <text:p><text:span text:style-name="T1">bianco</text:span></text:p>
        </draw:text-box>
      </draw:frame>
      <draw:frame text:anchor-type="page" text:anchor-page-number="10" draw:z-index="1061" draw:name="Shape964" draw:style-name="gr1" draw:text-style-name="P2" svg:width="4.9079in" svg:height="0.1287in" svg:x="2.0807in" svg:y="9.1228in">
        <draw:text-box>
          <text:p><text:span text:style-name="T1">Trasferimento di una sostanza o di un preparato in piccoli contenitori (linea di riempimento dedicata,</text:span></text:p>
        </draw:text-box>
      </draw:frame>
      <draw:frame text:anchor-type="page" text:anchor-page-number="5" draw:z-index="1060" draw:name="Shape510" draw:style-name="gr1" draw:text-style-name="P2" svg:width="0.3287in" svg:height="0.1287in" svg:x="0.5201in" svg:y="9.5291in">
        <draw:text-box>
          <text:p><text:span text:style-name="T1">Colore</text:span></text:p>
        </draw:text-box>
      </draw:frame>
      <draw:frame text:anchor-type="page" text:anchor-page-number="5" draw:z-index="1059" draw:name="Shape509" draw:style-name="gr1" draw:text-style-name="P2" svg:width="0.6567in" svg:height="0.1287in" svg:x="3.0898in" svg:y="9.3937in">
        <draw:text-box>
          <text:p><text:span text:style-name="T1">liquido denso</text:span></text:p>
        </draw:text-box>
      </draw:frame>
      <draw:frame text:anchor-type="page" text:anchor-page-number="10" draw:z-index="1058" draw:name="Shape963" draw:style-name="gr1" draw:text-style-name="P2" svg:width="0.3224in" svg:height="0.1287in" svg:x="0.6756in" svg:y="9.1228in">
        <draw:text-box>
          <text:p><text:span text:style-name="T3">PROC</text:span></text:p>
        </draw:text-box>
      </draw:frame>
      <draw:frame text:anchor-type="page" text:anchor-page-number="4" draw:z-index="1057" draw:name="Shape385" draw:style-name="gr1" draw:text-style-name="P2" svg:width="0.4098in" svg:height="0.1276in" svg:x="5.1917in" svg:y="9.7189in">
        <draw:text-box>
          <text:p><text:span text:style-name="T2">RESPIR</text:span></text:p>
        </draw:text-box>
      </draw:frame>
      <draw:frame text:anchor-type="page" text:anchor-page-number="4" draw:z-index="1056" draw:name="Shape383" draw:style-name="gr1" draw:text-style-name="P2" svg:width="0.1559in" svg:height="0.1287in" svg:x="2.1535in" svg:y="9.7165in">
        <draw:text-box>
          <text:p><text:span text:style-name="T1"><text:s text:c="3"/>2</text:span></text:p>
        </draw:text-box>
      </draw:frame>
      <draw:frame text:anchor-type="page" text:anchor-page-number="10" draw:z-index="1055" draw:name="Shape965" draw:style-name="gr1" draw:text-style-name="P2" svg:width="0.063in" svg:height="0.1276in" svg:x="1.061in" svg:y="9.1236in">
        <draw:text-box>
          <text:p><text:span text:style-name="T2">9</text:span></text:p>
        </draw:text-box>
      </draw:frame>
      <draw:frame text:anchor-type="page" text:anchor-page-number="5" draw:z-index="1054" draw:name="Shape508" draw:style-name="gr1" draw:text-style-name="P2" svg:width="0.5823in" svg:height="0.1287in" svg:x="0.5201in" svg:y="9.3937in">
        <draw:text-box>
          <text:p><text:span text:style-name="T1">Stato Fisico</text:span></text:p>
        </draw:text-box>
      </draw:frame>
      <draw:frame text:anchor-type="page" text:anchor-page-number="4" draw:z-index="1053" draw:name="Shape382" draw:style-name="gr1" draw:text-style-name="P2" svg:width="0.3539in" svg:height="0.1287in" svg:x="0.6756in" svg:y="9.7165in">
        <draw:text-box>
          <text:p><text:span text:style-name="T1">ACGIH</text:span></text:p>
        </draw:text-box>
      </draw:frame>
      <draw:frame text:anchor-type="page" text:anchor-page-number="5" draw:z-index="1052" draw:name="Shape507" draw:style-name="gr1" draw:text-style-name="P2" svg:width="0.6622in" svg:height="0.1287in" svg:x="5.1917in" svg:y="9.2602in">
        <draw:text-box>
          <text:p><text:span text:style-name="T3">Informazioni</text:span></text:p>
        </draw:text-box>
      </draw:frame>
      <draw:frame text:anchor-type="page" text:anchor-page-number="10" draw:z-index="1051" draw:name="Shape961" draw:style-name="gr1" draw:text-style-name="P2" svg:width="4.963in" svg:height="0.1287in" svg:x="2.0807in" svg:y="8.9882in">
        <draw:text-box>
          <text:p><text:span text:style-name="T1">Trasferimento di una sostanza o di una miscela (riempimento/svuotamento) presso strutture dedicate</text:span></text:p>
        </draw:text-box>
      </draw:frame>
      <draw:frame text:anchor-type="page" text:anchor-page-number="10" draw:z-index="1050" draw:name="Shape960" draw:style-name="gr1" draw:text-style-name="P2" svg:width="0.3224in" svg:height="0.1287in" svg:x="0.6756in" svg:y="8.9882in">
        <draw:text-box>
          <text:p><text:span text:style-name="T3">PROC</text:span></text:p>
        </draw:text-box>
      </draw:frame>
      <draw:frame text:anchor-type="page" text:anchor-page-number="4" draw:z-index="1049" draw:name="Shape381" draw:style-name="gr1" draw:text-style-name="P2" svg:width="0.4098in" svg:height="0.1276in" svg:x="5.1917in" svg:y="9.5835in">
        <draw:text-box>
          <text:p><text:span text:style-name="T2">RESPIR</text:span></text:p>
        </draw:text-box>
      </draw:frame>
      <draw:frame text:anchor-type="page" text:anchor-page-number="5" draw:z-index="1048" draw:name="Shape506" draw:style-name="gr1" draw:text-style-name="P2" svg:width="0.335in" svg:height="0.1287in" svg:x="3.0898in" svg:y="9.2602in">
        <draw:text-box>
          <text:p><text:span text:style-name="T3">Valore</text:span></text:p>
        </draw:text-box>
      </draw:frame>
      <draw:frame text:anchor-type="page" text:anchor-page-number="4" draw:z-index="1047" draw:name="Shape379" draw:style-name="gr1" draw:text-style-name="P2" svg:width="0.1559in" svg:height="0.1287in" svg:x="2.1535in" svg:y="9.5811in">
        <draw:text-box>
          <text:p><text:span text:style-name="T1"><text:s text:c="3"/>1</text:span></text:p>
        </draw:text-box>
      </draw:frame>
      <draw:frame text:anchor-type="page" text:anchor-page-number="5" draw:z-index="1046" draw:name="Shape505" draw:style-name="gr1" draw:text-style-name="P2" svg:width="0.4894in" svg:height="0.1287in" svg:x="0.5201in" svg:y="9.2602in">
        <draw:text-box>
          <text:p><text:span text:style-name="T3">Proprietà</text:span></text:p>
        </draw:text-box>
      </draw:frame>
      <draw:frame text:anchor-type="page" text:anchor-page-number="10" draw:z-index="1045" draw:name="Shape962" draw:style-name="gr1" draw:text-style-name="P2" svg:width="0.124in" svg:height="0.1276in" svg:x="1.061in" svg:y="8.989in">
        <draw:text-box>
          <text:p><text:span text:style-name="T2">8b</text:span></text:p>
        </draw:text-box>
      </draw:frame>
      <draw:frame text:anchor-type="page" text:anchor-page-number="4" draw:z-index="1044" draw:name="Shape378" draw:style-name="gr1" draw:text-style-name="P2" svg:width="0.2425in" svg:height="0.1287in" svg:x="1.5291in" svg:y="9.5811in">
        <draw:text-box>
          <text:p><text:span text:style-name="T1">GBR</text:span></text:p>
        </draw:text-box>
      </draw:frame>
      <draw:frame text:anchor-type="page" text:anchor-page-number="10" draw:z-index="1043" draw:name="Shape958" draw:style-name="gr1" draw:text-style-name="P2" svg:width="5.2161in" svg:height="0.1287in" svg:x="2.0807in" svg:y="8.8528in">
        <draw:text-box>
          <text:p><text:span text:style-name="T1">Trasferimento di una sostanza o di un preparato (riempimento/svuotamento) presso strutture non dedicate</text:span></text:p>
        </draw:text-box>
      </draw:frame>
      <draw:frame text:anchor-type="page" text:anchor-page-number="5" draw:z-index="1042" draw:name="Shape504" draw:style-name="gr1" draw:text-style-name="P2" svg:width="3.385in" svg:height="0.1287in" svg:x="0.3744in" svg:y="8.9898in">
        <draw:text-box>
          <text:p><text:span text:style-name="T3">9.1. Informazioni sulle proprietà fisiche e chimiche fondamentali</text:span></text:p>
        </draw:text-box>
      </draw:frame>
      <draw:frame text:anchor-type="page" text:anchor-page-number="5" draw:z-index="1041" draw:name="Shape503" draw:style-name="gr1" draw:text-style-name="P2" svg:width="2.9142in" svg:height="0.1768in" svg:x="0.3744in" svg:y="8.5728in">
        <draw:text-box>
          <text:p><text:span text:style-name="T4">SEZIONE 9. Proprietà fisiche e chimiche</text:span></text:p>
        </draw:text-box>
      </draw:frame>
      <draw:frame text:anchor-type="page" text:anchor-page-number="10" draw:z-index="1040" draw:name="Shape957" draw:style-name="gr1" draw:text-style-name="P2" svg:width="0.3224in" svg:height="0.1287in" svg:x="0.6756in" svg:y="8.8528in">
        <draw:text-box>
          <text:p><text:span text:style-name="T3">PROC</text:span></text:p>
        </draw:text-box>
      </draw:frame>
      <draw:frame text:anchor-type="page" text:anchor-page-number="4" draw:z-index="1039" draw:name="Shape377" draw:style-name="gr1" draw:text-style-name="P2" svg:width="0.2425in" svg:height="0.1287in" svg:x="0.6756in" svg:y="9.5811in">
        <draw:text-box>
          <text:p><text:span text:style-name="T1">WEL</text:span></text:p>
        </draw:text-box>
      </draw:frame>
      <draw:frame text:anchor-type="page" text:anchor-page-number="5" draw:z-index="1038" draw:name="Shape500" draw:style-name="gr1" draw:text-style-name="P2" svg:width="1.7579in" svg:height="0.1276in" svg:x="0.5201in" svg:y="8.1272in">
        <draw:text-box>
          <text:p><text:span text:style-name="T2">della normativa di tutela ambientale.</text:span></text:p>
        </draw:text-box>
      </draw:frame>
      <draw:frame text:anchor-type="page" text:anchor-page-number="10" draw:z-index="1037" draw:name="Shape959" draw:style-name="gr1" draw:text-style-name="P2" svg:width="0.124in" svg:height="0.1276in" svg:x="1.061in" svg:y="8.8535in">
        <draw:text-box>
          <text:p><text:span text:style-name="T2">8a</text:span></text:p>
        </draw:text-box>
      </draw:frame>
      <draw:frame text:anchor-type="page" text:anchor-page-number="4" draw:z-index="1036" draw:name="Shape375" draw:style-name="gr1" draw:text-style-name="P2" svg:width="0.1559in" svg:height="0.1287in" svg:x="2.1535in" svg:y="9.4457in">
        <draw:text-box>
          <text:p><text:span text:style-name="T1"><text:s text:c="3"/>2</text:span></text:p>
        </draw:text-box>
      </draw:frame>
      <draw:frame text:anchor-type="page" text:anchor-page-number="5" draw:z-index="1035" draw:name="Shape499" draw:style-name="gr1" draw:text-style-name="P2" svg:width="6.5768in" svg:height="0.1276in" svg:x="0.5201in" svg:y="7.9898in">
        <draw:text-box>
          <text:p><text:span text:style-name="T2">Le emissioni da processi produttivi, comprese quelle da apparecchiature di ventilazione dovrebbero essere controllate ai fini del rispetto</text:span></text:p>
        </draw:text-box>
      </draw:frame>
      <draw:frame text:anchor-type="page" text:anchor-page-number="4" draw:z-index="1034" draw:name="Shape374" draw:style-name="gr1" draw:text-style-name="P2" svg:width="0.2488in" svg:height="0.1287in" svg:x="1.5291in" svg:y="9.4457in">
        <draw:text-box>
          <text:p><text:span text:style-name="T1">ROU</text:span></text:p>
        </draw:text-box>
      </draw:frame>
      <draw:frame text:anchor-type="page" text:anchor-page-number="10" draw:z-index="1033" draw:name="Shape955" draw:style-name="gr1" draw:text-style-name="P2" svg:width="1.6071in" svg:height="0.1287in" svg:x="2.0807in" svg:y="8.7181in">
        <draw:text-box>
          <text:p><text:span text:style-name="T1">Applicazioni a spruzzo industriali</text:span></text:p>
        </draw:text-box>
      </draw:frame>
      <draw:frame text:anchor-type="page" text:anchor-page-number="10" draw:z-index="1032" draw:name="Shape954" draw:style-name="gr1" draw:text-style-name="P2" svg:width="0.3224in" svg:height="0.1287in" svg:x="0.6756in" svg:y="8.7181in">
        <draw:text-box>
          <text:p><text:span text:style-name="T3">PROC</text:span></text:p>
        </draw:text-box>
      </draw:frame>
      <draw:frame text:anchor-type="page" text:anchor-page-number="5" draw:z-index="1031" draw:name="Shape498" draw:style-name="gr1" draw:text-style-name="P2" svg:width="2.4079in" svg:height="0.1276in" svg:x="0.5201in" svg:y="7.8563in">
        <draw:text-box>
          <text:p><text:span text:style-name="T2">CONTROLLI DELL’ESPOSIZIONE AMBIENTALE</text:span></text:p>
        </draw:text-box>
      </draw:frame>
      <draw:frame text:anchor-type="page" text:anchor-page-number="4" draw:z-index="1030" draw:name="Shape373" draw:style-name="gr1" draw:text-style-name="P2" svg:width="0.1976in" svg:height="0.1287in" svg:x="0.6756in" svg:y="9.4457in">
        <draw:text-box>
          <text:p><text:span text:style-name="T1">TLV</text:span></text:p>
        </draw:text-box>
      </draw:frame>
      <draw:frame text:anchor-type="page" text:anchor-page-number="10" draw:z-index="1029" draw:name="Shape956" draw:style-name="gr1" draw:text-style-name="P2" svg:width="0.063in" svg:height="0.1276in" svg:x="1.061in" svg:y="8.7181in">
        <draw:text-box>
          <text:p><text:span text:style-name="T2">7</text:span></text:p>
        </draw:text-box>
      </draw:frame>
      <draw:frame text:anchor-type="page" text:anchor-page-number="5" draw:z-index="1028" draw:name="Shape497" draw:style-name="gr1" draw:text-style-name="P2" svg:width="5.6307in" svg:height="0.1276in" svg:x="0.5201in" svg:y="7.7217in">
        <draw:text-box>
          <text:p><text:span text:style-name="T2">EN 138). Per la corretta scelta del dispositivo di protezione delle vie respiratorie, fare riferimento alla norma EN 529.</text:span></text:p>
        </draw:text-box>
      </draw:frame>
      <draw:frame text:anchor-type="page" text:anchor-page-number="4" draw:z-index="1027" draw:name="Shape372" draw:style-name="gr1" draw:text-style-name="P2" svg:width="0.4098in" svg:height="0.1276in" svg:x="5.1917in" svg:y="9.3126in">
        <draw:text-box>
          <text:p><text:span text:style-name="T2">RESPIR</text:span></text:p>
        </draw:text-box>
      </draw:frame>
      <draw:frame text:anchor-type="page" text:anchor-page-number="10" draw:z-index="1026" draw:name="Shape952" draw:style-name="gr1" draw:text-style-name="P2" svg:width="2.348in" svg:height="0.1287in" svg:x="2.0807in" svg:y="8.5819in">
        <draw:text-box>
          <text:p><text:span text:style-name="T1">Miscelazione o mescolamento in processi a lotti</text:span></text:p>
        </draw:text-box>
      </draw:frame>
      <draw:frame text:anchor-type="page" text:anchor-page-number="5" draw:z-index="1025" draw:name="Shape496" draw:style-name="gr1" draw:text-style-name="P2" svg:width="6.8043in" svg:height="0.1276in" svg:x="0.5201in" svg:y="7.5839in">
        <draw:text-box>
          <text:p><text:span text:style-name="T2">indossare un autorespiratore ad aria compressa a circuito aperto (rif. norma EN 137) oppure un respiratore a presa d'aria esterna (rif. norma</text:span></text:p>
        </draw:text-box>
      </draw:frame>
      <draw:frame text:anchor-type="page" text:anchor-page-number="4" draw:z-index="1024" draw:name="Shape370" draw:style-name="gr1" draw:text-style-name="P2" svg:width="0.1559in" svg:height="0.1287in" svg:x="2.1535in" svg:y="9.3102in">
        <draw:text-box>
          <text:p><text:span text:style-name="T1"><text:s text:c="3"/>1</text:span></text:p>
        </draw:text-box>
      </draw:frame>
      <draw:frame text:anchor-type="page" text:anchor-page-number="10" draw:z-index="1023" draw:name="Shape951" draw:style-name="gr1" draw:text-style-name="P2" svg:width="0.3224in" svg:height="0.1287in" svg:x="0.6756in" svg:y="8.5819in">
        <draw:text-box>
          <text:p><text:span text:style-name="T3">PROC</text:span></text:p>
        </draw:text-box>
      </draw:frame>
      <draw:frame text:anchor-type="page" text:anchor-page-number="5" draw:z-index="1022" draw:name="Shape495" draw:style-name="gr1" draw:text-style-name="P2" svg:width="6.4461in" svg:height="0.1276in" svg:x="0.5201in" svg:y="7.4484in">
        <draw:text-box>
          <text:p><text:span text:style-name="T2">Nel caso in cui la sostanza considerata sia inodore o la sua soglia olfattiva sia superiore al relativo TLV-TWA e in caso di emergenza,</text:span></text:p>
        </draw:text-box>
      </draw:frame>
      <draw:frame text:anchor-type="page" text:anchor-page-number="4" draw:z-index="1021" draw:name="Shape369" draw:style-name="gr1" draw:text-style-name="P2" svg:width="0.224in" svg:height="0.1287in" svg:x="1.5291in" svg:y="9.3102in">
        <draw:text-box>
          <text:p><text:span text:style-name="T1">POL</text:span></text:p>
        </draw:text-box>
      </draw:frame>
      <draw:frame text:anchor-type="page" text:anchor-page-number="10" draw:z-index="1020" draw:name="Shape953" draw:style-name="gr1" draw:text-style-name="P2" svg:width="0.063in" svg:height="0.1276in" svg:x="1.061in" svg:y="8.5827in">
        <draw:text-box>
          <text:p><text:span text:style-name="T2">5</text:span></text:p>
        </draw:text-box>
      </draw:frame>
      <draw:frame text:anchor-type="page" text:anchor-page-number="5" draw:z-index="1019" draw:name="Shape494" draw:style-name="gr1" draw:text-style-name="P2" svg:width="4.9051in" svg:height="0.1276in" svg:x="0.5201in" svg:y="7.3154in">
        <draw:text-box>
          <text:p><text:span text:style-name="T2">(1, 2 o 3) dovrà essere scelta in relazione alla concentrazione limite di utilizzo. (rif. norma EN 14387).</text:span></text:p>
        </draw:text-box>
      </draw:frame>
      <draw:frame text:anchor-type="page" text:anchor-page-number="4" draw:z-index="1018" draw:name="Shape368" draw:style-name="gr1" draw:text-style-name="P2" svg:width="0.6441in" svg:height="0.1287in" svg:x="0.6756in" svg:y="9.3102in">
        <draw:text-box>
          <text:p><text:span text:style-name="T1">NDS/NDSCh</text:span></text:p>
        </draw:text-box>
      </draw:frame>
      <draw:frame text:anchor-type="page" text:anchor-page-number="10" draw:z-index="1017" draw:name="Shape949" draw:style-name="gr1" draw:text-style-name="P2" svg:width="2.2823in" svg:height="0.1287in" svg:x="2.0807in" svg:y="8.4472in">
        <draw:text-box>
          <text:p><text:span text:style-name="T1">Trattamento di articoli per immersione e colata</text:span></text:p>
        </draw:text-box>
      </draw:frame>
      <draw:frame text:anchor-type="page" text:anchor-page-number="4" draw:z-index="1016" draw:name="Shape367" draw:style-name="gr1" draw:text-style-name="P2" svg:width="0.3921in" svg:height="0.1276in" svg:x="5.1917in" svg:y="9.178in">
        <draw:text-box>
          <text:p><text:span text:style-name="T2">INALAB</text:span></text:p>
        </draw:text-box>
      </draw:frame>
      <draw:frame text:anchor-type="page" text:anchor-page-number="5" draw:z-index="1015" draw:name="Shape493" draw:style-name="gr1" draw:text-style-name="P2" svg:width="6.7835in" svg:height="0.1276in" svg:x="0.5201in" svg:y="7.1783in">
        <draw:text-box>
          <text:p><text:span text:style-name="T2">l’esposizione del lavoratore ai valori di soglia presi in considerazione. Si consiglia di indossare una maschera con filtro di tipo B la cui classe</text:span></text:p>
        </draw:text-box>
      </draw:frame>
      <draw:frame text:anchor-type="page" text:anchor-page-number="10" draw:z-index="1014" draw:name="Shape948" draw:style-name="gr1" draw:text-style-name="P2" svg:width="0.3224in" svg:height="0.1287in" svg:x="0.6756in" svg:y="8.4472in">
        <draw:text-box>
          <text:p><text:span text:style-name="T3">PROC</text:span></text:p>
        </draw:text-box>
      </draw:frame>
      <draw:frame text:anchor-type="page" text:anchor-page-number="4" draw:z-index="1013" draw:name="Shape365" draw:style-name="gr1" draw:text-style-name="P2" svg:width="0.1559in" svg:height="0.1287in" svg:x="2.1535in" svg:y="9.1752in">
        <draw:text-box>
          <text:p><text:span text:style-name="T1"><text:s text:c="3"/>4</text:span></text:p>
        </draw:text-box>
      </draw:frame>
      <draw:frame text:anchor-type="page" text:anchor-page-number="5" draw:z-index="1012" draw:name="Shape492" draw:style-name="gr1" draw:text-style-name="P2" svg:width="6.4587in" svg:height="0.1276in" svg:x="0.5201in" svg:y="7.0429in">
        <draw:text-box>
          <text:p><text:span text:style-name="T2">L’utilizzo di mezzi di protezione delle vie respiratorie è necessario in caso le misure tecniche adottate non siano sufficienti per limitare</text:span></text:p>
        </draw:text-box>
      </draw:frame>
      <draw:frame text:anchor-type="page" text:anchor-page-number="4" draw:z-index="1011" draw:name="Shape364" draw:style-name="gr1" draw:text-style-name="P2" svg:width="0.224in" svg:height="0.1287in" svg:x="1.5291in" svg:y="9.1752in">
        <draw:text-box>
          <text:p><text:span text:style-name="T1">POL</text:span></text:p>
        </draw:text-box>
      </draw:frame>
      <draw:frame text:anchor-type="page" text:anchor-page-number="10" draw:z-index="1010" draw:name="Shape950" draw:style-name="gr1" draw:text-style-name="P2" svg:width="0.124in" svg:height="0.1276in" svg:x="1.061in" svg:y="8.448in">
        <draw:text-box>
          <text:p><text:span text:style-name="T2">13</text:span></text:p>
        </draw:text-box>
      </draw:frame>
      <draw:frame text:anchor-type="page" text:anchor-page-number="5" draw:z-index="1009" draw:name="Shape491" draw:style-name="gr1" draw:text-style-name="P2" svg:width="1.5524in" svg:height="0.1276in" svg:x="0.5201in" svg:y="6.9098in">
        <draw:text-box>
          <text:p><text:span text:style-name="T2">PROTEZIONE RESPIRATORIA</text:span></text:p>
        </draw:text-box>
      </draw:frame>
      <draw:frame text:anchor-type="page" text:anchor-page-number="4" draw:z-index="1008" draw:name="Shape363" draw:style-name="gr1" draw:text-style-name="P2" svg:width="0.6441in" svg:height="0.1287in" svg:x="0.6756in" svg:y="9.1752in">
        <draw:text-box>
          <text:p><text:span text:style-name="T1">NDS/NDSCh</text:span></text:p>
        </draw:text-box>
      </draw:frame>
      <draw:frame text:anchor-type="page" text:anchor-page-number="10" draw:z-index="1007" draw:name="Shape946" draw:style-name="gr1" draw:text-style-name="P2" svg:width="1.824in" svg:height="0.1287in" svg:x="2.0807in" svg:y="8.3118in">
        <draw:text-box>
          <text:p><text:span text:style-name="T1">Applicazioni a spruzzo non industriali</text:span></text:p>
        </draw:text-box>
      </draw:frame>
      <draw:frame text:anchor-type="page" text:anchor-page-number="5" draw:z-index="1006" draw:name="Shape490" draw:style-name="gr1" draw:text-style-name="P2" svg:width="3.7705in" svg:height="0.1276in" svg:x="0.5201in" svg:y="6.7744in">
        <draw:text-box>
          <text:p><text:span text:style-name="T2">Si consiglia di indossare occhiali protettivi ermetici (rif. norma EN ISO 16321).</text:span></text:p>
        </draw:text-box>
      </draw:frame>
      <draw:frame text:anchor-type="page" text:anchor-page-number="5" draw:z-index="1005" draw:name="Shape489" draw:style-name="gr1" draw:text-style-name="P2" svg:width="1.4587in" svg:height="0.1276in" svg:x="0.5201in" svg:y="6.639in">
        <draw:text-box>
          <text:p><text:span text:style-name="T2">PROTEZIONE DEGLI OCCHI</text:span></text:p>
        </draw:text-box>
      </draw:frame>
      <draw:frame text:anchor-type="page" text:anchor-page-number="4" draw:z-index="1004" draw:name="Shape362" draw:style-name="gr1" draw:text-style-name="P2" svg:width="0.4098in" svg:height="0.1276in" svg:x="5.1917in" svg:y="9.0425in">
        <draw:text-box>
          <text:p><text:span text:style-name="T2">RESPIR</text:span></text:p>
        </draw:text-box>
      </draw:frame>
      <draw:frame text:anchor-type="page" text:anchor-page-number="10" draw:z-index="1003" draw:name="Shape945" draw:style-name="gr1" draw:text-style-name="P2" svg:width="0.3224in" svg:height="0.1287in" svg:x="0.6756in" svg:y="8.3118in">
        <draw:text-box>
          <text:p><text:span text:style-name="T3">PROC</text:span></text:p>
        </draw:text-box>
      </draw:frame>
      <draw:frame text:anchor-type="page" text:anchor-page-number="5" draw:z-index="1002" draw:name="Shape488" draw:style-name="gr1" draw:text-style-name="P2" svg:width="4.576in" svg:height="0.1276in" svg:x="0.5201in" svg:y="6.5035in">
        <draw:text-box>
          <text:p><text:span text:style-name="T2">norma EN ISO 20344). Lavarsi con acqua e sapone dopo aver rimosso gli indumenti protettivi.</text:span></text:p>
        </draw:text-box>
      </draw:frame>
      <draw:frame text:anchor-type="page" text:anchor-page-number="10" draw:z-index="1001" draw:name="Shape947" draw:style-name="gr1" draw:text-style-name="P2" svg:width="0.1157in" svg:height="0.1276in" svg:x="1.061in" svg:y="8.3126in">
        <draw:text-box>
          <text:p><text:span text:style-name="T2">11</text:span></text:p>
        </draw:text-box>
      </draw:frame>
      <draw:frame text:anchor-type="page" text:anchor-page-number="4" draw:z-index="1000" draw:name="Shape360" draw:style-name="gr1" draw:text-style-name="P2" svg:width="0.2177in" svg:height="0.1287in" svg:x="2.1535in" svg:y="9.0402in">
        <draw:text-box>
          <text:p><text:span text:style-name="T1">0.25</text:span></text:p>
        </draw:text-box>
      </draw:frame>
      <draw:frame text:anchor-type="page" text:anchor-page-number="5" draw:z-index="999" draw:name="Shape487" draw:style-name="gr1" draw:text-style-name="P2" svg:width="6.5768in" svg:height="0.1276in" svg:x="0.5201in" svg:y="6.3665in">
        <draw:text-box>
          <text:p><text:span text:style-name="T2">Indossare abiti da lavoro con maniche lunghe e calzature di sicurezza per uso professionale di categoria I (rif. Regolamento 2016/425 e</text:span></text:p>
        </draw:text-box>
      </draw:frame>
      <draw:frame text:anchor-type="page" text:anchor-page-number="4" draw:z-index="998" draw:name="Shape359" draw:style-name="gr1" draw:text-style-name="P2" svg:width="0.224in" svg:height="0.1287in" svg:x="1.5291in" svg:y="9.0402in">
        <draw:text-box>
          <text:p><text:span text:style-name="T1">NLD</text:span></text:p>
        </draw:text-box>
      </draw:frame>
      <draw:frame text:anchor-type="page" text:anchor-page-number="10" draw:z-index="997" draw:name="Shape943" draw:style-name="gr1" draw:text-style-name="P2" svg:width="1.5524in" svg:height="0.1287in" svg:x="2.0807in" svg:y="8.1772in">
        <draw:text-box>
          <text:p><text:span text:style-name="T1">Applicazione con rulli o pennelli</text:span></text:p>
        </draw:text-box>
      </draw:frame>
      <draw:frame text:anchor-type="page" text:anchor-page-number="10" draw:z-index="996" draw:name="Shape942" draw:style-name="gr1" draw:text-style-name="P2" svg:width="0.3224in" svg:height="0.1287in" svg:x="0.6756in" svg:y="8.1772in">
        <draw:text-box>
          <text:p><text:span text:style-name="T3">PROC</text:span></text:p>
        </draw:text-box>
      </draw:frame>
      <draw:frame text:anchor-type="page" text:anchor-page-number="5" draw:z-index="995" draw:name="Shape486" draw:style-name="gr1" draw:text-style-name="P2" svg:width="1.4594in" svg:height="0.1276in" svg:x="0.5201in" svg:y="6.2335in">
        <draw:text-box>
          <text:p><text:span text:style-name="T2">PROTEZIONE DELLA PELLE</text:span></text:p>
        </draw:text-box>
      </draw:frame>
      <draw:frame text:anchor-type="page" text:anchor-page-number="4" draw:z-index="994" draw:name="Shape358" draw:style-name="gr1" draw:text-style-name="P2" svg:width="0.2425in" svg:height="0.1287in" svg:x="0.6756in" svg:y="9.0402in">
        <draw:text-box>
          <text:p><text:span text:style-name="T1">TGG</text:span></text:p>
        </draw:text-box>
      </draw:frame>
      <draw:frame text:anchor-type="page" text:anchor-page-number="10" draw:z-index="993" draw:name="Shape944" draw:style-name="gr1" draw:text-style-name="P2" svg:width="0.124in" svg:height="0.1276in" svg:x="1.061in" svg:y="8.1772in">
        <draw:text-box>
          <text:p><text:span text:style-name="T2">10</text:span></text:p>
        </draw:text-box>
      </draw:frame>
      <draw:frame text:anchor-type="page" text:anchor-page-number="5" draw:z-index="992" draw:name="Shape485" draw:style-name="gr1" draw:text-style-name="P2" svg:width="4.5969in" svg:height="0.1287in" svg:x="0.5201in" svg:y="6.0957in">
        <draw:text-box>
          <text:p><text:span text:style-name="T1">La resistenza dei guanti dipende da vari fattori, come la temperatura ed altri fattori ambientali.</text:span></text:p>
        </draw:text-box>
      </draw:frame>
      <draw:frame text:anchor-type="page" text:anchor-page-number="4" draw:z-index="991" draw:name="Shape357" draw:style-name="gr1" draw:text-style-name="P2" svg:width="0.4098in" svg:height="0.1276in" svg:x="5.1917in" svg:y="8.9071in">
        <draw:text-box>
          <text:p><text:span text:style-name="T2">RESPIR</text:span></text:p>
        </draw:text-box>
      </draw:frame>
      <draw:frame text:anchor-type="page" text:anchor-page-number="10" draw:z-index="990" draw:name="Shape940" draw:style-name="gr1" draw:text-style-name="P2" svg:width="2.4717in" svg:height="0.1287in" svg:x="2.0807in" svg:y="8.0417in">
        <draw:text-box>
          <text:p><text:span text:style-name="T1">Rivestimenti e vernici, diluenti, soluzioni decapanti</text:span></text:p>
        </draw:text-box>
      </draw:frame>
      <draw:frame text:anchor-type="page" text:anchor-page-number="5" draw:z-index="989" draw:name="Shape484" draw:style-name="gr1" draw:text-style-name="P2" svg:width="1.5213in" svg:height="0.1287in" svg:x="0.5201in" svg:y="5.9602in">
        <draw:text-box>
          <text:p><text:span text:style-name="T1">Tempo di permeazione: 30 min</text:span></text:p>
        </draw:text-box>
      </draw:frame>
      <draw:frame text:anchor-type="page" text:anchor-page-number="4" draw:z-index="988" draw:name="Shape355" draw:style-name="gr1" draw:text-style-name="P2" svg:width="0.1559in" svg:height="0.1287in" svg:x="2.1535in" svg:y="8.9047in">
        <draw:text-box>
          <text:p><text:span text:style-name="T1"><text:s text:c="3"/>2</text:span></text:p>
        </draw:text-box>
      </draw:frame>
      <draw:frame text:anchor-type="page" text:anchor-page-number="10" draw:z-index="987" draw:name="Shape939" draw:style-name="gr1" draw:text-style-name="P2" svg:width="0.1559in" svg:height="0.1287in" svg:x="0.6756in" svg:y="8.0417in">
        <draw:text-box>
          <text:p><text:span text:style-name="T3">PC</text:span></text:p>
        </draw:text-box>
      </draw:frame>
      <draw:frame text:anchor-type="page" text:anchor-page-number="5" draw:z-index="986" draw:name="Shape483" draw:style-name="gr1" draw:text-style-name="P2" svg:width="4.8504in" svg:height="0.1287in" svg:x="0.5201in" svg:y="5.8256in">
        <draw:text-box>
          <text:p><text:span text:style-name="T1">Lo spessore dei guanti deve essere selezionato in base al tempo di permeazione minimo richiesto.</text:span></text:p>
        </draw:text-box>
      </draw:frame>
      <draw:frame text:anchor-type="page" text:anchor-page-number="4" draw:z-index="985" draw:name="Shape354" draw:style-name="gr1" draw:text-style-name="P2" svg:width="0.224in" svg:height="0.1287in" svg:x="1.5291in" svg:y="8.9047in">
        <draw:text-box>
          <text:p><text:span text:style-name="T1">ESP</text:span></text:p>
        </draw:text-box>
      </draw:frame>
      <draw:frame text:anchor-type="page" text:anchor-page-number="5" draw:z-index="984" draw:name="Shape482" draw:style-name="gr1" draw:text-style-name="P2" svg:width="0.9031in" svg:height="0.1287in" svg:x="0.5201in" svg:y="5.6902in">
        <draw:text-box>
          <text:p><text:span text:style-name="T1">Spessore: 0.3 mm</text:span></text:p>
        </draw:text-box>
      </draw:frame>
      <draw:frame text:anchor-type="page" text:anchor-page-number="10" draw:z-index="983" draw:name="Shape941" draw:style-name="gr1" draw:text-style-name="P2" svg:width="0.124in" svg:height="0.1276in" svg:x="1.061in" svg:y="8.0417in">
        <draw:text-box>
          <text:p><text:span text:style-name="T2">9a</text:span></text:p>
        </draw:text-box>
      </draw:frame>
      <draw:frame text:anchor-type="page" text:anchor-page-number="4" draw:z-index="982" draw:name="Shape353" draw:style-name="gr1" draw:text-style-name="P2" svg:width="0.2114in" svg:height="0.1287in" svg:x="0.6756in" svg:y="8.9047in">
        <draw:text-box>
          <text:p><text:span text:style-name="T1">VLA</text:span></text:p>
        </draw:text-box>
      </draw:frame>
      <draw:frame text:anchor-type="page" text:anchor-page-number="10" draw:z-index="981" draw:name="Shape937" draw:style-name="gr1" draw:text-style-name="P2" svg:width="2.5713in" svg:height="0.1287in" svg:x="2.0807in" svg:y="7.9063in">
        <draw:text-box>
          <text:p><text:span text:style-name="T1">Uso generalizzato da parte di operatori professionali</text:span></text:p>
        </draw:text-box>
      </draw:frame>
      <draw:frame text:anchor-type="page" text:anchor-page-number="4" draw:z-index="980" draw:name="Shape351" draw:style-name="gr1" draw:text-style-name="P2" svg:width="0.2177in" svg:height="0.1287in" svg:x="4.5665in" svg:y="8.7693in">
        <draw:text-box>
          <text:p><text:span text:style-name="T1">ppm</text:span></text:p>
        </draw:text-box>
      </draw:frame>
      <draw:frame text:anchor-type="page" text:anchor-page-number="5" draw:z-index="979" draw:name="Shape481" draw:style-name="gr1" draw:text-style-name="P2" svg:width="1.6315in" svg:height="0.1287in" svg:x="0.5201in" svg:y="5.5547in">
        <draw:text-box>
          <text:p><text:span text:style-name="T1">Materiale: Gomma nitrilica (NBR)</text:span></text:p>
        </draw:text-box>
      </draw:frame>
      <draw:frame text:anchor-type="page" text:anchor-page-number="1" draw:z-index="978" draw:name="Shape96" draw:style-name="gr1" draw:text-style-name="P2" svg:width="1.3913in" svg:height="0.1287in" svg:x="0.3744in" svg:y="10.5193in">
        <draw:text-box>
          <text:p><text:span text:style-name="T3">2.2. Elementi dell’etichetta</text:span></text:p>
        </draw:text-box>
      </draw:frame>
      <draw:frame text:anchor-type="page" text:anchor-page-number="4" draw:z-index="977" draw:name="Shape350" draw:style-name="gr1" draw:text-style-name="P2" svg:width="0.3413in" svg:height="0.1287in" svg:x="3.7972in" svg:y="8.7693in">
        <draw:text-box>
          <text:p><text:span text:style-name="T1">mg/m3</text:span></text:p>
        </draw:text-box>
      </draw:frame>
      <draw:frame text:anchor-type="page" text:anchor-page-number="10" draw:z-index="976" draw:name="Shape936" draw:style-name="gr1" draw:text-style-name="P2" svg:width="0.224in" svg:height="0.1287in" svg:x="0.6756in" svg:y="7.9063in">
        <draw:text-box>
          <text:p><text:span text:style-name="T3">LCS</text:span></text:p>
        </draw:text-box>
      </draw:frame>
      <draw:frame text:anchor-type="page" text:anchor-page-number="5" draw:z-index="975" draw:name="Shape480" draw:style-name="gr1" draw:text-style-name="P2" svg:width="2.7894in" svg:height="0.1276in" svg:x="0.5201in" svg:y="5.4201in">
        <draw:text-box>
          <text:p><text:span text:style-name="T2">Proteggere le mani con guanti del tipo indicato di seguito:</text:span></text:p>
        </draw:text-box>
      </draw:frame>
      <draw:frame text:anchor-type="page" text:anchor-page-number="10" draw:z-index="974" draw:name="Shape938" draw:style-name="gr1" draw:text-style-name="P2" svg:width="0.1787in" svg:height="0.1276in" svg:x="1.061in" svg:y="7.9071in">
        <draw:text-box>
          <text:p><text:span text:style-name="T2">PW</text:span></text:p>
        </draw:text-box>
      </draw:frame>
      <draw:frame text:anchor-type="page" text:anchor-page-number="5" draw:z-index="973" draw:name="Shape479" draw:style-name="gr1" draw:text-style-name="P2" svg:width="3.9606in" svg:height="0.1276in" svg:x="0.5201in" svg:y="5.2866in">
        <draw:text-box>
          <text:p><text:span text:style-name="T2">I guanti hanno un tempo di usura che dipende dalla durata e dalla modalità d’uso.</text:span></text:p>
        </draw:text-box>
      </draw:frame>
      <draw:frame text:anchor-type="page" text:anchor-page-number="4" draw:z-index="972" draw:name="Shape349" draw:style-name="gr1" draw:text-style-name="P2" svg:width="0.2177in" svg:height="0.1287in" svg:x="2.9339in" svg:y="8.7693in">
        <draw:text-box>
          <text:p><text:span text:style-name="T1">ppm</text:span></text:p>
        </draw:text-box>
      </draw:frame>
      <draw:frame text:anchor-type="page" text:anchor-page-number="1" draw:z-index="971" draw:name="Shape95" draw:style-name="gr1" draw:text-style-name="P2" svg:width="0.076in" svg:height="0.1287in" svg:x="2.8602in" svg:y="9.9764in">
        <draw:text-box>
          <text:p><text:span text:style-name="T1">--</text:span></text:p>
        </draw:text-box>
      </draw:frame>
      <draw:frame text:anchor-type="page" text:anchor-page-number="1" draw:z-index="970" draw:name="Shape94" draw:style-name="gr1" draw:text-style-name="P2" svg:width="1.9531in" svg:height="0.1287in" svg:x="0.5201in" svg:y="9.9764in">
        <draw:text-box>
          <text:p><text:span text:style-name="T1">Classificazione e indicazioni di pericolo:</text:span></text:p>
        </draw:text-box>
      </draw:frame>
      <draw:frame text:anchor-type="page" text:anchor-page-number="10" draw:z-index="969" draw:name="Shape934" draw:style-name="gr1" draw:text-style-name="P2" svg:width="0.6996in" svg:height="0.1287in" svg:x="2.0807in" svg:y="7.7709in">
        <draw:text-box>
          <text:p><text:span text:style-name="T1">Fabbricazione</text:span></text:p>
        </draw:text-box>
      </draw:frame>
      <draw:frame text:anchor-type="page" text:anchor-page-number="4" draw:z-index="968" draw:name="Shape348" draw:style-name="gr1" draw:text-style-name="P2" svg:width="0.3413in" svg:height="0.1287in" svg:x="2.1535in" svg:y="8.7693in">
        <draw:text-box>
          <text:p><text:span text:style-name="T1">mg/m3</text:span></text:p>
        </draw:text-box>
      </draw:frame>
      <draw:frame text:anchor-type="page" text:anchor-page-number="5" draw:z-index="967" draw:name="Shape478" draw:style-name="gr1" draw:text-style-name="P2" svg:width="6.7862in" svg:height="0.1276in" svg:x="0.5201in" svg:y="5.1492in">
        <draw:text-box>
          <text:p><text:span text:style-name="T2">Nel caso di preparati la resistenza dei guanti da lavoro agli agenti chimici deve essere verificata prima dell'utilizzo in quanto non prevedibile.</text:span></text:p>
        </draw:text-box>
      </draw:frame>
      <draw:frame text:anchor-type="page" text:anchor-page-number="4" draw:z-index="966" draw:name="Shape347" draw:style-name="gr1" draw:text-style-name="P2" svg:width="0.9594in" svg:height="0.1276in" svg:x="5.1917in" svg:y="8.6366in">
        <draw:text-box>
          <text:p><text:span text:style-name="T2">Note / Osservazioni</text:span></text:p>
        </draw:text-box>
      </draw:frame>
      <draw:frame text:anchor-type="page" text:anchor-page-number="1" draw:z-index="965" draw:name="Shape93" draw:style-name="gr1" draw:text-style-name="P2" svg:width="4.424in" svg:height="0.1287in" svg:x="0.5201in" svg:y="9.7075in">
        <draw:text-box>
          <text:p><text:span text:style-name="T1">dati di sicurezza con informazioni adeguate, in conformità al Regolamento (UE) 2020/878.</text:span></text:p>
        </draw:text-box>
      </draw:frame>
      <draw:frame text:anchor-type="page" text:anchor-page-number="5" draw:z-index="964" draw:name="Shape477" draw:style-name="gr1" draw:text-style-name="P2" svg:width="0.6661in" svg:height="0.1276in" svg:x="0.5201in" svg:y="5.0161in">
        <draw:text-box>
          <text:p><text:span text:style-name="T2">permeazione.</text:span></text:p>
        </draw:text-box>
      </draw:frame>
      <draw:frame text:anchor-type="page" text:anchor-page-number="10" draw:z-index="963" draw:name="Shape933" draw:style-name="gr1" draw:text-style-name="P2" svg:width="0.224in" svg:height="0.1287in" svg:x="0.6756in" svg:y="7.7709in">
        <draw:text-box>
          <text:p><text:span text:style-name="T3">LCS</text:span></text:p>
        </draw:text-box>
      </draw:frame>
      <draw:frame text:anchor-type="page" text:anchor-page-number="1" draw:z-index="962" draw:name="Shape92" draw:style-name="gr1" draw:text-style-name="P2" svg:width="6.7343in" svg:height="0.1287in" svg:x="0.5201in" svg:y="9.5709in">
        <draw:text-box>
          <text:p><text:span text:style-name="T1">Il prodotto, comunque, contenendo sostanze pericolose in concentrazione tale da essere dichiarate alla sezione n.3, richiede una scheda</text:span></text:p>
        </draw:text-box>
      </draw:frame>
      <draw:frame text:anchor-type="page" text:anchor-page-number="10" draw:z-index="961" draw:name="Shape935" draw:style-name="gr1" draw:text-style-name="P2" svg:width="0.0933in" svg:height="0.1276in" svg:x="1.061in" svg:y="7.7717in">
        <draw:text-box>
          <text:p><text:span text:style-name="T2">M</text:span></text:p>
        </draw:text-box>
      </draw:frame>
      <draw:frame text:anchor-type="page" text:anchor-page-number="4" draw:z-index="960" draw:name="Shape345" draw:style-name="gr1" draw:text-style-name="P2" svg:width="0.613in" svg:height="0.1287in" svg:x="3.7972in" svg:y="8.6339in">
        <draw:text-box>
          <text:p><text:span text:style-name="T1">STEL/15min</text:span></text:p>
        </draw:text-box>
      </draw:frame>
      <draw:frame text:anchor-type="page" text:anchor-page-number="5" draw:z-index="959" draw:name="Shape476" draw:style-name="gr1" draw:text-style-name="P2" svg:width="6.6614in" svg:height="0.1276in" svg:x="0.5201in" svg:y="4.8791in">
        <draw:text-box>
          <text:p><text:span text:style-name="T2">Per la scelta definitiva del materiale dei guanti da lavoro (rif. norma EN 374) si devono considerare: compatibilità, degradazione, tempo di</text:span></text:p>
        </draw:text-box>
      </draw:frame>
      <draw:frame text:anchor-type="page" text:anchor-page-number="5" draw:z-index="958" draw:name="Shape475" draw:style-name="gr1" draw:text-style-name="P2" svg:width="2.6976in" svg:height="0.1276in" svg:x="0.5201in" svg:y="4.7457in">
        <draw:text-box>
          <text:p><text:span text:style-name="T2">Proteggere le mani con guanti da lavoro di categoria III.</text:span></text:p>
        </draw:text-box>
      </draw:frame>
      <draw:frame text:anchor-type="page" text:anchor-page-number="4" draw:z-index="957" draw:name="Shape344" draw:style-name="gr1" draw:text-style-name="P2" svg:width="0.3988in" svg:height="0.1287in" svg:x="2.1535in" svg:y="8.6339in">
        <draw:text-box>
          <text:p><text:span text:style-name="T1">TWA/8h</text:span></text:p>
        </draw:text-box>
      </draw:frame>
      <draw:frame text:anchor-type="page" text:anchor-page-number="10" draw:z-index="956" draw:name="Shape931" draw:style-name="gr1" draw:text-style-name="P2" svg:width="1.2307in" svg:height="0.1287in" svg:x="2.0807in" svg:y="7.6362in">
        <draw:text-box>
          <text:p><text:span text:style-name="T1">Uso presso siti industriali</text:span></text:p>
        </draw:text-box>
      </draw:frame>
      <draw:frame text:anchor-type="page" text:anchor-page-number="1" draw:z-index="955" draw:name="Shape91" draw:style-name="gr1" draw:text-style-name="P2" svg:width="5.4614in" svg:height="0.1287in" svg:x="0.5201in" svg:y="9.4374in">
        <draw:text-box>
          <text:p><text:span text:style-name="T1">Il prodotto non è classificato pericoloso ai sensi delle disposizioni di cui al Regolamento (CE) 1272/2008 (CLP).</text:span></text:p>
        </draw:text-box>
      </draw:frame>
      <draw:frame text:anchor-type="page" text:anchor-page-number="2" draw:z-index="954" draw:name="Shape190" draw:style-name="gr1" draw:text-style-name="P2" svg:width="4.637in" svg:height="0.1276in" svg:x="0.5201in" svg:y="10.6654in">
        <draw:text-box>
          <text:p><text:span text:style-name="T2">In caso di dubbio o in presenza di sintomi contattare un medico e mostrargli questo documento.</text:span></text:p>
        </draw:text-box>
      </draw:frame>
      <draw:frame text:anchor-type="page" text:anchor-page-number="4" draw:z-index="953" draw:name="Shape343" draw:style-name="gr1" draw:text-style-name="P2" svg:width="0.2614in" svg:height="0.1287in" svg:x="1.5291in" svg:y="8.6339in">
        <draw:text-box>
          <text:p><text:span text:style-name="T1">Stato</text:span></text:p>
        </draw:text-box>
      </draw:frame>
      <draw:frame text:anchor-type="page" text:anchor-page-number="1" draw:z-index="952" draw:name="Shape90" draw:style-name="gr1" draw:text-style-name="P2" svg:width="2.6323in" svg:height="0.1287in" svg:x="0.3744in" svg:y="9.1665in">
        <draw:text-box>
          <text:p><text:span text:style-name="T3">2.1. Classificazione della sostanza o della miscela</text:span></text:p>
        </draw:text-box>
      </draw:frame>
      <draw:frame text:anchor-type="page" text:anchor-page-number="2" draw:z-index="951" draw:name="Shape189" draw:style-name="gr1" draw:text-style-name="P2" svg:width="4.9177in" svg:height="0.1276in" svg:x="0.5201in" svg:y="10.5299in">
        <draw:text-box>
          <text:p><text:span text:style-name="T2">pratiche di corretto comportamento in caso di contatto con un prodotto chimico anche non pericoloso.</text:span></text:p>
        </draw:text-box>
      </draw:frame>
      <draw:frame text:anchor-type="page" text:anchor-page-number="10" draw:z-index="950" draw:name="Shape930" draw:style-name="gr1" draw:text-style-name="P2" svg:width="0.224in" svg:height="0.1287in" svg:x="0.6756in" svg:y="7.6362in">
        <draw:text-box>
          <text:p><text:span text:style-name="T3">LCS</text:span></text:p>
        </draw:text-box>
      </draw:frame>
      <draw:frame text:anchor-type="page" text:anchor-page-number="5" draw:z-index="949" draw:name="Shape474" draw:style-name="gr1" draw:text-style-name="P2" svg:width="1.3976in" svg:height="0.1276in" svg:x="0.5201in" svg:y="4.6102in">
        <draw:text-box>
          <text:p><text:span text:style-name="T2">PROTEZIONE DELLE MANI</text:span></text:p>
        </draw:text-box>
      </draw:frame>
      <draw:frame text:anchor-type="page" text:anchor-page-number="5" draw:z-index="948" draw:name="Shape473" draw:style-name="gr1" draw:text-style-name="P2" svg:width="4.9488in" svg:height="0.1276in" svg:x="0.5201in" svg:y="4.4752in">
        <draw:text-box>
          <text:p><text:span text:style-name="T2">personali, assicurare una buona ventilazione nel luogo di lavoro tramite un'efficace aspirazione locale.</text:span></text:p>
        </draw:text-box>
      </draw:frame>
      <draw:frame text:anchor-type="page" text:anchor-page-number="1" draw:z-index="947" draw:name="Shape89" draw:style-name="gr1" draw:text-style-name="P2" svg:width="2.7949in" svg:height="0.1768in" svg:x="0.3744in" svg:y="8.8846in">
        <draw:text-box>
          <text:p><text:span text:style-name="T4">SEZIONE 2. Identificazione dei pericoli</text:span></text:p>
        </draw:text-box>
      </draw:frame>
      <draw:frame text:anchor-type="page" text:anchor-page-number="10" draw:z-index="946" draw:name="Shape932" draw:style-name="gr1" draw:text-style-name="P2" svg:width="0.1051in" svg:height="0.1276in" svg:x="1.061in" svg:y="7.6362in">
        <draw:text-box>
          <text:p><text:span text:style-name="T2">IS</text:span></text:p>
        </draw:text-box>
      </draw:frame>
      <draw:frame text:anchor-type="page" text:anchor-page-number="4" draw:z-index="945" draw:name="Shape342" draw:style-name="gr1" draw:text-style-name="P2" svg:width="0.2134in" svg:height="0.1287in" svg:x="0.6756in" svg:y="8.6339in">
        <draw:text-box>
          <text:p><text:span text:style-name="T1">Tipo</text:span></text:p>
        </draw:text-box>
      </draw:frame>
      <draw:frame text:anchor-type="page" text:anchor-page-number="2" draw:z-index="944" draw:name="Shape188" draw:style-name="gr1" draw:text-style-name="P2" svg:width="6.5197in" svg:height="0.1276in" svg:x="0.5201in" svg:y="10.3929in">
        <draw:text-box>
          <text:p><text:span text:style-name="T2">Non sono attesi effetti tali da richiedere l’attuazione di speciali misure di primo soccorso. Le informazioni che seguono sono indicazioni</text:span></text:p>
        </draw:text-box>
      </draw:frame>
      <draw:frame text:anchor-type="page" text:anchor-page-number="10" draw:z-index="943" draw:name="Shape928" draw:style-name="gr1" draw:text-style-name="P2" svg:width="1.4594in" svg:height="0.1287in" svg:x="2.0807in" svg:y="7.5008in">
        <draw:text-box>
          <text:p><text:span text:style-name="T1">Formulazione o reimballaggio</text:span></text:p>
        </draw:text-box>
      </draw:frame>
      <draw:frame text:anchor-type="page" text:anchor-page-number="5" draw:z-index="942" draw:name="Shape472" draw:style-name="gr1" draw:text-style-name="P2" svg:width="6.3717in" svg:height="0.1276in" svg:x="0.5201in" svg:y="4.3382in">
        <draw:text-box>
          <text:p><text:span text:style-name="T2">Considerato che l'utilizzo di misure tecniche adeguate dovrebbe sempre avere la priorità rispetto agli equipaggiamenti di protezione</text:span></text:p>
        </draw:text-box>
      </draw:frame>
      <draw:frame text:anchor-type="page" text:anchor-page-number="1" draw:z-index="941" draw:name="Shape86" draw:style-name="gr1" draw:text-style-name="P2" svg:width="2.8815in" svg:height="0.1287in" svg:x="3.0898in" svg:y="8.572in">
        <draw:text-box>
          <text:p><text:span text:style-name="T3">CAV Centro antiveleni Veneto - Verona Tel. 800.011.858</text:span></text:p>
        </draw:text-box>
      </draw:frame>
      <draw:frame text:anchor-type="page" text:anchor-page-number="4" draw:z-index="940" draw:name="Shape341" draw:style-name="gr1" draw:text-style-name="P2" svg:width="1.1378in" svg:height="0.1287in" svg:x="0.5201in" svg:y="8.5016in">
        <draw:text-box>
          <text:p><text:span text:style-name="T3">Valore limite di soglia</text:span></text:p>
        </draw:text-box>
      </draw:frame>
      <draw:frame text:anchor-type="page" text:anchor-page-number="2" draw:z-index="939" draw:name="Shape187" draw:style-name="gr1" draw:text-style-name="P2" svg:width="2.515in" svg:height="0.1287in" svg:x="0.3744in" svg:y="10.1244in">
        <draw:text-box>
          <text:p><text:span text:style-name="T3">4.1. Descrizione delle misure di primo soccorso</text:span></text:p>
        </draw:text-box>
      </draw:frame>
      <draw:frame text:anchor-type="page" text:anchor-page-number="4" draw:z-index="938" draw:name="Shape336" draw:style-name="gr1" draw:text-style-name="P2" svg:width="0.376in" svg:height="0.1287in" svg:x="3.8492in" svg:y="8.3638in">
        <draw:text-box>
          <text:p><text:span text:style-name="T3">TALCO</text:span></text:p>
        </draw:text-box>
      </draw:frame>
      <draw:frame text:anchor-type="page" text:anchor-page-number="10" draw:z-index="937" draw:name="Shape927" draw:style-name="gr1" draw:text-style-name="P2" svg:width="0.224in" svg:height="0.1287in" svg:x="0.6756in" svg:y="7.5008in">
        <draw:text-box>
          <text:p><text:span text:style-name="T3">LCS</text:span></text:p>
        </draw:text-box>
      </draw:frame>
      <draw:frame text:anchor-type="page" text:anchor-page-number="1" draw:z-index="936" draw:name="Shape85" draw:style-name="gr1" draw:text-style-name="P2" svg:width="3.8961in" svg:height="0.1287in" svg:x="3.0898in" svg:y="8.428in">
        <draw:text-box>
          <text:p><text:span text:style-name="T3">CAV Azienda Ospedaliera Papa Giovanni XXIII - Bergamo Tel. 800.88.33.00</text:span></text:p>
        </draw:text-box>
      </draw:frame>
      <draw:frame text:anchor-type="page" text:anchor-page-number="2" draw:z-index="935" draw:name="Shape186" draw:style-name="gr1" draw:text-style-name="P2" svg:width="2.7441in" svg:height="0.1768in" svg:x="0.3744in" svg:y="9.8425in">
        <draw:text-box>
          <text:p><text:span text:style-name="T4">SEZIONE 4. Misure di primo soccorso</text:span></text:p>
        </draw:text-box>
      </draw:frame>
      <draw:frame text:anchor-type="page" text:anchor-page-number="5" draw:z-index="934" draw:name="Shape471" draw:style-name="gr1" draw:text-style-name="P2" svg:width="1.5634in" svg:height="0.1287in" svg:x="0.3744in" svg:y="4.0689in">
        <draw:text-box>
          <text:p><text:span text:style-name="T3">8.2. Controlli dell’esposizione</text:span></text:p>
        </draw:text-box>
      </draw:frame>
      <draw:frame text:anchor-type="page" text:anchor-page-number="10" draw:z-index="933" draw:name="Shape929" draw:style-name="gr1" draw:text-style-name="P2" svg:width="0.0689in" svg:height="0.1276in" svg:x="1.061in" svg:y="7.5008in">
        <draw:text-box>
          <text:p><text:span text:style-name="T2">F</text:span></text:p>
        </draw:text-box>
      </draw:frame>
      <draw:frame text:anchor-type="page" text:anchor-page-number="2" draw:z-index="932" draw:name="Shape183" draw:style-name="gr1" draw:text-style-name="P2" svg:width="4.337in" svg:height="0.1287in" svg:x="0.5201in" svg:y="9.3957in">
        <draw:text-box>
          <text:p><text:span text:style-name="T1">Il testo completo delle indicazioni di pericolo (H) è riportato alla sezione 16 della scheda.</text:span></text:p>
        </draw:text-box>
      </draw:frame>
      <draw:frame text:anchor-type="page" text:anchor-page-number="5" draw:z-index="931" draw:name="Shape470" draw:style-name="gr1" draw:text-style-name="P2" svg:width="5.6787in" svg:height="0.1276in" svg:x="0.5201in" svg:y="3.7984in">
        <draw:text-box>
          <text:p><text:span text:style-name="T2">(C) = CEILING <text:s text:c="2"/>; <text:s text:c="2"/>INALAB = Frazione Inalabile <text:s text:c="2"/>; <text:s text:c="2"/>RESPIR = Frazione Respirabile <text:s text:c="2"/>; <text:s text:c="2"/>TORAC = Frazione Toracica.</text:span></text:p>
        </draw:text-box>
      </draw:frame>
      <draw:frame text:anchor-type="page" text:anchor-page-number="1" draw:z-index="930" draw:name="Shape84" draw:style-name="gr1" draw:text-style-name="P2" svg:width="2.9713in" svg:height="0.1287in" svg:x="3.0898in" svg:y="8.2827in">
        <draw:text-box>
          <text:p><text:span text:style-name="T3">CAV Ospedale Niguarda - Milano Tel. (+39) 02.66.1010.29</text:span></text:p>
        </draw:text-box>
      </draw:frame>
      <draw:frame text:anchor-type="page" text:anchor-page-number="4" draw:z-index="929" draw:name="Shape335" draw:style-name="gr1" draw:text-style-name="P2" svg:width="0.624in" svg:height="0.1276in" svg:x="2.6217in" svg:y="8.0937in">
        <draw:text-box>
          <text:p><text:span text:style-name="T2">ACGIH 2025</text:span></text:p>
        </draw:text-box>
      </draw:frame>
      <draw:frame text:anchor-type="page" text:anchor-page-number="5" draw:z-index="928" draw:name="Shape469" draw:style-name="gr1" draw:text-style-name="P2" svg:width="0.4594in" svg:height="0.1276in" svg:x="0.5201in" svg:y="3.6618in">
        <draw:text-box>
          <text:p><text:span text:style-name="T2">Legenda:</text:span></text:p>
        </draw:text-box>
      </draw:frame>
      <draw:frame text:anchor-type="page" text:anchor-page-number="2" draw:z-index="927" draw:name="Shape182" draw:style-name="gr1" draw:text-style-name="P2" svg:width="1.5205in" svg:height="0.1287in" svg:x="3.4846in" svg:y="9.1228in">
        <draw:text-box>
          <text:p><text:span text:style-name="T3">nebbie/polveri: 0.171 mg/l/4h</text:span></text:p>
        </draw:text-box>
      </draw:frame>
      <draw:frame text:anchor-type="page" text:anchor-page-number="1" draw:z-index="926" draw:name="Shape83" draw:style-name="gr1" draw:text-style-name="P2" svg:width="4.3276in" svg:height="0.1287in" svg:x="3.0898in" svg:y="8.1366in">
        <draw:text-box>
          <text:p><text:span text:style-name="T3">CAV Centro Nazionale di Informazione Tossicologica - Pavia Tel. (+39) 0382 24.444</text:span></text:p>
        </draw:text-box>
      </draw:frame>
      <draw:frame text:anchor-type="page" text:anchor-page-number="4" draw:z-index="925" draw:name="Shape334" draw:style-name="gr1" draw:text-style-name="P2" svg:width="0.3539in" svg:height="0.1287in" svg:x="1.5291in" svg:y="8.0929in">
        <draw:text-box>
          <text:p><text:span text:style-name="T1">ACGIH</text:span></text:p>
        </draw:text-box>
      </draw:frame>
      <draw:frame text:anchor-type="page" text:anchor-page-number="10" draw:z-index="924" draw:name="Shape925" draw:style-name="gr1" draw:text-style-name="P2" svg:width="0.798in" svg:height="0.1287in" svg:x="2.0807in" svg:y="7.3654in">
        <draw:text-box>
          <text:p><text:span text:style-name="T1">Uso al consumo</text:span></text:p>
        </draw:text-box>
      </draw:frame>
      <draw:frame text:anchor-type="page" text:anchor-page-number="1" draw:z-index="923" draw:name="Shape82" draw:style-name="gr1" draw:text-style-name="P2" svg:width="0.6815in" svg:height="0.1287in" svg:x="3.0898in" svg:y="7.9917in">
        <draw:text-box>
          <text:p><text:span text:style-name="T3">055.794.7819</text:span></text:p>
        </draw:text-box>
      </draw:frame>
      <draw:frame text:anchor-type="page" text:anchor-page-number="2" draw:z-index="922" draw:name="Shape180" draw:style-name="gr1" draw:text-style-name="P2" svg:width="3.5461in" svg:height="0.1287in" svg:x="3.4846in" svg:y="8.9882in">
        <draw:text-box>
          <text:p><text:span text:style-name="T3">STA Orale: 100 mg/kg, LD50 Cutanea: 87.12 mg/kg, LC50 Inalazione</text:span></text:p>
        </draw:text-box>
      </draw:frame>
      <draw:frame text:anchor-type="page" text:anchor-page-number="4" draw:z-index="921" draw:name="Shape333" draw:style-name="gr1" draw:text-style-name="P2" svg:width="2.9213in" svg:height="0.1276in" svg:x="2.6217in" svg:y="7.9583in">
        <draw:text-box>
          <text:p><text:span text:style-name="T2">EH40/2005 Workplace exposure limits (Fourth Edition 2020)</text:span></text:p>
        </draw:text-box>
      </draw:frame>
      <draw:frame text:anchor-type="page" text:anchor-page-number="10" draw:z-index="920" draw:name="Shape924" draw:style-name="gr1" draw:text-style-name="P2" svg:width="0.224in" svg:height="0.1287in" svg:x="0.6756in" svg:y="7.3654in">
        <draw:text-box>
          <text:p><text:span text:style-name="T3">LCS</text:span></text:p>
        </draw:text-box>
      </draw:frame>
      <draw:frame text:anchor-type="page" text:anchor-page-number="5" draw:z-index="919" draw:name="Shape467" draw:style-name="gr1" draw:text-style-name="P2" svg:width="0.4098in" svg:height="0.1276in" svg:x="5.1917in" svg:y="3.3929in">
        <draw:text-box>
          <text:p><text:span text:style-name="T2">RESPIR</text:span></text:p>
        </draw:text-box>
      </draw:frame>
      <draw:frame text:anchor-type="page" text:anchor-page-number="4" draw:z-index="918" draw:name="Shape332" draw:style-name="gr1" draw:text-style-name="P2" svg:width="0.7921in" svg:height="0.1287in" svg:x="1.5291in" svg:y="7.9583in">
        <draw:text-box>
          <text:p><text:span text:style-name="T1">United Kingdom</text:span></text:p>
        </draw:text-box>
      </draw:frame>
      <draw:frame text:anchor-type="page" text:anchor-page-number="1" draw:z-index="917" draw:name="Shape81" draw:style-name="gr1" draw:text-style-name="P2" svg:width="4.2614in" svg:height="0.1287in" svg:x="3.0898in" svg:y="7.8543in">
        <draw:text-box>
          <text:p><text:span text:style-name="T3">CAV Azienda Ospedaliera "Careggi" U.O. Tossicologia Medica - Firenze Tel. (+39)</text:span></text:p>
        </draw:text-box>
      </draw:frame>
      <draw:frame text:anchor-type="page" text:anchor-page-number="10" draw:z-index="916" draw:name="Shape926" draw:style-name="gr1" draw:text-style-name="P2" svg:width="0.0807in" svg:height="0.1276in" svg:x="1.061in" svg:y="7.3654in">
        <draw:text-box>
          <text:p><text:span text:style-name="T2">C</text:span></text:p>
        </draw:text-box>
      </draw:frame>
      <draw:frame text:anchor-type="page" text:anchor-page-number="2" draw:z-index="915" draw:name="Shape179" draw:style-name="gr1" draw:text-style-name="P2" svg:width="0.5697in" svg:height="0.1287in" svg:x="1.3008in" svg:y="8.9882in">
        <draw:text-box>
          <text:p><text:span text:style-name="T5">55965-84-9</text:span></text:p>
        </draw:text-box>
      </draw:frame>
      <draw:frame text:anchor-type="page" text:anchor-page-number="5" draw:z-index="914" draw:name="Shape465" draw:style-name="gr1" draw:text-style-name="P2" svg:width="0.1559in" svg:height="0.1287in" svg:x="2.1535in" svg:y="3.3909in">
        <draw:text-box>
          <text:p><text:span text:style-name="T1"><text:s text:c="3"/>3</text:span></text:p>
        </draw:text-box>
      </draw:frame>
      <draw:frame text:anchor-type="page" text:anchor-page-number="10" draw:z-index="913" draw:name="Shape923" draw:style-name="gr1" draw:text-style-name="P2" svg:width="1.1197in" svg:height="0.1287in" svg:x="2.0807in" svg:y="7.2299in">
        <draw:text-box>
          <text:p><text:span text:style-name="T1">articolo, uso in esterni)</text:span></text:p>
        </draw:text-box>
      </draw:frame>
      <draw:frame text:anchor-type="page" text:anchor-page-number="2" draw:z-index="912" draw:name="Shape181" draw:style-name="gr1" draw:text-style-name="P2" svg:width="0.2303in" svg:height="0.1287in" svg:x="0.5201in" svg:y="8.9898in">
        <draw:text-box>
          <text:p><text:span text:style-name="T5">CAS</text:span></text:p>
        </draw:text-box>
      </draw:frame>
      <draw:frame text:anchor-type="page" text:anchor-page-number="5" draw:z-index="911" draw:name="Shape464" draw:style-name="gr1" draw:text-style-name="P2" svg:width="0.3539in" svg:height="0.1287in" svg:x="0.6756in" svg:y="3.3909in">
        <draw:text-box>
          <text:p><text:span text:style-name="T1">ACGIH</text:span></text:p>
        </draw:text-box>
      </draw:frame>
      <draw:frame text:anchor-type="page" text:anchor-page-number="1" draw:z-index="910" draw:name="Shape80" draw:style-name="gr1" draw:text-style-name="P2" svg:width="3.0579in" svg:height="0.1287in" svg:x="3.0898in" svg:y="7.7102in">
        <draw:text-box>
          <text:p><text:span text:style-name="T3">CAV Policlinico "A. Gemelli" - Roma Tel. (+39) 06.305.4343</text:span></text:p>
        </draw:text-box>
      </draw:frame>
      <draw:frame text:anchor-type="page" text:anchor-page-number="4" draw:z-index="909" draw:name="Shape331" draw:style-name="gr1" draw:text-style-name="P2" svg:width="0.2425in" svg:height="0.1287in" svg:x="0.5201in" svg:y="7.9583in">
        <draw:text-box>
          <text:p><text:span text:style-name="T1">GBR</text:span></text:p>
        </draw:text-box>
      </draw:frame>
      <draw:frame text:anchor-type="page" text:anchor-page-number="4" draw:z-index="908" draw:name="Shape330" draw:style-name="gr1" draw:text-style-name="P2" svg:width="3.0634in" svg:height="0.1276in" svg:x="2.6217in" svg:y="7.8228in">
        <draw:text-box>
          <text:p><text:span text:style-name="T2">lucrătorilor împotriva riscurilor legate de expunerea la agenţi ca</text:span></text:p>
        </draw:text-box>
      </draw:frame>
      <draw:frame text:anchor-type="page" text:anchor-page-number="2" draw:z-index="907" draw:name="Shape178" draw:style-name="gr1" draw:text-style-name="P2" svg:width="0.2551in" svg:height="0.1287in" svg:x="3.4846in" svg:y="8.8528in">
        <draw:text-box>
          <text:p><text:span text:style-name="T3">0.6%</text:span></text:p>
        </draw:text-box>
      </draw:frame>
      <draw:frame text:anchor-type="page" text:anchor-page-number="1" draw:z-index="906" draw:name="Shape79" draw:style-name="gr1" draw:text-style-name="P2" svg:width="3.0949in" svg:height="0.1287in" svg:x="3.0898in" svg:y="7.5646in">
        <draw:text-box>
          <text:p><text:span text:style-name="T3">CAV Policlinico "Umberto I" - Roma Tel. (+39) 06.4997.8000</text:span></text:p>
        </draw:text-box>
      </draw:frame>
      <draw:frame text:anchor-type="page" text:anchor-page-number="5" draw:z-index="905" draw:name="Shape463" draw:style-name="gr1" draw:text-style-name="P2" svg:width="0.3921in" svg:height="0.1276in" svg:x="5.1917in" svg:y="3.2575in">
        <draw:text-box>
          <text:p><text:span text:style-name="T2">INALAB</text:span></text:p>
        </draw:text-box>
      </draw:frame>
      <draw:frame text:anchor-type="page" text:anchor-page-number="10" draw:z-index="904" draw:name="Shape921" draw:style-name="gr1" draw:text-style-name="P2" svg:width="5.2579in" svg:height="0.1287in" svg:x="2.0807in" svg:y="7.0945in">
        <draw:text-box>
          <text:p><text:span text:style-name="T1">Uso generalizzato di coadiuvanti tecnologici non reattivi (senza inclusione all’interno o sulla superficie di un</text:span></text:p>
        </draw:text-box>
      </draw:frame>
      <draw:frame text:anchor-type="page" text:anchor-page-number="10" draw:z-index="903" draw:name="Shape920" draw:style-name="gr1" draw:text-style-name="P2" svg:width="0.2362in" svg:height="0.1287in" svg:x="0.6756in" svg:y="7.0945in">
        <draw:text-box>
          <text:p><text:span text:style-name="T3">ERC</text:span></text:p>
        </draw:text-box>
      </draw:frame>
      <draw:frame text:anchor-type="page" text:anchor-page-number="2" draw:z-index="902" draw:name="Shape177" draw:style-name="gr1" draw:text-style-name="P2" svg:width="3.9323in" svg:height="0.1287in" svg:x="3.4846in" svg:y="8.7181in">
        <draw:text-box>
          <text:p><text:span text:style-name="T3">1A H317: ≥ 0.0015%, Eye Dam. 1 H318: ≥ 0.6%, Eye Irrit. 2 H319: ≥ 0.06% - &lt;</text:span></text:p>
        </draw:text-box>
      </draw:frame>
      <draw:frame text:anchor-type="page" text:anchor-page-number="4" draw:z-index="901" draw:name="Shape329" draw:style-name="gr1" draw:text-style-name="P2" svg:width="4.4051in" svg:height="0.1276in" svg:x="2.6217in" svg:y="7.6882in">
        <draw:text-box>
          <text:p><text:span text:style-name="T2">nr. 1.093/2006 privind stabilirea cerinţelor minime de securitate şi sănătate pentru protecţia</text:span></text:p>
        </draw:text-box>
      </draw:frame>
      <draw:frame text:anchor-type="page" text:anchor-page-number="1" draw:z-index="900" draw:name="Shape78" draw:style-name="gr1" draw:text-style-name="P2" svg:width="3.7949in" svg:height="0.1287in" svg:x="3.0898in" svg:y="7.4189in">
        <draw:text-box>
          <text:p><text:span text:style-name="T3">CAV "Azienda Ospedaliera A. Cardarelli" - Napoli Tel. (+39) 081.545.3333</text:span></text:p>
        </draw:text-box>
      </draw:frame>
      <draw:frame text:anchor-type="page" text:anchor-page-number="5" draw:z-index="899" draw:name="Shape461" draw:style-name="gr1" draw:text-style-name="P2" svg:width="0.187in" svg:height="0.1287in" svg:x="2.1535in" svg:y="3.2563in">
        <draw:text-box>
          <text:p><text:span text:style-name="T1"><text:s text:c="2"/>10</text:span></text:p>
        </draw:text-box>
      </draw:frame>
      <draw:frame text:anchor-type="page" text:anchor-page-number="10" draw:z-index="898" draw:name="Shape922" draw:style-name="gr1" draw:text-style-name="P2" svg:width="0.124in" svg:height="0.1276in" svg:x="1.061in" svg:y="7.0953in">
        <draw:text-box>
          <text:p><text:span text:style-name="T2">8d</text:span></text:p>
        </draw:text-box>
      </draw:frame>
      <draw:frame text:anchor-type="page" text:anchor-page-number="5" draw:z-index="897" draw:name="Shape460" draw:style-name="gr1" draw:text-style-name="P2" svg:width="0.3539in" svg:height="0.1287in" svg:x="0.6756in" svg:y="3.2563in">
        <draw:text-box>
          <text:p><text:span text:style-name="T1">ACGIH</text:span></text:p>
        </draw:text-box>
      </draw:frame>
      <draw:frame text:anchor-type="page" text:anchor-page-number="2" draw:z-index="896" draw:name="Shape175" draw:style-name="gr1" draw:text-style-name="P2" svg:width="3.8878in" svg:height="0.1287in" svg:x="3.4846in" svg:y="8.5819in">
        <draw:text-box>
          <text:p><text:span text:style-name="T3">Skin Corr. 1C H314: ≥ 0.6%, Skin Irrit. 2 H315: ≥ 0.06% - &lt; 0.6%, Skin Sens.</text:span></text:p>
        </draw:text-box>
      </draw:frame>
      <draw:frame text:anchor-type="page" text:anchor-page-number="4" draw:z-index="895" draw:name="Shape328" draw:style-name="gr1" draw:text-style-name="P2" svg:width="4.7343in" svg:height="0.1276in" svg:x="2.6217in" svg:y="7.5528in">
        <draw:text-box>
          <text:p><text:span text:style-name="T2">HOTĂRÂRE nr. 179 din 28 februarie 2024 pentru modificarea şi completarea Hotărârii Guvernului</text:span></text:p>
        </draw:text-box>
      </draw:frame>
      <draw:frame text:anchor-type="page" text:anchor-page-number="1" draw:z-index="894" draw:name="Shape77" draw:style-name="gr1" draw:text-style-name="P2" svg:width="3.876in" svg:height="0.1287in" svg:x="3.0898in" svg:y="7.2728in">
        <draw:text-box>
          <text:p><text:span text:style-name="T3">CAV "Azienda Ospedaliera Università di Foggia" - Foggia Tel. 800.183.459</text:span></text:p>
        </draw:text-box>
      </draw:frame>
      <draw:frame text:anchor-type="page" text:anchor-page-number="10" draw:z-index="893" draw:name="Shape918" draw:style-name="gr1" draw:text-style-name="P2" svg:width="3.4358in" svg:height="0.1287in" svg:x="2.0807in" svg:y="6.9598in">
        <draw:text-box>
          <text:p><text:span text:style-name="T1">Ampio uso dispersivo indoordi coadiuvanti tecnologici in sistemi aperti</text:span></text:p>
        </draw:text-box>
      </draw:frame>
      <draw:frame text:anchor-type="page" text:anchor-page-number="5" draw:z-index="892" draw:name="Shape459" draw:style-name="gr1" draw:text-style-name="P2" svg:width="0.3921in" svg:height="0.1276in" svg:x="5.1917in" svg:y="3.122in">
        <draw:text-box>
          <text:p><text:span text:style-name="T2">INALAB</text:span></text:p>
        </draw:text-box>
      </draw:frame>
      <draw:frame text:anchor-type="page" text:anchor-page-number="2" draw:z-index="891" draw:name="Shape176" draw:style-name="gr1" draw:text-style-name="P2" svg:width="0.1559in" svg:height="0.1287in" svg:x="0.5201in" svg:y="8.5839in">
        <draw:text-box>
          <text:p><text:span text:style-name="T5">CE</text:span></text:p>
        </draw:text-box>
      </draw:frame>
      <draw:frame text:anchor-type="page" text:anchor-page-number="1" draw:z-index="890" draw:name="Shape76" draw:style-name="gr1" draw:text-style-name="P2" svg:width="3.8051in" svg:height="0.1287in" svg:x="3.0898in" svg:y="7.128in">
        <draw:text-box>
          <text:p><text:span text:style-name="T3">CAV "Ospedale Pediatrico Bambino Gesù" Roma Tel. (+39) 06.6859.3726</text:span></text:p>
        </draw:text-box>
      </draw:frame>
      <draw:frame text:anchor-type="page" text:anchor-page-number="4" draw:z-index="889" draw:name="Shape327" draw:style-name="gr1" draw:text-style-name="P2" svg:width="0.4461in" svg:height="0.1287in" svg:x="1.5291in" svg:y="7.552in">
        <draw:text-box>
          <text:p><text:span text:style-name="T1">România</text:span></text:p>
        </draw:text-box>
      </draw:frame>
      <draw:frame text:anchor-type="page" text:anchor-page-number="4" draw:z-index="888" draw:name="Shape326" draw:style-name="gr1" draw:text-style-name="P2" svg:width="0.2488in" svg:height="0.1287in" svg:x="0.5201in" svg:y="7.552in">
        <draw:text-box>
          <text:p><text:span text:style-name="T1">ROU</text:span></text:p>
        </draw:text-box>
      </draw:frame>
      <draw:frame text:anchor-type="page" text:anchor-page-number="10" draw:z-index="887" draw:name="Shape917" draw:style-name="gr1" draw:text-style-name="P2" svg:width="0.2362in" svg:height="0.1287in" svg:x="0.6756in" svg:y="6.9598in">
        <draw:text-box>
          <text:p><text:span text:style-name="T3">ERC</text:span></text:p>
        </draw:text-box>
      </draw:frame>
      <draw:frame text:anchor-type="page" text:anchor-page-number="5" draw:z-index="886" draw:name="Shape457" draw:style-name="gr1" draw:text-style-name="P2" svg:width="0.187in" svg:height="0.1287in" svg:x="2.1535in" svg:y="3.1201in">
        <draw:text-box>
          <text:p><text:span text:style-name="T1"><text:s text:c="2"/>10</text:span></text:p>
        </draw:text-box>
      </draw:frame>
      <draw:frame text:anchor-type="page" text:anchor-page-number="2" draw:z-index="885" draw:name="Shape174" draw:style-name="gr1" draw:text-style-name="P2" svg:width="1.9421in" svg:height="0.1287in" svg:x="3.4846in" svg:y="8.4472in">
        <draw:text-box>
          <text:p><text:span text:style-name="T3">l'allegato VI del Regolamento CLP: B</text:span></text:p>
        </draw:text-box>
      </draw:frame>
      <draw:frame text:anchor-type="page" text:anchor-page-number="11" draw:z-index="884" draw:name="Shape1059" draw:style-name="gr1" draw:text-style-name="P2" svg:width="6.7295in" svg:height="0.1276in" svg:x="0.5201in" svg:y="10.5598in">
        <draw:text-box>
          <text:p><text:span text:style-name="T2">Le informazioni contenute in questa scheda si basano sulle conoscenze disponibili presso di noi alla data dell’ultima versione. L’utilizzatore</text:span></text:p>
        </draw:text-box>
      </draw:frame>
      <draw:frame text:anchor-type="page" text:anchor-page-number="1" draw:z-index="883" draw:name="Shape75" draw:style-name="gr1" draw:text-style-name="P2" svg:width="1.7433in" svg:height="0.1287in" svg:x="0.5201in" svg:y="7.128in">
        <draw:text-box>
          <text:p><text:span text:style-name="T1">Per informazioni urgenti rivolgersi a</text:span></text:p>
        </draw:text-box>
      </draw:frame>
      <draw:frame text:anchor-type="page" text:anchor-page-number="6" draw:z-index="882" draw:name="Shape611" draw:style-name="gr1" draw:text-style-name="P2" svg:width="1.3252in" svg:height="0.1276in" svg:x="0.5201in" svg:y="10.5299in">
        <draw:text-box>
          <text:p><text:span text:style-name="T2">Informazioni non disponibili</text:span></text:p>
        </draw:text-box>
      </draw:frame>
      <draw:frame text:anchor-type="page" text:anchor-page-number="5" draw:z-index="881" draw:name="Shape456" draw:style-name="gr1" draw:text-style-name="P2" svg:width="0.224in" svg:height="0.1287in" svg:x="1.5291in" svg:y="3.1201in">
        <draw:text-box>
          <text:p><text:span text:style-name="T1">POL</text:span></text:p>
        </draw:text-box>
      </draw:frame>
      <draw:frame text:anchor-type="page" text:anchor-page-number="6" draw:z-index="880" draw:name="Shape609" draw:style-name="gr1" draw:text-style-name="P2" svg:width="2.1976in" svg:height="0.1276in" svg:x="0.5201in" svg:y="10.2598in">
        <draw:text-box>
          <text:p><text:span text:style-name="T2">Informazioni sulle vie probabili di esposizione</text:span></text:p>
        </draw:text-box>
      </draw:frame>
      <draw:frame text:anchor-type="page" text:anchor-page-number="4" draw:z-index="879" draw:name="Shape325" draw:style-name="gr1" draw:text-style-name="P2" svg:width="3.1177in" svg:height="0.1276in" svg:x="2.6217in" svg:y="7.4173in">
        <draw:text-box>
          <text:p><text:span text:style-name="T2">natężeń czynników szkodliwych dla zdrowia w środowisku pracy</text:span></text:p>
        </draw:text-box>
      </draw:frame>
      <draw:frame text:anchor-type="page" text:anchor-page-number="1" draw:z-index="878" draw:name="Shape74" draw:style-name="gr1" draw:text-style-name="P2" svg:width="1.9343in" svg:height="0.1287in" svg:x="0.3744in" svg:y="6.8571in">
        <draw:text-box>
          <text:p><text:span text:style-name="T3">1.4. Numero telefonico di emergenza</text:span></text:p>
        </draw:text-box>
      </draw:frame>
      <draw:frame text:anchor-type="page" text:anchor-page-number="10" draw:z-index="877" draw:name="Shape919" draw:style-name="gr1" draw:text-style-name="P2" svg:width="0.124in" svg:height="0.1276in" svg:x="1.061in" svg:y="6.9598in">
        <draw:text-box>
          <text:p><text:span text:style-name="T2">8a</text:span></text:p>
        </draw:text-box>
      </draw:frame>
      <draw:frame text:anchor-type="page" text:anchor-page-number="2" draw:z-index="876" draw:name="Shape173" draw:style-name="gr1" draw:text-style-name="P2" svg:width="3.8453in" svg:height="0.1287in" svg:x="3.4846in" svg:y="8.3118in">
        <draw:text-box>
          <text:p><text:span text:style-name="T3">Aquatic Chronic 1 H410 M=100, EUH071, Nota di classificazione secondo</text:span></text:p>
        </draw:text-box>
      </draw:frame>
      <draw:frame text:anchor-type="page" text:anchor-page-number="11" draw:z-index="875" draw:name="Shape1058" draw:style-name="gr1" draw:text-style-name="P2" svg:width="1.0567in" svg:height="0.1276in" svg:x="0.5201in" svg:y="10.4256in">
        <draw:text-box>
          <text:p><text:span text:style-name="T2">Nota per l’utilizzatore:</text:span></text:p>
        </draw:text-box>
      </draw:frame>
      <draw:frame text:anchor-type="page" text:anchor-page-number="5" draw:z-index="874" draw:name="Shape455" draw:style-name="gr1" draw:text-style-name="P2" svg:width="0.6441in" svg:height="0.1287in" svg:x="0.6756in" svg:y="3.1201in">
        <draw:text-box>
          <text:p><text:span text:style-name="T1">NDS/NDSCh</text:span></text:p>
        </draw:text-box>
      </draw:frame>
      <draw:frame text:anchor-type="page" text:anchor-page-number="2" draw:z-index="873" draw:name="Shape172" draw:style-name="gr1" draw:text-style-name="P2" svg:width="3.9016in" svg:height="0.1287in" svg:x="3.4846in" svg:y="8.1772in">
        <draw:text-box>
          <text:p><text:span text:style-name="T3">H314, Eye Dam. 1 H318, Skin Sens. 1A H317, Aquatic Acute 1 H400 M=100,</text:span></text:p>
        </draw:text-box>
      </draw:frame>
      <draw:frame text:anchor-type="page" text:anchor-page-number="11" draw:z-index="872" draw:name="Shape1057" draw:style-name="gr1" draw:text-style-name="P2" svg:width="5.0571in" svg:height="0.1276in" svg:x="0.5201in" svg:y="10.0201in">
        <draw:text-box>
          <text:p><text:span text:style-name="T2">- Banca dati di modelli di SDS di sostanze chimiche - Ministero della Salute e Istituto Superiore di Sanità</text:span></text:p>
        </draw:text-box>
      </draw:frame>
      <draw:frame text:anchor-type="page" text:anchor-page-number="1" draw:z-index="871" draw:name="Shape73" draw:style-name="gr1" draw:text-style-name="P2" svg:width="0.913in" svg:height="0.1287in" svg:x="3.0898in" svg:y="6.5846in">
        <draw:text-box>
          <text:p><text:span text:style-name="T3">ITALMONT S.R.L.</text:span></text:p>
        </draw:text-box>
      </draw:frame>
      <draw:frame text:anchor-type="page" text:anchor-page-number="4" draw:z-index="870" draw:name="Shape324" draw:style-name="gr1" draw:text-style-name="P2" svg:width="4.5449in" svg:height="0.1276in" svg:x="2.6217in" svg:y="7.2819in">
        <draw:text-box>
          <text:p><text:span text:style-name="T2">czerwca 2024 r. zmieniające rozporządzenie w sprawie najwyższych dopuszczalnych stężeń i</text:span></text:p>
        </draw:text-box>
      </draw:frame>
      <draw:frame text:anchor-type="page" text:anchor-page-number="6" draw:z-index="869" draw:name="Shape608" draw:style-name="gr1" draw:text-style-name="P2" svg:width="1.3252in" svg:height="0.1276in" svg:x="0.5201in" svg:y="9.989in">
        <draw:text-box>
          <text:p><text:span text:style-name="T2">Informazioni non disponibili</text:span></text:p>
        </draw:text-box>
      </draw:frame>
      <draw:frame text:anchor-type="page" text:anchor-page-number="10" draw:z-index="868" draw:name="Shape915" draw:style-name="gr1" draw:text-style-name="P2" svg:width="1.2614in" svg:height="0.1287in" svg:x="2.0807in" svg:y="6.8244in">
        <draw:text-box>
          <text:p><text:span text:style-name="T1">Formulazione di preparati</text:span></text:p>
        </draw:text-box>
      </draw:frame>
      <draw:frame text:anchor-type="page" text:anchor-page-number="11" draw:z-index="867" draw:name="Shape1056" draw:style-name="gr1" draw:text-style-name="P2" svg:width="1.2685in" svg:height="0.1276in" svg:x="0.5201in" svg:y="9.8846in">
        <draw:text-box>
          <text:p><text:span text:style-name="T2">- Sito Web Agenzia ECHA</text:span></text:p>
        </draw:text-box>
      </draw:frame>
      <draw:frame text:anchor-type="page" text:anchor-page-number="2" draw:z-index="866" draw:name="Shape170" draw:style-name="gr1" draw:text-style-name="P2" svg:width="3.7232in" svg:height="0.1287in" svg:x="3.4846in" svg:y="8.0417in">
        <draw:text-box>
          <text:p><text:span text:style-name="T3">Acute Tox. 2 H310, Acute Tox. 2 H330, Acute Tox. 3 H301, Skin Corr. 1C</text:span></text:p>
        </draw:text-box>
      </draw:frame>
      <draw:frame text:anchor-type="page" text:anchor-page-number="8" draw:z-index="865" draw:name="Shape765" draw:style-name="gr1" draw:text-style-name="P2" svg:width="6.387in" svg:height="0.1276in" svg:x="0.5201in" svg:y="10.6654in">
        <draw:text-box>
          <text:p><text:span text:style-name="T2">Gli imballaggi contaminati devono essere inviati a recupero o smaltimento nel rispetto delle norme nazionali sulla gestione dei rifiuti.</text:span></text:p>
        </draw:text-box>
      </draw:frame>
      <draw:frame text:anchor-type="page" text:anchor-page-number="6" draw:z-index="864" draw:name="Shape606" draw:style-name="gr1" draw:text-style-name="P2" svg:width="3.1606in" svg:height="0.1276in" svg:x="0.5201in" svg:y="9.7189in">
        <draw:text-box>
          <text:p><text:span text:style-name="T2">Metabolismo, cinetica, meccanismo di azione e altre informazioni</text:span></text:p>
        </draw:text-box>
      </draw:frame>
      <draw:frame text:anchor-type="page" text:anchor-page-number="5" draw:z-index="863" draw:name="Shape453" draw:style-name="gr1" draw:text-style-name="P2" svg:width="0.187in" svg:height="0.1287in" svg:x="2.1535in" svg:y="2.9846in">
        <draw:text-box>
          <text:p><text:span text:style-name="T1"><text:s text:c="2"/>10</text:span></text:p>
        </draw:text-box>
      </draw:frame>
      <draw:frame text:anchor-type="page" text:anchor-page-number="10" draw:z-index="862" draw:name="Shape914" draw:style-name="gr1" draw:text-style-name="P2" svg:width="0.2362in" svg:height="0.1287in" svg:x="0.6756in" svg:y="6.8244in">
        <draw:text-box>
          <text:p><text:span text:style-name="T3">ERC</text:span></text:p>
        </draw:text-box>
      </draw:frame>
      <draw:frame text:anchor-type="page" text:anchor-page-number="4" draw:z-index="861" draw:name="Shape323" draw:style-name="gr1" draw:text-style-name="P2" svg:width="4.3205in" svg:height="0.1276in" svg:x="2.6217in" svg:y="7.1472in">
        <draw:text-box>
          <text:p><text:span text:style-name="T2">ROZPORZĄDZENIE MINISTRA RODZINY, PRACY I POLITYKI SPOŁECZNEJ z dnia 24</text:span></text:p>
        </draw:text-box>
      </draw:frame>
      <draw:frame text:anchor-type="page" text:anchor-page-number="1" draw:z-index="860" draw:name="Shape72" draw:style-name="gr1" draw:text-style-name="P2" svg:width="0.4776in" svg:height="0.1287in" svg:x="0.5201in" svg:y="6.5846in">
        <draw:text-box>
          <text:p><text:span text:style-name="T1">Fornitore:</text:span></text:p>
        </draw:text-box>
      </draw:frame>
      <draw:frame text:anchor-type="page" text:anchor-page-number="8" draw:z-index="859" draw:name="Shape764" draw:style-name="gr1" draw:text-style-name="P2" svg:width="1.4362in" svg:height="0.1276in" svg:x="0.5201in" svg:y="10.5299in">
        <draw:text-box>
          <text:p><text:span text:style-name="T2">IMBALLAGGI CONTAMINATI</text:span></text:p>
        </draw:text-box>
      </draw:frame>
      <draw:frame text:anchor-type="page" text:anchor-page-number="4" draw:z-index="858" draw:name="Shape322" draw:style-name="gr1" draw:text-style-name="P2" svg:width="0.335in" svg:height="0.1287in" svg:x="1.5291in" svg:y="7.1465in">
        <draw:text-box>
          <text:p><text:span text:style-name="T1">Polska</text:span></text:p>
        </draw:text-box>
      </draw:frame>
      <draw:frame text:anchor-type="page" text:anchor-page-number="6" draw:z-index="857" draw:name="Shape605" draw:style-name="gr1" draw:text-style-name="P2" svg:width="4.4476in" svg:height="0.1287in" svg:x="0.3744in" svg:y="9.448in">
        <draw:text-box>
          <text:p><text:span text:style-name="T3">11.1. Informazioni sulle classi di pericolo definite nel Regolamento (CE) n. 1272/2008</text:span></text:p>
        </draw:text-box>
      </draw:frame>
      <draw:frame text:anchor-type="page" text:anchor-page-number="2" draw:z-index="856" draw:name="Shape169" draw:style-name="gr1" draw:text-style-name="P2" svg:width="0.4031in" svg:height="0.1287in" svg:x="2.3098in" svg:y="8.0417in">
        <draw:text-box>
          <text:p><text:span text:style-name="T1">0.00148</text:span></text:p>
        </draw:text-box>
      </draw:frame>
      <draw:frame text:anchor-type="page" text:anchor-page-number="5" draw:z-index="855" draw:name="Shape452" draw:style-name="gr1" draw:text-style-name="P2" svg:width="0.224in" svg:height="0.1287in" svg:x="1.5291in" svg:y="2.9846in">
        <draw:text-box>
          <text:p><text:span text:style-name="T1">FRA</text:span></text:p>
        </draw:text-box>
      </draw:frame>
      <draw:frame text:anchor-type="page" text:anchor-page-number="11" draw:z-index="854" draw:name="Shape1055" draw:style-name="gr1" draw:text-style-name="P2" svg:width="1.1335in" svg:height="0.1276in" svg:x="0.5201in" svg:y="9.7492in">
        <draw:text-box>
          <text:p><text:span text:style-name="T2">- Sito Web IFA GESTIS</text:span></text:p>
        </draw:text-box>
      </draw:frame>
      <draw:frame text:anchor-type="page" text:anchor-page-number="10" draw:z-index="853" draw:name="Shape916" draw:style-name="gr1" draw:text-style-name="P2" svg:width="0.063in" svg:height="0.1276in" svg:x="1.061in" svg:y="6.8244in">
        <draw:text-box>
          <text:p><text:span text:style-name="T2">2</text:span></text:p>
        </draw:text-box>
      </draw:frame>
      <draw:frame text:anchor-type="page" text:anchor-page-number="1" draw:z-index="852" draw:name="Shape70" draw:style-name="gr1" draw:text-style-name="P2" svg:width="0.8449in" svg:height="0.1287in" svg:x="3.0898in" svg:y="6.3146in">
        <draw:text-box>
          <text:p><text:span text:style-name="T3">info@italmont.it</text:span></text:p>
        </draw:text-box>
      </draw:frame>
      <draw:frame text:anchor-type="page" text:anchor-page-number="8" draw:z-index="851" draw:name="Shape763" draw:style-name="gr1" draw:text-style-name="P2" svg:width="4.2248in" svg:height="0.1276in" svg:x="0.5201in" svg:y="10.3953in">
        <draw:text-box>
          <text:p><text:span text:style-name="T2">sicurezza sul lavoro. Si veda la sezione 8 per l'eventuale necessità di dotazione di DPI.</text:span></text:p>
        </draw:text-box>
      </draw:frame>
      <draw:frame text:anchor-type="page" text:anchor-page-number="2" draw:z-index="850" draw:name="Shape168" draw:style-name="gr1" draw:text-style-name="P2" svg:width="0.6689in" svg:height="0.1287in" svg:x="1.3008in" svg:y="8.0417in">
        <draw:text-box>
          <text:p><text:span text:style-name="T5">613-167-00-5</text:span></text:p>
        </draw:text-box>
      </draw:frame>
      <draw:frame text:anchor-type="page" text:anchor-page-number="11" draw:z-index="849" draw:name="Shape1054" draw:style-name="gr1" draw:text-style-name="P2" svg:width="3.4539in" svg:height="0.1276in" svg:x="0.5201in" svg:y="9.6146in">
        <draw:text-box>
          <text:p><text:span text:style-name="T2">- N.I. Sax - Dangerous properties of Industrial Materials-7, 1989 Edition</text:span></text:p>
        </draw:text-box>
      </draw:frame>
      <draw:frame text:anchor-type="page" text:anchor-page-number="5" draw:z-index="848" draw:name="Shape451" draw:style-name="gr1" draw:text-style-name="P2" svg:width="0.2858in" svg:height="0.1287in" svg:x="0.6756in" svg:y="2.9846in">
        <draw:text-box>
          <text:p><text:span text:style-name="T1">VLEP</text:span></text:p>
        </draw:text-box>
      </draw:frame>
      <draw:frame text:anchor-type="page" text:anchor-page-number="10" draw:z-index="847" draw:name="Shape913" draw:style-name="gr1" draw:text-style-name="P2" svg:width="1.6606in" svg:height="0.1276in" svg:x="0.5201in" svg:y="6.6898in">
        <draw:text-box>
          <text:p><text:span text:style-name="T2">Decodifica dei descrittori degli usi:</text:span></text:p>
        </draw:text-box>
      </draw:frame>
      <draw:frame text:anchor-type="page" text:anchor-page-number="6" draw:z-index="846" draw:name="Shape604" draw:style-name="gr1" draw:text-style-name="P2" svg:width="1.8012in" svg:height="0.1276in" svg:x="0.5201in" svg:y="9.178in">
        <draw:text-box>
          <text:p><text:span text:style-name="T2">derivanti dall’esposizione al prodotto.</text:span></text:p>
        </draw:text-box>
      </draw:frame>
      <draw:frame text:anchor-type="page" text:anchor-page-number="4" draw:z-index="845" draw:name="Shape321" draw:style-name="gr1" draw:text-style-name="P2" svg:width="0.224in" svg:height="0.1287in" svg:x="0.5201in" svg:y="7.1465in">
        <draw:text-box>
          <text:p><text:span text:style-name="T1">POL</text:span></text:p>
        </draw:text-box>
      </draw:frame>
      <draw:frame text:anchor-type="page" text:anchor-page-number="1" draw:z-index="844" draw:name="Shape71" draw:style-name="gr1" draw:text-style-name="P2" svg:width="2.1142in" svg:height="0.1287in" svg:x="0.5201in" svg:y="6.3161in">
        <draw:text-box>
          <text:p><text:span text:style-name="T1">responsabile della scheda dati di sicurezza</text:span></text:p>
        </draw:text-box>
      </draw:frame>
      <draw:frame text:anchor-type="page" text:anchor-page-number="7" draw:z-index="843" draw:name="Shape688" draw:style-name="gr1" draw:text-style-name="P2" svg:width="3.3441in" svg:height="0.1276in" svg:x="0.5201in" svg:y="10.2902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8" draw:z-index="842" draw:name="Shape762" draw:style-name="gr1" draw:text-style-name="P2" svg:width="6.6587in" svg:height="0.1276in" svg:x="0.5201in" svg:y="10.2575in">
        <draw:text-box>
          <text:p><text:span text:style-name="T2">La gestione dei rifiuti originati dall'uso o dalla dispersione di questo prodotto deve essere organizzata nel rispetto delle norme relative alla</text:span></text:p>
        </draw:text-box>
      </draw:frame>
      <draw:frame text:anchor-type="page" text:anchor-page-number="6" draw:z-index="841" draw:name="Shape603" draw:style-name="gr1" draw:text-style-name="P2" svg:width="6.6413in" svg:height="0.1276in" svg:x="0.5201in" svg:y="9.0402in">
        <draw:text-box>
          <text:p><text:span text:style-name="T2">Considerare perciò la concentrazione delle singole sostanze pericolose eventualmente citate in sez. 3, per valutare gli effetti tossicologici</text:span></text:p>
        </draw:text-box>
      </draw:frame>
      <draw:frame text:anchor-type="page" text:anchor-page-number="2" draw:z-index="840" draw:name="Shape171" draw:style-name="gr1" draw:text-style-name="P2" svg:width="0.3413in" svg:height="0.1287in" svg:x="0.5201in" svg:y="8.0429in">
        <draw:text-box>
          <text:p><text:span text:style-name="T5">INDEX</text:span></text:p>
        </draw:text-box>
      </draw:frame>
      <draw:frame text:anchor-type="page" text:anchor-page-number="7" draw:z-index="839" draw:name="Shape686" draw:style-name="gr1" draw:text-style-name="P2" svg:width="1.9531in" svg:height="0.1276in" svg:x="0.5201in" svg:y="10.0201in">
        <draw:text-box>
          <text:p><text:span text:style-name="T2">PERICOLO IN CASO DI ASPIRAZIONE</text:span></text:p>
        </draw:text-box>
      </draw:frame>
      <draw:frame text:anchor-type="page" text:anchor-page-number="4" draw:z-index="838" draw:name="Shape320" draw:style-name="gr1" draw:text-style-name="P2" svg:width="1.7642in" svg:height="0.1276in" svg:x="2.6217in" svg:y="7.0118in">
        <draw:text-box>
          <text:p><text:span text:style-name="T2">implementatie vanRichtlijn 2022/431</text:span></text:p>
        </draw:text-box>
      </draw:frame>
      <draw:frame text:anchor-type="page" text:anchor-page-number="10" draw:z-index="837" draw:name="Shape912" draw:style-name="gr1" draw:text-style-name="P2" svg:width="2.3858in" svg:height="0.1287in" svg:x="2.0807in" svg:y="6.4189in">
        <draw:text-box>
          <text:p><text:span text:style-name="T1">Scheda dati di sicurezza disponibile su richiesta.</text:span></text:p>
        </draw:text-box>
      </draw:frame>
      <draw:frame text:anchor-type="page" text:anchor-page-number="5" draw:z-index="836" draw:name="Shape449" draw:style-name="gr1" draw:text-style-name="P2" svg:width="0.2177in" svg:height="0.1287in" svg:x="4.5665in" svg:y="2.85in">
        <draw:text-box>
          <text:p><text:span text:style-name="T1">ppm</text:span></text:p>
        </draw:text-box>
      </draw:frame>
      <draw:frame text:anchor-type="page" text:anchor-page-number="1" draw:z-index="835" draw:name="Shape69" draw:style-name="gr1" draw:text-style-name="P2" svg:width="1.6449in" svg:height="0.1287in" svg:x="0.5201in" svg:y="6.1811in">
        <draw:text-box>
          <text:p><text:span text:style-name="T1">e-mail della persona competente,</text:span></text:p>
        </draw:text-box>
      </draw:frame>
      <draw:frame text:anchor-type="page" text:anchor-page-number="11" draw:z-index="834" draw:name="Shape1053" draw:style-name="gr1" draw:text-style-name="P2" svg:width="2.0488in" svg:height="0.1276in" svg:x="0.5201in" svg:y="9.4791in">
        <draw:text-box>
          <text:p><text:span text:style-name="T2">- Patty - Industrial Hygiene and Toxicology</text:span></text:p>
        </draw:text-box>
      </draw:frame>
      <draw:frame text:anchor-type="page" text:anchor-page-number="4" draw:z-index="833" draw:name="Shape319" draw:style-name="gr1" draw:text-style-name="P2" svg:width="4.3634in" svg:height="0.1276in" svg:x="2.6217in" svg:y="6.8764in">
        <draw:text-box>
          <text:p><text:span text:style-name="T2">2024-0000092805, tot wijziging van deArbeidsomstandighedenregeling in verband met de</text:span></text:p>
        </draw:text-box>
      </draw:frame>
      <draw:frame text:anchor-type="page" text:anchor-page-number="7" draw:z-index="832" draw:name="Shape685" draw:style-name="gr1" draw:text-style-name="P2" svg:width="3.3441in" svg:height="0.1276in" svg:x="0.5201in" svg:y="9.7492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11" draw:z-index="831" draw:name="Shape1052" draw:style-name="gr1" draw:text-style-name="P2" svg:width="2.3898in" svg:height="0.1276in" svg:x="0.5201in" svg:y="9.3437in">
        <draw:text-box>
          <text:p><text:span text:style-name="T2">- INRS - Fiche Toxicologique (toxicological sheet)</text:span></text:p>
        </draw:text-box>
      </draw:frame>
      <draw:frame text:anchor-type="page" text:anchor-page-number="5" draw:z-index="830" draw:name="Shape448" draw:style-name="gr1" draw:text-style-name="P2" svg:width="0.3413in" svg:height="0.1287in" svg:x="3.7972in" svg:y="2.85in">
        <draw:text-box>
          <text:p><text:span text:style-name="T1">mg/m3</text:span></text:p>
        </draw:text-box>
      </draw:frame>
      <draw:frame text:anchor-type="page" text:anchor-page-number="10" draw:z-index="829" draw:name="Shape911" draw:style-name="gr1" draw:text-style-name="P2" svg:width="0.4217in" svg:height="0.1287in" svg:x="0.6756in" svg:y="6.4189in">
        <draw:text-box>
          <text:p><text:span text:style-name="T3">EUH210</text:span></text:p>
        </draw:text-box>
      </draw:frame>
      <draw:frame text:anchor-type="page" text:anchor-page-number="2" draw:z-index="828" draw:name="Shape167" draw:style-name="gr1" draw:text-style-name="P2" svg:width="5.5224in" svg:height="0.1287in" svg:x="0.5201in" svg:y="7.9063in">
        <draw:text-box>
          <text:p><text:span text:style-name="T3">MASSA DI REAZIONE DI 5-CLORO-2- METIL-2H-ISOTIAZOL-3-ONE E 2-METIL-2H-ISOTIAZOL-3-ONE (3:1)</text:span></text:p>
        </draw:text-box>
      </draw:frame>
      <draw:frame text:anchor-type="page" text:anchor-page-number="6" draw:z-index="827" draw:name="Shape602" draw:style-name="gr1" draw:text-style-name="P2" svg:width="5.6004in" svg:height="0.1276in" svg:x="0.5201in" svg:y="8.9071in">
        <draw:text-box>
          <text:p><text:span text:style-name="T2">alle proprietà delle sostanze contenute, secondo i criteri previsti dalla normativa di riferimento per la classificazione.</text:span></text:p>
        </draw:text-box>
      </draw:frame>
      <draw:frame text:anchor-type="page" text:anchor-page-number="1" draw:z-index="826" draw:name="Shape67" draw:style-name="gr1" draw:text-style-name="P2" svg:width="0.8697in" svg:height="0.1287in" svg:x="3.7972in" svg:y="6.0437in">
        <draw:text-box>
          <text:p><text:span text:style-name="T3">+39 0736 899489</text:span></text:p>
        </draw:text-box>
      </draw:frame>
      <draw:frame text:anchor-type="page" text:anchor-page-number="8" draw:z-index="825" draw:name="Shape761" draw:style-name="gr1" draw:text-style-name="P2" svg:width="1.0689in" svg:height="0.1276in" svg:x="0.5201in" svg:y="10.1244in">
        <draw:text-box>
          <text:p><text:span text:style-name="T2">eventualmente locale.</text:span></text:p>
        </draw:text-box>
      </draw:frame>
      <draw:frame text:anchor-type="page" text:anchor-page-number="3" draw:z-index="824" draw:name="Shape262" draw:style-name="gr1" draw:text-style-name="P2" svg:width="4.485in" svg:height="0.1276in" svg:x="0.5201in" svg:y="10.6654in">
        <draw:text-box>
          <text:p><text:span text:style-name="T2">Impedire che il prodotto penetri nelle fognature, nelle acque superficiali, nelle falde freatiche.</text:span></text:p>
        </draw:text-box>
      </draw:frame>
      <draw:frame text:anchor-type="page" text:anchor-page-number="2" draw:z-index="823" draw:name="Shape165" draw:style-name="gr1" draw:text-style-name="P2" svg:width="0.5697in" svg:height="0.1287in" svg:x="1.3008in" svg:y="7.7709in">
        <draw:text-box>
          <text:p><text:span text:style-name="T5">14807-96-6</text:span></text:p>
        </draw:text-box>
      </draw:frame>
      <draw:frame text:anchor-type="page" text:anchor-page-number="11" draw:z-index="822" draw:name="Shape1051" draw:style-name="gr1" draw:text-style-name="P2" svg:width="1.3307in" svg:height="0.1276in" svg:x="0.5201in" svg:y="9.2083in">
        <draw:text-box>
          <text:p><text:span text:style-name="T2">- Handling Chemical Safety</text:span></text:p>
        </draw:text-box>
      </draw:frame>
      <draw:frame text:anchor-type="page" text:anchor-page-number="4" draw:z-index="821" draw:name="Shape318" draw:style-name="gr1" draw:text-style-name="P2" svg:width="4.1717in" svg:height="0.1276in" svg:x="2.6217in" svg:y="6.7417in">
        <draw:text-box>
          <text:p><text:span text:style-name="T2">Regeling van de Minister van Sociale Zaken en Werkgelegenheid van 13 mei2024, nr.</text:span></text:p>
        </draw:text-box>
      </draw:frame>
      <draw:frame text:anchor-type="page" text:anchor-page-number="1" draw:z-index="820" draw:name="Shape68" draw:style-name="gr1" draw:text-style-name="P2" svg:width="0.1622in" svg:height="0.1287in" svg:x="3.0898in" svg:y="6.0457in">
        <draw:text-box>
          <text:p><text:span text:style-name="T3">fax</text:span></text:p>
        </draw:text-box>
      </draw:frame>
      <draw:frame text:anchor-type="page" text:anchor-page-number="7" draw:z-index="819" draw:name="Shape683" draw:style-name="gr1" draw:text-style-name="P2" svg:width="4.3669in" svg:height="0.1276in" svg:x="0.5201in" svg:y="9.4791in">
        <draw:text-box>
          <text:p><text:span text:style-name="T2">TOSSICITÀ SPECIFICA PER ORGANI BERSAGLIO (STOT) - ESPOSIZIONE RIPETUTA</text:span></text:p>
        </draw:text-box>
      </draw:frame>
      <draw:frame text:anchor-type="page" text:anchor-page-number="6" draw:z-index="818" draw:name="Shape601" draw:style-name="gr1" draw:text-style-name="P2" svg:width="6.6677in" svg:height="0.1276in" svg:x="0.5201in" svg:y="8.7701in">
        <draw:text-box>
          <text:p><text:span text:style-name="T2">In mancanza di dati tossicologici sperimentali sul prodotto stesso, gli eventuali pericoli del prodotto per la salute sono stati valutati in base</text:span></text:p>
        </draw:text-box>
      </draw:frame>
      <draw:frame text:anchor-type="page" text:anchor-page-number="5" draw:z-index="817" draw:name="Shape447" draw:style-name="gr1" draw:text-style-name="P2" svg:width="0.2177in" svg:height="0.1287in" svg:x="2.9339in" svg:y="2.85in">
        <draw:text-box>
          <text:p><text:span text:style-name="T1">ppm</text:span></text:p>
        </draw:text-box>
      </draw:frame>
      <draw:frame text:anchor-type="page" text:anchor-page-number="8" draw:z-index="816" draw:name="Shape760" draw:style-name="gr1" draw:text-style-name="P2" svg:width="6.1843in" svg:height="0.1276in" svg:x="0.5201in" svg:y="9.9866in">
        <draw:text-box>
          <text:p><text:span text:style-name="T2">Lo smaltimento deve essere affidato ad una società autorizzata alla gestione dei rifiuti, nel rispetto della normativa nazionale ed</text:span></text:p>
        </draw:text-box>
      </draw:frame>
      <draw:frame text:anchor-type="page" text:anchor-page-number="10" draw:z-index="815" draw:name="Shape910" draw:style-name="gr1" draw:text-style-name="P2" svg:width="1.5768in" svg:height="0.1287in" svg:x="2.0807in" svg:y="6.2835in">
        <draw:text-box>
          <text:p><text:span text:style-name="T1">Corrosivo per le vie respiratorie.</text:span></text:p>
        </draw:text-box>
      </draw:frame>
      <draw:frame text:anchor-type="page" text:anchor-page-number="11" draw:z-index="814" draw:name="Shape1050" draw:style-name="gr1" draw:text-style-name="P2" svg:width="1.5913in" svg:height="0.1276in" svg:x="0.5201in" svg:y="9.0736in">
        <draw:text-box>
          <text:p><text:span text:style-name="T2">- The Merck Index. - 10th Edition</text:span></text:p>
        </draw:text-box>
      </draw:frame>
      <draw:frame text:anchor-type="page" text:anchor-page-number="9" draw:z-index="813" draw:name="Shape836" draw:style-name="gr1" draw:text-style-name="P2" svg:width="2.5031in" svg:height="0.1287in" svg:x="0.5201in" svg:y="10.6634in">
        <draw:text-box>
          <text:p><text:span text:style-name="T1">Sostanze soggette alla Convenzione di Stoccolma:</text:span></text:p>
        </draw:text-box>
      </draw:frame>
      <draw:frame text:anchor-type="page" text:anchor-page-number="4" draw:z-index="812" draw:name="Shape317" draw:style-name="gr1" draw:text-style-name="P2" svg:width="0.5142in" svg:height="0.1287in" svg:x="1.5291in" svg:y="6.7409in">
        <draw:text-box>
          <text:p><text:span text:style-name="T1">Nederland</text:span></text:p>
        </draw:text-box>
      </draw:frame>
      <draw:frame text:anchor-type="page" text:anchor-page-number="2" draw:z-index="811" draw:name="Shape166" draw:style-name="gr1" draw:text-style-name="P2" svg:width="0.2303in" svg:height="0.1287in" svg:x="0.5201in" svg:y="7.7728in">
        <draw:text-box>
          <text:p><text:span text:style-name="T5">CAS</text:span></text:p>
        </draw:text-box>
      </draw:frame>
      <draw:frame text:anchor-type="page" text:anchor-page-number="10" draw:z-index="810" draw:name="Shape909" draw:style-name="gr1" draw:text-style-name="P2" svg:width="0.4217in" svg:height="0.1287in" svg:x="0.6756in" svg:y="6.2835in">
        <draw:text-box>
          <text:p><text:span text:style-name="T3">EUH071</text:span></text:p>
        </draw:text-box>
      </draw:frame>
      <draw:frame text:anchor-type="page" text:anchor-page-number="8" draw:z-index="809" draw:name="Shape759" draw:style-name="gr1" draw:text-style-name="P2" svg:width="5.0579in" svg:height="0.1276in" svg:x="0.5201in" svg:y="9.8535in">
        <draw:text-box>
          <text:p><text:span text:style-name="T2">Riutilizzare, se possibile. I residui del prodotto tal quali sono da considerare rifiuti speciali non pericolosi.</text:span></text:p>
        </draw:text-box>
      </draw:frame>
      <draw:frame text:anchor-type="page" text:anchor-page-number="7" draw:z-index="808" draw:name="Shape682" draw:style-name="gr1" draw:text-style-name="P2" svg:width="3.3441in" svg:height="0.1276in" svg:x="0.5201in" svg:y="9.2083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5" draw:z-index="807" draw:name="Shape446" draw:style-name="gr1" draw:text-style-name="P2" svg:width="0.3413in" svg:height="0.1287in" svg:x="2.1535in" svg:y="2.85in">
        <draw:text-box>
          <text:p><text:span text:style-name="T1">mg/m3</text:span></text:p>
        </draw:text-box>
      </draw:frame>
      <draw:frame text:anchor-type="page" text:anchor-page-number="1" draw:z-index="806" draw:name="Shape65" draw:style-name="gr1" draw:text-style-name="P2" svg:width="0.8697in" svg:height="0.1287in" svg:x="3.7972in" svg:y="5.9083in">
        <draw:text-box>
          <text:p><text:span text:style-name="T3">+39 0736 899238</text:span></text:p>
        </draw:text-box>
      </draw:frame>
      <draw:frame text:anchor-type="page" text:anchor-page-number="3" draw:z-index="805" draw:name="Shape261" draw:style-name="gr1" draw:text-style-name="P2" svg:width="1.4217in" svg:height="0.1287in" svg:x="0.3744in" svg:y="10.3945in">
        <draw:text-box>
          <text:p><text:span text:style-name="T3">6.2. Precauzioni ambientali</text:span></text:p>
        </draw:text-box>
      </draw:frame>
      <draw:frame text:anchor-type="page" text:anchor-page-number="6" draw:z-index="804" draw:name="Shape600" draw:style-name="gr1" draw:text-style-name="P2" svg:width="2.9815in" svg:height="0.1768in" svg:x="0.3744in" svg:y="8.4898in">
        <draw:text-box>
          <text:p><text:span text:style-name="T4">SEZIONE 11. Informazioni tossicologiche</text:span></text:p>
        </draw:text-box>
      </draw:frame>
      <draw:frame text:anchor-type="page" text:anchor-page-number="3" draw:z-index="803" draw:name="Shape260" draw:style-name="gr1" draw:text-style-name="P2" svg:width="2.8252in" svg:height="0.1276in" svg:x="0.5201in" svg:y="10.1244in">
        <draw:text-box>
          <text:p><text:span text:style-name="T2">addetti alle lavorazioni che per gli interventi in emergenza.</text:span></text:p>
        </draw:text-box>
      </draw:frame>
      <draw:frame text:anchor-type="page" text:anchor-page-number="1" draw:z-index="802" draw:name="Shape66" draw:style-name="gr1" draw:text-style-name="P2" svg:width="0.1622in" svg:height="0.1287in" svg:x="3.0898in" svg:y="5.9102in">
        <draw:text-box>
          <text:p><text:span text:style-name="T3">tel.</text:span></text:p>
        </draw:text-box>
      </draw:frame>
      <draw:frame text:anchor-type="page" text:anchor-page-number="8" draw:z-index="801" draw:name="Shape758" draw:style-name="gr1" draw:text-style-name="P2" svg:width="1.9094in" svg:height="0.1287in" svg:x="0.3744in" svg:y="9.5835in">
        <draw:text-box>
          <text:p><text:span text:style-name="T3">13.1. Metodi di trattamento dei rifiuti</text:span></text:p>
        </draw:text-box>
      </draw:frame>
      <draw:frame text:anchor-type="page" text:anchor-page-number="4" draw:z-index="800" draw:name="Shape316" draw:style-name="gr1" draw:text-style-name="P2" svg:width="0.224in" svg:height="0.1287in" svg:x="0.5201in" svg:y="6.7409in">
        <draw:text-box>
          <text:p><text:span text:style-name="T1">NLD</text:span></text:p>
        </draw:text-box>
      </draw:frame>
      <draw:frame text:anchor-type="page" text:anchor-page-number="10" draw:z-index="799" draw:name="Shape908" draw:style-name="gr1" draw:text-style-name="P2" svg:width="3.2732in" svg:height="0.1287in" svg:x="2.0807in" svg:y="6.148in">
        <draw:text-box>
          <text:p><text:span text:style-name="T1">Molto tossico per gli organismi acquatici con effetti di lunga durata.</text:span></text:p>
        </draw:text-box>
      </draw:frame>
      <draw:frame text:anchor-type="page" text:anchor-page-number="2" draw:z-index="798" draw:name="Shape163" draw:style-name="gr1" draw:text-style-name="P2" svg:width="0.5079in" svg:height="0.1287in" svg:x="1.3008in" svg:y="7.6362in">
        <draw:text-box>
          <text:p><text:span text:style-name="T5">238-877-9</text:span></text:p>
        </draw:text-box>
      </draw:frame>
      <draw:frame text:anchor-type="page" text:anchor-page-number="9" draw:z-index="797" draw:name="Shape835" draw:style-name="gr1" draw:text-style-name="P2" svg:width="0.4398in" svg:height="0.1287in" svg:x="0.5201in" svg:y="10.3945in">
        <draw:text-box>
          <text:p><text:span text:style-name="T1">Nessuna</text:span></text:p>
        </draw:text-box>
      </draw:frame>
      <draw:frame text:anchor-type="page" text:anchor-page-number="7" draw:z-index="796" draw:name="Shape680" draw:style-name="gr1" draw:text-style-name="P2" svg:width="4.3205in" svg:height="0.1276in" svg:x="0.5201in" svg:y="8.9382in">
        <draw:text-box>
          <text:p><text:span text:style-name="T2">TOSSICITÀ SPECIFICA PER ORGANI BERSAGLIO (STOT) - ESPOSIZIONE SINGOLA</text:span></text:p>
        </draw:text-box>
      </draw:frame>
      <draw:frame text:anchor-type="page" text:anchor-page-number="11" draw:z-index="795" draw:name="Shape1049" draw:style-name="gr1" draw:text-style-name="P2" svg:width="1.6425in" svg:height="0.1276in" svg:x="0.5201in" svg:y="8.8035in">
        <draw:text-box>
          <text:p><text:span text:style-name="T2">28. Regolamento (UE) 2024/2865</text:span></text:p>
        </draw:text-box>
      </draw:frame>
      <draw:frame text:anchor-type="page" text:anchor-page-number="6" draw:z-index="794" draw:name="Shape597" draw:style-name="gr1" draw:text-style-name="P2" svg:width="2.4043in" svg:height="0.1276in" svg:x="0.6756in" svg:y="8.3126in">
        <draw:text-box>
          <text:p><text:span text:style-name="T2">Può sviluppare: ossidi di calcio,ossidi di carbonio.</text:span></text:p>
        </draw:text-box>
      </draw:frame>
      <draw:frame text:anchor-type="page" text:anchor-page-number="5" draw:z-index="793" draw:name="Shape445" draw:style-name="gr1" draw:text-style-name="P2" svg:width="0.9594in" svg:height="0.1276in" svg:x="5.1917in" svg:y="2.7165in">
        <draw:text-box>
          <text:p><text:span text:style-name="T2">Note / Osservazioni</text:span></text:p>
        </draw:text-box>
      </draw:frame>
      <draw:frame text:anchor-type="page" text:anchor-page-number="9" draw:z-index="792" draw:name="Shape833" draw:style-name="gr1" draw:text-style-name="P2" svg:width="2.5031in" svg:height="0.1287in" svg:x="0.5201in" svg:y="10.2575in">
        <draw:text-box>
          <text:p><text:span text:style-name="T1">Sostanze soggette alla Convenzione di Rotterdam:</text:span></text:p>
        </draw:text-box>
      </draw:frame>
      <draw:frame text:anchor-type="page" text:anchor-page-number="2" draw:z-index="791" draw:name="Shape164" draw:style-name="gr1" draw:text-style-name="P2" svg:width="0.1559in" svg:height="0.1287in" svg:x="0.5201in" svg:y="7.6374in">
        <draw:text-box>
          <text:p><text:span text:style-name="T5">CE</text:span></text:p>
        </draw:text-box>
      </draw:frame>
      <draw:frame text:anchor-type="page" text:anchor-page-number="3" draw:z-index="790" draw:name="Shape259" draw:style-name="gr1" draw:text-style-name="P2" svg:width="6.5094in" svg:height="0.1276in" svg:x="0.5201in" svg:y="9.9866in">
        <draw:text-box>
          <text:p><text:span text:style-name="T2">sicurezza) onde prevenire contaminazioni della pelle, degli occhi e degli indumenti personali. Queste indicazioni sono valide sia per gli</text:span></text:p>
        </draw:text-box>
      </draw:frame>
      <draw:frame text:anchor-type="page" text:anchor-page-number="8" draw:z-index="789" draw:name="Shape757" draw:style-name="gr1" draw:text-style-name="P2" svg:width="3.4059in" svg:height="0.1768in" svg:x="0.3744in" svg:y="9.3016in">
        <draw:text-box>
          <text:p><text:span text:style-name="T4">SEZIONE 13. Considerazioni sullo smaltimento</text:span></text:p>
        </draw:text-box>
      </draw:frame>
      <draw:frame text:anchor-type="page" text:anchor-page-number="10" draw:z-index="788" draw:name="Shape907" draw:style-name="gr1" draw:text-style-name="P2" svg:width="0.2677in" svg:height="0.1287in" svg:x="0.6756in" svg:y="6.148in">
        <draw:text-box>
          <text:p><text:span text:style-name="T3">H410</text:span></text:p>
        </draw:text-box>
      </draw:frame>
      <draw:frame text:anchor-type="page" text:anchor-page-number="11" draw:z-index="787" draw:name="Shape1048" draw:style-name="gr1" draw:text-style-name="P2" svg:width="2.8685in" svg:height="0.1276in" svg:x="0.5201in" svg:y="8.6681in">
        <draw:text-box>
          <text:p><text:span text:style-name="T2">27. Regolamento delegato (UE) 2024/2564 (XXII Atp. CLP)</text:span></text:p>
        </draw:text-box>
      </draw:frame>
      <draw:frame text:anchor-type="page" text:anchor-page-number="1" draw:z-index="786" draw:name="Shape64" draw:style-name="gr1" draw:text-style-name="P2" svg:width="0.3516in" svg:height="0.1287in" svg:x="3.7972in" svg:y="5.7728in">
        <draw:text-box>
          <text:p><text:span text:style-name="T3">ITALIA</text:span></text:p>
        </draw:text-box>
      </draw:frame>
      <draw:frame text:anchor-type="page" text:anchor-page-number="4" draw:z-index="785" draw:name="Shape315" draw:style-name="gr1" draw:text-style-name="P2" svg:width="1.0689in" svg:height="0.1276in" svg:x="2.6217in" svg:y="6.6063in">
        <draw:text-box>
          <text:p><text:span text:style-name="T2">du 28 décembre 2021</text:span></text:p>
        </draw:text-box>
      </draw:frame>
      <draw:frame text:anchor-type="page" text:anchor-page-number="7" draw:z-index="784" draw:name="Shape679" draw:style-name="gr1" draw:text-style-name="P2" svg:width="3.3441in" svg:height="0.1276in" svg:x="0.5201in" svg:y="8.6681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6" draw:z-index="783" draw:name="Shape596" draw:style-name="gr1" draw:text-style-name="P2" svg:width="1.1252in" svg:height="0.1276in" svg:x="0.5201in" svg:y="8.1772in">
        <draw:text-box>
          <text:p><text:span text:style-name="T2">CALCIO CARBONATO</text:span></text:p>
        </draw:text-box>
      </draw:frame>
      <draw:frame text:anchor-type="page" text:anchor-page-number="5" draw:z-index="782" draw:name="Shape443" draw:style-name="gr1" draw:text-style-name="P2" svg:width="0.613in" svg:height="0.1287in" svg:x="3.7972in" svg:y="2.7154in">
        <draw:text-box>
          <text:p><text:span text:style-name="T1">STEL/15min</text:span></text:p>
        </draw:text-box>
      </draw:frame>
      <draw:frame text:anchor-type="page" text:anchor-page-number="11" draw:z-index="781" draw:name="Shape1047" draw:style-name="gr1" draw:text-style-name="P2" svg:width="2.7768in" svg:height="0.1276in" svg:x="0.5201in" svg:y="8.5319in">
        <draw:text-box>
          <text:p><text:span text:style-name="T2">26. Regolamento delegato (UE) 2024/197 (XXI Atp. CLP)</text:span></text:p>
        </draw:text-box>
      </draw:frame>
      <draw:frame text:anchor-type="page" text:anchor-page-number="2" draw:z-index="780" draw:name="Shape161" draw:style-name="gr1" draw:text-style-name="P2" svg:width="0.2177in" svg:height="0.1287in" svg:x="2.3098in" svg:y="7.5008in">
        <draw:text-box>
          <text:p><text:span text:style-name="T1">1.34</text:span></text:p>
        </draw:text-box>
      </draw:frame>
      <draw:frame text:anchor-type="page" text:anchor-page-number="5" draw:z-index="779" draw:name="Shape442" draw:style-name="gr1" draw:text-style-name="P2" svg:width="0.3988in" svg:height="0.1287in" svg:x="2.1535in" svg:y="2.7154in">
        <draw:text-box>
          <text:p><text:span text:style-name="T1">TWA/8h</text:span></text:p>
        </draw:text-box>
      </draw:frame>
      <draw:frame text:anchor-type="page" text:anchor-page-number="9" draw:z-index="778" draw:name="Shape832" draw:style-name="gr1" draw:text-style-name="P2" svg:width="0.4398in" svg:height="0.1287in" svg:x="0.5201in" svg:y="9.989in">
        <draw:text-box>
          <text:p><text:span text:style-name="T1">Nessuna</text:span></text:p>
        </draw:text-box>
      </draw:frame>
      <draw:frame text:anchor-type="page" text:anchor-page-number="8" draw:z-index="777" draw:name="Shape754" draw:style-name="gr1" draw:text-style-name="P2" svg:width="1.3252in" svg:height="0.1276in" svg:x="0.5201in" svg:y="8.9902in">
        <draw:text-box>
          <text:p><text:span text:style-name="T2">Informazioni non disponibili</text:span></text:p>
        </draw:text-box>
      </draw:frame>
      <draw:frame text:anchor-type="page" text:anchor-page-number="7" draw:z-index="776" draw:name="Shape677" draw:style-name="gr1" draw:text-style-name="P2" svg:width="1.8657in" svg:height="0.1276in" svg:x="0.5201in" svg:y="8.3972in">
        <draw:text-box>
          <text:p><text:span text:style-name="T2">TOSSICITÀ PER LA RIPRODUZIONE</text:span></text:p>
        </draw:text-box>
      </draw:frame>
      <draw:frame text:anchor-type="page" text:anchor-page-number="6" draw:z-index="775" draw:name="Shape595" draw:style-name="gr1" draw:text-style-name="P2" svg:width="2.2921in" svg:height="0.1287in" svg:x="0.3744in" svg:y="7.9075in">
        <draw:text-box>
          <text:p><text:span text:style-name="T3">10.6. Prodotti di decomposizione pericolosi</text:span></text:p>
        </draw:text-box>
      </draw:frame>
      <draw:frame text:anchor-type="page" text:anchor-page-number="10" draw:z-index="774" draw:name="Shape906" draw:style-name="gr1" draw:text-style-name="P2" svg:width="1.9961in" svg:height="0.1287in" svg:x="2.0807in" svg:y="6.0126in">
        <draw:text-box>
          <text:p><text:span text:style-name="T1">Molto tossico per gli organismi acquatici.</text:span></text:p>
        </draw:text-box>
      </draw:frame>
      <draw:frame text:anchor-type="page" text:anchor-page-number="4" draw:z-index="773" draw:name="Shape314" draw:style-name="gr1" draw:text-style-name="P2" svg:width="4.7122in" svg:height="0.1276in" svg:x="2.6217in" svg:y="6.4709in">
        <draw:text-box>
          <text:p><text:span text:style-name="T2">Valeurs limites d'exposition professionnelle aux agents chimiques en FranceDécret n° 2021-1849</text:span></text:p>
        </draw:text-box>
      </draw:frame>
      <draw:frame text:anchor-type="page" text:anchor-page-number="1" draw:z-index="772" draw:name="Shape62" draw:style-name="gr1" draw:text-style-name="P2" svg:width="0.2303in" svg:height="0.1287in" svg:x="5.9717in" svg:y="5.6382in">
        <draw:text-box>
          <text:p><text:span text:style-name="T3">(AP)</text:span></text:p>
        </draw:text-box>
      </draw:frame>
      <draw:frame text:anchor-type="page" text:anchor-page-number="3" draw:z-index="771" draw:name="Shape258" draw:style-name="gr1" draw:text-style-name="P2" svg:width="6.3386in" svg:height="0.1276in" svg:x="0.5201in" svg:y="9.852in">
        <draw:text-box>
          <text:p><text:span text:style-name="T2">Indossare adeguati dispositivi di protezione (compresi i dispositivi di protezione individuale di cui alla sezione 8 della scheda dati di</text:span></text:p>
        </draw:text-box>
      </draw:frame>
      <draw:frame text:anchor-type="page" text:anchor-page-number="6" draw:z-index="770" draw:name="Shape594" draw:style-name="gr1" draw:text-style-name="P2" svg:width="1.1724in" svg:height="0.1276in" svg:x="0.6756in" svg:y="7.7717in">
        <draw:text-box>
          <text:p><text:span text:style-name="T2">Incompatibile con: acidi.</text:span></text:p>
        </draw:text-box>
      </draw:frame>
      <draw:frame text:anchor-type="page" text:anchor-page-number="5" draw:z-index="769" draw:name="Shape441" draw:style-name="gr1" draw:text-style-name="P2" svg:width="0.2614in" svg:height="0.1287in" svg:x="1.5291in" svg:y="2.7154in">
        <draw:text-box>
          <text:p><text:span text:style-name="T1">Stato</text:span></text:p>
        </draw:text-box>
      </draw:frame>
      <draw:frame text:anchor-type="page" text:anchor-page-number="8" draw:z-index="768" draw:name="Shape753" draw:style-name="gr1" draw:text-style-name="P2" svg:width="1.2449in" svg:height="0.1287in" svg:x="0.3744in" svg:y="8.7193in">
        <draw:text-box>
          <text:p><text:span text:style-name="T3">12.7. Altri effetti avversi</text:span></text:p>
        </draw:text-box>
      </draw:frame>
      <draw:frame text:anchor-type="page" text:anchor-page-number="9" draw:z-index="767" draw:name="Shape830" draw:style-name="gr1" draw:text-style-name="P2" svg:width="4.2268in" svg:height="0.1287in" svg:x="0.5201in" svg:y="9.8516in">
        <draw:text-box>
          <text:p><text:span text:style-name="T1">Sostanze soggette ad obbligo di notifica di esportazione Regolamento (UE) 649/2012:</text:span></text:p>
        </draw:text-box>
      </draw:frame>
      <draw:frame text:anchor-type="page" text:anchor-page-number="7" draw:z-index="766" draw:name="Shape676" draw:style-name="gr1" draw:text-style-name="P2" svg:width="6.1012in" svg:height="0.1276in" svg:x="0.9047in" svg:y="8.1272in">
        <draw:text-box>
          <text:p><text:span text:style-name="T2">2B). Il talco inalato non contenente amianto o fibre asbestiformi non è classificabile in quanto tale cancerogenicità (Gruppo 3).</text:span></text:p>
        </draw:text-box>
      </draw:frame>
      <draw:frame text:anchor-type="page" text:anchor-page-number="2" draw:z-index="765" draw:name="Shape162" draw:style-name="gr1" draw:text-style-name="P2" svg:width="0.3413in" svg:height="0.1287in" svg:x="0.5201in" svg:y="7.502in">
        <draw:text-box>
          <text:p><text:span text:style-name="T5">INDEX</text:span></text:p>
        </draw:text-box>
      </draw:frame>
      <draw:frame text:anchor-type="page" text:anchor-page-number="11" draw:z-index="764" draw:name="Shape1046" draw:style-name="gr1" draw:text-style-name="P2" svg:width="2.8071in" svg:height="0.1276in" svg:x="0.5201in" svg:y="8.3972in">
        <draw:text-box>
          <text:p><text:span text:style-name="T2">25. Regolamento delegato (UE) 2023/1435 (XX Atp. CLP)</text:span></text:p>
        </draw:text-box>
      </draw:frame>
      <draw:frame text:anchor-type="page" text:anchor-page-number="4" draw:z-index="763" draw:name="Shape313" draw:style-name="gr1" draw:text-style-name="P2" svg:width="0.3476in" svg:height="0.1287in" svg:x="1.5291in" svg:y="6.4701in">
        <draw:text-box>
          <text:p><text:span text:style-name="T1">France</text:span></text:p>
        </draw:text-box>
      </draw:frame>
      <draw:frame text:anchor-type="page" text:anchor-page-number="10" draw:z-index="762" draw:name="Shape905" draw:style-name="gr1" draw:text-style-name="P2" svg:width="0.2677in" svg:height="0.1287in" svg:x="0.6756in" svg:y="6.0126in">
        <draw:text-box>
          <text:p><text:span text:style-name="T3">H400</text:span></text:p>
        </draw:text-box>
      </draw:frame>
      <draw:frame text:anchor-type="page" text:anchor-page-number="3" draw:z-index="761" draw:name="Shape257" draw:style-name="gr1" draw:text-style-name="P2" svg:width="1.8831in" svg:height="0.1276in" svg:x="0.5201in" svg:y="9.7189in">
        <draw:text-box>
          <text:p><text:span text:style-name="T2">Bloccare la perdita se non c'è pericolo.</text:span></text:p>
        </draw:text-box>
      </draw:frame>
      <draw:frame text:anchor-type="page" text:anchor-page-number="1" draw:z-index="760" draw:name="Shape61" draw:style-name="gr1" draw:text-style-name="P2" svg:width="0.4713in" svg:height="0.1287in" svg:x="3.7972in" svg:y="5.6382in">
        <draw:text-box>
          <text:p><text:span text:style-name="T3">Spinetoli</text:span></text:p>
        </draw:text-box>
      </draw:frame>
      <draw:frame text:anchor-type="page" text:anchor-page-number="2" draw:z-index="759" draw:name="Shape160" draw:style-name="gr1" draw:text-style-name="P2" svg:width="0.376in" svg:height="0.1287in" svg:x="0.5201in" svg:y="7.3654in">
        <draw:text-box>
          <text:p><text:span text:style-name="T3">TALCO</text:span></text:p>
        </draw:text-box>
      </draw:frame>
      <draw:frame text:anchor-type="page" text:anchor-page-number="9" draw:z-index="758" draw:name="Shape829" draw:style-name="gr1" draw:text-style-name="P2" svg:width="0.4398in" svg:height="0.1287in" svg:x="0.5201in" svg:y="9.5835in">
        <draw:text-box>
          <text:p><text:span text:style-name="T1">Nessuna</text:span></text:p>
        </draw:text-box>
      </draw:frame>
      <draw:frame text:anchor-type="page" text:anchor-page-number="7" draw:z-index="757" draw:name="Shape675" draw:style-name="gr1" draw:text-style-name="P2" svg:width="6.3913in" svg:height="0.1276in" svg:x="0.9047in" svg:y="7.9898in">
        <draw:text-box>
          <text:p><text:span text:style-name="T2">Valutazione generale IARC: L'uso perineale di polvere per il corpo a base di talco è probabilmente cancerogeno per l'uomo (Gruppo</text:span></text:p>
        </draw:text-box>
      </draw:frame>
      <draw:frame text:anchor-type="page" text:anchor-page-number="1" draw:z-index="756" draw:name="Shape60" draw:style-name="gr1" draw:text-style-name="P2" svg:width="0.3106in" svg:height="0.1287in" svg:x="3.0898in" svg:y="5.6382in">
        <draw:text-box>
          <text:p><text:span text:style-name="T3">63078</text:span></text:p>
        </draw:text-box>
      </draw:frame>
      <draw:frame text:anchor-type="page" text:anchor-page-number="10" draw:z-index="755" draw:name="Shape904" draw:style-name="gr1" draw:text-style-name="P2" svg:width="2.2996in" svg:height="0.1287in" svg:x="2.0807in" svg:y="5.878in">
        <draw:text-box>
          <text:p><text:span text:style-name="T1">Può provocare una reazione allergica cutanea.</text:span></text:p>
        </draw:text-box>
      </draw:frame>
      <draw:frame text:anchor-type="page" text:anchor-page-number="4" draw:z-index="754" draw:name="Shape312" draw:style-name="gr1" draw:text-style-name="P2" svg:width="0.224in" svg:height="0.1287in" svg:x="0.5201in" svg:y="6.4701in">
        <draw:text-box>
          <text:p><text:span text:style-name="T1">FRA</text:span></text:p>
        </draw:text-box>
      </draw:frame>
      <draw:frame text:anchor-type="page" text:anchor-page-number="3" draw:z-index="753" draw:name="Shape256" draw:style-name="gr1" draw:text-style-name="P2" svg:width="4.5213in" svg:height="0.1287in" svg:x="0.3744in" svg:y="9.448in">
        <draw:text-box>
          <text:p><text:span text:style-name="T3">6.1. Precauzioni personali, dispositivi di protezione e procedure in caso di emergenza</text:span></text:p>
        </draw:text-box>
      </draw:frame>
      <draw:frame text:anchor-type="page" text:anchor-page-number="6" draw:z-index="752" draw:name="Shape593" draw:style-name="gr1" draw:text-style-name="P2" svg:width="1.1252in" svg:height="0.1276in" svg:x="0.5201in" svg:y="7.6362in">
        <draw:text-box>
          <text:p><text:span text:style-name="T2">CALCIO CARBONATO</text:span></text:p>
        </draw:text-box>
      </draw:frame>
      <draw:frame text:anchor-type="page" text:anchor-page-number="11" draw:z-index="751" draw:name="Shape1045" draw:style-name="gr1" draw:text-style-name="P2" svg:width="2.8378in" svg:height="0.1276in" svg:x="0.5201in" svg:y="8.2626in">
        <draw:text-box>
          <text:p><text:span text:style-name="T2">24. Regolamento delegato (UE) 2023/1434 (XIX Atp. CLP)</text:span></text:p>
        </draw:text-box>
      </draw:frame>
      <draw:frame text:anchor-type="page" text:anchor-page-number="8" draw:z-index="750" draw:name="Shape752" draw:style-name="gr1" draw:text-style-name="P2" svg:width="2.7504in" svg:height="0.1276in" svg:x="0.5201in" svg:y="8.4492in">
        <draw:text-box>
          <text:p><text:span text:style-name="T2">endocrini con effetti sull’ambiente oggetto di valutazione.</text:span></text:p>
        </draw:text-box>
      </draw:frame>
      <draw:frame text:anchor-type="page" text:anchor-page-number="5" draw:z-index="749" draw:name="Shape440" draw:style-name="gr1" draw:text-style-name="P2" svg:width="0.2134in" svg:height="0.1287in" svg:x="0.6756in" svg:y="2.7154in">
        <draw:text-box>
          <text:p><text:span text:style-name="T1">Tipo</text:span></text:p>
        </draw:text-box>
      </draw:frame>
      <draw:frame text:anchor-type="page" text:anchor-page-number="10" draw:z-index="748" draw:name="Shape903" draw:style-name="gr1" draw:text-style-name="P2" svg:width="0.2677in" svg:height="0.1287in" svg:x="0.6756in" svg:y="5.878in">
        <draw:text-box>
          <text:p><text:span text:style-name="T3">H317</text:span></text:p>
        </draw:text-box>
      </draw:frame>
      <draw:frame text:anchor-type="page" text:anchor-page-number="5" draw:z-index="747" draw:name="Shape439" draw:style-name="gr1" draw:text-style-name="P2" svg:width="1.1378in" svg:height="0.1287in" svg:x="0.5201in" svg:y="2.5811in">
        <draw:text-box>
          <text:p><text:span text:style-name="T3">Valore limite di soglia</text:span></text:p>
        </draw:text-box>
      </draw:frame>
      <draw:frame text:anchor-type="page" text:anchor-page-number="3" draw:z-index="746" draw:name="Shape255" draw:style-name="gr1" draw:text-style-name="P2" svg:width="3.576in" svg:height="0.1768in" svg:x="0.3744in" svg:y="9.1661in">
        <draw:text-box>
          <text:p><text:span text:style-name="T4">SEZIONE 6. Misure in caso di rilascio accidentale</text:span></text:p>
        </draw:text-box>
      </draw:frame>
      <draw:frame text:anchor-type="page" text:anchor-page-number="11" draw:z-index="745" draw:name="Shape1044" draw:style-name="gr1" draw:text-style-name="P2" svg:width="2.0331in" svg:height="0.1276in" svg:x="0.5201in" svg:y="8.1272in">
        <draw:text-box>
          <text:p><text:span text:style-name="T2">23. Regolamento delegato (UE) 2023/707</text:span></text:p>
        </draw:text-box>
      </draw:frame>
      <draw:frame text:anchor-type="page" text:anchor-page-number="2" draw:z-index="744" draw:name="Shape158" draw:style-name="gr1" draw:text-style-name="P2" svg:width="0.4461in" svg:height="0.1287in" svg:x="1.3008in" svg:y="7.2299in">
        <draw:text-box>
          <text:p><text:span text:style-name="T5">471-34-1</text:span></text:p>
        </draw:text-box>
      </draw:frame>
      <draw:frame text:anchor-type="page" text:anchor-page-number="1" draw:z-index="743" draw:name="Shape63" draw:style-name="gr1" draw:text-style-name="P2" svg:width="0.7677in" svg:height="0.1287in" svg:x="0.5201in" svg:y="5.6398in">
        <draw:text-box>
          <text:p><text:span text:style-name="T1">Località e Stato</text:span></text:p>
        </draw:text-box>
      </draw:frame>
      <draw:frame text:anchor-type="page" text:anchor-page-number="4" draw:z-index="742" draw:name="Shape311" draw:style-name="gr1" draw:text-style-name="P2" svg:width="3.5941in" svg:height="0.1276in" svg:x="2.6217in" svg:y="6.3354in">
        <draw:text-box>
          <text:p><text:span text:style-name="T2">Límites de exposición profesional para agentes químicos en España 2024</text:span></text:p>
        </draw:text-box>
      </draw:frame>
      <draw:frame text:anchor-type="page" text:anchor-page-number="8" draw:z-index="741" draw:name="Shape751" draw:style-name="gr1" draw:text-style-name="P2" svg:width="6.3571in" svg:height="0.1276in" svg:x="0.5201in" svg:y="8.3126in">
        <draw:text-box>
          <text:p><text:span text:style-name="T2">In base ai dati disponibili, il prodotto non contiene sostanze elencate nelle principali liste europee di potenziali o sospetti interferenti</text:span></text:p>
        </draw:text-box>
      </draw:frame>
      <draw:frame text:anchor-type="page" text:anchor-page-number="6" draw:z-index="740" draw:name="Shape592" draw:style-name="gr1" draw:text-style-name="P2" svg:width="1.4469in" svg:height="0.1287in" svg:x="0.3744in" svg:y="7.3665in">
        <draw:text-box>
          <text:p><text:span text:style-name="T3">10.5. Materiali incompatibili</text:span></text:p>
        </draw:text-box>
      </draw:frame>
      <draw:frame text:anchor-type="page" text:anchor-page-number="9" draw:z-index="739" draw:name="Shape827" draw:style-name="gr1" draw:text-style-name="P2" svg:width="2.9598in" svg:height="0.1287in" svg:x="0.5201in" svg:y="9.448in">
        <draw:text-box>
          <text:p><text:span text:style-name="T1">Sostanze soggette ad autorizzazione (Allegato XIV REACH)</text:span></text:p>
        </draw:text-box>
      </draw:frame>
      <draw:frame text:anchor-type="page" text:anchor-page-number="7" draw:z-index="738" draw:name="Shape674" draw:style-name="gr1" draw:text-style-name="P2" svg:width="0.3594in" svg:height="0.1276in" svg:x="0.9047in" svg:y="7.8543in">
        <draw:text-box>
          <text:p><text:span text:style-name="T2">TALCO</text:span></text:p>
        </draw:text-box>
      </draw:frame>
      <draw:frame text:anchor-type="page" text:anchor-page-number="10" draw:z-index="737" draw:name="Shape902" draw:style-name="gr1" draw:text-style-name="P2" svg:width="1.3787in" svg:height="0.1287in" svg:x="2.0807in" svg:y="5.7425in">
        <draw:text-box>
          <text:p><text:span text:style-name="T1">Provoca irritazione cutanea.</text:span></text:p>
        </draw:text-box>
      </draw:frame>
      <draw:frame text:anchor-type="page" text:anchor-page-number="1" draw:z-index="736" draw:name="Shape58" draw:style-name="gr1" draw:text-style-name="P2" svg:width="1.1461in" svg:height="0.1287in" svg:x="3.0898in" svg:y="5.5028in">
        <draw:text-box>
          <text:p><text:span text:style-name="T3">VIA IV NOVEMBRE 13</text:span></text:p>
        </draw:text-box>
      </draw:frame>
      <draw:frame text:anchor-type="page" text:anchor-page-number="11" draw:z-index="735" draw:name="Shape1043" draw:style-name="gr1" draw:text-style-name="P2" svg:width="2.8378in" svg:height="0.1276in" svg:x="0.5201in" svg:y="7.9917in">
        <draw:text-box>
          <text:p><text:span text:style-name="T2">22. Regolamento delegato (UE) 2022/692 (XVIII Atp. CLP)</text:span></text:p>
        </draw:text-box>
      </draw:frame>
      <draw:frame text:anchor-type="page" text:anchor-page-number="9" draw:z-index="734" draw:name="Shape826" draw:style-name="gr1" draw:text-style-name="P2" svg:width="4.4724in" svg:height="0.1287in" svg:x="0.5201in" svg:y="9.1772in">
        <draw:text-box>
          <text:p><text:span text:style-name="T1">In base ai dati disponibili, il prodotto non contiene sostanze SVHC in percentuale ≥ a 0,1%.</text:span></text:p>
        </draw:text-box>
      </draw:frame>
      <draw:frame text:anchor-type="page" text:anchor-page-number="4" draw:z-index="733" draw:name="Shape310" draw:style-name="gr1" draw:text-style-name="P2" svg:width="0.3787in" svg:height="0.1287in" svg:x="1.5291in" svg:y="6.3346in">
        <draw:text-box>
          <text:p><text:span text:style-name="T1">España</text:span></text:p>
        </draw:text-box>
      </draw:frame>
      <draw:frame text:anchor-type="page" text:anchor-page-number="6" draw:z-index="732" draw:name="Shape591" draw:style-name="gr1" draw:text-style-name="P2" svg:width="4.4661in" svg:height="0.1276in" svg:x="0.5201in" svg:y="7.0965in">
        <draw:text-box>
          <text:p><text:span text:style-name="T2">Nessuna in particolare. Attenersi tuttavia alle usuali cautele nei confronti dei prodotti chimici.</text:span></text:p>
        </draw:text-box>
      </draw:frame>
      <draw:frame text:anchor-type="page" text:anchor-page-number="3" draw:z-index="731" draw:name="Shape252" draw:style-name="gr1" draw:text-style-name="P2" svg:width="4.2748in" svg:height="0.1276in" svg:x="0.5201in" svg:y="8.8547in">
        <draw:text-box>
          <text:p><text:span text:style-name="T2">(EN469), guanti antifiamma (EN 659) e stivali per Vigili del Fuoco (HO A29 oppure A30).</text:span></text:p>
        </draw:text-box>
      </draw:frame>
      <draw:frame text:anchor-type="page" text:anchor-page-number="8" draw:z-index="730" draw:name="Shape750" draw:style-name="gr1" draw:text-style-name="P2" svg:width="2.8913in" svg:height="0.1287in" svg:x="0.3744in" svg:y="8.0429in">
        <draw:text-box>
          <text:p><text:span text:style-name="T3">12.6. Proprietà di interferenza con il sistema endocrino</text:span></text:p>
        </draw:text-box>
      </draw:frame>
      <draw:frame text:anchor-type="page" text:anchor-page-number="7" draw:z-index="729" draw:name="Shape673" draw:style-name="gr1" draw:text-style-name="P2" svg:width="3.3441in" svg:height="0.1276in" svg:x="0.5201in" svg:y="7.5862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2" draw:z-index="728" draw:name="Shape159" draw:style-name="gr1" draw:text-style-name="P2" svg:width="0.2303in" svg:height="0.1287in" svg:x="0.5201in" svg:y="7.2319in">
        <draw:text-box>
          <text:p><text:span text:style-name="T5">CAS</text:span></text:p>
        </draw:text-box>
      </draw:frame>
      <draw:frame text:anchor-type="page" text:anchor-page-number="5" draw:z-index="727" draw:name="Shape434" draw:style-name="gr1" draw:text-style-name="P2" svg:width="1.1705in" svg:height="0.1287in" svg:x="3.4429in" svg:y="2.4437in">
        <draw:text-box>
          <text:p><text:span text:style-name="T3">CALCIO CARBONATO</text:span></text:p>
        </draw:text-box>
      </draw:frame>
      <draw:frame text:anchor-type="page" text:anchor-page-number="7" draw:z-index="726" draw:name="Shape671" draw:style-name="gr1" draw:text-style-name="P2" svg:width="1.0685in" svg:height="0.1276in" svg:x="0.5201in" svg:y="7.3154in">
        <draw:text-box>
          <text:p><text:span text:style-name="T2">CANCEROGENICITÀ</text:span></text:p>
        </draw:text-box>
      </draw:frame>
      <draw:frame text:anchor-type="page" text:anchor-page-number="10" draw:z-index="725" draw:name="Shape901" draw:style-name="gr1" draw:text-style-name="P2" svg:width="0.2677in" svg:height="0.1287in" svg:x="0.6756in" svg:y="5.7425in">
        <draw:text-box>
          <text:p><text:span text:style-name="T3">H315</text:span></text:p>
        </draw:text-box>
      </draw:frame>
      <draw:frame text:anchor-type="page" text:anchor-page-number="6" draw:z-index="724" draw:name="Shape590" draw:style-name="gr1" draw:text-style-name="P2" svg:width="1.3969in" svg:height="0.1287in" svg:x="0.3744in" svg:y="6.8256in">
        <draw:text-box>
          <text:p><text:span text:style-name="T3">10.4. Condizioni da evitare</text:span></text:p>
        </draw:text-box>
      </draw:frame>
      <draw:frame text:anchor-type="page" text:anchor-page-number="2" draw:z-index="723" draw:name="Shape156" draw:style-name="gr1" draw:text-style-name="P2" svg:width="0.5079in" svg:height="0.1287in" svg:x="1.3008in" svg:y="7.0945in">
        <draw:text-box>
          <text:p><text:span text:style-name="T5">207-439-9</text:span></text:p>
        </draw:text-box>
      </draw:frame>
      <draw:frame text:anchor-type="page" text:anchor-page-number="4" draw:z-index="722" draw:name="Shape309" draw:style-name="gr1" draw:text-style-name="P2" svg:width="0.224in" svg:height="0.1287in" svg:x="0.5201in" svg:y="6.3346in">
        <draw:text-box>
          <text:p><text:span text:style-name="T1">ESP</text:span></text:p>
        </draw:text-box>
      </draw:frame>
      <draw:frame text:anchor-type="page" text:anchor-page-number="11" draw:z-index="721" draw:name="Shape1042" draw:style-name="gr1" draw:text-style-name="P2" svg:width="2.8071in" svg:height="0.1276in" svg:x="0.5201in" svg:y="7.8563in">
        <draw:text-box>
          <text:p><text:span text:style-name="T2">21. Regolamento delegato (UE) 2021/849 (XVII Atp. CLP)</text:span></text:p>
        </draw:text-box>
      </draw:frame>
      <draw:frame text:anchor-type="page" text:anchor-page-number="8" draw:z-index="720" draw:name="Shape749" draw:style-name="gr1" draw:text-style-name="P2" svg:width="4.7016in" svg:height="0.1276in" svg:x="0.5201in" svg:y="7.7728in">
        <draw:text-box>
          <text:p><text:span text:style-name="T2">In base ai dati disponibili, il prodotto non contiene sostanze PBT o vPvB in percentuale ≥ a 0,1%.</text:span></text:p>
        </draw:text-box>
      </draw:frame>
      <draw:frame text:anchor-type="page" text:anchor-page-number="1" draw:z-index="719" draw:name="Shape59" draw:style-name="gr1" draw:text-style-name="P2" svg:width="0.4157in" svg:height="0.1287in" svg:x="0.5201in" svg:y="5.5047in">
        <draw:text-box>
          <text:p><text:span text:style-name="T1">Indirizzo</text:span></text:p>
        </draw:text-box>
      </draw:frame>
      <draw:frame text:anchor-type="page" text:anchor-page-number="9" draw:z-index="718" draw:name="Shape824" draw:style-name="gr1" draw:text-style-name="P2" svg:width="2.1752in" svg:height="0.1287in" svg:x="0.5201in" svg:y="9.0425in">
        <draw:text-box>
          <text:p><text:span text:style-name="T1">Sostanze in Candidate List (Art. 59 REACH)</text:span></text:p>
        </draw:text-box>
      </draw:frame>
      <draw:frame text:anchor-type="page" text:anchor-page-number="3" draw:z-index="717" draw:name="Shape251" draw:style-name="gr1" draw:text-style-name="P2" svg:width="6.3685in" svg:height="0.1276in" svg:x="0.5201in" svg:y="8.7181in">
        <draw:text-box>
          <text:p><text:span text:style-name="T2">Indumenti normali per la lotta al fuoco, come un autorespiratore ad aria compressa a circuito aperto (EN 137), completo antifiamma</text:span></text:p>
        </draw:text-box>
      </draw:frame>
      <draw:frame text:anchor-type="page" text:anchor-page-number="5" draw:z-index="716" draw:name="Shape432" draw:style-name="gr1" draw:text-style-name="P2" svg:width="0.3433in" svg:height="0.1276in" svg:x="5.1917in" svg:y="2.0402in">
        <draw:text-box>
          <text:p><text:span text:style-name="T2">PELLE</text:span></text:p>
        </draw:text-box>
      </draw:frame>
      <draw:frame text:anchor-type="page" text:anchor-page-number="8" draw:z-index="715" draw:name="Shape748" draw:style-name="gr1" draw:text-style-name="P2" svg:width="2.2925in" svg:height="0.1287in" svg:x="0.3744in" svg:y="7.502in">
        <draw:text-box>
          <text:p><text:span text:style-name="T3">12.5. Risultati della valutazione PBT e vPvB</text:span></text:p>
        </draw:text-box>
      </draw:frame>
      <draw:frame text:anchor-type="page" text:anchor-page-number="6" draw:z-index="714" draw:name="Shape589" draw:style-name="gr1" draw:text-style-name="P2" svg:width="3.9539in" svg:height="0.1276in" svg:x="0.5201in" svg:y="6.5563in">
        <draw:text-box>
          <text:p><text:span text:style-name="T2">In condizioni di uso e stoccaggio normali non sono prevedibili reazioni pericolose.</text:span></text:p>
        </draw:text-box>
      </draw:frame>
      <draw:frame text:anchor-type="page" text:anchor-page-number="3" draw:z-index="713" draw:name="Shape250" draw:style-name="gr1" draw:text-style-name="P2" svg:width="1.0768in" svg:height="0.1276in" svg:x="0.5201in" svg:y="8.5846in">
        <draw:text-box>
          <text:p><text:span text:style-name="T2">EQUIPAGGIAMENTO</text:span></text:p>
        </draw:text-box>
      </draw:frame>
      <draw:frame text:anchor-type="page" text:anchor-page-number="9" draw:z-index="712" draw:name="Shape823" draw:style-name="gr1" draw:text-style-name="P2" svg:width="0.7433in" svg:height="0.1287in" svg:x="0.5201in" svg:y="8.7717in">
        <draw:text-box>
          <text:p><text:span text:style-name="T1">non applicabile</text:span></text:p>
        </draw:text-box>
      </draw:frame>
      <draw:frame text:anchor-type="page" text:anchor-page-number="2" draw:z-index="711" draw:name="Shape157" draw:style-name="gr1" draw:text-style-name="P2" svg:width="0.1559in" svg:height="0.1287in" svg:x="0.5201in" svg:y="7.0965in">
        <draw:text-box>
          <text:p><text:span text:style-name="T5">CE</text:span></text:p>
        </draw:text-box>
      </draw:frame>
      <draw:frame text:anchor-type="page" text:anchor-page-number="4" draw:z-index="710" draw:name="Shape308" draw:style-name="gr1" draw:text-style-name="P2" svg:width="1.7807in" svg:height="0.1276in" svg:x="2.6217in" svg:y="6.2008in">
        <draw:text-box>
          <text:p><text:span text:style-name="T2">gesundheitsschädlicher Arbeitsstoffe</text:span></text:p>
        </draw:text-box>
      </draw:frame>
      <draw:frame text:anchor-type="page" text:anchor-page-number="5" draw:z-index="709" draw:name="Shape430" draw:style-name="gr1" draw:text-style-name="P2" svg:width="0.187in" svg:height="0.1287in" svg:x="3.7972in" svg:y="2.039in">
        <draw:text-box>
          <text:p><text:span text:style-name="T1"><text:s/>0.4</text:span></text:p>
        </draw:text-box>
      </draw:frame>
      <draw:frame text:anchor-type="page" text:anchor-page-number="7" draw:z-index="708" draw:name="Shape670" draw:style-name="gr1" draw:text-style-name="P2" svg:width="3.3441in" svg:height="0.1276in" svg:x="0.5201in" svg:y="7.0453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10" draw:z-index="707" draw:name="Shape900" draw:style-name="gr1" draw:text-style-name="P2" svg:width="1.6567in" svg:height="0.1287in" svg:x="2.0807in" svg:y="5.6071in">
        <draw:text-box>
          <text:p><text:span text:style-name="T1">Provoca grave irritazione oculare.</text:span></text:p>
        </draw:text-box>
      </draw:frame>
      <draw:frame text:anchor-type="page" text:anchor-page-number="11" draw:z-index="706" draw:name="Shape1041" draw:style-name="gr1" draw:text-style-name="P2" svg:width="2.7768in" svg:height="0.1276in" svg:x="0.5201in" svg:y="7.7217in">
        <draw:text-box>
          <text:p><text:span text:style-name="T2">20. Regolamento delegato (UE) 2021/643 (XVI Atp. CLP)</text:span></text:p>
        </draw:text-box>
      </draw:frame>
      <draw:frame text:anchor-type="page" text:anchor-page-number="1" draw:z-index="705" draw:name="Shape56" draw:style-name="gr1" draw:text-style-name="P2" svg:width="0.913in" svg:height="0.1287in" svg:x="3.0898in" svg:y="5.3681in">
        <draw:text-box>
          <text:p><text:span text:style-name="T3">ITALMONT S.R.L.</text:span></text:p>
        </draw:text-box>
      </draw:frame>
      <draw:frame text:anchor-type="page" text:anchor-page-number="9" draw:z-index="704" draw:name="Shape821" draw:style-name="gr1" draw:text-style-name="P2" svg:width="4.9024in" svg:height="0.1287in" svg:x="0.5201in" svg:y="8.6362in">
        <draw:text-box>
          <text:p><text:span text:style-name="T1">Regolamento (UE) 2019/1148 - relativo all'immissione sul mercato e all'uso di precursori di esplosivi</text:span></text:p>
        </draw:text-box>
      </draw:frame>
      <draw:frame text:anchor-type="page" text:anchor-page-number="5" draw:z-index="703" draw:name="Shape429" draw:style-name="gr1" draw:text-style-name="P2" svg:width="0.187in" svg:height="0.1287in" svg:x="2.1535in" svg:y="2.039in">
        <draw:text-box>
          <text:p><text:span text:style-name="T1"><text:s/>0.2</text:span></text:p>
        </draw:text-box>
      </draw:frame>
      <draw:frame text:anchor-type="page" text:anchor-page-number="3" draw:z-index="702" draw:name="Shape249" draw:style-name="gr1" draw:text-style-name="P2" svg:width="0.3496in" svg:height="0.1276in" svg:x="0.5201in" svg:y="8.4492in">
        <draw:text-box>
          <text:p><text:span text:style-name="T2">vigenti.</text:span></text:p>
        </draw:text-box>
      </draw:frame>
      <draw:frame text:anchor-type="page" text:anchor-page-number="6" draw:z-index="701" draw:name="Shape588" draw:style-name="gr1" draw:text-style-name="P2" svg:width="2.0024in" svg:height="0.1287in" svg:x="0.3744in" svg:y="6.2846in">
        <draw:text-box>
          <text:p><text:span text:style-name="T3">10.3. Possibilità di reazioni pericolose</text:span></text:p>
        </draw:text-box>
      </draw:frame>
      <draw:frame text:anchor-type="page" text:anchor-page-number="7" draw:z-index="700" draw:name="Shape668" draw:style-name="gr1" draw:text-style-name="P2" svg:width="2.3531in" svg:height="0.1276in" svg:x="0.5201in" svg:y="6.7744in">
        <draw:text-box>
          <text:p><text:span text:style-name="T2">MUTAGENICITÀ SULLE CELLULE GERMINALI</text:span></text:p>
        </draw:text-box>
      </draw:frame>
      <draw:frame text:anchor-type="page" text:anchor-page-number="10" draw:z-index="699" draw:name="Shape899" draw:style-name="gr1" draw:text-style-name="P2" svg:width="0.2677in" svg:height="0.1287in" svg:x="0.6756in" svg:y="5.6071in">
        <draw:text-box>
          <text:p><text:span text:style-name="T3">H319</text:span></text:p>
        </draw:text-box>
      </draw:frame>
      <draw:frame text:anchor-type="page" text:anchor-page-number="1" draw:z-index="698" draw:name="Shape57" draw:style-name="gr1" draw:text-style-name="P2" svg:width="0.8106in" svg:height="0.1287in" svg:x="0.5201in" svg:y="5.3693in">
        <draw:text-box>
          <text:p><text:span text:style-name="T1">Ragione Sociale</text:span></text:p>
        </draw:text-box>
      </draw:frame>
      <draw:frame text:anchor-type="page" text:anchor-page-number="8" draw:z-index="697" draw:name="Shape747" draw:style-name="gr1" draw:text-style-name="P2" svg:width="1.3252in" svg:height="0.1276in" svg:x="0.5201in" svg:y="7.0965in">
        <draw:text-box>
          <text:p><text:span text:style-name="T2">Informazioni non disponibili</text:span></text:p>
        </draw:text-box>
      </draw:frame>
      <draw:frame text:anchor-type="page" text:anchor-page-number="11" draw:z-index="696" draw:name="Shape1040" draw:style-name="gr1" draw:text-style-name="P2" svg:width="2.7996in" svg:height="0.1276in" svg:x="0.5201in" svg:y="7.5862in">
        <draw:text-box>
          <text:p><text:span text:style-name="T2">19. Regolamento delegato (UE) 2020/1182 (XV Atp. CLP)</text:span></text:p>
        </draw:text-box>
      </draw:frame>
      <draw:frame text:anchor-type="page" text:anchor-page-number="4" draw:z-index="695" draw:name="Shape307" draw:style-name="gr1" draw:text-style-name="P2" svg:width="4.6205in" svg:height="0.1276in" svg:x="2.6217in" svg:y="6.0654in">
        <draw:text-box>
          <text:p><text:span text:style-name="T2">WirkungDosisNOAELMAK-und BAT-Werte-Liste 2024 Ständige Senatskommission zur Prüfung</text:span></text:p>
        </draw:text-box>
      </draw:frame>
      <draw:frame text:anchor-type="page" text:anchor-page-number="2" draw:z-index="694" draw:name="Shape154" draw:style-name="gr1" draw:text-style-name="P2" svg:width="0.2177in" svg:height="0.1287in" svg:x="2.3098in" svg:y="6.9598in">
        <draw:text-box>
          <text:p><text:span text:style-name="T1">60.1</text:span></text:p>
        </draw:text-box>
      </draw:frame>
      <draw:frame text:anchor-type="page" text:anchor-page-number="4" draw:z-index="693" draw:name="Shape306" draw:style-name="gr1" draw:text-style-name="P2" svg:width="0.6189in" svg:height="0.1287in" svg:x="1.5291in" svg:y="6.0646in">
        <draw:text-box>
          <text:p><text:span text:style-name="T1">Deutschland</text:span></text:p>
        </draw:text-box>
      </draw:frame>
      <draw:frame text:anchor-type="page" text:anchor-page-number="10" draw:z-index="692" draw:name="Shape898" draw:style-name="gr1" draw:text-style-name="P2" svg:width="1.4157in" svg:height="0.1287in" svg:x="2.0807in" svg:y="5.4717in">
        <draw:text-box>
          <text:p><text:span text:style-name="T1">Provoca gravi lesioni oculari.</text:span></text:p>
        </draw:text-box>
      </draw:frame>
      <draw:frame text:anchor-type="page" text:anchor-page-number="7" draw:z-index="691" draw:name="Shape667" draw:style-name="gr1" draw:text-style-name="P2" svg:width="5.385in" svg:height="0.1276in" svg:x="0.5201in" svg:y="6.502in">
        <draw:text-box>
          <text:p><text:span text:style-name="T2">MASSA DI REAZIONE DI 5-CLORO-2- METIL-2H-ISOTIAZOL-3-ONE E 2-METIL-2H-ISOTIAZOL-3-ONE (3:1)</text:span></text:p>
        </draw:text-box>
      </draw:frame>
      <draw:frame text:anchor-type="page" text:anchor-page-number="11" draw:z-index="690" draw:name="Shape1039" draw:style-name="gr1" draw:text-style-name="P2" svg:width="2.7768in" svg:height="0.1276in" svg:x="0.5201in" svg:y="7.4508in">
        <draw:text-box>
          <text:p><text:span text:style-name="T2">18. Regolamento delegato (UE) 2020/217 (XIV Atp. CLP)</text:span></text:p>
        </draw:text-box>
      </draw:frame>
      <draw:frame text:anchor-type="page" text:anchor-page-number="1" draw:z-index="689" draw:name="Shape55" draw:style-name="gr1" draw:text-style-name="P2" svg:width="3.274in" svg:height="0.1287in" svg:x="0.3744in" svg:y="5.0984in">
        <draw:text-box>
          <text:p><text:span text:style-name="T3">1.3. Informazioni sul fornitore della scheda di dati di sicurezza</text:span></text:p>
        </draw:text-box>
      </draw:frame>
      <draw:frame text:anchor-type="page" text:anchor-page-number="9" draw:z-index="688" draw:name="Shape819" draw:style-name="gr1" draw:text-style-name="P2" svg:width="1.1252in" svg:height="0.1276in" svg:x="3.2457in" svg:y="8.3638in">
        <draw:text-box>
          <text:p><text:span text:style-name="T2">CALCIO CARBONATO</text:span></text:p>
        </draw:text-box>
      </draw:frame>
      <draw:frame text:anchor-type="page" text:anchor-page-number="8" draw:z-index="687" draw:name="Shape746" draw:style-name="gr1" draw:text-style-name="P2" svg:width="1.2177in" svg:height="0.1287in" svg:x="0.3744in" svg:y="6.8256in">
        <draw:text-box>
          <text:p><text:span text:style-name="T3">12.4. Mobilità nel suolo</text:span></text:p>
        </draw:text-box>
      </draw:frame>
      <draw:frame text:anchor-type="page" text:anchor-page-number="2" draw:z-index="686" draw:name="Shape155" draw:style-name="gr1" draw:text-style-name="P2" svg:width="0.3413in" svg:height="0.1287in" svg:x="0.5201in" svg:y="6.961in">
        <draw:text-box>
          <text:p><text:span text:style-name="T5">INDEX</text:span></text:p>
        </draw:text-box>
      </draw:frame>
      <draw:frame text:anchor-type="page" text:anchor-page-number="5" draw:z-index="685" draw:name="Shape428" draw:style-name="gr1" draw:text-style-name="P2" svg:width="0.224in" svg:height="0.1287in" svg:x="1.5291in" svg:y="2.039in">
        <draw:text-box>
          <text:p><text:span text:style-name="T1">POL</text:span></text:p>
        </draw:text-box>
      </draw:frame>
      <draw:frame text:anchor-type="page" text:anchor-page-number="3" draw:z-index="684" draw:name="Shape248" draw:style-name="gr1" draw:text-style-name="P2" svg:width="6.6276in" svg:height="0.1276in" svg:x="0.5201in" svg:y="8.3126in">
        <draw:text-box>
          <text:p><text:span text:style-name="T2">devono essere scaricate nelle fognature. Smaltire l'acqua contaminata usata per l'estinzione ed il residuo dell'incendio secondo le norme</text:span></text:p>
        </draw:text-box>
      </draw:frame>
      <draw:frame text:anchor-type="page" text:anchor-page-number="6" draw:z-index="683" draw:name="Shape587" draw:style-name="gr1" draw:text-style-name="P2" svg:width="3.4232in" svg:height="0.1276in" svg:x="0.5201in" svg:y="6.0154in">
        <draw:text-box>
          <text:p><text:span text:style-name="T2">Il prodotto è stabile nelle normali condizioni di impiego e di stoccaggio.</text:span></text:p>
        </draw:text-box>
      </draw:frame>
      <draw:frame text:anchor-type="page" text:anchor-page-number="4" draw:z-index="682" draw:name="Shape305" draw:style-name="gr1" draw:text-style-name="P2" svg:width="0.2362in" svg:height="0.1287in" svg:x="0.5201in" svg:y="6.0646in">
        <draw:text-box>
          <text:p><text:span text:style-name="T1">DEU</text:span></text:p>
        </draw:text-box>
      </draw:frame>
      <draw:frame text:anchor-type="page" text:anchor-page-number="10" draw:z-index="681" draw:name="Shape897" draw:style-name="gr1" draw:text-style-name="P2" svg:width="0.2677in" svg:height="0.1287in" svg:x="0.6756in" svg:y="5.4717in">
        <draw:text-box>
          <text:p><text:span text:style-name="T3">H318</text:span></text:p>
        </draw:text-box>
      </draw:frame>
      <draw:frame text:anchor-type="page" text:anchor-page-number="6" draw:z-index="680" draw:name="Shape586" draw:style-name="gr1" draw:text-style-name="P2" svg:width="1.1567in" svg:height="0.1287in" svg:x="0.3744in" svg:y="5.7437in">
        <draw:text-box>
          <text:p><text:span text:style-name="T3">10.2. Stabilità chimica</text:span></text:p>
        </draw:text-box>
      </draw:frame>
      <draw:frame text:anchor-type="page" text:anchor-page-number="7" draw:z-index="679" draw:name="Shape666" draw:style-name="gr1" draw:text-style-name="P2" svg:width="0.4713in" svg:height="0.1276in" svg:x="0.5201in" svg:y="6.3665in">
        <draw:text-box>
          <text:p><text:span text:style-name="T2">Contiene:</text:span></text:p>
        </draw:text-box>
      </draw:frame>
      <draw:frame text:anchor-type="page" text:anchor-page-number="11" draw:z-index="678" draw:name="Shape1038" draw:style-name="gr1" draw:text-style-name="P2" svg:width="1.6343in" svg:height="0.1276in" svg:x="0.5201in" svg:y="7.3154in">
        <draw:text-box>
          <text:p><text:span text:style-name="T2">17. Regolamento (UE) 2019/1148</text:span></text:p>
        </draw:text-box>
      </draw:frame>
      <draw:frame text:anchor-type="page" text:anchor-page-number="1" draw:z-index="677" draw:name="Shape54" draw:style-name="gr1" draw:text-style-name="P2" svg:width="0.2543in" svg:height="0.1287in" svg:x="6.2102in" svg:y="4.8272in">
        <draw:text-box>
          <text:p><text:span text:style-name="T3"><text:s text:c="7"/>-</text:span></text:p>
        </draw:text-box>
      </draw:frame>
      <draw:frame text:anchor-type="page" text:anchor-page-number="5" draw:z-index="676" draw:name="Shape427" draw:style-name="gr1" draw:text-style-name="P2" svg:width="0.6441in" svg:height="0.1287in" svg:x="0.6756in" svg:y="2.039in">
        <draw:text-box>
          <text:p><text:span text:style-name="T1">NDS/NDSCh</text:span></text:p>
        </draw:text-box>
      </draw:frame>
      <draw:frame text:anchor-type="page" text:anchor-page-number="2" draw:z-index="675" draw:name="Shape153" draw:style-name="gr1" draw:text-style-name="P2" svg:width="1.1705in" svg:height="0.1287in" svg:x="0.5201in" svg:y="6.8244in">
        <draw:text-box>
          <text:p><text:span text:style-name="T3">CALCIO CARBONATO</text:span></text:p>
        </draw:text-box>
      </draw:frame>
      <draw:frame text:anchor-type="page" text:anchor-page-number="8" draw:z-index="674" draw:name="Shape744" draw:style-name="gr1" draw:text-style-name="P2" svg:width="0.2185in" svg:height="0.1276in" svg:x="3.3291in" svg:y="6.5543in">
        <draw:text-box>
          <text:p><text:span text:style-name="T2">&lt; 54</text:span></text:p>
        </draw:text-box>
      </draw:frame>
      <draw:frame text:anchor-type="page" text:anchor-page-number="3" draw:z-index="673" draw:name="Shape247" draw:style-name="gr1" draw:text-style-name="P2" svg:width="6.4634in" svg:height="0.1276in" svg:x="0.5201in" svg:y="8.1772in">
        <draw:text-box>
          <text:p><text:span text:style-name="T2">per la salute. Indossare sempre l'equipaggiamento completo di protezione antincendio. Raccogliere le acque di spegnimento che non</text:span></text:p>
        </draw:text-box>
      </draw:frame>
      <draw:frame text:anchor-type="page" text:anchor-page-number="9" draw:z-index="672" draw:name="Shape820" draw:style-name="gr1" draw:text-style-name="P2" svg:width="0.2886in" svg:height="0.1276in" svg:x="0.6756in" svg:y="8.3661in">
        <draw:text-box>
          <text:p><text:span text:style-name="T2">Punto</text:span></text:p>
        </draw:text-box>
      </draw:frame>
      <draw:frame text:anchor-type="page" text:anchor-page-number="5" draw:z-index="671" draw:name="Shape426" draw:style-name="gr1" draw:text-style-name="P2" svg:width="0.3921in" svg:height="0.1276in" svg:x="5.1917in" svg:y="1.9055in">
        <draw:text-box>
          <text:p><text:span text:style-name="T2">INALAB</text:span></text:p>
        </draw:text-box>
      </draw:frame>
      <draw:frame text:anchor-type="page" text:anchor-page-number="6" draw:z-index="670" draw:name="Shape585" draw:style-name="gr1" draw:text-style-name="P2" svg:width="2.7004in" svg:height="0.1276in" svg:x="0.6756in" svg:y="5.6075in">
        <draw:text-box>
          <text:p><text:span text:style-name="T2">Si decompone a temperature superiori a 800°C/1472°F.</text:span></text:p>
        </draw:text-box>
      </draw:frame>
      <draw:frame text:anchor-type="page" text:anchor-page-number="1" draw:z-index="669" draw:name="Shape53" draw:style-name="gr1" draw:text-style-name="P2" svg:width="0.3161in" svg:height="0.1287in" svg:x="4.4937in" svg:y="4.8272in">
        <draw:text-box>
          <text:p><text:span text:style-name="T3"><text:s text:c="9"/>-</text:span></text:p>
        </draw:text-box>
      </draw:frame>
      <draw:frame text:anchor-type="page" text:anchor-page-number="8" draw:z-index="668" draw:name="Shape745" draw:style-name="gr1" draw:text-style-name="P2" svg:width="0.2213in" svg:height="0.1276in" svg:x="0.5201in" svg:y="6.5563in">
        <draw:text-box>
          <text:p><text:span text:style-name="T2">BCF</text:span></text:p>
        </draw:text-box>
      </draw:frame>
      <draw:frame text:anchor-type="page" text:anchor-page-number="9" draw:z-index="667" draw:name="Shape818" draw:style-name="gr1" draw:text-style-name="P2" svg:width="0.1252in" svg:height="0.1287in" svg:x="1.8417in" svg:y="8.3638in">
        <draw:text-box>
          <text:p><text:span text:style-name="T1">75</text:span></text:p>
        </draw:text-box>
      </draw:frame>
      <draw:frame text:anchor-type="page" text:anchor-page-number="11" draw:z-index="666" draw:name="Shape1037" draw:style-name="gr1" draw:text-style-name="P2" svg:width="2.826in" svg:height="0.1276in" svg:x="0.5201in" svg:y="7.1799in">
        <draw:text-box>
          <text:p><text:span text:style-name="T2">16. Regolamento delegato (UE) 2018/1480 (XIII Atp. CLP)</text:span></text:p>
        </draw:text-box>
      </draw:frame>
      <draw:frame text:anchor-type="page" text:anchor-page-number="4" draw:z-index="665" draw:name="Shape304" draw:style-name="gr1" draw:text-style-name="P2" svg:width="1.0323in" svg:height="0.1276in" svg:x="0.5201in" svg:y="5.7945in">
        <draw:text-box>
          <text:p><text:span text:style-name="T2">Riferimenti normativi:</text:span></text:p>
        </draw:text-box>
      </draw:frame>
      <draw:frame text:anchor-type="page" text:anchor-page-number="2" draw:z-index="664" draw:name="Shape152" draw:style-name="gr1" draw:text-style-name="P2" svg:width="1.6878in" svg:height="0.1287in" svg:x="3.4846in" svg:y="6.5555in">
        <draw:text-box>
          <text:p><text:span text:style-name="T3">Classificazione 1272/2008 (CLP)</text:span></text:p>
        </draw:text-box>
      </draw:frame>
      <draw:frame text:anchor-type="page" text:anchor-page-number="10" draw:z-index="663" draw:name="Shape896" draw:style-name="gr1" draw:text-style-name="P2" svg:width="2.5587in" svg:height="0.1287in" svg:x="2.0807in" svg:y="5.3366in">
        <draw:text-box>
          <text:p><text:span text:style-name="T1">Provoca gravi ustioni cutanee e gravi lesioni oculari.</text:span></text:p>
        </draw:text-box>
      </draw:frame>
      <draw:frame text:anchor-type="page" text:anchor-page-number="3" draw:z-index="662" draw:name="Shape246" draw:style-name="gr1" draw:text-style-name="P2" svg:width="6.6567in" svg:height="0.1276in" svg:x="0.5201in" svg:y="8.0417in">
        <draw:text-box>
          <text:p><text:span text:style-name="T2">Raffreddare con getti d'acqua i contenitori per evitare la decomposizione del prodotto e lo sviluppo di sostanze potenzialmente pericolose</text:span></text:p>
        </draw:text-box>
      </draw:frame>
      <draw:frame text:anchor-type="page" text:anchor-page-number="7" draw:z-index="661" draw:name="Shape665" draw:style-name="gr1" draw:text-style-name="P2" svg:width="1.8496in" svg:height="0.1276in" svg:x="0.5201in" svg:y="6.2335in">
        <draw:text-box>
          <text:p><text:span text:style-name="T2">Può provocare una reazione allergica.</text:span></text:p>
        </draw:text-box>
      </draw:frame>
      <draw:frame text:anchor-type="page" text:anchor-page-number="2" draw:z-index="660" draw:name="Shape151" draw:style-name="gr1" draw:text-style-name="P2" svg:width="0.4398in" svg:height="0.1287in" svg:x="2.3098in" svg:y="6.5555in">
        <draw:text-box>
          <text:p><text:span text:style-name="T3">Conc. %</text:span></text:p>
        </draw:text-box>
      </draw:frame>
      <draw:frame text:anchor-type="page" text:anchor-page-number="3" draw:z-index="659" draw:name="Shape245" draw:style-name="gr1" draw:text-style-name="P2" svg:width="1.3858in" svg:height="0.1276in" svg:x="0.5201in" svg:y="7.9083in">
        <draw:text-box>
          <text:p><text:span text:style-name="T2">INFORMAZIONI GENERALI</text:span></text:p>
        </draw:text-box>
      </draw:frame>
      <draw:frame text:anchor-type="page" text:anchor-page-number="1" draw:z-index="658" draw:name="Shape52" draw:style-name="gr1" draw:text-style-name="P2" svg:width="0.5323in" svg:height="0.1287in" svg:x="3.0898in" svg:y="4.6811in">
        <draw:text-box>
          <text:p><text:span text:style-name="T3">LCS: F, M.</text:span></text:p>
        </draw:text-box>
      </draw:frame>
      <draw:frame text:anchor-type="page" text:anchor-page-number="5" draw:z-index="657" draw:name="Shape424" draw:style-name="gr1" draw:text-style-name="P2" svg:width="0.187in" svg:height="0.1287in" svg:x="3.7972in" svg:y="1.9035in">
        <draw:text-box>
          <text:p><text:span text:style-name="T1"><text:s/>0.4</text:span></text:p>
        </draw:text-box>
      </draw:frame>
      <draw:frame text:anchor-type="page" text:anchor-page-number="4" draw:z-index="656" draw:name="Shape303" draw:style-name="gr1" draw:text-style-name="P2" svg:width="1.3661in" svg:height="0.1287in" svg:x="0.3744in" svg:y="5.5256in">
        <draw:text-box>
          <text:p><text:span text:style-name="T3">8.1. Parametri di controllo</text:span></text:p>
        </draw:text-box>
      </draw:frame>
      <draw:frame text:anchor-type="page" text:anchor-page-number="6" draw:z-index="655" draw:name="Shape584" draw:style-name="gr1" draw:text-style-name="P2" svg:width="1.1252in" svg:height="0.1276in" svg:x="0.5201in" svg:y="5.472in">
        <draw:text-box>
          <text:p><text:span text:style-name="T2">CALCIO CARBONATO</text:span></text:p>
        </draw:text-box>
      </draw:frame>
      <draw:frame text:anchor-type="page" text:anchor-page-number="8" draw:z-index="654" draw:name="Shape742" draw:style-name="gr1" draw:text-style-name="P2" svg:width="0.2157in" svg:height="0.1276in" svg:x="3.3291in" svg:y="6.4189in">
        <draw:text-box>
          <text:p><text:span text:style-name="T2">0.75</text:span></text:p>
        </draw:text-box>
      </draw:frame>
      <draw:frame text:anchor-type="page" text:anchor-page-number="9" draw:z-index="653" draw:name="Shape817" draw:style-name="gr1" draw:text-style-name="P2" svg:width="1.8362in" svg:height="0.1276in" svg:x="3.2457in" svg:y="8.2291in">
        <draw:text-box>
          <text:p><text:span text:style-name="T2">2-METIL-2H-ISOTIAZOL-3-ONE (3:1)</text:span></text:p>
        </draw:text-box>
      </draw:frame>
      <draw:frame text:anchor-type="page" text:anchor-page-number="7" draw:z-index="652" draw:name="Shape663" draw:style-name="gr1" draw:text-style-name="P2" svg:width="2.5622in" svg:height="0.1276in" svg:x="0.5201in" svg:y="5.9626in">
        <draw:text-box>
          <text:p><text:span text:style-name="T2">SENSIBILIZZAZIONE RESPIRATORIA O CUTANEA</text:span></text:p>
        </draw:text-box>
      </draw:frame>
      <draw:frame text:anchor-type="page" text:anchor-page-number="10" draw:z-index="651" draw:name="Shape895" draw:style-name="gr1" draw:text-style-name="P2" svg:width="0.2677in" svg:height="0.1287in" svg:x="0.6756in" svg:y="5.3366in">
        <draw:text-box>
          <text:p><text:span text:style-name="T3">H314</text:span></text:p>
        </draw:text-box>
      </draw:frame>
      <draw:frame text:anchor-type="page" text:anchor-page-number="11" draw:z-index="650" draw:name="Shape1036" draw:style-name="gr1" draw:text-style-name="P2" svg:width="2.2831in" svg:height="0.1276in" svg:x="0.5201in" svg:y="7.0453in">
        <draw:text-box>
          <text:p><text:span text:style-name="T2">15. Regolamento (UE) 2019/521 (XII Atp. CLP)</text:span></text:p>
        </draw:text-box>
      </draw:frame>
      <draw:frame text:anchor-type="page" text:anchor-page-number="8" draw:z-index="649" draw:name="Shape743" draw:style-name="gr1" draw:text-style-name="P2" svg:width="2.1406in" svg:height="0.1276in" svg:x="0.5201in" svg:y="6.4201in">
        <draw:text-box>
          <text:p><text:span text:style-name="T2">Coefficiente di ripartizione: n-ottanolo/acqua</text:span></text:p>
        </draw:text-box>
      </draw:frame>
      <draw:frame text:anchor-type="page" text:anchor-page-number="3" draw:z-index="648" draw:name="Shape244" draw:style-name="gr1" draw:text-style-name="P2" svg:width="3.3606in" svg:height="0.1287in" svg:x="0.3744in" svg:y="7.6374in">
        <draw:text-box>
          <text:p><text:span text:style-name="T3">5.3. Raccomandazioni per gli addetti all’estinzione degli incendi</text:span></text:p>
        </draw:text-box>
      </draw:frame>
      <draw:frame text:anchor-type="page" text:anchor-page-number="7" draw:z-index="647" draw:name="Shape662" draw:style-name="gr1" draw:text-style-name="P2" svg:width="3.3441in" svg:height="0.1276in" svg:x="0.5201in" svg:y="5.6925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2" draw:z-index="646" draw:name="Shape150" draw:style-name="gr1" draw:text-style-name="P2" svg:width="0.7122in" svg:height="0.1287in" svg:x="0.5201in" svg:y="6.5555in">
        <draw:text-box>
          <text:p><text:span text:style-name="T1">Identificazione</text:span></text:p>
        </draw:text-box>
      </draw:frame>
      <draw:frame text:anchor-type="page" text:anchor-page-number="11" draw:z-index="645" draw:name="Shape1035" draw:style-name="gr1" draw:text-style-name="P2" svg:width="2.2524in" svg:height="0.1276in" svg:x="0.5201in" svg:y="6.9098in">
        <draw:text-box>
          <text:p><text:span text:style-name="T2">14. Regolamento (UE) 2018/669 (XI Atp. CLP)</text:span></text:p>
        </draw:text-box>
      </draw:frame>
      <draw:frame text:anchor-type="page" text:anchor-page-number="4" draw:z-index="644" draw:name="Shape302" draw:style-name="gr1" draw:text-style-name="P2" svg:width="4.7748in" svg:height="0.1768in" svg:x="0.3744in" svg:y="5.2437in">
        <draw:text-box>
          <text:p><text:span text:style-name="T4">SEZIONE 8. Controlli dell'esposizione/della protezione individuale</text:span></text:p>
        </draw:text-box>
      </draw:frame>
      <draw:frame text:anchor-type="page" text:anchor-page-number="5" draw:z-index="643" draw:name="Shape423" draw:style-name="gr1" draw:text-style-name="P2" svg:width="0.187in" svg:height="0.1287in" svg:x="2.1535in" svg:y="1.9035in">
        <draw:text-box>
          <text:p><text:span text:style-name="T1"><text:s/>0.2</text:span></text:p>
        </draw:text-box>
      </draw:frame>
      <draw:frame text:anchor-type="page" text:anchor-page-number="1" draw:z-index="642" draw:name="Shape51" draw:style-name="gr1" draw:text-style-name="P2" svg:width="0.378in" svg:height="0.1287in" svg:x="3.0898in" svg:y="4.5366in">
        <draw:text-box>
          <text:p><text:span text:style-name="T3">PC: 9a.</text:span></text:p>
        </draw:text-box>
      </draw:frame>
      <draw:frame text:anchor-type="page" text:anchor-page-number="10" draw:z-index="641" draw:name="Shape894" draw:style-name="gr1" draw:text-style-name="P2" svg:width="0.9469in" svg:height="0.1287in" svg:x="2.0807in" svg:y="5.2016in">
        <draw:text-box>
          <text:p><text:span text:style-name="T1">Tossico se ingerito.</text:span></text:p>
        </draw:text-box>
      </draw:frame>
      <draw:frame text:anchor-type="page" text:anchor-page-number="6" draw:z-index="640" draw:name="Shape583" draw:style-name="gr1" draw:text-style-name="P2" svg:width="4.6858in" svg:height="0.1276in" svg:x="0.5201in" svg:y="5.2035in">
        <draw:text-box>
          <text:p><text:span text:style-name="T2">Non vi sono particolari pericoli di reazione con altre sostanze nelle normali condizioni di impiego.</text:span></text:p>
        </draw:text-box>
      </draw:frame>
      <draw:frame text:anchor-type="page" text:anchor-page-number="9" draw:z-index="639" draw:name="Shape815" draw:style-name="gr1" draw:text-style-name="P2" svg:width="3.5197in" svg:height="0.1276in" svg:x="3.2457in" svg:y="8.0937in">
        <draw:text-box>
          <text:p><text:span text:style-name="T2">MASSA DI REAZIONE DI 5-CLORO-2- METIL-2H-ISOTIAZOL-3-ONE E</text:span></text:p>
        </draw:text-box>
      </draw:frame>
      <draw:frame text:anchor-type="page" text:anchor-page-number="7" draw:z-index="638" draw:name="Shape660" draw:style-name="gr1" draw:text-style-name="P2" svg:width="2.5642in" svg:height="0.1276in" svg:x="0.5201in" svg:y="5.4217in">
        <draw:text-box>
          <text:p><text:span text:style-name="T2">GRAVI DANNI OCULARI / IRRITAZIONE OCULARE</text:span></text:p>
        </draw:text-box>
      </draw:frame>
      <draw:frame text:anchor-type="page" text:anchor-page-number="1" draw:z-index="637" draw:name="Shape50" draw:style-name="gr1" draw:text-style-name="P2" svg:width="0.798in" svg:height="0.1287in" svg:x="3.0898in" svg:y="4.3917in">
        <draw:text-box>
          <text:p><text:span text:style-name="T3">PROC: 5, 8b, 9.</text:span></text:p>
        </draw:text-box>
      </draw:frame>
      <draw:frame text:anchor-type="page" text:anchor-page-number="8" draw:z-index="636" draw:name="Shape741" draw:style-name="gr1" draw:text-style-name="P2" svg:width="5.385in" svg:height="0.1276in" svg:x="0.5201in" svg:y="6.2835in">
        <draw:text-box>
          <text:p><text:span text:style-name="T2">MASSA DI REAZIONE DI 5-CLORO-2- METIL-2H-ISOTIAZOL-3-ONE E 2-METIL-2H-ISOTIAZOL-3-ONE (3:1)</text:span></text:p>
        </draw:text-box>
      </draw:frame>
      <draw:frame text:anchor-type="page" text:anchor-page-number="9" draw:z-index="635" draw:name="Shape816" draw:style-name="gr1" draw:text-style-name="P2" svg:width="0.2886in" svg:height="0.1276in" svg:x="0.6756in" svg:y="8.0957in">
        <draw:text-box>
          <text:p><text:span text:style-name="T2">Punto</text:span></text:p>
        </draw:text-box>
      </draw:frame>
      <draw:frame text:anchor-type="page" text:anchor-page-number="6" draw:z-index="634" draw:name="Shape582" draw:style-name="gr1" draw:text-style-name="P2" svg:width="0.7803in" svg:height="0.1287in" svg:x="0.3744in" svg:y="4.9327in">
        <draw:text-box>
          <text:p><text:span text:style-name="T3">10.1. Reattività</text:span></text:p>
        </draw:text-box>
      </draw:frame>
      <draw:frame text:anchor-type="page" text:anchor-page-number="3" draw:z-index="633" draw:name="Shape243" draw:style-name="gr1" draw:text-style-name="P2" svg:width="2.1724in" svg:height="0.1276in" svg:x="0.5201in" svg:y="7.3673in">
        <draw:text-box>
          <text:p><text:span text:style-name="T2">Evitare di respirare i prodotti di combustione.</text:span></text:p>
        </draw:text-box>
      </draw:frame>
      <draw:frame text:anchor-type="page" text:anchor-page-number="11" draw:z-index="632" draw:name="Shape1034" draw:style-name="gr1" draw:text-style-name="P2" svg:width="2.2217in" svg:height="0.1276in" svg:x="0.5201in" svg:y="6.7744in">
        <draw:text-box>
          <text:p><text:span text:style-name="T2">13. Regolamento (UE) 2017/776 (X Atp. CLP)</text:span></text:p>
        </draw:text-box>
      </draw:frame>
      <draw:frame text:anchor-type="page" text:anchor-page-number="5" draw:z-index="631" draw:name="Shape422" draw:style-name="gr1" draw:text-style-name="P2" svg:width="0.2362in" svg:height="0.1287in" svg:x="1.5291in" svg:y="1.9035in">
        <draw:text-box>
          <text:p><text:span text:style-name="T1">DEU</text:span></text:p>
        </draw:text-box>
      </draw:frame>
      <draw:frame text:anchor-type="page" text:anchor-page-number="4" draw:z-index="630" draw:name="Shape299" draw:style-name="gr1" draw:text-style-name="P2" svg:width="1.3252in" svg:height="0.1276in" svg:x="0.5201in" svg:y="4.9335in">
        <draw:text-box>
          <text:p><text:span text:style-name="T2">Informazioni non disponibili</text:span></text:p>
        </draw:text-box>
      </draw:frame>
      <draw:frame text:anchor-type="page" text:anchor-page-number="10" draw:z-index="629" draw:name="Shape893" draw:style-name="gr1" draw:text-style-name="P2" svg:width="0.2677in" svg:height="0.1287in" svg:x="0.6756in" svg:y="5.2016in">
        <draw:text-box>
          <text:p><text:span text:style-name="T3">H301</text:span></text:p>
        </draw:text-box>
      </draw:frame>
      <draw:frame text:anchor-type="page" text:anchor-page-number="2" draw:z-index="628" draw:name="Shape149" draw:style-name="gr1" draw:text-style-name="P2" svg:width="0.4776in" svg:height="0.1287in" svg:x="0.5201in" svg:y="6.2835in">
        <draw:text-box>
          <text:p><text:span text:style-name="T1">Contiene:</text:span></text:p>
        </draw:text-box>
      </draw:frame>
      <draw:frame text:anchor-type="page" text:anchor-page-number="5" draw:z-index="627" draw:name="Shape421" draw:style-name="gr1" draw:text-style-name="P2" svg:width="0.2425in" svg:height="0.1287in" svg:x="0.6756in" svg:y="1.9035in">
        <draw:text-box>
          <text:p><text:span text:style-name="T1">MAK</text:span></text:p>
        </draw:text-box>
      </draw:frame>
      <draw:frame text:anchor-type="page" text:anchor-page-number="1" draw:z-index="626" draw:name="Shape49" draw:style-name="gr1" draw:text-style-name="P2" svg:width="0.3969in" svg:height="0.1287in" svg:x="3.0898in" svg:y="4.2457in">
        <draw:text-box>
          <text:p><text:span text:style-name="T3">ERC: 2.</text:span></text:p>
        </draw:text-box>
      </draw:frame>
      <draw:frame text:anchor-type="page" text:anchor-page-number="7" draw:z-index="625" draw:name="Shape659" draw:style-name="gr1" draw:text-style-name="P2" svg:width="3.3441in" svg:height="0.1276in" svg:x="0.5201in" svg:y="5.1516in">
        <draw:text-box>
          <text:p><text:span text:style-name="T2">Non risponde ai criteri di classificazione per questa classe di pericolo</text:span></text:p>
        </draw:text-box>
      </draw:frame>
      <draw:frame text:anchor-type="page" text:anchor-page-number="4" draw:z-index="624" draw:name="Shape298" draw:style-name="gr1" draw:text-style-name="P2" svg:width="1.2488in" svg:height="0.1287in" svg:x="0.3744in" svg:y="4.6626in">
        <draw:text-box>
          <text:p><text:span text:style-name="T3">7.3. Usi finali particolari</text:span></text:p>
        </draw:text-box>
      </draw:frame>
      <draw:frame text:anchor-type="page" text:anchor-page-number="8" draw:z-index="623" draw:name="Shape740" draw:style-name="gr1" draw:text-style-name="P2" svg:width="1.6752in" svg:height="0.1287in" svg:x="0.3744in" svg:y="5.8791in">
        <draw:text-box>
          <text:p><text:span text:style-name="T3">12.3. Potenziale di bioaccumulo</text:span></text:p>
        </draw:text-box>
      </draw:frame>
      <draw:frame text:anchor-type="page" text:anchor-page-number="10" draw:z-index="622" draw:name="Shape892" draw:style-name="gr1" draw:text-style-name="P2" svg:width="0.8421in" svg:height="0.1287in" svg:x="2.0807in" svg:y="5.0661in">
        <draw:text-box>
          <text:p><text:span text:style-name="T1">Letale se inalato.</text:span></text:p>
        </draw:text-box>
      </draw:frame>
      <draw:frame text:anchor-type="page" text:anchor-page-number="2" draw:z-index="621" draw:name="Shape148" draw:style-name="gr1" draw:text-style-name="P2" svg:width="0.6189in" svg:height="0.1287in" svg:x="0.3744in" svg:y="6.0146in">
        <draw:text-box>
          <text:p><text:span text:style-name="T3">3.2. Miscele</text:span></text:p>
        </draw:text-box>
      </draw:frame>
      <draw:frame text:anchor-type="page" text:anchor-page-number="9" draw:z-index="620" draw:name="Shape814" draw:style-name="gr1" draw:text-style-name="P2" svg:width="0.1252in" svg:height="0.1287in" svg:x="1.8417in" svg:y="8.0929in">
        <draw:text-box>
          <text:p><text:span text:style-name="T1">75</text:span></text:p>
        </draw:text-box>
      </draw:frame>
      <draw:frame text:anchor-type="page" text:anchor-page-number="6" draw:z-index="619" draw:name="Shape581" draw:style-name="gr1" draw:text-style-name="P2" svg:width="2.3705in" svg:height="0.1768in" svg:x="0.3744in" svg:y="4.6508in">
        <draw:text-box>
          <text:p><text:span text:style-name="T4">SEZIONE 10. Stabilità e reattività</text:span></text:p>
        </draw:text-box>
      </draw:frame>
      <draw:frame text:anchor-type="page" text:anchor-page-number="3" draw:z-index="618" draw:name="Shape242" draw:style-name="gr1" draw:text-style-name="P2" svg:width="3.1323in" svg:height="0.1276in" svg:x="0.5201in" svg:y="7.2319in">
        <draw:text-box>
          <text:p><text:span text:style-name="T2">PERICOLI DOVUTI ALL'ESPOSIZIONE IN CASO DI INCENDIO</text:span></text:p>
        </draw:text-box>
      </draw:frame>
      <draw:frame text:anchor-type="page" text:anchor-page-number="11" draw:z-index="617" draw:name="Shape1033" draw:style-name="gr1" draw:text-style-name="P2" svg:width="2.3051in" svg:height="0.1276in" svg:x="0.5201in" svg:y="6.639in">
        <draw:text-box>
          <text:p><text:span text:style-name="T2">12. Regolamento (UE) 2016/1179 (IX Atp. CLP)</text:span></text:p>
        </draw:text-box>
      </draw:frame>
      <draw:frame text:anchor-type="page" text:anchor-page-number="6" draw:z-index="616" draw:name="Shape578" draw:style-name="gr1" draw:text-style-name="P2" svg:width="1.3421in" svg:height="0.1287in" svg:x="0.5201in" svg:y="4.4752in">
        <draw:text-box>
          <text:p><text:span text:style-name="T1">Informazioni non disponibili</text:span></text:p>
        </draw:text-box>
      </draw:frame>
      <draw:frame text:anchor-type="page" text:anchor-page-number="7" draw:z-index="615" draw:name="Shape657" draw:style-name="gr1" draw:text-style-name="P2" svg:width="2.6169in" svg:height="0.1276in" svg:x="0.5201in" svg:y="4.8807in">
        <draw:text-box>
          <text:p><text:span text:style-name="T2">CORROSIONE CUTANEA / IRRITAZIONE CUTANEA</text:span></text:p>
        </draw:text-box>
      </draw:frame>
      <draw:frame text:anchor-type="page" text:anchor-page-number="2" draw:z-index="614" draw:name="Shape147" draw:style-name="gr1" draw:text-style-name="P2" svg:width="4.1016in" svg:height="0.1768in" svg:x="0.3744in" svg:y="5.7327in">
        <draw:text-box>
          <text:p><text:span text:style-name="T4">SEZIONE 3. Composizione/informazioni sugli ingredienti</text:span></text:p>
        </draw:text-box>
      </draw:frame>
      <draw:frame text:anchor-type="page" text:anchor-page-number="11" draw:z-index="613" draw:name="Shape1032" draw:style-name="gr1" draw:text-style-name="P2" svg:width="3.5189in" svg:height="0.1276in" svg:x="0.5201in" svg:y="6.5035in">
        <draw:text-box>
          <text:p><text:span text:style-name="T2">11. Regolamento (UE) 2016/918 del Parlamento Europeo (VIII Atp. CLP)</text:span></text:p>
        </draw:text-box>
      </draw:frame>
      <draw:frame text:anchor-type="page" text:anchor-page-number="1" draw:z-index="612" draw:name="Shape47" draw:style-name="gr1" draw:text-style-name="P2" svg:width="1.7114in" svg:height="0.1287in" svg:x="0.5201in" svg:y="4.2437in">
        <draw:text-box>
          <text:p><text:span text:style-name="T3">Produzione prodotto verniciante</text:span></text:p>
        </draw:text-box>
      </draw:frame>
      <draw:frame text:anchor-type="page" text:anchor-page-number="9" draw:z-index="611" draw:name="Shape812" draw:style-name="gr1" draw:text-style-name="P2" svg:width="0.6177in" svg:height="0.1276in" svg:x="3.2457in" svg:y="7.9583in">
        <draw:text-box>
          <text:p><text:span text:style-name="T2">GLIOSSALE</text:span></text:p>
        </draw:text-box>
      </draw:frame>
      <draw:frame text:anchor-type="page" text:anchor-page-number="5" draw:z-index="610" draw:name="Shape419" draw:style-name="gr1" draw:text-style-name="P2" svg:width="0.2177in" svg:height="0.1287in" svg:x="4.5665in" svg:y="1.7681in">
        <draw:text-box>
          <text:p><text:span text:style-name="T1">ppm</text:span></text:p>
        </draw:text-box>
      </draw:frame>
      <draw:frame text:anchor-type="page" text:anchor-page-number="4" draw:z-index="609" draw:name="Shape297" draw:style-name="gr1" draw:text-style-name="P2" svg:width="3.8988in" svg:height="0.1276in" svg:x="0.5201in" svg:y="4.3917in">
        <draw:text-box>
          <text:p><text:span text:style-name="T2">contenitori lontano da eventuali materiali incompatibili, verificando la sezione 10.</text:span></text:p>
        </draw:text-box>
      </draw:frame>
      <draw:frame text:anchor-type="page" text:anchor-page-number="10" draw:z-index="608" draw:name="Shape891" draw:style-name="gr1" draw:text-style-name="P2" svg:width="0.2677in" svg:height="0.1287in" svg:x="0.6756in" svg:y="5.0661in">
        <draw:text-box>
          <text:p><text:span text:style-name="T3">H330</text:span></text:p>
        </draw:text-box>
      </draw:frame>
      <draw:frame text:anchor-type="page" text:anchor-page-number="3" draw:z-index="607" draw:name="Shape241" draw:style-name="gr1" draw:text-style-name="P2" svg:width="3.1634in" svg:height="0.1287in" svg:x="0.3744in" svg:y="6.961in">
        <draw:text-box>
          <text:p><text:span text:style-name="T3">5.2. Pericoli speciali derivanti dalla sostanza o dalla miscela</text:span></text:p>
        </draw:text-box>
      </draw:frame>
      <draw:frame text:anchor-type="page" text:anchor-page-number="8" draw:z-index="606" draw:name="Shape739" draw:style-name="gr1" draw:text-style-name="P2" svg:width="1.4898in" svg:height="0.1276in" svg:x="0.5201in" svg:y="5.6091in">
        <draw:text-box>
          <text:p><text:span text:style-name="T2">NON rapidamente degradabile</text:span></text:p>
        </draw:text-box>
      </draw:frame>
      <draw:frame text:anchor-type="page" text:anchor-page-number="5" draw:z-index="605" draw:name="Shape418" draw:style-name="gr1" draw:text-style-name="P2" svg:width="0.3413in" svg:height="0.1287in" svg:x="3.7972in" svg:y="1.7681in">
        <draw:text-box>
          <text:p><text:span text:style-name="T1">mg/m3</text:span></text:p>
        </draw:text-box>
      </draw:frame>
      <draw:frame text:anchor-type="page" text:anchor-page-number="11" draw:z-index="604" draw:name="Shape1031" draw:style-name="gr1" draw:text-style-name="P2" svg:width="3.5571in" svg:height="0.1276in" svg:x="0.5201in" svg:y="6.3689in">
        <draw:text-box>
          <text:p><text:span text:style-name="T2">10. Regolamento (UE) 2015/1221 del Parlamento Europeo (VII Atp. CLP)</text:span></text:p>
        </draw:text-box>
      </draw:frame>
      <draw:frame text:anchor-type="page" text:anchor-page-number="7" draw:z-index="603" draw:name="Shape655" draw:style-name="gr1" draw:text-style-name="P2" svg:width="1.6122in" svg:height="0.1276in" svg:x="0.9047in" svg:y="4.6083in">
        <draw:text-box>
          <text:p><text:span text:style-name="T2">LC50 (Inalazione nebbie/polveri):</text:span></text:p>
        </draw:text-box>
      </draw:frame>
      <draw:frame text:anchor-type="page" text:anchor-page-number="4" draw:z-index="602" draw:name="Shape296" draw:style-name="gr1" draw:text-style-name="P2" svg:width="6.7413in" svg:height="0.1276in" svg:x="0.5201in" svg:y="4.2547in">
        <draw:text-box>
          <text:p><text:span text:style-name="T2">Conservare solo nel contenitore originale. Conservare i recipienti chiusi, in luogo ben ventilato, al riparo dai raggi solari diretti. Conservare i</text:span></text:p>
        </draw:text-box>
      </draw:frame>
      <draw:frame text:anchor-type="page" text:anchor-page-number="2" draw:z-index="601" draw:name="Shape144" draw:style-name="gr1" draw:text-style-name="P2" svg:width="5.7016in" svg:height="0.1287in" svg:x="0.5201in" svg:y="5.4217in">
        <draw:text-box>
          <text:p><text:span text:style-name="T1">Il prodotto non contiene sostanze aventi proprietà di interferenza con il sistema endocrino in concentrazione ≥ 0,1%.</text:span></text:p>
        </draw:text-box>
      </draw:frame>
      <draw:frame text:anchor-type="page" text:anchor-page-number="3" draw:z-index="600" draw:name="Shape240" draw:style-name="gr1" draw:text-style-name="P2" svg:width="1.124in" svg:height="0.1276in" svg:x="0.5201in" svg:y="6.6909in">
        <draw:text-box>
          <text:p><text:span text:style-name="T2">Nessuno in particolare.</text:span></text:p>
        </draw:text-box>
      </draw:frame>
      <draw:frame text:anchor-type="page" text:anchor-page-number="10" draw:z-index="599" draw:name="Shape890" draw:style-name="gr1" draw:text-style-name="P2" svg:width="1.5461in" svg:height="0.1287in" svg:x="2.0807in" svg:y="4.9307in">
        <draw:text-box>
          <text:p><text:span text:style-name="T1">Letale per contatto con la pelle.</text:span></text:p>
        </draw:text-box>
      </draw:frame>
      <draw:frame text:anchor-type="page" text:anchor-page-number="6" draw:z-index="598" draw:name="Shape577" draw:style-name="gr1" draw:text-style-name="P2" svg:width="1.8732in" svg:height="0.1287in" svg:x="0.5201in" svg:y="4.2043in">
        <draw:text-box>
          <text:p><text:span text:style-name="T1">9.2.2. Altre caratteristiche di sicurezza</text:span></text:p>
        </draw:text-box>
      </draw:frame>
      <draw:frame text:anchor-type="page" text:anchor-page-number="8" draw:z-index="597" draw:name="Shape737" draw:style-name="gr1" draw:text-style-name="P2" svg:width="0.6394in" svg:height="0.1276in" svg:x="3.3291in" svg:y="5.472in">
        <draw:text-box>
          <text:p><text:span text:style-name="T2">&gt; 10000 mg/l</text:span></text:p>
        </draw:text-box>
      </draw:frame>
      <draw:frame text:anchor-type="page" text:anchor-page-number="9" draw:z-index="596" draw:name="Shape813" draw:style-name="gr1" draw:text-style-name="P2" svg:width="0.2886in" svg:height="0.1276in" svg:x="0.6756in" svg:y="7.9602in">
        <draw:text-box>
          <text:p><text:span text:style-name="T2">Punto</text:span></text:p>
        </draw:text-box>
      </draw:frame>
      <draw:frame text:anchor-type="page" text:anchor-page-number="1" draw:z-index="595" draw:name="Shape46" draw:style-name="gr1" draw:text-style-name="P2" svg:width="0.4031in" svg:height="0.1287in" svg:x="6.2102in" svg:y="4.1083in">
        <draw:text-box>
          <text:p><text:span text:style-name="T3">LCS: C.</text:span></text:p>
        </draw:text-box>
      </draw:frame>
      <draw:frame text:anchor-type="page" text:anchor-page-number="3" draw:z-index="594" draw:name="Shape239" draw:style-name="gr1" draw:text-style-name="P2" svg:width="1.8425in" svg:height="0.1276in" svg:x="0.5201in" svg:y="6.5563in">
        <draw:text-box>
          <text:p><text:span text:style-name="T2">MEZZI DI ESTINZIONE NON IDONEI</text:span></text:p>
        </draw:text-box>
      </draw:frame>
      <draw:frame text:anchor-type="page" text:anchor-page-number="8" draw:z-index="593" draw:name="Shape738" draw:style-name="gr1" draw:text-style-name="P2" svg:width="0.8921in" svg:height="0.1276in" svg:x="0.5201in" svg:y="5.4744in">
        <draw:text-box>
          <text:p><text:span text:style-name="T2">Solubilità in acqua</text:span></text:p>
        </draw:text-box>
      </draw:frame>
      <draw:frame text:anchor-type="page" text:anchor-page-number="5" draw:z-index="592" draw:name="Shape417" draw:style-name="gr1" draw:text-style-name="P2" svg:width="0.2177in" svg:height="0.1287in" svg:x="2.9339in" svg:y="1.7681in">
        <draw:text-box>
          <text:p><text:span text:style-name="T1">ppm</text:span></text:p>
        </draw:text-box>
      </draw:frame>
      <draw:frame text:anchor-type="page" text:anchor-page-number="4" draw:z-index="591" draw:name="Shape295" draw:style-name="gr1" draw:text-style-name="P2" svg:width="4.015in" svg:height="0.1287in" svg:x="0.3744in" svg:y="3.9862in">
        <draw:text-box>
          <text:p><text:span text:style-name="T3">7.2. Condizioni per lo stoccaggio sicuro, comprese eventuali incompatibilità</text:span></text:p>
        </draw:text-box>
      </draw:frame>
      <draw:frame text:anchor-type="page" text:anchor-page-number="6" draw:z-index="590" draw:name="Shape576" draw:style-name="gr1" draw:text-style-name="P2" svg:width="1.3421in" svg:height="0.1287in" svg:x="0.5201in" svg:y="3.9339in">
        <draw:text-box>
          <text:p><text:span text:style-name="T1">Informazioni non disponibili</text:span></text:p>
        </draw:text-box>
      </draw:frame>
      <draw:frame text:anchor-type="page" text:anchor-page-number="10" draw:z-index="589" draw:name="Shape889" draw:style-name="gr1" draw:text-style-name="P2" svg:width="0.2677in" svg:height="0.1287in" svg:x="0.6756in" svg:y="4.9307in">
        <draw:text-box>
          <text:p><text:span text:style-name="T3">H310</text:span></text:p>
        </draw:text-box>
      </draw:frame>
      <draw:frame text:anchor-type="page" text:anchor-page-number="9" draw:z-index="588" draw:name="Shape811" draw:style-name="gr1" draw:text-style-name="P2" svg:width="0.1252in" svg:height="0.1287in" svg:x="1.8417in" svg:y="7.9583in">
        <draw:text-box>
          <text:p><text:span text:style-name="T1">75</text:span></text:p>
        </draw:text-box>
      </draw:frame>
      <draw:frame text:anchor-type="page" text:anchor-page-number="11" draw:z-index="587" draw:name="Shape1030" draw:style-name="gr1" draw:text-style-name="P2" svg:width="3.4051in" svg:height="0.1276in" svg:x="0.5201in" svg:y="6.2335in">
        <draw:text-box>
          <text:p><text:span text:style-name="T2">9. Regolamento (UE) 605/2014 del Parlamento Europeo (VI Atp. CLP)</text:span></text:p>
        </draw:text-box>
      </draw:frame>
      <draw:frame text:anchor-type="page" text:anchor-page-number="1" draw:z-index="586" draw:name="Shape43" draw:style-name="gr1" draw:text-style-name="P2" svg:width="0.378in" svg:height="0.1287in" svg:x="6.2102in" svg:y="3.9654in">
        <draw:text-box>
          <text:p><text:span text:style-name="T3">PC: 9a.</text:span></text:p>
        </draw:text-box>
      </draw:frame>
      <draw:frame text:anchor-type="page" text:anchor-page-number="7" draw:z-index="585" draw:name="Shape656" draw:style-name="gr1" draw:text-style-name="P2" svg:width="0.8677in" svg:height="0.1276in" svg:x="3.4846in" svg:y="4.6083in">
        <draw:text-box>
          <text:p><text:span text:style-name="T2">0.171 mg/l/4h Rat</text:span></text:p>
        </draw:text-box>
      </draw:frame>
      <draw:frame text:anchor-type="page" text:anchor-page-number="2" draw:z-index="584" draw:name="Shape143" draw:style-name="gr1" draw:text-style-name="P2" svg:width="4.7614in" svg:height="0.1287in" svg:x="0.5201in" svg:y="5.1516in">
        <draw:text-box>
          <text:p><text:span text:style-name="T1">In base ai dati disponibili, il prodotto non contiene sostanze PBT o vPvB in percentuale ≥ a 0,1%.</text:span></text:p>
        </draw:text-box>
      </draw:frame>
      <draw:frame text:anchor-type="page" text:anchor-page-number="9" draw:z-index="583" draw:name="Shape809" draw:style-name="gr1" draw:text-style-name="P2" svg:width="0.9835in" svg:height="0.1287in" svg:x="0.5929in" svg:y="7.8252in">
        <draw:text-box>
          <text:p><text:span text:style-name="T1">Sostanze contenute</text:span></text:p>
        </draw:text-box>
      </draw:frame>
      <draw:frame text:anchor-type="page" text:anchor-page-number="5" draw:z-index="582" draw:name="Shape416" draw:style-name="gr1" draw:text-style-name="P2" svg:width="0.3413in" svg:height="0.1287in" svg:x="2.1535in" svg:y="1.7681in">
        <draw:text-box>
          <text:p><text:span text:style-name="T1">mg/m3</text:span></text:p>
        </draw:text-box>
      </draw:frame>
      <draw:frame text:anchor-type="page" text:anchor-page-number="3" draw:z-index="581" draw:name="Shape238" draw:style-name="gr1" draw:text-style-name="P2" svg:width="5.0453in" svg:height="0.1276in" svg:x="0.5201in" svg:y="6.4201in">
        <draw:text-box>
          <text:p><text:span text:style-name="T2">I mezzi di estinzione sono quelli tradizionali: anidride carbonica, schiuma, polvere ed acqua nebulizzata.</text:span></text:p>
        </draw:text-box>
      </draw:frame>
      <draw:frame text:anchor-type="page" text:anchor-page-number="6" draw:z-index="580" draw:name="Shape575" draw:style-name="gr1" draw:text-style-name="P2" svg:width="2.5642in" svg:height="0.1287in" svg:x="0.5201in" svg:y="3.6634in">
        <draw:text-box>
          <text:p><text:span text:style-name="T1">9.2.1. Informazioni relative alle classi di pericoli fisici</text:span></text:p>
        </draw:text-box>
      </draw:frame>
      <draw:frame text:anchor-type="page" text:anchor-page-number="4" draw:z-index="579" draw:name="Shape294" draw:style-name="gr1" draw:text-style-name="P2" svg:width="1.7398in" svg:height="0.1276in" svg:x="0.5201in" svg:y="3.7161in">
        <draw:text-box>
          <text:p><text:span text:style-name="T2">accedere alle zone in cui si mangia.</text:span></text:p>
        </draw:text-box>
      </draw:frame>
      <draw:frame text:anchor-type="page" text:anchor-page-number="11" draw:z-index="578" draw:name="Shape1029" draw:style-name="gr1" draw:text-style-name="P2" svg:width="3.3748in" svg:height="0.1276in" svg:x="0.5201in" svg:y="6.098in">
        <draw:text-box>
          <text:p><text:span text:style-name="T2">8. Regolamento (UE) 944/2013 del Parlamento Europeo (V Atp. CLP)</text:span></text:p>
        </draw:text-box>
      </draw:frame>
      <draw:frame text:anchor-type="page" text:anchor-page-number="2" draw:z-index="577" draw:name="Shape142" draw:style-name="gr1" draw:text-style-name="P2" svg:width="0.8622in" svg:height="0.1287in" svg:x="0.3744in" svg:y="4.8807in">
        <draw:text-box>
          <text:p><text:span text:style-name="T3">2.3. Altri pericoli</text:span></text:p>
        </draw:text-box>
      </draw:frame>
      <draw:frame text:anchor-type="page" text:anchor-page-number="7" draw:z-index="576" draw:name="Shape653" draw:style-name="gr1" draw:text-style-name="P2" svg:width="0.6661in" svg:height="0.1276in" svg:x="0.9047in" svg:y="4.4728in">
        <draw:text-box>
          <text:p><text:span text:style-name="T2">LD50 (Orale):</text:span></text:p>
        </draw:text-box>
      </draw:frame>
      <draw:frame text:anchor-type="page" text:anchor-page-number="10" draw:z-index="575" draw:name="Shape888" draw:style-name="gr1" draw:text-style-name="P2" svg:width="3.2197in" svg:height="0.1287in" svg:x="2.0807in" svg:y="4.7957in">
        <draw:text-box>
          <text:p><text:span text:style-name="T1">Pericoloso per l’ambiente acquatico, tossicità cronica, categoria 1</text:span></text:p>
        </draw:text-box>
      </draw:frame>
      <draw:frame text:anchor-type="page" text:anchor-page-number="1" draw:z-index="574" draw:name="Shape40" draw:style-name="gr1" draw:text-style-name="P2" svg:width="1.0949in" svg:height="0.1287in" svg:x="6.2102in" svg:y="3.8193in">
        <draw:text-box>
          <text:p><text:span text:style-name="T3">PROC: 10, 11, 13, 8a.</text:span></text:p>
        </draw:text-box>
      </draw:frame>
      <draw:frame text:anchor-type="page" text:anchor-page-number="8" draw:z-index="573" draw:name="Shape736" draw:style-name="gr1" draw:text-style-name="P2" svg:width="5.385in" svg:height="0.1276in" svg:x="0.5201in" svg:y="5.3366in">
        <draw:text-box>
          <text:p><text:span text:style-name="T2">MASSA DI REAZIONE DI 5-CLORO-2- METIL-2H-ISOTIAZOL-3-ONE E 2-METIL-2H-ISOTIAZOL-3-ONE (3:1)</text:span></text:p>
        </draw:text-box>
      </draw:frame>
      <draw:frame text:anchor-type="page" text:anchor-page-number="10" draw:z-index="572" draw:name="Shape887" draw:style-name="gr1" draw:text-style-name="P2" svg:width="0.9524in" svg:height="0.1287in" svg:x="0.6756in" svg:y="4.7957in">
        <draw:text-box>
          <text:p><text:span text:style-name="T3">Aquatic Chronic 1</text:span></text:p>
        </draw:text-box>
      </draw:frame>
      <draw:frame text:anchor-type="page" text:anchor-page-number="8" draw:z-index="571" draw:name="Shape734" draw:style-name="gr1" draw:text-style-name="P2" svg:width="0.4862in" svg:height="0.1276in" svg:x="3.3291in" svg:y="5.0661in">
        <draw:text-box>
          <text:p><text:span text:style-name="T2">&lt; 0.1 mg/l</text:span></text:p>
        </draw:text-box>
      </draw:frame>
      <draw:frame text:anchor-type="page" text:anchor-page-number="1" draw:z-index="570" draw:name="Shape37" draw:style-name="gr1" draw:text-style-name="P2" svg:width="0.6504in" svg:height="0.1287in" svg:x="6.2102in" svg:y="3.6736in">
        <draw:text-box>
          <text:p><text:span text:style-name="T3">ERC: 8a, 8d.</text:span></text:p>
        </draw:text-box>
      </draw:frame>
      <draw:frame text:anchor-type="page" text:anchor-page-number="3" draw:z-index="569" draw:name="Shape237" draw:style-name="gr1" draw:text-style-name="P2" svg:width="1.5685in" svg:height="0.1276in" svg:x="0.5201in" svg:y="6.2854in">
        <draw:text-box>
          <text:p><text:span text:style-name="T2">MEZZI DI ESTINZIONE IDONEI</text:span></text:p>
        </draw:text-box>
      </draw:frame>
      <draw:frame text:anchor-type="page" text:anchor-page-number="5" draw:z-index="568" draw:name="Shape415" draw:style-name="gr1" draw:text-style-name="P2" svg:width="0.9594in" svg:height="0.1276in" svg:x="5.1917in" svg:y="1.6346in">
        <draw:text-box>
          <text:p><text:span text:style-name="T2">Note / Osservazioni</text:span></text:p>
        </draw:text-box>
      </draw:frame>
      <draw:frame text:anchor-type="page" text:anchor-page-number="4" draw:z-index="567" draw:name="Shape293" draw:style-name="gr1" draw:text-style-name="P2" svg:width="6.6594in" svg:height="0.1276in" svg:x="0.5201in" svg:y="3.5783in">
        <draw:text-box>
          <text:p><text:span text:style-name="T2">nell'ambiente. Non mangiare, nè bere, nè fumare durante l'impiego. Togliere gli indumenti contaminati e i dispositivi di protezione prima di</text:span></text:p>
        </draw:text-box>
      </draw:frame>
      <draw:frame text:anchor-type="page" text:anchor-page-number="6" draw:z-index="566" draw:name="Shape574" draw:style-name="gr1" draw:text-style-name="P2" svg:width="1.1579in" svg:height="0.1287in" svg:x="0.3744in" svg:y="3.2575in">
        <draw:text-box>
          <text:p><text:span text:style-name="T3">9.2. Altre informazioni</text:span></text:p>
        </draw:text-box>
      </draw:frame>
      <draw:frame text:anchor-type="page" text:anchor-page-number="2" draw:z-index="565" draw:name="Shape141" draw:style-name="gr1" draw:text-style-name="P2" svg:width="0.2795in" svg:height="0.1287in" svg:x="4.411in" svg:y="4.4728in">
        <draw:text-box>
          <text:p><text:span text:style-name="T1">30.00</text:span></text:p>
        </draw:text-box>
      </draw:frame>
      <draw:frame text:anchor-type="page" text:anchor-page-number="11" draw:z-index="564" draw:name="Shape1028" draw:style-name="gr1" draw:text-style-name="P2" svg:width="3.4051in" svg:height="0.1276in" svg:x="0.5201in" svg:y="5.9626in">
        <draw:text-box>
          <text:p><text:span text:style-name="T2">7. Regolamento (UE) 487/2013 del Parlamento Europeo (IV Atp. CLP)</text:span></text:p>
        </draw:text-box>
      </draw:frame>
      <draw:frame text:anchor-type="page" text:anchor-page-number="9" draw:z-index="563" draw:name="Shape807" draw:style-name="gr1" draw:text-style-name="P2" svg:width="5.4335in" svg:height="0.1287in" svg:x="0.5201in" svg:y="7.6898in">
        <draw:text-box>
          <text:p><text:span text:style-name="T1">Restrizioni relative al prodotto o alle sostanze contenute secondo l'Allegato XVII Regolamento (CE) 1907/2006</text:span></text:p>
        </draw:text-box>
      </draw:frame>
      <draw:frame text:anchor-type="page" text:anchor-page-number="7" draw:z-index="562" draw:name="Shape654" draw:style-name="gr1" draw:text-style-name="P2" svg:width="0.7157in" svg:height="0.1276in" svg:x="3.4846in" svg:y="4.4728in">
        <draw:text-box>
          <text:p><text:span text:style-name="T2">457 mg/kg Rat</text:span></text:p>
        </draw:text-box>
      </draw:frame>
      <draw:frame text:anchor-type="page" text:anchor-page-number="3" draw:z-index="561" draw:name="Shape236" draw:style-name="gr1" draw:text-style-name="P2" svg:width="1.2177in" svg:height="0.1287in" svg:x="0.3744in" svg:y="6.0146in">
        <draw:text-box>
          <text:p><text:span text:style-name="T3">5.1. Mezzi di estinzione</text:span></text:p>
        </draw:text-box>
      </draw:frame>
      <draw:frame text:anchor-type="page" text:anchor-page-number="6" draw:z-index="560" draw:name="Shape573" draw:style-name="gr1" draw:text-style-name="P2" svg:width="0.7433in" svg:height="0.1287in" svg:x="3.0898in" svg:y="2.5811in">
        <draw:text-box>
          <text:p><text:span text:style-name="T1">non applicabile</text:span></text:p>
        </draw:text-box>
      </draw:frame>
      <draw:frame text:anchor-type="page" text:anchor-page-number="2" draw:z-index="559" draw:name="Shape140" draw:style-name="gr1" draw:text-style-name="P2" svg:width="0.835in" svg:height="0.1287in" svg:x="0.5201in" svg:y="4.4728in">
        <draw:text-box>
          <text:p><text:span text:style-name="T1">Limite massimo :</text:span></text:p>
        </draw:text-box>
      </draw:frame>
      <draw:frame text:anchor-type="page" text:anchor-page-number="5" draw:z-index="558" draw:name="Shape413" draw:style-name="gr1" draw:text-style-name="P2" svg:width="0.613in" svg:height="0.1287in" svg:x="3.7972in" svg:y="1.6327in">
        <draw:text-box>
          <text:p><text:span text:style-name="T1">STEL/15min</text:span></text:p>
        </draw:text-box>
      </draw:frame>
      <draw:frame text:anchor-type="page" text:anchor-page-number="8" draw:z-index="557" draw:name="Shape735" draw:style-name="gr1" draw:text-style-name="P2" svg:width="0.8921in" svg:height="0.1276in" svg:x="0.5201in" svg:y="5.0681in">
        <draw:text-box>
          <text:p><text:span text:style-name="T2">Solubilità in acqua</text:span></text:p>
        </draw:text-box>
      </draw:frame>
      <draw:frame text:anchor-type="page" text:anchor-page-number="10" draw:z-index="556" draw:name="Shape886" draw:style-name="gr1" draw:text-style-name="P2" svg:width="3.1331in" svg:height="0.1287in" svg:x="2.0807in" svg:y="4.6602in">
        <draw:text-box>
          <text:p><text:span text:style-name="T1">Pericoloso per l’ambiente acquatico, tossicità acuta, categoria 1</text:span></text:p>
        </draw:text-box>
      </draw:frame>
      <draw:frame text:anchor-type="page" text:anchor-page-number="9" draw:z-index="555" draw:name="Shape804" draw:style-name="gr1" draw:text-style-name="P2" svg:width="2.0398in" svg:height="0.1287in" svg:x="0.5201in" svg:y="7.4173in">
        <draw:text-box>
          <text:p><text:span text:style-name="T1">Categoria Seveso - Direttiva 2012/18/UE:</text:span></text:p>
        </draw:text-box>
      </draw:frame>
      <draw:frame text:anchor-type="page" text:anchor-page-number="7" draw:z-index="554" draw:name="Shape651" draw:style-name="gr1" draw:text-style-name="P2" svg:width="0.813in" svg:height="0.1276in" svg:x="0.9047in" svg:y="4.3382in">
        <draw:text-box>
          <text:p><text:span text:style-name="T2">LD50 (Cutanea):</text:span></text:p>
        </draw:text-box>
      </draw:frame>
      <draw:frame text:anchor-type="page" text:anchor-page-number="1" draw:z-index="553" draw:name="Shape34" draw:style-name="gr1" draw:text-style-name="P2" svg:width="0.378in" svg:height="0.1287in" svg:x="6.2102in" svg:y="3.528in">
        <draw:text-box>
          <text:p><text:span text:style-name="T3">SU: 19.</text:span></text:p>
        </draw:text-box>
      </draw:frame>
      <draw:frame text:anchor-type="page" text:anchor-page-number="4" draw:z-index="552" draw:name="Shape292" draw:style-name="gr1" draw:text-style-name="P2" svg:width="6.2717in" svg:height="0.1276in" svg:x="0.5201in" svg:y="3.4429in">
        <draw:text-box>
          <text:p><text:span text:style-name="T2">Manipolare il prodotto dopo aver consultato tutte le altre sezioni di questa scheda di sicurezza. Evitare la dispersione del prodotto</text:span></text:p>
        </draw:text-box>
      </draw:frame>
      <draw:frame text:anchor-type="page" text:anchor-page-number="11" draw:z-index="551" draw:name="Shape1027" draw:style-name="gr1" draw:text-style-name="P2" svg:width="3.3925in" svg:height="0.1276in" svg:x="0.5201in" svg:y="5.828in">
        <draw:text-box>
          <text:p><text:span text:style-name="T2">6. Regolamento (UE) 618/2012 del Parlamento Europeo (III Atp. CLP)</text:span></text:p>
        </draw:text-box>
      </draw:frame>
      <draw:frame text:anchor-type="page" text:anchor-page-number="8" draw:z-index="550" draw:name="Shape733" draw:style-name="gr1" draw:text-style-name="P2" svg:width="0.3594in" svg:height="0.1276in" svg:x="0.5201in" svg:y="4.9311in">
        <draw:text-box>
          <text:p><text:span text:style-name="T2">TALCO</text:span></text:p>
        </draw:text-box>
      </draw:frame>
      <draw:frame text:anchor-type="page" text:anchor-page-number="7" draw:z-index="549" draw:name="Shape652" draw:style-name="gr1" draw:text-style-name="P2" svg:width="0.9531in" svg:height="0.1276in" svg:x="3.4846in" svg:y="4.3382in">
        <draw:text-box>
          <text:p><text:span text:style-name="T2">87.12 mg/kg Rabbit</text:span></text:p>
        </draw:text-box>
      </draw:frame>
      <draw:frame text:anchor-type="page" text:anchor-page-number="2" draw:z-index="548" draw:name="Shape139" draw:style-name="gr1" draw:text-style-name="P2" svg:width="0.2177in" svg:height="0.1287in" svg:x="4.411in" svg:y="4.3374in">
        <draw:text-box>
          <text:p><text:span text:style-name="T1">6.01</text:span></text:p>
        </draw:text-box>
      </draw:frame>
      <draw:frame text:anchor-type="page" text:anchor-page-number="3" draw:z-index="547" draw:name="Shape235" draw:style-name="gr1" draw:text-style-name="P2" svg:width="2.8197in" svg:height="0.1768in" svg:x="0.3744in" svg:y="5.7327in">
        <draw:text-box>
          <text:p><text:span text:style-name="T4">SEZIONE 5. Misure di lotta antincendio</text:span></text:p>
        </draw:text-box>
      </draw:frame>
      <draw:frame text:anchor-type="page" text:anchor-page-number="1" draw:z-index="546" draw:name="Shape45" draw:style-name="gr1" draw:text-style-name="P2" svg:width="0.4953in" svg:height="0.1287in" svg:x="4.4937in" svg:y="4.1083in">
        <draw:text-box>
          <text:p><text:span text:style-name="T3">LCS: PW.</text:span></text:p>
        </draw:text-box>
      </draw:frame>
      <draw:frame text:anchor-type="page" text:anchor-page-number="5" draw:z-index="545" draw:name="Shape412" draw:style-name="gr1" draw:text-style-name="P2" svg:width="0.3988in" svg:height="0.1287in" svg:x="2.1535in" svg:y="1.6327in">
        <draw:text-box>
          <text:p><text:span text:style-name="T1">TWA/8h</text:span></text:p>
        </draw:text-box>
      </draw:frame>
      <draw:frame text:anchor-type="page" text:anchor-page-number="11" draw:z-index="544" draw:name="Shape1026" draw:style-name="gr1" draw:text-style-name="P2" svg:width="3.3543in" svg:height="0.1276in" svg:x="0.5201in" svg:y="5.6925in">
        <draw:text-box>
          <text:p><text:span text:style-name="T2">5. Regolamento (UE) 286/2011 del Parlamento Europeo (II Atp. CLP)</text:span></text:p>
        </draw:text-box>
      </draw:frame>
      <draw:frame text:anchor-type="page" text:anchor-page-number="6" draw:z-index="543" draw:name="Shape572" draw:style-name="gr1" draw:text-style-name="P2" svg:width="1.4594in" svg:height="0.1287in" svg:x="0.5201in" svg:y="2.5799in">
        <draw:text-box>
          <text:p><text:span text:style-name="T1">Caratteristiche delle particelle</text:span></text:p>
        </draw:text-box>
      </draw:frame>
      <draw:frame text:anchor-type="page" text:anchor-page-number="10" draw:z-index="542" draw:name="Shape885" draw:style-name="gr1" draw:text-style-name="P2" svg:width="0.837in" svg:height="0.1287in" svg:x="0.6756in" svg:y="4.6602in">
        <draw:text-box>
          <text:p><text:span text:style-name="T3">Aquatic Acute 1</text:span></text:p>
        </draw:text-box>
      </draw:frame>
      <draw:frame text:anchor-type="page" text:anchor-page-number="4" draw:z-index="541" draw:name="Shape291" draw:style-name="gr1" draw:text-style-name="P2" svg:width="2.3295in" svg:height="0.1287in" svg:x="0.3744in" svg:y="3.1744in">
        <draw:text-box>
          <text:p><text:span text:style-name="T3">7.1. Precauzioni per la manipolazione sicura</text:span></text:p>
        </draw:text-box>
      </draw:frame>
      <draw:frame text:anchor-type="page" text:anchor-page-number="9" draw:z-index="540" draw:name="Shape805" draw:style-name="gr1" draw:text-style-name="P2" svg:width="0.435in" svg:height="0.1276in" svg:x="4.0256in" svg:y="7.4193in">
        <draw:text-box>
          <text:p><text:span text:style-name="T2">Nessuna</text:span></text:p>
        </draw:text-box>
      </draw:frame>
      <draw:frame text:anchor-type="page" text:anchor-page-number="10" draw:z-index="539" draw:name="Shape884" draw:style-name="gr1" draw:text-style-name="P2" svg:width="1.9657in" svg:height="0.1287in" svg:x="2.0807in" svg:y="4.5252in">
        <draw:text-box>
          <text:p><text:span text:style-name="T1">Sensibilizzazione cutanea, categoria 1A</text:span></text:p>
        </draw:text-box>
      </draw:frame>
      <draw:frame text:anchor-type="page" text:anchor-page-number="5" draw:z-index="538" draw:name="Shape411" draw:style-name="gr1" draw:text-style-name="P2" svg:width="0.2614in" svg:height="0.1287in" svg:x="1.5291in" svg:y="1.6327in">
        <draw:text-box>
          <text:p><text:span text:style-name="T1">Stato</text:span></text:p>
        </draw:text-box>
      </draw:frame>
      <draw:frame text:anchor-type="page" text:anchor-page-number="4" draw:z-index="537" draw:name="Shape290" draw:style-name="gr1" draw:text-style-name="P2" svg:width="3.5161in" svg:height="0.1768in" svg:x="0.3744in" svg:y="2.8925in">
        <draw:text-box>
          <text:p><text:span text:style-name="T4">SEZIONE 7. Manipolazione e immagazzinamento</text:span></text:p>
        </draw:text-box>
      </draw:frame>
      <draw:frame text:anchor-type="page" text:anchor-page-number="8" draw:z-index="536" draw:name="Shape731" draw:style-name="gr1" draw:text-style-name="P2" svg:width="0.6724in" svg:height="0.1276in" svg:x="3.3291in" svg:y="4.6602in">
        <draw:text-box>
          <text:p><text:span text:style-name="T2">0,1 - 100 mg/l</text:span></text:p>
        </draw:text-box>
      </draw:frame>
      <draw:frame text:anchor-type="page" text:anchor-page-number="7" draw:z-index="535" draw:name="Shape650" draw:style-name="gr1" draw:text-style-name="P2" svg:width="5.385in" svg:height="0.1276in" svg:x="0.9047in" svg:y="4.2028in">
        <draw:text-box>
          <text:p><text:span text:style-name="T2">MASSA DI REAZIONE DI 5-CLORO-2- METIL-2H-ISOTIAZOL-3-ONE E 2-METIL-2H-ISOTIAZOL-3-ONE (3:1)</text:span></text:p>
        </draw:text-box>
      </draw:frame>
      <draw:frame text:anchor-type="page" text:anchor-page-number="9" draw:z-index="534" draw:name="Shape803" draw:style-name="gr1" draw:text-style-name="P2" svg:width="6.1157in" svg:height="0.1287in" svg:x="0.3744in" svg:y="7.1484in">
        <draw:text-box>
          <text:p><text:span text:style-name="T3">15.1. Disposizioni legislative e regolamentari su salute, sicurezza e ambiente specifiche per la sostanza o la miscela</text:span></text:p>
        </draw:text-box>
      </draw:frame>
      <draw:frame text:anchor-type="page" text:anchor-page-number="11" draw:z-index="533" draw:name="Shape1025" draw:style-name="gr1" draw:text-style-name="P2" svg:width="3.3315in" svg:height="0.1276in" svg:x="0.5201in" svg:y="5.5571in">
        <draw:text-box>
          <text:p><text:span text:style-name="T2">4. Regolamento (CE) 790/2009 del Parlamento Europeo (I Atp. CLP)</text:span></text:p>
        </draw:text-box>
      </draw:frame>
      <draw:frame text:anchor-type="page" text:anchor-page-number="2" draw:z-index="532" draw:name="Shape138" draw:style-name="gr1" draw:text-style-name="P2" svg:width="2.413in" svg:height="0.1287in" svg:x="0.5201in" svg:y="4.3374in">
        <draw:text-box>
          <text:p><text:span text:style-name="T1">VOC espressi in g/litro di prodotto pronto all'uso :</text:span></text:p>
        </draw:text-box>
      </draw:frame>
      <draw:frame text:anchor-type="page" text:anchor-page-number="6" draw:z-index="531" draw:name="Shape571" draw:style-name="gr1" draw:text-style-name="P2" svg:width="0.7433in" svg:height="0.1287in" svg:x="3.0898in" svg:y="2.4457in">
        <draw:text-box>
          <text:p><text:span text:style-name="T1">non disponibile</text:span></text:p>
        </draw:text-box>
      </draw:frame>
      <draw:frame text:anchor-type="page" text:anchor-page-number="3" draw:z-index="530" draw:name="Shape232" draw:style-name="gr1" draw:text-style-name="P2" svg:width="2.3862in" svg:height="0.1276in" svg:x="0.5201in" svg:y="5.4217in">
        <draw:text-box>
          <text:p><text:span text:style-name="T2">Acqua corrente per il lavaggio cutaneo e oculare.</text:span></text:p>
        </draw:text-box>
      </draw:frame>
      <draw:frame text:anchor-type="page" text:anchor-page-number="1" draw:z-index="529" draw:name="Shape42" draw:style-name="gr1" draw:text-style-name="P2" svg:width="0.378in" svg:height="0.1287in" svg:x="4.4937in" svg:y="3.9654in">
        <draw:text-box>
          <text:p><text:span text:style-name="T3">PC: 9a.</text:span></text:p>
        </draw:text-box>
      </draw:frame>
      <draw:frame text:anchor-type="page" text:anchor-page-number="5" draw:z-index="528" draw:name="Shape410" draw:style-name="gr1" draw:text-style-name="P2" svg:width="0.2134in" svg:height="0.1287in" svg:x="0.6756in" svg:y="1.6327in">
        <draw:text-box>
          <text:p><text:span text:style-name="T1">Tipo</text:span></text:p>
        </draw:text-box>
      </draw:frame>
      <draw:frame text:anchor-type="page" text:anchor-page-number="9" draw:z-index="527" draw:name="Shape802" draw:style-name="gr1" draw:text-style-name="P2" svg:width="3.6098in" svg:height="0.1768in" svg:x="0.3744in" svg:y="6.7311in">
        <draw:text-box>
          <text:p><text:span text:style-name="T4">SEZIONE 15. Informazioni sulla regolamentazione</text:span></text:p>
        </draw:text-box>
      </draw:frame>
      <draw:frame text:anchor-type="page" text:anchor-page-number="11" draw:z-index="526" draw:name="Shape1024" draw:style-name="gr1" draw:text-style-name="P2" svg:width="2.9657in" svg:height="0.1276in" svg:x="0.5201in" svg:y="5.4217in">
        <draw:text-box>
          <text:p><text:span text:style-name="T2">3. Regolamento (UE) 2020/878 (All. II Regolamento REACH)</text:span></text:p>
        </draw:text-box>
      </draw:frame>
      <draw:frame text:anchor-type="page" text:anchor-page-number="10" draw:z-index="525" draw:name="Shape883" draw:style-name="gr1" draw:text-style-name="P2" svg:width="0.7362in" svg:height="0.1287in" svg:x="0.6756in" svg:y="4.5252in">
        <draw:text-box>
          <text:p><text:span text:style-name="T3">Skin Sens. 1A</text:span></text:p>
        </draw:text-box>
      </draw:frame>
      <draw:frame text:anchor-type="page" text:anchor-page-number="4" draw:z-index="524" draw:name="Shape287" draw:style-name="gr1" draw:text-style-name="P2" svg:width="5.3016in" svg:height="0.1276in" svg:x="0.5201in" svg:y="2.5811in">
        <draw:text-box>
          <text:p><text:span text:style-name="T2">Eventuali informazioni riguardanti la protezione individuale e lo smaltimento sono riportate alle sezioni 8 e 13.</text:span></text:p>
        </draw:text-box>
      </draw:frame>
      <draw:frame text:anchor-type="page" text:anchor-page-number="8" draw:z-index="523" draw:name="Shape732" draw:style-name="gr1" draw:text-style-name="P2" svg:width="0.8921in" svg:height="0.1276in" svg:x="0.5201in" svg:y="4.6626in">
        <draw:text-box>
          <text:p><text:span text:style-name="T2">Solubilità in acqua</text:span></text:p>
        </draw:text-box>
      </draw:frame>
      <draw:frame text:anchor-type="page" text:anchor-page-number="7" draw:z-index="522" draw:name="Shape648" draw:style-name="gr1" draw:text-style-name="P2" svg:width="1.6122in" svg:height="0.1276in" svg:x="0.9047in" svg:y="3.9319in">
        <draw:text-box>
          <text:p><text:span text:style-name="T2">LC50 (Inalazione nebbie/polveri):</text:span></text:p>
        </draw:text-box>
      </draw:frame>
      <draw:frame text:anchor-type="page" text:anchor-page-number="6" draw:z-index="521" draw:name="Shape570" draw:style-name="gr1" draw:text-style-name="P2" svg:width="1.2551in" svg:height="0.1287in" svg:x="0.5201in" svg:y="2.4437in">
        <draw:text-box>
          <text:p><text:span text:style-name="T1">Densità di vapore relativa</text:span></text:p>
        </draw:text-box>
      </draw:frame>
      <draw:frame text:anchor-type="page" text:anchor-page-number="2" draw:z-index="520" draw:name="Shape137" draw:style-name="gr1" draw:text-style-name="P2" svg:width="2.8898in" svg:height="0.1287in" svg:x="0.5201in" svg:y="4.202in">
        <draw:text-box>
          <text:p><text:span text:style-name="T1">Pitture opache per pareti e soffitti interni (gloss &lt; 25@60°).</text:span></text:p>
        </draw:text-box>
      </draw:frame>
      <draw:frame text:anchor-type="page" text:anchor-page-number="1" draw:z-index="519" draw:name="Shape39" draw:style-name="gr1" draw:text-style-name="P2" svg:width="1.0949in" svg:height="0.1287in" svg:x="4.4937in" svg:y="3.8193in">
        <draw:text-box>
          <text:p><text:span text:style-name="T3">PROC: 10, 11, 13, 8a.</text:span></text:p>
        </draw:text-box>
      </draw:frame>
      <draw:frame text:anchor-type="page" text:anchor-page-number="3" draw:z-index="518" draw:name="Shape230" draw:style-name="gr1" draw:text-style-name="P2" svg:width="4.3862in" svg:height="0.1276in" svg:x="0.5201in" svg:y="5.1516in">
        <draw:text-box>
          <text:p><text:span text:style-name="T2">Mezzi da avere a disposizione sul luogo di lavoro per il trattamento specifico ed immediato</text:span></text:p>
        </draw:text-box>
      </draw:frame>
      <draw:frame text:anchor-type="page" text:anchor-page-number="8" draw:z-index="517" draw:name="Shape730" draw:style-name="gr1" draw:text-style-name="P2" svg:width="1.1252in" svg:height="0.1276in" svg:x="0.5201in" svg:y="4.5252in">
        <draw:text-box>
          <text:p><text:span text:style-name="T2">CALCIO CARBONATO</text:span></text:p>
        </draw:text-box>
      </draw:frame>
      <draw:frame text:anchor-type="page" text:anchor-page-number="9" draw:z-index="516" draw:name="Shape799" draw:style-name="gr1" draw:text-style-name="P2" svg:width="1.385in" svg:height="0.1287in" svg:x="0.5201in" svg:y="6.4201in">
        <draw:text-box>
          <text:p><text:span text:style-name="T1">Informazione non pertinente</text:span></text:p>
        </draw:text-box>
      </draw:frame>
      <draw:frame text:anchor-type="page" text:anchor-page-number="4" draw:z-index="515" draw:name="Shape286" draw:style-name="gr1" draw:text-style-name="P2" svg:width="1.6689in" svg:height="0.1287in" svg:x="0.3744in" svg:y="2.3102in">
        <draw:text-box>
          <text:p><text:span text:style-name="T3">6.4. Riferimento ad altre sezioni</text:span></text:p>
        </draw:text-box>
      </draw:frame>
      <draw:frame text:anchor-type="page" text:anchor-page-number="3" draw:z-index="514" draw:name="Shape229" draw:style-name="gr1" draw:text-style-name="P2" svg:width="3.0512in" svg:height="0.1276in" svg:x="0.5201in" svg:y="4.8807in">
        <draw:text-box>
          <text:p><text:span text:style-name="T2">In caso di sintomi, sia acuti che ritardati, consultare un medico.</text:span></text:p>
        </draw:text-box>
      </draw:frame>
      <draw:frame text:anchor-type="page" text:anchor-page-number="11" draw:z-index="513" draw:name="Shape1023" draw:style-name="gr1" draw:text-style-name="P2" svg:width="3.1122in" svg:height="0.1276in" svg:x="0.5201in" svg:y="5.2866in">
        <draw:text-box>
          <text:p><text:span text:style-name="T2">2. Regolamento (CE) 1272/2008 del Parlamento Europeo (CLP)</text:span></text:p>
        </draw:text-box>
      </draw:frame>
      <draw:frame text:anchor-type="page" text:anchor-page-number="5" draw:z-index="512" draw:name="Shape409" draw:style-name="gr1" draw:text-style-name="P2" svg:width="1.1378in" svg:height="0.1287in" svg:x="0.5201in" svg:y="1.4992in">
        <draw:text-box>
          <text:p><text:span text:style-name="T3">Valore limite di soglia</text:span></text:p>
        </draw:text-box>
      </draw:frame>
      <draw:frame text:anchor-type="page" text:anchor-page-number="10" draw:z-index="511" draw:name="Shape882" draw:style-name="gr1" draw:text-style-name="P2" svg:width="1.5276in" svg:height="0.1287in" svg:x="2.0807in" svg:y="4.3898in">
        <draw:text-box>
          <text:p><text:span text:style-name="T1">Irritazione cutanea, categoria 2</text:span></text:p>
        </draw:text-box>
      </draw:frame>
      <draw:frame text:anchor-type="page" text:anchor-page-number="6" draw:z-index="510" draw:name="Shape569" draw:style-name="gr1" draw:text-style-name="P2" svg:width="0.965in" svg:height="0.1287in" svg:x="5.1917in" svg:y="2.3091in">
        <draw:text-box>
          <text:p><text:span text:style-name="T1">Metodo:Picnometro</text:span></text:p>
        </draw:text-box>
      </draw:frame>
      <draw:frame text:anchor-type="page" text:anchor-page-number="7" draw:z-index="509" draw:name="Shape649" draw:style-name="gr1" draw:text-style-name="P2" svg:width="0.8406in" svg:height="0.1276in" svg:x="3.4846in" svg:y="3.9319in">
        <draw:text-box>
          <text:p><text:span text:style-name="T2">&gt; 2.1 mg/l/4h Rat</text:span></text:p>
        </draw:text-box>
      </draw:frame>
      <draw:frame text:anchor-type="page" text:anchor-page-number="1" draw:z-index="508" draw:name="Shape36" draw:style-name="gr1" draw:text-style-name="P2" svg:width="0.6504in" svg:height="0.1287in" svg:x="4.4937in" svg:y="3.6736in">
        <draw:text-box>
          <text:p><text:span text:style-name="T3">ERC: 8a, 8d.</text:span></text:p>
        </draw:text-box>
      </draw:frame>
      <draw:frame text:anchor-type="page" text:anchor-page-number="2" draw:z-index="507" draw:name="Shape135" draw:style-name="gr1" draw:text-style-name="P2" svg:width="1.4343in" svg:height="0.1287in" svg:x="0.5201in" svg:y="4.0673in">
        <draw:text-box>
          <text:p><text:span text:style-name="T1">VOC (Direttiva 2004/42/CE) :</text:span></text:p>
        </draw:text-box>
      </draw:frame>
      <draw:frame text:anchor-type="page" text:anchor-page-number="2" draw:z-index="506" draw:name="Shape134" draw:style-name="gr1" draw:text-style-name="P2" svg:width="4.8594in" svg:height="0.1287in" svg:x="2.0807in" svg:y="3.661in">
        <draw:text-box>
          <text:p><text:span text:style-name="T1">In caso di consultazione di un medico, tenere a disposizione il contenitore o l'etichetta del prodotto.</text:span></text:p>
        </draw:text-box>
      </draw:frame>
      <draw:frame text:anchor-type="page" text:anchor-page-number="10" draw:z-index="505" draw:name="Shape881" draw:style-name="gr1" draw:text-style-name="P2" svg:width="0.576in" svg:height="0.1287in" svg:x="0.6756in" svg:y="4.3898in">
        <draw:text-box>
          <text:p><text:span text:style-name="T3">Skin Irrit. 2</text:span></text:p>
        </draw:text-box>
      </draw:frame>
      <draw:frame text:anchor-type="page" text:anchor-page-number="5" draw:z-index="504" draw:name="Shape405" draw:style-name="gr1" draw:text-style-name="P2" svg:width="5.5224in" svg:height="0.1287in" svg:x="1.2071in" svg:y="1.3626in">
        <draw:text-box>
          <text:p><text:span text:style-name="T3">MASSA DI REAZIONE DI 5-CLORO-2- METIL-2H-ISOTIAZOL-3-ONE E 2-METIL-2H-ISOTIAZOL-3-ONE (3:1)</text:span></text:p>
        </draw:text-box>
      </draw:frame>
      <draw:frame text:anchor-type="page" text:anchor-page-number="8" draw:z-index="503" draw:name="Shape729" draw:style-name="gr1" draw:text-style-name="P2" svg:width="1.7122in" svg:height="0.1287in" svg:x="0.3744in" svg:y="4.1209in">
        <draw:text-box>
          <text:p><text:span text:style-name="T3">12.2. Persistenza e degradabilità</text:span></text:p>
        </draw:text-box>
      </draw:frame>
      <draw:frame text:anchor-type="page" text:anchor-page-number="11" draw:z-index="502" draw:name="Shape1022" draw:style-name="gr1" draw:text-style-name="P2" svg:width="3.2831in" svg:height="0.1276in" svg:x="0.5201in" svg:y="5.1516in">
        <draw:text-box>
          <text:p><text:span text:style-name="T2">1. Regolamento (CE) 1907/2006 del Parlamento Europeo (REACH)</text:span></text:p>
        </draw:text-box>
      </draw:frame>
      <draw:frame text:anchor-type="page" text:anchor-page-number="7" draw:z-index="501" draw:name="Shape647" draw:style-name="gr1" draw:text-style-name="P2" svg:width="0.3594in" svg:height="0.1276in" svg:x="0.9047in" svg:y="3.7972in">
        <draw:text-box>
          <text:p><text:span text:style-name="T2">TALCO</text:span></text:p>
        </draw:text-box>
      </draw:frame>
      <draw:frame text:anchor-type="page" text:anchor-page-number="4" draw:z-index="500" draw:name="Shape285" draw:style-name="gr1" draw:text-style-name="P2" svg:width="2.7142in" svg:height="0.1276in" svg:x="0.5201in" svg:y="2.0402in">
        <draw:text-box>
          <text:p><text:span text:style-name="T2">effettuato conformemente alle disposizioni del punto 13.</text:span></text:p>
        </draw:text-box>
      </draw:frame>
      <draw:frame text:anchor-type="page" text:anchor-page-number="6" draw:z-index="499" draw:name="Shape568" draw:style-name="gr1" draw:text-style-name="P2" svg:width="0.3043in" svg:height="0.1287in" svg:x="3.8701in" svg:y="2.3091in">
        <draw:text-box>
          <text:p><text:span text:style-name="T1">g/cm3</text:span></text:p>
        </draw:text-box>
      </draw:frame>
      <draw:frame text:anchor-type="page" text:anchor-page-number="9" draw:z-index="498" draw:name="Shape798" draw:style-name="gr1" draw:text-style-name="P2" svg:width="3.6941in" svg:height="0.1287in" svg:x="0.3744in" svg:y="6.15in">
        <draw:text-box>
          <text:p><text:span text:style-name="T3">14.7. Trasporto marittimo alla rinfusa conformemente agli atti dell’IMO</text:span></text:p>
        </draw:text-box>
      </draw:frame>
      <draw:frame text:anchor-type="page" text:anchor-page-number="3" draw:z-index="497" draw:name="Shape228" draw:style-name="gr1" draw:text-style-name="P2" svg:width="5.6087in" svg:height="0.1287in" svg:x="0.3744in" svg:y="4.6102in">
        <draw:text-box>
          <text:p><text:span text:style-name="T3">4.3. Indicazione dell’eventuale necessità di consultare immediatamente un medico e di trattamenti speciali</text:span></text:p>
        </draw:text-box>
      </draw:frame>
      <draw:frame text:anchor-type="page" text:anchor-page-number="1" draw:z-index="496" draw:name="Shape33" draw:style-name="gr1" draw:text-style-name="P2" svg:width="0.378in" svg:height="0.1287in" svg:x="4.4937in" svg:y="3.528in">
        <draw:text-box>
          <text:p><text:span text:style-name="T3">SU: 19.</text:span></text:p>
        </draw:text-box>
      </draw:frame>
      <draw:frame text:anchor-type="page" text:anchor-page-number="11" draw:z-index="495" draw:name="Shape1021" draw:style-name="gr1" draw:text-style-name="P2" svg:width="1.4161in" svg:height="0.1276in" svg:x="0.5201in" svg:y="5.0161in">
        <draw:text-box>
          <text:p><text:span text:style-name="T2">BIBLIOGRAFIA GENERALE:</text:span></text:p>
        </draw:text-box>
      </draw:frame>
      <draw:frame text:anchor-type="page" text:anchor-page-number="2" draw:z-index="494" draw:name="Shape133" draw:style-name="gr1" draw:text-style-name="P2" svg:width="0.2614in" svg:height="0.1287in" svg:x="0.6756in" svg:y="3.661in">
        <draw:text-box>
          <text:p><text:span text:style-name="T3">P101</text:span></text:p>
        </draw:text-box>
      </draw:frame>
      <draw:frame text:anchor-type="page" text:anchor-page-number="6" draw:z-index="493" draw:name="Shape567" draw:style-name="gr1" draw:text-style-name="P2" svg:width="0.1559in" svg:height="0.1287in" svg:x="3.0898in" svg:y="2.3091in">
        <draw:text-box>
          <text:p><text:span text:style-name="T1">1.2</text:span></text:p>
        </draw:text-box>
      </draw:frame>
      <draw:frame text:anchor-type="page" text:anchor-page-number="10" draw:z-index="492" draw:name="Shape880" draw:style-name="gr1" draw:text-style-name="P2" svg:width="1.4961in" svg:height="0.1287in" svg:x="2.0807in" svg:y="4.2543in">
        <draw:text-box>
          <text:p><text:span text:style-name="T1">Irritazione oculare, categoria 2</text:span></text:p>
        </draw:text-box>
      </draw:frame>
      <draw:frame text:anchor-type="page" text:anchor-page-number="7" draw:z-index="491" draw:name="Shape645" draw:style-name="gr1" draw:text-style-name="P2" svg:width="0.6661in" svg:height="0.1276in" svg:x="0.9047in" svg:y="3.5264in">
        <draw:text-box>
          <text:p><text:span text:style-name="T2">LD50 (Orale):</text:span></text:p>
        </draw:text-box>
      </draw:frame>
      <draw:frame text:anchor-type="page" text:anchor-page-number="1" draw:z-index="490" draw:name="Shape44" draw:style-name="gr1" draw:text-style-name="P2" svg:width="0.4276in" svg:height="0.1287in" svg:x="3.0898in" svg:y="4.1083in">
        <draw:text-box>
          <text:p><text:span text:style-name="T3">LCS: IS.</text:span></text:p>
        </draw:text-box>
      </draw:frame>
      <draw:frame text:anchor-type="page" text:anchor-page-number="9" draw:z-index="489" draw:name="Shape797" draw:style-name="gr1" draw:text-style-name="P2" svg:width="0.7433in" svg:height="0.1287in" svg:x="0.5201in" svg:y="5.8791in">
        <draw:text-box>
          <text:p><text:span text:style-name="T1">non applicabile</text:span></text:p>
        </draw:text-box>
      </draw:frame>
      <draw:frame text:anchor-type="page" text:anchor-page-number="5" draw:z-index="488" draw:name="Shape403" draw:style-name="gr1" draw:text-style-name="P2" svg:width="0.3169in" svg:height="0.1287in" svg:x="4.4339in" svg:y="1.039in">
        <draw:text-box>
          <text:p><text:span text:style-name="T1">... / &gt;&gt;</text:span></text:p>
        </draw:text-box>
      </draw:frame>
      <draw:frame text:anchor-type="page" text:anchor-page-number="8" draw:z-index="487" draw:name="Shape727" draw:style-name="gr1" draw:text-style-name="P2" svg:width="1.7831in" svg:height="0.1276in" svg:x="3.3291in" svg:y="3.8484in">
        <draw:text-box>
          <text:p><text:span text:style-name="T2">0.00049 mg/l Skeletonema costatum</text:span></text:p>
        </draw:text-box>
      </draw:frame>
      <draw:frame text:anchor-type="page" text:anchor-page-number="4" draw:z-index="486" draw:name="Shape284" draw:style-name="gr1" draw:text-style-name="P2" svg:width="6.3551in" svg:height="0.1276in" svg:x="0.5201in" svg:y="1.9035in">
        <draw:text-box>
          <text:p><text:span text:style-name="T2">Provvedere ad una sufficiente areazione del luogo interessato dalla perdita. Lo smaltimento del materiale contaminato deve essere</text:span></text:p>
        </draw:text-box>
      </draw:frame>
      <draw:frame text:anchor-type="page" text:anchor-page-number="3" draw:z-index="485" draw:name="Shape227" draw:style-name="gr1" draw:text-style-name="P2" svg:width="0.7949in" svg:height="0.1276in" svg:x="0.5201in" svg:y="4.3398in">
        <draw:text-box>
          <text:p><text:span text:style-name="T2">questo prodotto.</text:span></text:p>
        </draw:text-box>
      </draw:frame>
      <draw:frame text:anchor-type="page" text:anchor-page-number="6" draw:z-index="484" draw:name="Shape566" draw:style-name="gr1" draw:text-style-name="P2" svg:width="1.3606in" svg:height="0.1287in" svg:x="0.5201in" svg:y="2.3091in">
        <draw:text-box>
          <text:p><text:span text:style-name="T1">Densità e/o Densità relativa</text:span></text:p>
        </draw:text-box>
      </draw:frame>
      <draw:frame text:anchor-type="page" text:anchor-page-number="9" draw:z-index="483" draw:name="Shape796" draw:style-name="gr1" draw:text-style-name="P2" svg:width="2.2862in" svg:height="0.1287in" svg:x="0.3744in" svg:y="5.6083in">
        <draw:text-box>
          <text:p><text:span text:style-name="T3">14.6. Precauzioni speciali per gli utilizzatori</text:span></text:p>
        </draw:text-box>
      </draw:frame>
      <draw:frame text:anchor-type="page" text:anchor-page-number="7" draw:z-index="482" draw:name="Shape646" draw:style-name="gr1" draw:text-style-name="P2" svg:width="0.776in" svg:height="0.1276in" svg:x="3.4846in" svg:y="3.5264in">
        <draw:text-box>
          <text:p><text:span text:style-name="T2">6450 mg/kg Rat</text:span></text:p>
        </draw:text-box>
      </draw:frame>
      <draw:frame text:anchor-type="page" text:anchor-page-number="4" draw:z-index="481" draw:name="Shape283" draw:style-name="gr1" draw:text-style-name="P2" svg:width="2.8378in" svg:height="0.1276in" svg:x="0.5201in" svg:y="1.7701in">
        <draw:text-box>
          <text:p><text:span text:style-name="T2">10. Assorbire il rimanente con materiale assorbente inerte.</text:span></text:p>
        </draw:text-box>
      </draw:frame>
      <draw:frame text:anchor-type="page" text:anchor-page-number="1" draw:z-index="480" draw:name="Shape41" draw:style-name="gr1" draw:text-style-name="P2" svg:width="0.378in" svg:height="0.1287in" svg:x="3.0898in" svg:y="3.9654in">
        <draw:text-box>
          <text:p><text:span text:style-name="T3">PC: 9a.</text:span></text:p>
        </draw:text-box>
      </draw:frame>
      <draw:frame text:anchor-type="page" text:anchor-page-number="2" draw:z-index="479" draw:name="Shape132" draw:style-name="gr1" draw:text-style-name="P2" svg:width="1.8606in" svg:height="0.1287in" svg:x="2.0807in" svg:y="3.5264in">
        <draw:text-box>
          <text:p><text:span text:style-name="T1">Tenere fuori dalla portata dei bambini.</text:span></text:p>
        </draw:text-box>
      </draw:frame>
      <draw:frame text:anchor-type="page" text:anchor-page-number="3" draw:z-index="478" draw:name="Shape226" draw:style-name="gr1" draw:text-style-name="P2" svg:width="6.7343in" svg:height="0.1276in" svg:x="0.5201in" svg:y="4.2028in">
        <draw:text-box>
          <text:p><text:span text:style-name="T2">EFFETTI RITARDATI: In base alle informazioni attualmente a disposizione, non sono noti casi di effetti ritardati successivi all’esposizione a</text:span></text:p>
        </draw:text-box>
      </draw:frame>
      <draw:frame text:anchor-type="page" text:anchor-page-number="5" draw:z-index="477" draw:name="Shape402" draw:style-name="gr1" draw:text-style-name="P2" svg:width="3.9071in" svg:height="0.1449in" svg:x="0.3744in" svg:y="1.0366in">
        <draw:text-box>
          <text:p><text:span text:style-name="T6">SEZIONE 8. Controlli dell'esposizione/della protezione individuale</text:span></text:p>
        </draw:text-box>
      </draw:frame>
      <draw:frame text:anchor-type="page" text:anchor-page-number="8" draw:z-index="476" draw:name="Shape728" draw:style-name="gr1" draw:text-style-name="P2" svg:width="2.0024in" svg:height="0.1276in" svg:x="0.5201in" svg:y="3.8508in">
        <draw:text-box>
          <text:p><text:span text:style-name="T2">NOEC Cronica Alghe / Piante Acquatiche</text:span></text:p>
        </draw:text-box>
      </draw:frame>
      <draw:frame text:anchor-type="page" text:anchor-page-number="10" draw:z-index="475" draw:name="Shape879" draw:style-name="gr1" draw:text-style-name="P2" svg:width="0.5394in" svg:height="0.1287in" svg:x="0.6756in" svg:y="4.2543in">
        <draw:text-box>
          <text:p><text:span text:style-name="T3">Eye Irrit. 2</text:span></text:p>
        </draw:text-box>
      </draw:frame>
      <draw:frame text:anchor-type="page" text:anchor-page-number="11" draw:z-index="474" draw:name="Shape1020" draw:style-name="gr1" draw:text-style-name="P2" svg:width="2.5449in" svg:height="0.1276in" svg:x="0.5201in" svg:y="4.6102in">
        <draw:text-box>
          <text:p><text:span text:style-name="T2">- WGK: Classe di pericolosità acquatica (Germania).</text:span></text:p>
        </draw:text-box>
      </draw:frame>
      <draw:frame text:anchor-type="page" text:anchor-page-number="5" draw:z-index="473" draw:name="Shape532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2" draw:z-index="472" draw:name="Shape131" draw:style-name="gr1" draw:text-style-name="P2" svg:width="0.2614in" svg:height="0.1287in" svg:x="0.6756in" svg:y="3.5264in">
        <draw:text-box>
          <text:p><text:span text:style-name="T3">P102</text:span></text:p>
        </draw:text-box>
      </draw:frame>
      <draw:frame text:anchor-type="page" text:anchor-page-number="7" draw:z-index="471" draw:name="Shape644" draw:style-name="gr1" draw:text-style-name="P2" svg:width="1.1252in" svg:height="0.1276in" svg:x="0.9047in" svg:y="3.3917in">
        <draw:text-box>
          <text:p><text:span text:style-name="T2">CALCIO CARBONATO</text:span></text:p>
        </draw:text-box>
      </draw:frame>
      <draw:frame text:anchor-type="page" text:anchor-page-number="6" draw:z-index="470" draw:name="Shape565" draw:style-name="gr1" draw:text-style-name="P2" svg:width="0.7433in" svg:height="0.1287in" svg:x="3.0898in" svg:y="2.1756in">
        <draw:text-box>
          <text:p><text:span text:style-name="T1">non disponibile</text:span></text:p>
        </draw:text-box>
      </draw:frame>
      <draw:frame text:anchor-type="page" text:anchor-page-number="3" draw:z-index="469" draw:name="Shape225" draw:style-name="gr1" draw:text-style-name="P2" svg:width="3.9461in" svg:height="0.1276in" svg:x="0.5201in" svg:y="3.9339in">
        <draw:text-box>
          <text:p><text:span text:style-name="T2">Non sono note informazioni specifiche su sintomi ed effetti provocati dal prodotto.</text:span></text:p>
        </draw:text-box>
      </draw:frame>
      <draw:frame text:anchor-type="page" text:anchor-page-number="1" draw:z-index="468" draw:name="Shape38" draw:style-name="gr1" draw:text-style-name="P2" svg:width="1.2248in" svg:height="0.1287in" svg:x="3.0898in" svg:y="3.8193in">
        <draw:text-box>
          <text:p><text:span text:style-name="T3">PROC: 10, 11, 13, 7, 8b.</text:span></text:p>
        </draw:text-box>
      </draw:frame>
      <draw:frame text:anchor-type="page" text:anchor-page-number="11" draw:z-index="467" draw:name="Shape1019" draw:style-name="gr1" draw:text-style-name="P2" svg:width="1.9835in" svg:height="0.1276in" svg:x="0.5201in" svg:y="4.4752in">
        <draw:text-box>
          <text:p><text:span text:style-name="T2">- vPvM: Molto persistente e molto mobile</text:span></text:p>
        </draw:text-box>
      </draw:frame>
      <draw:frame text:anchor-type="page" text:anchor-page-number="8" draw:z-index="466" draw:name="Shape725" draw:style-name="gr1" draw:text-style-name="P2" svg:width="1.1969in" svg:height="0.1276in" svg:x="3.3291in" svg:y="3.7138in">
        <draw:text-box>
          <text:p><text:span text:style-name="T2">0.1 mg/l Daphnia magna</text:span></text:p>
        </draw:text-box>
      </draw:frame>
      <draw:frame text:anchor-type="page" text:anchor-page-number="4" draw:z-index="465" draw:name="Shape282" draw:style-name="gr1" draw:text-style-name="P2" svg:width="6.7878in" svg:height="0.1276in" svg:x="0.5201in" svg:y="1.6335in">
        <draw:text-box>
          <text:p><text:span text:style-name="T2">Aspirare il prodotto fuoriuscito in recipiente idoneo. Valutare la compatibilità del recipiente da utilizzare con il prodotto, verificando la sezione</text:span></text:p>
        </draw:text-box>
      </draw:frame>
      <draw:frame text:anchor-type="page" text:anchor-page-number="9" draw:z-index="464" draw:name="Shape795" draw:style-name="gr1" draw:text-style-name="P2" svg:width="0.7433in" svg:height="0.1287in" svg:x="0.5201in" svg:y="5.2035in">
        <draw:text-box>
          <text:p><text:span text:style-name="T1">non applicabile</text:span></text:p>
        </draw:text-box>
      </draw:frame>
      <draw:frame text:anchor-type="page" text:anchor-page-number="10" draw:z-index="463" draw:name="Shape878" draw:style-name="gr1" draw:text-style-name="P2" svg:width="1.5953in" svg:height="0.1287in" svg:x="2.0807in" svg:y="4.1193in">
        <draw:text-box>
          <text:p><text:span text:style-name="T1">Lesioni oculari gravi, categoria 1</text:span></text:p>
        </draw:text-box>
      </draw:frame>
      <draw:frame text:anchor-type="page" text:anchor-page-number="7" draw:z-index="462" draw:name="Shape643" draw:style-name="gr1" draw:text-style-name="P2" svg:width="2.3071in" svg:height="0.1276in" svg:x="3.4846in" svg:y="2.9874in">
        <draw:text-box>
          <text:p><text:span text:style-name="T2">Non classificato (nessun componente rilevante)</text:span></text:p>
        </draw:text-box>
      </draw:frame>
      <draw:frame text:anchor-type="page" text:anchor-page-number="2" draw:z-index="461" draw:name="Shape130" draw:style-name="gr1" draw:text-style-name="P2" svg:width="3.948in" svg:height="0.1287in" svg:x="2.0807in" svg:y="3.3909in">
        <draw:text-box>
          <text:p><text:span text:style-name="T1">Smaltire il prodotto / recipiente in conformità con le disposizioni locali e nazionali</text:span></text:p>
        </draw:text-box>
      </draw:frame>
      <draw:frame text:anchor-type="page" text:anchor-page-number="6" draw:z-index="460" draw:name="Shape564" draw:style-name="gr1" draw:text-style-name="P2" svg:width="0.9343in" svg:height="0.1287in" svg:x="0.5201in" svg:y="2.1736in">
        <draw:text-box>
          <text:p><text:span text:style-name="T1">Tensione di vapore</text:span></text:p>
        </draw:text-box>
      </draw:frame>
      <draw:frame text:anchor-type="page" text:anchor-page-number="8" draw:z-index="459" draw:name="Shape726" draw:style-name="gr1" draw:text-style-name="P2" svg:width="1.2213in" svg:height="0.1276in" svg:x="0.5201in" svg:y="3.7161in">
        <draw:text-box>
          <text:p><text:span text:style-name="T2">NOEC Cronica Crostacei</text:span></text:p>
        </draw:text-box>
      </draw:frame>
      <draw:frame text:anchor-type="page" text:anchor-page-number="1" draw:z-index="458" draw:name="Shape35" draw:style-name="gr1" draw:text-style-name="P2" svg:width="0.6504in" svg:height="0.1287in" svg:x="3.0898in" svg:y="3.6736in">
        <draw:text-box>
          <text:p><text:span text:style-name="T3">ERC: 8a, 8d.</text:span></text:p>
        </draw:text-box>
      </draw:frame>
      <draw:frame text:anchor-type="page" text:anchor-page-number="10" draw:z-index="457" draw:name="Shape877" draw:style-name="gr1" draw:text-style-name="P2" svg:width="0.5949in" svg:height="0.1287in" svg:x="0.6756in" svg:y="4.1193in">
        <draw:text-box>
          <text:p><text:span text:style-name="T3">Eye Dam. 1</text:span></text:p>
        </draw:text-box>
      </draw:frame>
      <draw:frame text:anchor-type="page" text:anchor-page-number="11" draw:z-index="456" draw:name="Shape1018" draw:style-name="gr1" draw:text-style-name="P2" svg:width="2.4287in" svg:height="0.1276in" svg:x="0.5201in" svg:y="4.3398in">
        <draw:text-box>
          <text:p><text:span text:style-name="T2">- vPvB: Molto persistente e molto bioaccumulabile</text:span></text:p>
        </draw:text-box>
      </draw:frame>
      <draw:frame text:anchor-type="page" text:anchor-page-number="3" draw:z-index="455" draw:name="Shape224" draw:style-name="gr1" draw:text-style-name="P2" svg:width="2.8114in" svg:height="0.1287in" svg:x="0.3744in" svg:y="3.6634in">
        <draw:text-box>
          <text:p><text:span text:style-name="T3">4.2. Principali sintomi ed effetti, sia acuti che ritardati</text:span></text:p>
        </draw:text-box>
      </draw:frame>
      <draw:frame text:anchor-type="page" text:anchor-page-number="4" draw:z-index="454" draw:name="Shape281" draw:style-name="gr1" draw:text-style-name="P2" svg:width="3.0894in" svg:height="0.1287in" svg:x="0.3744in" svg:y="1.3638in">
        <draw:text-box>
          <text:p><text:span text:style-name="T3">6.3. Metodi e materiali per il contenimento e per la bonifica</text:span></text:p>
        </draw:text-box>
      </draw:frame>
      <draw:frame text:anchor-type="page" text:anchor-page-number="5" draw:z-index="453" draw:name="Shape400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9" draw:z-index="452" draw:name="Shape794" draw:style-name="gr1" draw:text-style-name="P2" svg:width="1.4657in" svg:height="0.1287in" svg:x="0.3744in" svg:y="4.9327in">
        <draw:text-box>
          <text:p><text:span text:style-name="T3">14.5. Pericoli per l’ambiente</text:span></text:p>
        </draw:text-box>
      </draw:frame>
      <draw:frame text:anchor-type="page" text:anchor-page-number="6" draw:z-index="451" draw:name="Shape563" draw:style-name="gr1" draw:text-style-name="P2" svg:width="0.7433in" svg:height="0.1287in" svg:x="3.0898in" svg:y="2.0402in">
        <draw:text-box>
          <text:p><text:span text:style-name="T1">non disponibile</text:span></text:p>
        </draw:text-box>
      </draw:frame>
      <draw:frame text:anchor-type="page" text:anchor-page-number="1" draw:z-index="450" draw:name="Shape32" draw:style-name="gr1" draw:text-style-name="P2" svg:width="0.378in" svg:height="0.1287in" svg:x="3.0898in" svg:y="3.528in">
        <draw:text-box>
          <text:p><text:span text:style-name="T3">SU: 19.</text:span></text:p>
        </draw:text-box>
      </draw:frame>
      <draw:frame text:anchor-type="page" text:anchor-page-number="5" draw:z-index="449" draw:name="Shape399" draw:style-name="gr1" draw:text-style-name="P2" svg:width="0.5579in" svg:height="0.0894in" svg:x="5.7299in" svg:y="0.6752in">
        <draw:text-box>
          <text:p><text:span text:style-name="T8">Pagina n. <text:s/>5 / 12</text:span></text:p>
        </draw:text-box>
      </draw:frame>
      <draw:frame text:anchor-type="page" text:anchor-page-number="9" draw:z-index="448" draw:name="Shape793" draw:style-name="gr1" draw:text-style-name="P2" svg:width="0.7433in" svg:height="0.1287in" svg:x="0.5201in" svg:y="4.5272in">
        <draw:text-box>
          <text:p><text:span text:style-name="T1">non applicabile</text:span></text:p>
        </draw:text-box>
      </draw:frame>
      <draw:frame text:anchor-type="page" text:anchor-page-number="8" draw:z-index="447" draw:name="Shape723" draw:style-name="gr1" draw:text-style-name="P2" svg:width="1.0205in" svg:height="0.1276in" svg:x="3.3291in" svg:y="3.5783in">
        <draw:text-box>
          <text:p><text:span text:style-name="T2">0.02 mg/l Danio rerio</text:span></text:p>
        </draw:text-box>
      </draw:frame>
      <draw:frame text:anchor-type="page" text:anchor-page-number="11" draw:z-index="446" draw:name="Shape1017" draw:style-name="gr1" draw:text-style-name="P2" svg:width="1.6906in" svg:height="0.1276in" svg:x="0.5201in" svg:y="4.2047in">
        <draw:text-box>
          <text:p><text:span text:style-name="T2">- VOC: Composto organico volatile</text:span></text:p>
        </draw:text-box>
      </draw:frame>
      <draw:frame text:anchor-type="page" text:anchor-page-number="10" draw:z-index="445" draw:name="Shape876" draw:style-name="gr1" draw:text-style-name="P2" svg:width="1.5831in" svg:height="0.1287in" svg:x="2.0807in" svg:y="3.9839in">
        <draw:text-box>
          <text:p><text:span text:style-name="T1">Corrosione cutanea, categoria 1</text:span></text:p>
        </draw:text-box>
      </draw:frame>
      <draw:frame text:anchor-type="page" text:anchor-page-number="2" draw:z-index="444" draw:name="Shape129" draw:style-name="gr1" draw:text-style-name="P2" svg:width="0.2614in" svg:height="0.1287in" svg:x="0.6756in" svg:y="3.3909in">
        <draw:text-box>
          <text:p><text:span text:style-name="T3">P501</text:span></text:p>
        </draw:text-box>
      </draw:frame>
      <draw:frame text:anchor-type="page" text:anchor-page-number="4" draw:z-index="443" draw:name="Shape279" draw:style-name="gr1" draw:text-style-name="P2" svg:width="0.3169in" svg:height="0.1287in" svg:x="3.4244in" svg:y="1.039in">
        <draw:text-box>
          <text:p><text:span text:style-name="T1">... / &gt;&gt;</text:span></text:p>
        </draw:text-box>
      </draw:frame>
      <draw:frame text:anchor-type="page" text:anchor-page-number="3" draw:z-index="442" draw:name="Shape223" draw:style-name="gr1" draw:text-style-name="P2" svg:width="1.4713in" svg:height="0.1276in" svg:x="0.5201in" svg:y="3.3929in">
        <draw:text-box>
          <text:p><text:span text:style-name="T2">fare riferimento alla sezione 8.</text:span></text:p>
        </draw:text-box>
      </draw:frame>
      <draw:frame text:anchor-type="page" text:anchor-page-number="7" draw:z-index="441" draw:name="Shape642" draw:style-name="gr1" draw:text-style-name="P2" svg:width="1.4205in" svg:height="0.1276in" svg:x="0.5201in" svg:y="2.9854in">
        <draw:text-box>
          <text:p><text:span text:style-name="T2">ATE (Cutanea) della miscela:</text:span></text:p>
        </draw:text-box>
      </draw:frame>
      <draw:frame text:anchor-type="page" text:anchor-page-number="10" draw:z-index="440" draw:name="Shape875" draw:style-name="gr1" draw:text-style-name="P2" svg:width="0.6189in" svg:height="0.1287in" svg:x="0.6756in" svg:y="3.9839in">
        <draw:text-box>
          <text:p><text:span text:style-name="T3">Skin Corr. 1</text:span></text:p>
        </draw:text-box>
      </draw:frame>
      <draw:frame text:anchor-type="page" text:anchor-page-number="6" draw:z-index="439" draw:name="Shape562" draw:style-name="gr1" draw:text-style-name="P2" svg:width="2.1677in" svg:height="0.1287in" svg:x="0.5201in" svg:y="2.039in">
        <draw:text-box>
          <text:p><text:span text:style-name="T1">Coefficiente di ripartizione: n-ottanolo/acqua</text:span></text:p>
        </draw:text-box>
      </draw:frame>
      <draw:frame text:anchor-type="page" text:anchor-page-number="5" draw:z-index="438" draw:name="Shape396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frame text:anchor-type="page" text:anchor-page-number="1" draw:z-index="437" draw:name="Shape30" draw:style-name="gr1" draw:text-style-name="P2" svg:width="1.798in" svg:height="0.1287in" svg:x="0.5201in" svg:y="3.5264in">
        <draw:text-box>
          <text:p><text:span text:style-name="T3">Applicazione Prodotto verniciante</text:span></text:p>
        </draw:text-box>
      </draw:frame>
      <draw:frame text:anchor-type="page" text:anchor-page-number="2" draw:z-index="436" draw:name="Shape128" draw:style-name="gr1" draw:text-style-name="P2" svg:width="1.0394in" svg:height="0.1287in" svg:x="0.5201in" svg:y="3.2563in">
        <draw:text-box>
          <text:p><text:span text:style-name="T1">Consigli di prudenza:</text:span></text:p>
        </draw:text-box>
      </draw:frame>
      <draw:frame text:anchor-type="page" text:anchor-page-number="9" draw:z-index="435" draw:name="Shape792" draw:style-name="gr1" draw:text-style-name="P2" svg:width="1.4232in" svg:height="0.1287in" svg:x="0.3744in" svg:y="4.2563in">
        <draw:text-box>
          <text:p><text:span text:style-name="T3">14.4. Gruppo d'imballaggio</text:span></text:p>
        </draw:text-box>
      </draw:frame>
      <draw:frame text:anchor-type="page" text:anchor-page-number="8" draw:z-index="434" draw:name="Shape724" draw:style-name="gr1" draw:text-style-name="P2" svg:width="1.026in" svg:height="0.1276in" svg:x="0.5201in" svg:y="3.5807in">
        <draw:text-box>
          <text:p><text:span text:style-name="T2">NOEC Cronica Pesci</text:span></text:p>
        </draw:text-box>
      </draw:frame>
      <draw:frame text:anchor-type="page" text:anchor-page-number="7" draw:z-index="433" draw:name="Shape641" draw:style-name="gr1" draw:text-style-name="P2" svg:width="2.3071in" svg:height="0.1276in" svg:x="3.4846in" svg:y="2.852in">
        <draw:text-box>
          <text:p><text:span text:style-name="T2">Non classificato (nessun componente rilevante)</text:span></text:p>
        </draw:text-box>
      </draw:frame>
      <draw:frame text:anchor-type="page" text:anchor-page-number="11" draw:z-index="432" draw:name="Shape1016" draw:style-name="gr1" draw:text-style-name="P2" svg:width="2.4776in" svg:height="0.1276in" svg:x="0.5201in" svg:y="4.0693in">
        <draw:text-box>
          <text:p><text:span text:style-name="T2">- TWA STEL: Limite di esposizione a breve termine</text:span></text:p>
        </draw:text-box>
      </draw:frame>
      <draw:frame text:anchor-type="page" text:anchor-page-number="4" draw:z-index="431" draw:name="Shape278" draw:style-name="gr1" draw:text-style-name="P2" svg:width="2.9268in" svg:height="0.1449in" svg:x="0.3744in" svg:y="1.0366in">
        <draw:text-box>
          <text:p><text:span text:style-name="T6">SEZIONE 6. Misure in caso di rilascio accidentale</text:span></text:p>
        </draw:text-box>
      </draw:frame>
      <draw:frame text:anchor-type="page" text:anchor-page-number="3" draw:z-index="430" draw:name="Shape222" draw:style-name="gr1" draw:text-style-name="P2" svg:width="6.7224in" svg:height="0.1276in" svg:x="0.5201in" svg:y="3.2563in">
        <draw:text-box>
          <text:p><text:span text:style-name="T2">monouso in caso di possibile contatto con liquidi biologici. Per la tipologia di DPI adatti per le caratteristiche della sostanza o della miscela,</text:span></text:p>
        </draw:text-box>
      </draw:frame>
      <draw:frame text:anchor-type="page" text:anchor-page-number="5" draw:z-index="429" draw:name="Shape395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3" draw:z-index="428" draw:name="Shape221" draw:style-name="gr1" draw:text-style-name="P2" svg:width="6.6622in" svg:height="0.1276in" svg:x="0.5201in" svg:y="3.1209in">
        <draw:text-box>
          <text:p><text:span text:style-name="T2">modalità di esposizione e dall’entità della contaminazione. In assenza di altre indicazioni più specifiche, si raccomanda di utilizzare guanti</text:span></text:p>
        </draw:text-box>
      </draw:frame>
      <draw:frame text:anchor-type="page" text:anchor-page-number="10" draw:z-index="427" draw:name="Shape874" draw:style-name="gr1" draw:text-style-name="P2" svg:width="1.6634in" svg:height="0.1287in" svg:x="2.0807in" svg:y="3.8484in">
        <draw:text-box>
          <text:p><text:span text:style-name="T1">Corrosione cutanea, categoria 1C</text:span></text:p>
        </draw:text-box>
      </draw:frame>
      <draw:frame text:anchor-type="page" text:anchor-page-number="6" draw:z-index="426" draw:name="Shape561" draw:style-name="gr1" draw:text-style-name="P2" svg:width="0.7433in" svg:height="0.1287in" svg:x="3.0898in" svg:y="1.9047in">
        <draw:text-box>
          <text:p><text:span text:style-name="T1">non disponibile</text:span></text:p>
        </draw:text-box>
      </draw:frame>
      <draw:frame text:anchor-type="page" text:anchor-page-number="1" draw:z-index="425" draw:name="Shape29" draw:style-name="gr1" draw:text-style-name="P2" svg:width="0.5142in" svg:height="0.1287in" svg:x="6.2102in" svg:y="3.3929in">
        <draw:text-box>
          <text:p><text:span text:style-name="T3">Consumo</text:span></text:p>
        </draw:text-box>
      </draw:frame>
      <draw:frame text:anchor-type="page" text:anchor-page-number="7" draw:z-index="424" draw:name="Shape640" draw:style-name="gr1" draw:text-style-name="P2" svg:width="1.274in" svg:height="0.1276in" svg:x="0.5201in" svg:y="2.8508in">
        <draw:text-box>
          <text:p><text:span text:style-name="T2">ATE (Orale) della miscela:</text:span></text:p>
        </draw:text-box>
      </draw:frame>
      <draw:frame text:anchor-type="page" text:anchor-page-number="8" draw:z-index="423" draw:name="Shape721" draw:style-name="gr1" draw:text-style-name="P2" svg:width="1.935in" svg:height="0.1276in" svg:x="3.3291in" svg:y="3.4429in">
        <draw:text-box>
          <text:p><text:span text:style-name="T2">0.0052 mg/l/72h Skeletonema costatum</text:span></text:p>
        </draw:text-box>
      </draw:frame>
      <draw:frame text:anchor-type="page" text:anchor-page-number="9" draw:z-index="422" draw:name="Shape791" draw:style-name="gr1" draw:text-style-name="P2" svg:width="0.7433in" svg:height="0.1287in" svg:x="0.5201in" svg:y="3.8508in">
        <draw:text-box>
          <text:p><text:span text:style-name="T1">non applicabile</text:span></text:p>
        </draw:text-box>
      </draw:frame>
      <draw:frame text:anchor-type="page" text:anchor-page-number="4" draw:z-index="421" draw:name="Shape387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11" draw:z-index="420" draw:name="Shape1015" draw:style-name="gr1" draw:text-style-name="P2" svg:width="2.0752in" svg:height="0.1276in" svg:x="0.5201in" svg:y="3.9339in">
        <draw:text-box>
          <text:p><text:span text:style-name="T2">- TWA: Limite di esposizione medio pesato</text:span></text:p>
        </draw:text-box>
      </draw:frame>
      <draw:frame text:anchor-type="page" text:anchor-page-number="2" draw:z-index="419" draw:name="Shape127" draw:style-name="gr1" draw:text-style-name="P2" svg:width="1.8732in" svg:height="0.1287in" svg:x="2.0807in" svg:y="2.8516in">
        <draw:text-box>
          <text:p><text:span text:style-name="T1">Può provocare una reazione allergica.</text:span></text:p>
        </draw:text-box>
      </draw:frame>
      <draw:frame text:anchor-type="page" text:anchor-page-number="5" draw:z-index="418" draw:name="Shape394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10" draw:z-index="417" draw:name="Shape873" draw:style-name="gr1" draw:text-style-name="P2" svg:width="0.6996in" svg:height="0.1287in" svg:x="0.6756in" svg:y="3.8484in">
        <draw:text-box>
          <text:p><text:span text:style-name="T3">Skin Corr. 1C</text:span></text:p>
        </draw:text-box>
      </draw:frame>
      <draw:frame text:anchor-type="page" text:anchor-page-number="9" draw:z-index="416" draw:name="Shape790" draw:style-name="gr1" draw:text-style-name="P2" svg:width="2.3913in" svg:height="0.1287in" svg:x="0.3744in" svg:y="3.5799in">
        <draw:text-box>
          <text:p><text:span text:style-name="T3">14.3. Classi di pericolo connesso al trasporto</text:span></text:p>
        </draw:text-box>
      </draw:frame>
      <draw:frame text:anchor-type="page" text:anchor-page-number="11" draw:z-index="415" draw:name="Shape1014" draw:style-name="gr1" draw:text-style-name="P2" svg:width="5.7488in" svg:height="0.1276in" svg:x="0.5201in" svg:y="3.7984in">
        <draw:text-box>
          <text:p><text:span text:style-name="T2">- TLV CEILING: Concentrazione che non deve essere superata durante qualsiasi momento dell’esposizione lavorativa.</text:span></text:p>
        </draw:text-box>
      </draw:frame>
      <draw:frame text:anchor-type="page" text:anchor-page-number="8" draw:z-index="414" draw:name="Shape722" draw:style-name="gr1" draw:text-style-name="P2" svg:width="1.6185in" svg:height="0.1276in" svg:x="0.5201in" svg:y="3.4453in">
        <draw:text-box>
          <text:p><text:span text:style-name="T2">EC50 - Alghe / Piante Acquatiche</text:span></text:p>
        </draw:text-box>
      </draw:frame>
      <draw:frame text:anchor-type="page" text:anchor-page-number="6" draw:z-index="413" draw:name="Shape560" draw:style-name="gr1" draw:text-style-name="P2" svg:width="0.4524in" svg:height="0.1287in" svg:x="0.5201in" svg:y="1.9035in">
        <draw:text-box>
          <text:p><text:span text:style-name="T1">Solubilità</text:span></text:p>
        </draw:text-box>
      </draw:frame>
      <draw:frame text:anchor-type="page" text:anchor-page-number="4" draw:z-index="412" draw:name="Shape276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2" draw:z-index="411" draw:name="Shape126" draw:style-name="gr1" draw:text-style-name="P2" svg:width="1.8598in" svg:height="0.1287in" svg:x="2.8602in" svg:y="2.7154in">
        <draw:text-box>
          <text:p><text:span text:style-name="T1">2-METIL-2H-ISOTIAZOL-3-ONE (3:1)</text:span></text:p>
        </draw:text-box>
      </draw:frame>
      <draw:frame text:anchor-type="page" text:anchor-page-number="7" draw:z-index="410" draw:name="Shape639" draw:style-name="gr1" draw:text-style-name="P2" svg:width="2.3071in" svg:height="0.1276in" svg:x="3.4846in" svg:y="2.7165in">
        <draw:text-box>
          <text:p><text:span text:style-name="T2">Non classificato (nessun componente rilevante)</text:span></text:p>
        </draw:text-box>
      </draw:frame>
      <draw:frame text:anchor-type="page" text:anchor-page-number="3" draw:z-index="409" draw:name="Shape220" draw:style-name="gr1" draw:text-style-name="P2" svg:width="6.5587in" svg:height="0.1276in" svg:x="0.5201in" svg:y="2.9854in">
        <draw:text-box>
          <text:p><text:span text:style-name="T2">indossare dispositivi di protezione individuale. La natura di tali protezioni dipende dalla pericolosità della sostanza o della miscela, dalla</text:span></text:p>
        </draw:text-box>
      </draw:frame>
      <draw:frame text:anchor-type="page" text:anchor-page-number="1" draw:z-index="408" draw:name="Shape28" draw:style-name="gr1" draw:text-style-name="P2" svg:width="0.6996in" svg:height="0.1287in" svg:x="4.4937in" svg:y="3.3929in">
        <draw:text-box>
          <text:p><text:span text:style-name="T3">Professionali</text:span></text:p>
        </draw:text-box>
      </draw:frame>
      <draw:frame text:anchor-type="page" text:anchor-page-number="11" draw:z-index="407" draw:name="Shape1013" draw:style-name="gr1" draw:text-style-name="P2" svg:width="1.376in" svg:height="0.1276in" svg:x="0.5201in" svg:y="3.6638in">
        <draw:text-box>
          <text:p><text:span text:style-name="T2">- TLV: Valore limite di soglia </text:span></text:p>
        </draw:text-box>
      </draw:frame>
      <draw:frame text:anchor-type="page" text:anchor-page-number="2" draw:z-index="406" draw:name="Shape125" draw:style-name="gr1" draw:text-style-name="P2" svg:width="3.5642in" svg:height="0.1287in" svg:x="2.8602in" svg:y="2.5799in">
        <draw:text-box>
          <text:p><text:span text:style-name="T1">MASSA DI REAZIONE DI 5-CLORO-2- METIL-2H-ISOTIAZOL-3-ONE E</text:span></text:p>
        </draw:text-box>
      </draw:frame>
      <draw:frame text:anchor-type="page" text:anchor-page-number="3" draw:z-index="405" draw:name="Shape219" draw:style-name="gr1" draw:text-style-name="P2" svg:width="6.3531in" svg:height="0.1276in" svg:x="0.5201in" svg:y="2.8508in">
        <draw:text-box>
          <text:p><text:span text:style-name="T2">E’ buona norma per il soccorritore che presta aiuto ad un soggetto, che è stato esposto ad una sostanza chimica o ad una miscela,</text:span></text:p>
        </draw:text-box>
      </draw:frame>
      <draw:frame text:anchor-type="page" text:anchor-page-number="5" draw:z-index="404" draw:name="Shape398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frame text:anchor-type="page" text:anchor-page-number="8" draw:z-index="403" draw:name="Shape719" draw:style-name="gr1" draw:text-style-name="P2" svg:width="1.4717in" svg:height="0.1276in" svg:x="3.3291in" svg:y="3.3075in">
        <draw:text-box>
          <text:p><text:span text:style-name="T2">0.16 mg/l/48h Daphnia magna</text:span></text:p>
        </draw:text-box>
      </draw:frame>
      <draw:frame text:anchor-type="page" text:anchor-page-number="9" draw:z-index="402" draw:name="Shape789" draw:style-name="gr1" draw:text-style-name="P2" svg:width="0.7433in" svg:height="0.1287in" svg:x="0.5201in" svg:y="3.1744in">
        <draw:text-box>
          <text:p><text:span text:style-name="T1">non applicabile</text:span></text:p>
        </draw:text-box>
      </draw:frame>
      <draw:frame text:anchor-type="page" text:anchor-page-number="1" draw:z-index="401" draw:name="Shape27" draw:style-name="gr1" draw:text-style-name="P2" svg:width="0.5331in" svg:height="0.1287in" svg:x="3.0898in" svg:y="3.3929in">
        <draw:text-box>
          <text:p><text:span text:style-name="T3">Industriali</text:span></text:p>
        </draw:text-box>
      </draw:frame>
      <draw:frame text:anchor-type="page" text:anchor-page-number="7" draw:z-index="400" draw:name="Shape638" draw:style-name="gr1" draw:text-style-name="P2" svg:width="1.5059in" svg:height="0.1276in" svg:x="0.5201in" svg:y="2.7154in">
        <draw:text-box>
          <text:p><text:span text:style-name="T2">ATE (Inalazione) della miscela:</text:span></text:p>
        </draw:text-box>
      </draw:frame>
      <draw:frame text:anchor-type="page" text:anchor-page-number="4" draw:z-index="399" draw:name="Shape275" draw:style-name="gr1" draw:text-style-name="P2" svg:width="0.5579in" svg:height="0.0894in" svg:x="5.7299in" svg:y="0.6752in">
        <draw:text-box>
          <text:p><text:span text:style-name="T8">Pagina n. <text:s/>4 / 12</text:span></text:p>
        </draw:text-box>
      </draw:frame>
      <draw:frame text:anchor-type="page" text:anchor-page-number="10" draw:z-index="398" draw:name="Shape872" draw:style-name="gr1" draw:text-style-name="P2" svg:width="1.3421in" svg:height="0.1287in" svg:x="2.0807in" svg:y="3.7134in">
        <draw:text-box>
          <text:p><text:span text:style-name="T1">Tossicità acuta, categoria 3</text:span></text:p>
        </draw:text-box>
      </draw:frame>
      <draw:frame text:anchor-type="page" text:anchor-page-number="6" draw:z-index="397" draw:name="Shape559" draw:style-name="gr1" draw:text-style-name="P2" svg:width="0.9531in" svg:height="0.1287in" svg:x="5.1917in" svg:y="1.7681in">
        <draw:text-box>
          <text:p><text:span text:style-name="T1">Metodo:Tazza Ford</text:span></text:p>
        </draw:text-box>
      </draw:frame>
      <draw:frame text:anchor-type="page" text:anchor-page-number="6" draw:z-index="396" draw:name="Shape558" draw:style-name="gr1" draw:text-style-name="P2" svg:width="0.4898in" svg:height="0.1287in" svg:x="3.0898in" svg:y="1.7681in">
        <draw:text-box>
          <text:p><text:span text:style-name="T1">0.03 m2/s</text:span></text:p>
        </draw:text-box>
      </draw:frame>
      <draw:frame text:anchor-type="page" text:anchor-page-number="9" draw:z-index="395" draw:name="Shape788" draw:style-name="gr1" draw:text-style-name="P2" svg:width="2.3724in" svg:height="0.1287in" svg:x="0.3744in" svg:y="2.9043in">
        <draw:text-box>
          <text:p><text:span text:style-name="T3">14.2. Designazione ufficiale ONU di trasporto</text:span></text:p>
        </draw:text-box>
      </draw:frame>
      <draw:frame text:anchor-type="page" text:anchor-page-number="11" draw:z-index="394" draw:name="Shape1012" draw:style-name="gr1" draw:text-style-name="P2" svg:width="3.7894in" svg:height="0.1276in" svg:x="0.5201in" svg:y="3.5283in">
        <draw:text-box>
          <text:p><text:span text:style-name="T2">- RID: Regolamento per il trasporto internazionale di merci pericolose su treno</text:span></text:p>
        </draw:text-box>
      </draw:frame>
      <draw:frame text:anchor-type="page" text:anchor-page-number="10" draw:z-index="393" draw:name="Shape871" draw:style-name="gr1" draw:text-style-name="P2" svg:width="0.6539in" svg:height="0.1287in" svg:x="0.6756in" svg:y="3.7134in">
        <draw:text-box>
          <text:p><text:span text:style-name="T3">Acute Tox. 3</text:span></text:p>
        </draw:text-box>
      </draw:frame>
      <draw:frame text:anchor-type="page" text:anchor-page-number="2" draw:z-index="392" draw:name="Shape124" draw:style-name="gr1" draw:text-style-name="P2" svg:width="0.4776in" svg:height="0.1287in" svg:x="2.0807in" svg:y="2.5799in">
        <draw:text-box>
          <text:p><text:span text:style-name="T1">Contiene:</text:span></text:p>
        </draw:text-box>
      </draw:frame>
      <draw:frame text:anchor-type="page" text:anchor-page-number="3" draw:z-index="391" draw:name="Shape217" draw:style-name="gr1" draw:text-style-name="P2" svg:width="1.2705in" svg:height="0.1276in" svg:x="0.5201in" svg:y="2.5811in">
        <draw:text-box>
          <text:p><text:span text:style-name="T2">Protezione dei soccorritori</text:span></text:p>
        </draw:text-box>
      </draw:frame>
      <draw:frame text:anchor-type="page" text:anchor-page-number="4" draw:z-index="390" draw:name="Shape272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frame text:anchor-type="page" text:anchor-page-number="7" draw:z-index="389" draw:name="Shape636" draw:style-name="gr1" draw:text-style-name="P2" svg:width="0.9669in" svg:height="0.1276in" svg:x="0.5201in" svg:y="2.4465in">
        <draw:text-box>
          <text:p><text:span text:style-name="T2">TOSSICITÀ ACUTA</text:span></text:p>
        </draw:text-box>
      </draw:frame>
      <draw:frame text:anchor-type="page" text:anchor-page-number="8" draw:z-index="388" draw:name="Shape720" draw:style-name="gr1" draw:text-style-name="P2" svg:width="0.837in" svg:height="0.1276in" svg:x="0.5201in" svg:y="3.3098in">
        <draw:text-box>
          <text:p><text:span text:style-name="T2">EC50 - Crostacei</text:span></text:p>
        </draw:text-box>
      </draw:frame>
      <draw:frame text:anchor-type="page" text:anchor-page-number="1" draw:z-index="387" draw:name="Shape24" draw:style-name="gr1" draw:text-style-name="P2" svg:width="0.7614in" svg:height="0.1287in" svg:x="0.5201in" svg:y="3.3909in">
        <draw:text-box>
          <text:p><text:span text:style-name="T3">Usi Identificati</text:span></text:p>
        </draw:text-box>
      </draw:frame>
      <draw:frame text:anchor-type="page" text:anchor-page-number="5" draw:z-index="386" draw:name="Shape393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2" draw:z-index="385" draw:name="Shape123" draw:style-name="gr1" draw:text-style-name="P2" svg:width="0.4217in" svg:height="0.1287in" svg:x="0.6756in" svg:y="2.5799in">
        <draw:text-box>
          <text:p><text:span text:style-name="T3">EUH208</text:span></text:p>
        </draw:text-box>
      </draw:frame>
      <draw:frame text:anchor-type="page" text:anchor-page-number="7" draw:z-index="384" draw:name="Shape635" draw:style-name="gr1" draw:text-style-name="P2" svg:width="1.3252in" svg:height="0.1276in" svg:x="0.5201in" svg:y="2.1756in">
        <draw:text-box>
          <text:p><text:span text:style-name="T2">Informazioni non disponibili</text:span></text:p>
        </draw:text-box>
      </draw:frame>
      <draw:frame text:anchor-type="page" text:anchor-page-number="10" draw:z-index="383" draw:name="Shape870" draw:style-name="gr1" draw:text-style-name="P2" svg:width="1.3421in" svg:height="0.1287in" svg:x="2.0807in" svg:y="3.5783in">
        <draw:text-box>
          <text:p><text:span text:style-name="T1">Tossicità acuta, categoria 2</text:span></text:p>
        </draw:text-box>
      </draw:frame>
      <draw:frame text:anchor-type="page" text:anchor-page-number="1" draw:z-index="382" draw:name="Shape22" draw:style-name="gr1" draw:text-style-name="P2" svg:width="1.0823in" svg:height="0.1287in" svg:x="3.0898in" svg:y="3.1201in">
        <draw:text-box>
          <text:p><text:span text:style-name="T3">Prodotto verniciante</text:span></text:p>
        </draw:text-box>
      </draw:frame>
      <draw:frame text:anchor-type="page" text:anchor-page-number="9" draw:z-index="381" draw:name="Shape787" draw:style-name="gr1" draw:text-style-name="P2" svg:width="0.7433in" svg:height="0.1287in" svg:x="0.5201in" svg:y="2.498in">
        <draw:text-box>
          <text:p><text:span text:style-name="T1">non applicabile</text:span></text:p>
        </draw:text-box>
      </draw:frame>
      <draw:frame text:anchor-type="page" text:anchor-page-number="4" draw:z-index="380" draw:name="Shape271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line text:anchor-type="page" text:anchor-page-number="5" draw:z-index="379" draw:name="Shape501" draw:style-name="gr2" draw:text-style-name="P2" svg:x1="0.3327in" svg:y1="8.5638in" svg:x2="7.7402in" svg:y2="8.5638in">
        <text:p/>
      </draw:line>
      <draw:frame text:anchor-type="page" text:anchor-page-number="8" draw:z-index="378" draw:name="Shape717" draw:style-name="gr1" draw:text-style-name="P2" svg:width="1.7705in" svg:height="0.1276in" svg:x="3.3291in" svg:y="3.1728in">
        <draw:text-box>
          <text:p><text:span text:style-name="T2">0.19 mg/l/96h Oncorhynchus mykiss</text:span></text:p>
        </draw:text-box>
      </draw:frame>
      <draw:frame text:anchor-type="page" text:anchor-page-number="3" draw:z-index="377" draw:name="Shape216" draw:style-name="gr1" draw:text-style-name="P2" svg:width="5.3315in" svg:height="0.1276in" svg:x="0.5201in" svg:y="2.311in">
        <draw:text-box>
          <text:p><text:span text:style-name="T2">INALAZIONE: Portare il soggetto all'aria aperta, lontano dal luogo dell'incidente. Consultare subito un medico.</text:span></text:p>
        </draw:text-box>
      </draw:frame>
      <draw:frame text:anchor-type="page" text:anchor-page-number="11" draw:z-index="376" draw:name="Shape1011" draw:style-name="gr1" draw:text-style-name="P2" svg:width="1.9717in" svg:height="0.1276in" svg:x="0.5201in" svg:y="3.3929in">
        <draw:text-box>
          <text:p><text:span text:style-name="T2">- REACH: Regolamento (CE) 1907/2006</text:span></text:p>
        </draw:text-box>
      </draw:frame>
      <draw:frame text:anchor-type="page" text:anchor-page-number="6" draw:z-index="375" draw:name="Shape557" draw:style-name="gr1" draw:text-style-name="P2" svg:width="1.0067in" svg:height="0.1287in" svg:x="0.5201in" svg:y="1.7681in">
        <draw:text-box>
          <text:p><text:span text:style-name="T1">Viscosità cinematica</text:span></text:p>
        </draw:text-box>
      </draw:frame>
      <draw:frame text:anchor-type="page" text:anchor-page-number="10" draw:z-index="374" draw:name="Shape869" draw:style-name="gr1" draw:text-style-name="P2" svg:width="0.6539in" svg:height="0.1287in" svg:x="0.6756in" svg:y="3.5783in">
        <draw:text-box>
          <text:p><text:span text:style-name="T3">Acute Tox. 2</text:span></text:p>
        </draw:text-box>
      </draw:frame>
      <draw:frame text:anchor-type="page" text:anchor-page-number="9" draw:z-index="373" draw:name="Shape786" draw:style-name="gr1" draw:text-style-name="P2" svg:width="1.6567in" svg:height="0.1287in" svg:x="0.3744in" svg:y="2.228in">
        <draw:text-box>
          <text:p><text:span text:style-name="T3">14.1. Numero ONU o numero ID</text:span></text:p>
        </draw:text-box>
      </draw:frame>
      <draw:frame text:anchor-type="page" text:anchor-page-number="6" draw:z-index="372" draw:name="Shape556" draw:style-name="gr1" draw:text-style-name="P2" svg:width="0.8295in" svg:height="0.1287in" svg:x="5.1917in" svg:y="1.6327in">
        <draw:text-box>
          <text:p><text:span text:style-name="T1">Metodo:pHmetro</text:span></text:p>
        </draw:text-box>
      </draw:frame>
      <draw:frame text:anchor-type="page" text:anchor-page-number="4" draw:z-index="371" draw:name="Shape270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12" draw:z-index="370" draw:name="Shape1092" draw:style-name="gr1" draw:text-style-name="P2" svg:width="0.1543in" svg:height="0.1276in" svg:x="0.5201in" svg:y="3.6618in">
        <draw:text-box>
          <text:p><text:span text:style-name="T2">03.</text:span></text:p>
        </draw:text-box>
      </draw:frame>
      <draw:frame text:anchor-type="page" text:anchor-page-number="11" draw:z-index="369" draw:name="Shape1010" draw:style-name="gr1" draw:text-style-name="P2" svg:width="2.4453in" svg:height="0.1276in" svg:x="0.5201in" svg:y="3.2575in">
        <draw:text-box>
          <text:p><text:span text:style-name="T2">- PNEC: Concentrazione prevedibile priva di effetti</text:span></text:p>
        </draw:text-box>
      </draw:frame>
      <draw:frame text:anchor-type="page" text:anchor-page-number="8" draw:z-index="368" draw:name="Shape718" draw:style-name="gr1" draw:text-style-name="P2" svg:width="0.6295in" svg:height="0.1276in" svg:x="0.5201in" svg:y="3.1744in">
        <draw:text-box>
          <text:p><text:span text:style-name="T2">LC50 - Pesci</text:span></text:p>
        </draw:text-box>
      </draw:frame>
      <draw:frame text:anchor-type="page" text:anchor-page-number="7" draw:z-index="367" draw:name="Shape633" draw:style-name="gr1" draw:text-style-name="P2" svg:width="0.7496in" svg:height="0.1276in" svg:x="0.5201in" svg:y="1.9055in">
        <draw:text-box>
          <text:p><text:span text:style-name="T2">Effetti interattivi</text:span></text:p>
        </draw:text-box>
      </draw:frame>
      <draw:frame text:anchor-type="page" text:anchor-page-number="2" draw:z-index="366" draw:name="Shape122" draw:style-name="gr1" draw:text-style-name="P2" svg:width="2.3858in" svg:height="0.1287in" svg:x="2.0807in" svg:y="2.4437in">
        <draw:text-box>
          <text:p><text:span text:style-name="T1">Scheda dati di sicurezza disponibile su richiesta.</text:span></text:p>
        </draw:text-box>
      </draw:frame>
      <draw:frame text:anchor-type="page" text:anchor-page-number="3" draw:z-index="365" draw:name="Shape215" draw:style-name="gr1" draw:text-style-name="P2" svg:width="2.0331in" svg:height="0.1276in" svg:x="0.5201in" svg:y="2.1756in">
        <draw:text-box>
          <text:p><text:span text:style-name="T2">incosciente. Consultare subito un medico.</text:span></text:p>
        </draw:text-box>
      </draw:frame>
      <draw:frame text:anchor-type="page" text:anchor-page-number="1" draw:z-index="364" draw:name="Shape23" draw:style-name="gr1" draw:text-style-name="P2" svg:width="0.9713in" svg:height="0.1287in" svg:x="0.5201in" svg:y="3.122in">
        <draw:text-box>
          <text:p><text:span text:style-name="T1">Descrizione/Utilizzo</text:span></text:p>
        </draw:text-box>
      </draw:frame>
      <draw:frame text:anchor-type="page" text:anchor-page-number="10" draw:z-index="363" draw:name="Shape868" draw:style-name="gr1" draw:text-style-name="P2" svg:width="3.515in" svg:height="0.1276in" svg:x="0.5201in" svg:y="3.3075in">
        <draw:text-box>
          <text:p><text:span text:style-name="T2">Testo delle indicazioni di pericolo (H) citate alle sezioni 2-3 della scheda:</text:span></text:p>
        </draw:text-box>
      </draw:frame>
      <draw:frame text:anchor-type="page" text:anchor-page-number="11" draw:z-index="362" draw:name="Shape1009" draw:style-name="gr1" draw:text-style-name="P2" svg:width="1.7453in" svg:height="0.1276in" svg:x="0.5201in" svg:y="3.122in">
        <draw:text-box>
          <text:p><text:span text:style-name="T2">- PMT: Persistente, mobile e tossico</text:span></text:p>
        </draw:text-box>
      </draw:frame>
      <draw:frame text:anchor-type="page" text:anchor-page-number="12" draw:z-index="361" draw:name="Shape1091" draw:style-name="gr1" draw:text-style-name="P2" svg:width="2.5634in" svg:height="0.1276in" svg:x="0.5201in" svg:y="3.5264in">
        <draw:text-box>
          <text:p><text:span text:style-name="T2">Sono state apportate variazioni alle seguenti sezioni:</text:span></text:p>
        </draw:text-box>
      </draw:frame>
      <draw:frame text:anchor-type="page" text:anchor-page-number="2" draw:z-index="360" draw:name="Shape121" draw:style-name="gr1" draw:text-style-name="P2" svg:width="0.4217in" svg:height="0.1287in" svg:x="0.6756in" svg:y="2.4437in">
        <draw:text-box>
          <text:p><text:span text:style-name="T3">EUH210</text:span></text:p>
        </draw:text-box>
      </draw:frame>
      <draw:frame text:anchor-type="page" text:anchor-page-number="4" draw:z-index="359" draw:name="Shape274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frame text:anchor-type="page" text:anchor-page-number="3" draw:z-index="358" draw:name="Shape214" draw:style-name="gr1" draw:text-style-name="P2" svg:width="6.6248in" svg:height="0.1276in" svg:x="0.5201in" svg:y="2.039in">
        <draw:text-box>
          <text:p><text:span text:style-name="T2">INGESTIONE: Non indurre il vomito se non espressamente autorizzati dal medico. Non somministrare nulla per via orale se il soggetto è</text:span></text:p>
        </draw:text-box>
      </draw:frame>
      <draw:frame text:anchor-type="page" text:anchor-page-number="1" draw:z-index="357" draw:name="Shape21" draw:style-name="gr1" draw:text-style-name="P2" svg:width="4.0524in" svg:height="0.1287in" svg:x="0.3744in" svg:y="2.8516in">
        <draw:text-box>
          <text:p><text:span text:style-name="T3">1.2. Usi identificati pertinenti della sostanza o della miscela e usi sconsigliati</text:span></text:p>
        </draw:text-box>
      </draw:frame>
      <draw:frame text:anchor-type="page" text:anchor-page-number="6" draw:z-index="356" draw:name="Shape555" draw:style-name="gr1" draw:text-style-name="P2" svg:width="0.0634in" svg:height="0.1287in" svg:x="3.0898in" svg:y="1.6327in">
        <draw:text-box>
          <text:p><text:span text:style-name="T1">8</text:span></text:p>
        </draw:text-box>
      </draw:frame>
      <draw:polygon text:anchor-type="page" text:anchor-page-number="5" draw:z-index="355" draw:name="Shape502" draw:style-name="gr3" draw:text-style-name="P3" svg:width="7.3866in" svg:height="0.1874in" svg:x="0.3433in" svg:y="8.5638in" svg:viewBox="0 0 18763 477" draw:points="0,0 18763,0 18763,477 0,477">
        <text:p/>
      </draw:polygon>
      <draw:frame text:anchor-type="page" text:anchor-page-number="9" draw:z-index="354" draw:name="Shape785" draw:style-name="gr1" draw:text-style-name="P2" svg:width="2.9059in" svg:height="0.1276in" svg:x="0.5201in" svg:y="1.9575in">
        <draw:text-box>
          <text:p><text:span text:style-name="T2">su ferrovia (RID), via mare (IMDG Code) e via aerea (IATA).</text:span></text:p>
        </draw:text-box>
      </draw:frame>
      <draw:frame text:anchor-type="page" text:anchor-page-number="7" draw:z-index="353" draw:name="Shape632" draw:style-name="gr1" draw:text-style-name="P2" svg:width="1.3252in" svg:height="0.1276in" svg:x="0.5201in" svg:y="1.6346in">
        <draw:text-box>
          <text:p><text:span text:style-name="T2">Informazioni non disponibili</text:span></text:p>
        </draw:text-box>
      </draw:frame>
      <draw:frame text:anchor-type="page" text:anchor-page-number="8" draw:z-index="352" draw:name="Shape716" draw:style-name="gr1" draw:text-style-name="P2" svg:width="5.385in" svg:height="0.1276in" svg:x="0.5201in" svg:y="3.0374in">
        <draw:text-box>
          <text:p><text:span text:style-name="T2">MASSA DI REAZIONE DI 5-CLORO-2- METIL-2H-ISOTIAZOL-3-ONE E 2-METIL-2H-ISOTIAZOL-3-ONE (3:1)</text:span></text:p>
        </draw:text-box>
      </draw:frame>
      <draw:frame text:anchor-type="page" text:anchor-page-number="12" draw:z-index="351" draw:name="Shape1090" draw:style-name="gr1" draw:text-style-name="P2" svg:width="2.1122in" svg:height="0.1276in" svg:x="0.5201in" svg:y="3.3929in">
        <draw:text-box>
          <text:p><text:span text:style-name="T2">Modifiche rispetto alla revisione precedente</text:span></text:p>
        </draw:text-box>
      </draw:frame>
      <draw:frame text:anchor-type="page" text:anchor-page-number="2" draw:z-index="350" draw:name="Shape120" draw:style-name="gr1" draw:text-style-name="P2" svg:width="1.0949in" svg:height="0.1287in" svg:x="0.5201in" svg:y="2.3091in">
        <draw:text-box>
          <text:p><text:span text:style-name="T1">Indicazioni di pericolo:</text:span></text:p>
        </draw:text-box>
      </draw:frame>
      <draw:frame text:anchor-type="page" text:anchor-page-number="8" draw:z-index="349" draw:name="Shape715" draw:style-name="gr1" draw:text-style-name="P2" svg:width="0.7531in" svg:height="0.1287in" svg:x="0.3744in" svg:y="2.6335in">
        <draw:text-box>
          <text:p><text:span text:style-name="T3">12.1. Tossicità</text:span></text:p>
        </draw:text-box>
      </draw:frame>
      <draw:frame text:anchor-type="page" text:anchor-page-number="4" draw:z-index="348" draw:name="Shape269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line text:anchor-type="page" text:anchor-page-number="5" draw:z-index="347" draw:name="Shape468" draw:style-name="gr4" draw:text-style-name="P2" svg:x1="0.5201in" svg:y1="3.5268in" svg:x2="7.6465in" svg:y2="3.5268in">
        <text:p/>
      </draw:line>
      <draw:frame text:anchor-type="page" text:anchor-page-number="11" draw:z-index="346" draw:name="Shape1008" draw:style-name="gr1" draw:text-style-name="P2" svg:width="1.935in" svg:height="0.1276in" svg:x="0.5201in" svg:y="2.9874in">
        <draw:text-box>
          <text:p><text:span text:style-name="T2">- PEL: Livello prevedibile di esposizione</text:span></text:p>
        </draw:text-box>
      </draw:frame>
      <draw:frame text:anchor-type="page" text:anchor-page-number="3" draw:z-index="345" draw:name="Shape213" draw:style-name="gr1" draw:text-style-name="P2" svg:width="3.7217in" svg:height="0.1276in" svg:x="0.5201in" svg:y="1.9055in">
        <draw:text-box>
          <text:p><text:span text:style-name="T2">Consultare un medico. Evitare ulteriori contatti con gli indumenti contaminati.</text:span></text:p>
        </draw:text-box>
      </draw:frame>
      <draw:frame text:anchor-type="page" text:anchor-page-number="10" draw:z-index="344" draw:name="Shape867" draw:style-name="gr1" draw:text-style-name="P2" svg:width="2.263in" svg:height="0.1768in" svg:x="0.3744in" svg:y="3.028in">
        <draw:text-box>
          <text:p><text:span text:style-name="T4">SEZIONE 16. Altre informazioni</text:span></text:p>
        </draw:text-box>
      </draw:frame>
      <draw:frame text:anchor-type="page" text:anchor-page-number="9" draw:z-index="343" draw:name="Shape784" draw:style-name="gr1" draw:text-style-name="P2" svg:width="6.6858in" svg:height="0.1276in" svg:x="0.5201in" svg:y="1.8201in">
        <draw:text-box>
          <text:p><text:span text:style-name="T2">Il prodotto non è da considerarsi pericoloso ai sensi delle disposizioni vigenti in materia di trasporto di merci pericolose su strada (A.D.R.),</text:span></text:p>
        </draw:text-box>
      </draw:frame>
      <draw:frame text:anchor-type="page" text:anchor-page-number="1" draw:z-index="342" draw:name="Shape19" draw:style-name="gr1" draw:text-style-name="P2" svg:width="1.448in" svg:height="0.1287in" svg:x="3.0898in" svg:y="2.5799in">
        <draw:text-box>
          <text:p><text:span text:style-name="T3">SUPER TRASPIRA BIANCO</text:span></text:p>
        </draw:text-box>
      </draw:frame>
      <draw:frame text:anchor-type="page" text:anchor-page-number="6" draw:z-index="341" draw:name="Shape554" draw:style-name="gr1" draw:text-style-name="P2" svg:width="0.1441in" svg:height="0.1287in" svg:x="0.5201in" svg:y="1.6327in">
        <draw:text-box>
          <text:p><text:span text:style-name="T1">pH</text:span></text:p>
        </draw:text-box>
      </draw:frame>
      <draw:frame text:anchor-type="page" text:anchor-page-number="7" draw:z-index="340" draw:name="Shape630" draw:style-name="gr1" draw:text-style-name="P2" svg:width="4.4496in" svg:height="0.1276in" svg:x="0.5201in" svg:y="1.3646in">
        <draw:text-box>
          <text:p><text:span text:style-name="T2">Effetti immediati, ritardati e ed effetti cronici derivanti da esposizioni a breve e lungo termine</text:span></text:p>
        </draw:text-box>
      </draw:frame>
      <draw:frame text:anchor-type="page" text:anchor-page-number="7" draw:z-index="339" draw:name="Shape628" draw:style-name="gr1" draw:text-style-name="P2" svg:width="0.3169in" svg:height="0.1287in" svg:x="2.9244in" svg:y="1.039in">
        <draw:text-box>
          <text:p><text:span text:style-name="T1">... / &gt;&gt;</text:span></text:p>
        </draw:text-box>
      </draw:frame>
      <draw:frame text:anchor-type="page" text:anchor-page-number="2" draw:z-index="338" draw:name="Shape119" draw:style-name="gr1" draw:text-style-name="P2" svg:width="0.076in" svg:height="0.1287in" svg:x="2.2366in" svg:y="1.9035in">
        <draw:text-box>
          <text:p><text:span text:style-name="T1">--</text:span></text:p>
        </draw:text-box>
      </draw:frame>
      <draw:line text:anchor-type="page" text:anchor-page-number="4" draw:z-index="337" draw:name="Shape386" draw:style-name="gr4" draw:text-style-name="P2" svg:x1="0.5201in" svg:y1="9.852in" svg:x2="7.6465in" svg:y2="9.852in">
        <text:p/>
      </draw:line>
      <draw:line text:anchor-type="page" text:anchor-page-number="5" draw:z-index="336" draw:name="Shape466" draw:style-name="gr4" draw:text-style-name="P2" svg:x1="0.5201in" svg:y1="3.3913in" svg:x2="7.6465in" svg:y2="3.3913in">
        <text:p/>
      </draw:line>
      <draw:frame text:anchor-type="page" text:anchor-page-number="9" draw:z-index="335" draw:name="Shape783" draw:style-name="gr1" draw:text-style-name="P2" svg:width="2.8539in" svg:height="0.1768in" svg:x="0.3744in" svg:y="1.5402in">
        <draw:text-box>
          <text:p><text:span text:style-name="T4">SEZIONE 14. Informazioni sul trasporto</text:span></text:p>
        </draw:text-box>
      </draw:frame>
      <draw:frame text:anchor-type="page" text:anchor-page-number="1" draw:z-index="334" draw:name="Shape20" draw:style-name="gr1" draw:text-style-name="P2" svg:width="0.774in" svg:height="0.1287in" svg:x="0.5201in" svg:y="2.5811in">
        <draw:text-box>
          <text:p><text:span text:style-name="T1">Denominazione</text:span></text:p>
        </draw:text-box>
      </draw:frame>
      <draw:frame text:anchor-type="page" text:anchor-page-number="11" draw:z-index="333" draw:name="Shape1007" draw:style-name="gr1" draw:text-style-name="P2" svg:width="2.2524in" svg:height="0.1276in" svg:x="0.5201in" svg:y="2.852in">
        <draw:text-box>
          <text:p><text:span text:style-name="T2">- PEC: Concentrazione ambientale prevedibile</text:span></text:p>
        </draw:text-box>
      </draw:frame>
      <draw:frame text:anchor-type="page" text:anchor-page-number="8" draw:z-index="332" draw:name="Shape714" draw:style-name="gr1" draw:text-style-name="P2" svg:width="3.9689in" svg:height="0.1276in" svg:x="0.5201in" svg:y="2.3634in">
        <draw:text-box>
          <text:p><text:span text:style-name="T2">prodotto ha raggiunto corsi d'acqua o se ha contaminato il suolo o la vegetazione.</text:span></text:p>
        </draw:text-box>
      </draw:frame>
      <draw:frame text:anchor-type="page" text:anchor-page-number="12" draw:z-index="331" draw:name="Shape1089" draw:style-name="gr1" draw:text-style-name="P2" svg:width="1.7768in" svg:height="0.1276in" svg:x="0.5201in" svg:y="2.9874in">
        <draw:text-box>
          <text:p><text:span text:style-name="T2">diversamente indicato in sezione 12.</text:span></text:p>
        </draw:text-box>
      </draw:frame>
      <draw:frame text:anchor-type="page" text:anchor-page-number="6" draw:z-index="330" draw:name="Shape553" draw:style-name="gr1" draw:text-style-name="P2" svg:width="0.7433in" svg:height="0.1287in" svg:x="3.0898in" svg:y="1.4992in">
        <draw:text-box>
          <text:p><text:span text:style-name="T1">non disponibile</text:span></text:p>
        </draw:text-box>
      </draw:frame>
      <draw:frame text:anchor-type="page" text:anchor-page-number="10" draw:z-index="329" draw:name="Shape864" draw:style-name="gr1" draw:text-style-name="P2" svg:width="5.4598in" svg:height="0.1276in" svg:x="0.5201in" svg:y="2.7165in">
        <draw:text-box>
          <text:p><text:span text:style-name="T2">Non è stata elaborata una valutazione di sicurezza chimica per la miscela / per le sostanze indicate in sezione 3.</text:span></text:p>
        </draw:text-box>
      </draw:frame>
      <draw:frame text:anchor-type="page" text:anchor-page-number="3" draw:z-index="328" draw:name="Shape212" draw:style-name="gr1" draw:text-style-name="P2" svg:width="6.4894in" svg:height="0.1276in" svg:x="0.5201in" svg:y="1.7689in">
        <draw:text-box>
          <text:p><text:span text:style-name="T2">PELLE: Togliere gli indumenti contaminati. Lavare immediatamente ed abbondantemente con acqua corrente (e sapone se possibile).</text:span></text:p>
        </draw:text-box>
      </draw:frame>
      <draw:frame text:anchor-type="page" text:anchor-page-number="6" draw:z-index="327" draw:name="Shape552" draw:style-name="gr1" draw:text-style-name="P2" svg:width="1.5768in" svg:height="0.1287in" svg:x="0.5201in" svg:y="1.498in">
        <draw:text-box>
          <text:p><text:span text:style-name="T1">Temperatura di decomposizione</text:span></text:p>
        </draw:text-box>
      </draw:frame>
      <draw:frame text:anchor-type="page" text:anchor-page-number="8" draw:z-index="326" draw:name="Shape713" draw:style-name="gr1" draw:text-style-name="P2" svg:width="6.376in" svg:height="0.1276in" svg:x="0.5201in" svg:y="2.2256in">
        <draw:text-box>
          <text:p><text:span text:style-name="T2">Utilizzare secondo le buone pratiche lavorative, evitando di disperdere il prodotto nell'ambiente. Avvisare le autorità competenti se il</text:span></text:p>
        </draw:text-box>
      </draw:frame>
      <draw:line text:anchor-type="page" text:anchor-page-number="5" draw:z-index="325" draw:name="Shape462" draw:style-name="gr4" draw:text-style-name="P2" svg:x1="0.5201in" svg:y1="3.2563in" svg:x2="7.6465in" svg:y2="3.2563in">
        <text:p/>
      </draw:line>
      <draw:frame text:anchor-type="page" text:anchor-page-number="12" draw:z-index="324" draw:name="Shape1088" draw:style-name="gr1" draw:text-style-name="P2" svg:width="6.4858in" svg:height="0.1276in" svg:x="0.5201in" svg:y="2.852in">
        <draw:text-box>
          <text:p><text:span text:style-name="T2">Pericoli per l’ambiente: La classificazione del prodotto è basata sui metodi di calcolo di cui all'Allegato I del CLP Parte 4, salvo che sia</text:span></text:p>
        </draw:text-box>
      </draw:frame>
      <draw:frame text:anchor-type="page" text:anchor-page-number="3" draw:z-index="323" draw:name="Shape211" draw:style-name="gr1" draw:text-style-name="P2" svg:width="5.4248in" svg:height="0.1276in" svg:x="0.5201in" svg:y="1.6346in">
        <draw:text-box>
          <text:p><text:span text:style-name="T2">ed abbondantemente con acqua per almeno 15 minuti, aprendo bene le palpebre. Consultare subito un medico.</text:span></text:p>
        </draw:text-box>
      </draw:frame>
      <draw:line text:anchor-type="page" text:anchor-page-number="4" draw:z-index="322" draw:name="Shape384" draw:style-name="gr4" draw:text-style-name="P2" svg:x1="0.5201in" svg:y1="9.7169in" svg:x2="7.6465in" svg:y2="9.7169in">
        <text:p/>
      </draw:line>
      <draw:frame text:anchor-type="page" text:anchor-page-number="9" draw:z-index="321" draw:name="Shape838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7" draw:z-index="320" draw:name="Shape627" draw:style-name="gr1" draw:text-style-name="P2" svg:width="2.4398in" svg:height="0.1449in" svg:x="0.3744in" svg:y="1.0366in">
        <draw:text-box>
          <text:p><text:span text:style-name="T6">SEZIONE 11. Informazioni tossicologiche</text:span></text:p>
        </draw:text-box>
      </draw:frame>
      <draw:frame text:anchor-type="page" text:anchor-page-number="10" draw:z-index="319" draw:name="Shape863" draw:style-name="gr1" draw:text-style-name="P2" svg:width="2.1512in" svg:height="0.1287in" svg:x="0.3744in" svg:y="2.4457in">
        <draw:text-box>
          <text:p><text:span text:style-name="T3">15.2. Valutazione della sicurezza chimica</text:span></text:p>
        </draw:text-box>
      </draw:frame>
      <draw:frame text:anchor-type="page" text:anchor-page-number="1" draw:z-index="318" draw:name="Shape18" draw:style-name="gr1" draw:text-style-name="P2" svg:width="1.5949in" svg:height="0.1287in" svg:x="0.3744in" svg:y="2.3102in">
        <draw:text-box>
          <text:p><text:span text:style-name="T3">1.1. Identificatore del prodotto</text:span></text:p>
        </draw:text-box>
      </draw:frame>
      <draw:frame text:anchor-type="page" text:anchor-page-number="11" draw:z-index="317" draw:name="Shape1006" draw:style-name="gr1" draw:text-style-name="P2" svg:width="2.1724in" svg:height="0.1276in" svg:x="0.5201in" svg:y="2.7165in">
        <draw:text-box>
          <text:p><text:span text:style-name="T2">- PBT: Persistente, bioaccumulante e tossico</text:span></text:p>
        </draw:text-box>
      </draw:frame>
      <draw:frame text:anchor-type="page" text:anchor-page-number="2" draw:z-index="316" draw:name="Shape118" draw:style-name="gr1" draw:text-style-name="P2" svg:width="0.5862in" svg:height="0.1287in" svg:x="0.5201in" svg:y="1.9035in">
        <draw:text-box>
          <text:p><text:span text:style-name="T1">Avvertenza:</text:span></text:p>
        </draw:text-box>
      </draw:frame>
      <draw:frame text:anchor-type="page" text:anchor-page-number="9" draw:z-index="315" draw:name="Shape779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1" draw:z-index="314" draw:name="Shape17" draw:style-name="gr1" draw:text-style-name="P2" svg:width="5.3512in" svg:height="0.1768in" svg:x="0.3744in" svg:y="2.0291in">
        <draw:text-box>
          <text:p><text:span text:style-name="T4">SEZIONE 1. Identificazione della sostanza/miscela e della società/impresa</text:span></text:p>
        </draw:text-box>
      </draw:frame>
      <draw:frame text:anchor-type="page" text:anchor-page-number="6" draw:z-index="313" draw:name="Shape551" draw:style-name="gr1" draw:text-style-name="P2" svg:width="0.7433in" svg:height="0.1287in" svg:x="3.0898in" svg:y="1.3638in">
        <draw:text-box>
          <text:p><text:span text:style-name="T1">non disponibile</text:span></text:p>
        </draw:text-box>
      </draw:frame>
      <draw:line text:anchor-type="page" text:anchor-page-number="5" draw:z-index="312" draw:name="Shape458" draw:style-name="gr4" draw:text-style-name="P2" svg:x1="0.5201in" svg:y1="3.1209in" svg:x2="7.6465in" svg:y2="3.1209in">
        <text:p/>
      </draw:line>
      <draw:frame text:anchor-type="page" text:anchor-page-number="2" draw:z-index="311" draw:name="Shape117" draw:style-name="gr1" draw:text-style-name="P2" svg:width="0.076in" svg:height="0.1287in" svg:x="2.2366in" svg:y="1.6327in">
        <draw:text-box>
          <text:p><text:span text:style-name="T1">--</text:span></text:p>
        </draw:text-box>
      </draw:frame>
      <draw:frame text:anchor-type="page" text:anchor-page-number="11" draw:z-index="310" draw:name="Shape1005" draw:style-name="gr1" draw:text-style-name="P2" svg:width="2.1185in" svg:height="0.1276in" svg:x="0.5201in" svg:y="2.5811in">
        <draw:text-box>
          <text:p><text:span text:style-name="T2">- OEL: Livello di esposizione occupazionale</text:span></text:p>
        </draw:text-box>
      </draw:frame>
      <draw:line text:anchor-type="page" text:anchor-page-number="4" draw:z-index="309" draw:name="Shape380" draw:style-name="gr4" draw:text-style-name="P2" svg:x1="0.5201in" svg:y1="9.5815in" svg:x2="7.6465in" svg:y2="9.5815in">
        <text:p/>
      </draw:line>
      <draw:frame text:anchor-type="page" text:anchor-page-number="3" draw:z-index="308" draw:name="Shape210" draw:style-name="gr1" draw:text-style-name="P2" svg:width="6.7331in" svg:height="0.1276in" svg:x="0.5201in" svg:y="1.498in">
        <draw:text-box>
          <text:p><text:span text:style-name="T2">OCCHI: Rimuovere, se presenti, le lenti a contatto se la situazione consente di effettuare l’operazione con facilità. Lavarsi immediatamente</text:span></text:p>
        </draw:text-box>
      </draw:frame>
      <draw:frame text:anchor-type="page" text:anchor-page-number="10" draw:z-index="307" draw:name="Shape862" draw:style-name="gr1" draw:text-style-name="P2" svg:width="2.8539in" svg:height="0.1276in" svg:x="0.5201in" svg:y="2.1744in">
        <draw:text-box>
          <text:p><text:span text:style-name="T2">Pitture opache per pareti e soffitti interni (gloss &lt; 25@60°).</text:span></text:p>
        </draw:text-box>
      </draw:frame>
      <draw:frame text:anchor-type="page" text:anchor-page-number="8" draw:z-index="306" draw:name="Shape712" draw:style-name="gr1" draw:text-style-name="P2" svg:width="2.7185in" svg:height="0.1768in" svg:x="0.3744in" svg:y="1.9457in">
        <draw:text-box>
          <text:p><text:span text:style-name="T4">SEZIONE 12. Informazioni ecologiche</text:span></text:p>
        </draw:text-box>
      </draw:frame>
      <draw:frame text:anchor-type="page" text:anchor-page-number="12" draw:z-index="305" draw:name="Shape1087" draw:style-name="gr1" draw:text-style-name="P2" svg:width="1.7685in" svg:height="0.1276in" svg:x="0.5201in" svg:y="2.7165in">
        <draw:text-box>
          <text:p><text:span text:style-name="T2">diversamente indicato in sezione 11.</text:span></text:p>
        </draw:text-box>
      </draw:frame>
      <draw:frame text:anchor-type="page" text:anchor-page-number="7" draw:z-index="304" draw:name="Shape689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2" draw:z-index="303" draw:name="Shape116" draw:style-name="gr1" draw:text-style-name="P2" svg:width="1.163in" svg:height="0.1287in" svg:x="0.5201in" svg:y="1.6327in">
        <draw:text-box>
          <text:p><text:span text:style-name="T1">Pittogrammi di pericolo:</text:span></text:p>
        </draw:text-box>
      </draw:frame>
      <draw:frame text:anchor-type="page" text:anchor-page-number="9" draw:z-index="302" draw:name="Shape778" draw:style-name="gr1" draw:text-style-name="P2" svg:width="0.5579in" svg:height="0.0894in" svg:x="5.7299in" svg:y="0.6752in">
        <draw:text-box>
          <text:p><text:span text:style-name="T8">Pagina n. <text:s/>9 / 12</text:span></text:p>
        </draw:text-box>
      </draw:frame>
      <draw:frame text:anchor-type="page" text:anchor-page-number="11" draw:z-index="301" draw:name="Shape1004" draw:style-name="gr1" draw:text-style-name="P2" svg:width="1.1913in" svg:height="0.1276in" svg:x="0.5201in" svg:y="2.4465in">
        <draw:text-box>
          <text:p><text:span text:style-name="T2">- LD50: Dose letale 50%</text:span></text:p>
        </draw:text-box>
      </draw:frame>
      <draw:frame text:anchor-type="page" text:anchor-page-number="3" draw:z-index="300" draw:name="Shape209" draw:style-name="gr1" draw:text-style-name="P2" svg:width="4.1953in" svg:height="0.1276in" svg:x="0.5201in" svg:y="1.3646in">
        <draw:text-box>
          <text:p><text:span text:style-name="T2">In caso di sintomi più gravi, chiamare il 118 per ottenere soccorso sanitario immediato.</text:span></text:p>
        </draw:text-box>
      </draw:frame>
      <draw:frame text:anchor-type="page" text:anchor-page-number="6" draw:z-index="299" draw:name="Shape550" draw:style-name="gr1" draw:text-style-name="P2" svg:width="1.5524in" svg:height="0.1287in" svg:x="0.5201in" svg:y="1.3626in">
        <draw:text-box>
          <text:p><text:span text:style-name="T1">Temperatura di autoaccensione</text:span></text:p>
        </draw:text-box>
      </draw:frame>
      <draw:frame text:anchor-type="page" text:anchor-page-number="7" draw:z-index="298" draw:name="Shape625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line text:anchor-type="page" text:anchor-page-number="5" draw:z-index="297" draw:name="Shape454" draw:style-name="gr4" draw:text-style-name="P2" svg:x1="0.5201in" svg:y1="2.9858in" svg:x2="7.6465in" svg:y2="2.9858in">
        <text:p/>
      </draw:line>
      <draw:frame text:anchor-type="page" text:anchor-page-number="8" draw:z-index="296" draw:name="Shape709" draw:style-name="gr1" draw:text-style-name="P2" svg:width="3.0252in" svg:height="0.1276in" svg:x="0.5201in" svg:y="1.7701in">
        <draw:text-box>
          <text:p><text:span text:style-name="T2">endocrini con effetti sulla salute umana oggetto di valutazione.</text:span></text:p>
        </draw:text-box>
      </draw:frame>
      <draw:frame text:anchor-type="page" text:anchor-page-number="1" draw:z-index="295" draw:name="Shape14" draw:style-name="gr1" draw:text-style-name="P2" svg:width="3.2185in" svg:height="0.1276in" svg:x="2.5591in" svg:y="1.5602in">
        <draw:text-box>
          <text:p><text:span text:style-name="T2">Conforme all'Allegato II del REACH - Regolamento (UE) 2020/878</text:span></text:p>
        </draw:text-box>
      </draw:frame>
      <draw:line text:anchor-type="page" text:anchor-page-number="4" draw:z-index="294" draw:name="Shape376" draw:style-name="gr4" draw:text-style-name="P2" svg:x1="0.5201in" svg:y1="9.4465in" svg:x2="7.6465in" svg:y2="9.4465in">
        <text:p/>
      </draw:line>
      <draw:frame text:anchor-type="page" text:anchor-page-number="10" draw:z-index="293" draw:name="Shape860" draw:style-name="gr1" draw:text-style-name="P2" svg:width="1.4343in" svg:height="0.1287in" svg:x="0.5201in" svg:y="2.039in">
        <draw:text-box>
          <text:p><text:span text:style-name="T1">VOC (Direttiva 2004/42/CE) :</text:span></text:p>
        </draw:text-box>
      </draw:frame>
      <draw:frame text:anchor-type="page" text:anchor-page-number="12" draw:z-index="292" draw:name="Shape1086" draw:style-name="gr1" draw:text-style-name="P2" svg:width="6.3941in" svg:height="0.1276in" svg:x="0.5201in" svg:y="2.5811in">
        <draw:text-box>
          <text:p><text:span text:style-name="T2">Pericoli per la salute: La classificazione del prodotto è basata sui metodi di calcolo di cui all'Allegato I del CLP Parte 3, salvo che sia</text:span></text:p>
        </draw:text-box>
      </draw:frame>
      <draw:frame text:anchor-type="page" text:anchor-page-number="1" draw:z-index="291" draw:name="Shape13" draw:style-name="gr1" draw:text-style-name="P2" svg:width="2.7894in" svg:height="0.2488in" svg:x="2.7984in" svg:y="1.2598in">
        <draw:text-box>
          <text:p><text:span text:style-name="T10">Scheda di Dati di Sicurezza</text:span></text:p>
        </draw:text-box>
      </draw:frame>
      <draw:frame text:anchor-type="page" text:anchor-page-number="3" draw:z-index="290" draw:name="Shape207" draw:style-name="gr1" draw:text-style-name="P2" svg:width="0.3169in" svg:height="0.1287in" svg:x="2.7244in" svg:y="1.039in">
        <draw:text-box>
          <text:p><text:span text:style-name="T1">... / &gt;&gt;</text:span></text:p>
        </draw:text-box>
      </draw:frame>
      <draw:frame text:anchor-type="page" text:anchor-page-number="2" draw:z-index="289" draw:name="Shape115" draw:style-name="gr1" draw:text-style-name="P2" svg:width="5.6098in" svg:height="0.1287in" svg:x="0.5201in" svg:y="1.3638in">
        <draw:text-box>
          <text:p><text:span text:style-name="T1">Etichettatura di pericolo ai sensi del Regolamento (CE) 1272/2008 (CLP) e successive modifiche ed adeguamenti.</text:span></text:p>
        </draw:text-box>
      </draw:frame>
      <draw:frame text:anchor-type="page" text:anchor-page-number="10" draw:z-index="288" draw:name="Shape859" draw:style-name="gr1" draw:text-style-name="P2" svg:width="1.3421in" svg:height="0.1287in" svg:x="0.5201in" svg:y="1.7693in">
        <draw:text-box>
          <text:p><text:span text:style-name="T1">Informazioni non disponibili</text:span></text:p>
        </draw:text-box>
      </draw:frame>
      <draw:frame text:anchor-type="page" text:anchor-page-number="9" draw:z-index="287" draw:name="Shape775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4" draw:z-index="286" draw:name="Shape371" draw:style-name="gr4" draw:text-style-name="P2" svg:x1="0.5201in" svg:y1="9.311in" svg:x2="7.6465in" svg:y2="9.311in">
        <text:p/>
      </draw:line>
      <draw:frame text:anchor-type="page" text:anchor-page-number="7" draw:z-index="285" draw:name="Shape624" draw:style-name="gr1" draw:text-style-name="P2" svg:width="0.5579in" svg:height="0.0894in" svg:x="5.7299in" svg:y="0.6752in">
        <draw:text-box>
          <text:p><text:span text:style-name="T8">Pagina n. <text:s/>7 / 12</text:span></text:p>
        </draw:text-box>
      </draw:frame>
      <draw:frame text:anchor-type="page" text:anchor-page-number="12" draw:z-index="284" draw:name="Shape1085" draw:style-name="gr1" draw:text-style-name="P2" svg:width="3.3378in" svg:height="0.1276in" svg:x="0.5201in" svg:y="2.4465in">
        <draw:text-box>
          <text:p><text:span text:style-name="T2">valutazione delle proprietà chimico fisiche sono riportati in sezione 9.</text:span></text:p>
        </draw:text-box>
      </draw:frame>
      <draw:frame text:anchor-type="page" text:anchor-page-number="6" draw:z-index="283" draw:name="Shape548" draw:style-name="gr1" draw:text-style-name="P2" svg:width="0.3169in" svg:height="0.1287in" svg:x="2.8665in" svg:y="1.039in">
        <draw:text-box>
          <text:p><text:span text:style-name="T1">... / &gt;&gt;</text:span></text:p>
        </draw:text-box>
      </draw:frame>
      <draw:frame text:anchor-type="page" text:anchor-page-number="11" draw:z-index="282" draw:name="Shape1003" draw:style-name="gr1" draw:text-style-name="P2" svg:width="1.7031in" svg:height="0.1276in" svg:x="0.5201in" svg:y="2.311in">
        <draw:text-box>
          <text:p><text:span text:style-name="T2">- LC50: Concentrazione letale 50%</text:span></text:p>
        </draw:text-box>
      </draw:frame>
      <draw:line text:anchor-type="page" text:anchor-page-number="5" draw:z-index="281" draw:name="Shape450" draw:style-name="gr4" draw:text-style-name="P2" svg:x1="0.5201in" svg:y1="2.8504in" svg:x2="7.6465in" svg:y2="2.8504in">
        <text:p/>
      </draw:line>
      <draw:frame text:anchor-type="page" text:anchor-page-number="8" draw:z-index="280" draw:name="Shape708" draw:style-name="gr1" draw:text-style-name="P2" svg:width="6.3571in" svg:height="0.1276in" svg:x="0.5201in" svg:y="1.6335in">
        <draw:text-box>
          <text:p><text:span text:style-name="T2">In base ai dati disponibili, il prodotto non contiene sostanze elencate nelle principali liste europee di potenziali o sospetti interferenti</text:span></text:p>
        </draw:text-box>
      </draw:frame>
      <draw:frame text:anchor-type="page" text:anchor-page-number="2" draw:z-index="279" draw:name="Shape113" draw:style-name="gr1" draw:text-style-name="P2" svg:width="0.3169in" svg:height="0.1287in" svg:x="2.7665in" svg:y="1.039in">
        <draw:text-box>
          <text:p><text:span text:style-name="T1">... / &gt;&gt;</text:span></text:p>
        </draw:text-box>
      </draw:frame>
      <draw:frame text:anchor-type="page" text:anchor-page-number="10" draw:z-index="278" draw:name="Shape857" draw:style-name="gr1" draw:text-style-name="P2" svg:width="0.8169in" svg:height="0.1287in" svg:x="0.5201in" svg:y="1.6346in">
        <draw:text-box>
          <text:p><text:span text:style-name="T1">Controlli Sanitari</text:span></text:p>
        </draw:text-box>
      </draw:frame>
      <draw:frame text:anchor-type="page" text:anchor-page-number="12" draw:z-index="277" draw:name="Shape1084" draw:style-name="gr1" draw:text-style-name="P2" svg:width="6.6961in" svg:height="0.1276in" svg:x="0.5201in" svg:y="2.311in">
        <draw:text-box>
          <text:p><text:span text:style-name="T2">Pericoli chimico fisici: La classificazione del prodotto è stata derivata dai criteri stabiliti dal Regolamento CLP Allegato I Parte 2. I metodi di</text:span></text:p>
        </draw:text-box>
      </draw:frame>
      <draw:frame text:anchor-type="page" text:anchor-page-number="8" draw:z-index="276" draw:name="Shape707" draw:style-name="gr1" draw:text-style-name="P2" svg:width="1.7551in" svg:height="0.1287in" svg:x="0.3744in" svg:y="1.3638in">
        <draw:text-box>
          <text:p><text:span text:style-name="T3">11.2. Informazioni su altri pericoli</text:span></text:p>
        </draw:text-box>
      </draw:frame>
      <draw:frame text:anchor-type="page" text:anchor-page-number="3" draw:z-index="275" draw:name="Shape206" draw:style-name="gr1" draw:text-style-name="P2" svg:width="2.2453in" svg:height="0.1449in" svg:x="0.3744in" svg:y="1.0366in">
        <draw:text-box>
          <text:p><text:span text:style-name="T6">SEZIONE 4. Misure di primo soccorso</text:span></text:p>
        </draw:text-box>
      </draw:frame>
      <draw:frame text:anchor-type="page" text:anchor-page-number="11" draw:z-index="274" draw:name="Shape1002" draw:style-name="gr1" draw:text-style-name="P2" svg:width="2.6669in" svg:height="0.1276in" svg:x="0.5201in" svg:y="2.1756in">
        <draw:text-box>
          <text:p><text:span text:style-name="T2">- INDEX: Numero identificativo nell’Allegato VI del CLP</text:span></text:p>
        </draw:text-box>
      </draw:frame>
      <draw:line text:anchor-type="page" text:anchor-page-number="5" draw:z-index="273" draw:name="Shape444" draw:style-name="gr4" draw:text-style-name="P2" svg:x1="0.5201in" svg:y1="2.7154in" svg:x2="7.6465in" svg:y2="2.7154in">
        <text:p/>
      </draw:line>
      <draw:frame text:anchor-type="page" text:anchor-page-number="7" draw:z-index="272" draw:name="Shape621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4" draw:z-index="271" draw:name="Shape366" draw:style-name="gr4" draw:text-style-name="P2" svg:x1="0.5201in" svg:y1="9.1756in" svg:x2="7.6465in" svg:y2="9.1756in">
        <text:p/>
      </draw:line>
      <draw:frame text:anchor-type="page" text:anchor-page-number="6" draw:z-index="270" draw:name="Shape547" draw:style-name="gr1" draw:text-style-name="P2" svg:width="2.3843in" svg:height="0.1449in" svg:x="0.3744in" svg:y="1.0366in">
        <draw:text-box>
          <text:p><text:span text:style-name="T6">SEZIONE 9. Proprietà fisiche e chimiche</text:span></text:p>
        </draw:text-box>
      </draw:frame>
      <draw:frame text:anchor-type="page" text:anchor-page-number="1" draw:z-index="269" draw:name="Shape97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9" draw:z-index="268" draw:name="Shape774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8" draw:z-index="267" draw:name="Shape705" draw:style-name="gr1" draw:text-style-name="P2" svg:width="0.3169in" svg:height="0.1287in" svg:x="2.9244in" svg:y="1.039in">
        <draw:text-box>
          <text:p><text:span text:style-name="T1">... / &gt;&gt;</text:span></text:p>
        </draw:text-box>
      </draw:frame>
      <draw:frame text:anchor-type="page" text:anchor-page-number="12" draw:z-index="266" draw:name="Shape1083" draw:style-name="gr1" draw:text-style-name="P2" svg:width="2.4996in" svg:height="0.1276in" svg:x="0.5201in" svg:y="2.1756in">
        <draw:text-box>
          <text:p><text:span text:style-name="T2">METODI DI CALCOLO DELLA CLASSIFICAZIONE</text:span></text:p>
        </draw:text-box>
      </draw:frame>
      <draw:frame text:anchor-type="page" text:anchor-page-number="1" draw:z-index="265" draw:name="Shape11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3" draw:z-index="264" draw:name="Shape263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2" draw:z-index="263" draw:name="Shape112" draw:style-name="gr1" draw:text-style-name="P2" svg:width="2.287in" svg:height="0.1449in" svg:x="0.3744in" svg:y="1.0366in">
        <draw:text-box>
          <text:p><text:span text:style-name="T6">SEZIONE 2. Identificazione dei pericoli</text:span></text:p>
        </draw:text-box>
      </draw:frame>
      <draw:frame text:anchor-type="page" text:anchor-page-number="6" draw:z-index="262" draw:name="Shape612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11" draw:z-index="261" draw:name="Shape1001" draw:style-name="gr1" draw:text-style-name="P2" svg:width="2.0449in" svg:height="0.1276in" svg:x="0.5201in" svg:y="2.0402in">
        <draw:text-box>
          <text:p><text:span text:style-name="T2">- IMO: International Maritime Organization</text:span></text:p>
        </draw:text-box>
      </draw:frame>
      <draw:line text:anchor-type="page" text:anchor-page-number="4" draw:z-index="260" draw:name="Shape361" draw:style-name="gr4" draw:text-style-name="P2" svg:x1="0.5201in" svg:y1="9.0406in" svg:x2="7.6465in" svg:y2="9.0406in">
        <text:p/>
      </draw:line>
      <draw:frame text:anchor-type="page" text:anchor-page-number="9" draw:z-index="259" draw:name="Shape773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7" draw:z-index="258" draw:name="Shape620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10" draw:z-index="257" draw:name="Shape856" draw:style-name="gr1" draw:text-style-name="P2" svg:width="0.4398in" svg:height="0.1287in" svg:x="0.5201in" svg:y="1.3638in">
        <draw:text-box>
          <text:p><text:span text:style-name="T1">Nessuna</text:span></text:p>
        </draw:text-box>
      </draw:frame>
      <draw:frame text:anchor-type="page" text:anchor-page-number="11" draw:z-index="256" draw:name="Shape1000" draw:style-name="gr1" draw:text-style-name="P2" svg:width="3.776in" svg:height="0.1276in" svg:x="0.5201in" svg:y="1.9055in">
        <draw:text-box>
          <text:p><text:span text:style-name="T2">- IMDG: Codice marittimo internazionale per il trasporto delle merci pericolose</text:span></text:p>
        </draw:text-box>
      </draw:frame>
      <draw:frame text:anchor-type="page" text:anchor-page-number="9" draw:z-index="255" draw:name="Shape777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frame text:anchor-type="page" text:anchor-page-number="7" draw:z-index="254" draw:name="Shape619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3" draw:z-index="253" draw:name="Shape204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8" draw:z-index="252" draw:name="Shape704" draw:style-name="gr1" draw:text-style-name="P2" svg:width="2.4398in" svg:height="0.1449in" svg:x="0.3744in" svg:y="1.0366in">
        <draw:text-box>
          <text:p><text:span text:style-name="T6">SEZIONE 11. Informazioni tossicologiche</text:span></text:p>
        </draw:text-box>
      </draw:frame>
      <draw:line text:anchor-type="page" text:anchor-page-number="4" draw:z-index="251" draw:name="Shape356" draw:style-name="gr4" draw:text-style-name="P2" svg:x1="0.5201in" svg:y1="8.9055in" svg:x2="7.6465in" svg:y2="8.9055in">
        <text:p/>
      </draw:line>
      <draw:polygon text:anchor-type="page" text:anchor-page-number="5" draw:z-index="250" draw:name="Shape437" draw:style-name="gr5" draw:text-style-name="P4" svg:width="7.137in" svg:height="0.4161in" svg:x="0.5094in" svg:y="2.5799in" svg:viewBox="0 0 18129 1058" draw:points="0,0 18129,0 18129,1058 0,1058">
        <text:p/>
      </draw:polygon>
      <draw:frame text:anchor-type="page" text:anchor-page-number="10" draw:z-index="249" draw:name="Shape854" draw:style-name="gr1" draw:text-style-name="P2" svg:width="0.3169in" svg:height="0.1287in" svg:x="3.4528in" svg:y="1.039in">
        <draw:text-box>
          <text:p><text:span text:style-name="T1">... / &gt;&gt;</text:span></text:p>
        </draw:text-box>
      </draw:frame>
      <draw:frame text:anchor-type="page" text:anchor-page-number="12" draw:z-index="248" draw:name="Shape1082" draw:style-name="gr1" draw:text-style-name="P2" svg:width="3.8441in" svg:height="0.1276in" svg:x="0.5201in" svg:y="1.9055in">
        <draw:text-box>
          <text:p><text:span text:style-name="T2">Fornire adeguata formazione al personale addetto all’utilizzo di prodotti chimici.</text:span></text:p>
        </draw:text-box>
      </draw:frame>
      <draw:frame text:anchor-type="page" text:anchor-page-number="1" draw:z-index="247" draw:name="Shape10" draw:style-name="gr1" draw:text-style-name="P2" svg:width="0.5579in" svg:height="0.0894in" svg:x="5.7299in" svg:y="0.6752in">
        <draw:text-box>
          <text:p><text:span text:style-name="T8">Pagina n. <text:s/>1 / 12</text:span></text:p>
        </draw:text-box>
      </draw:frame>
      <draw:frame text:anchor-type="page" text:anchor-page-number="6" draw:z-index="246" draw:name="Shape545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2" draw:z-index="245" draw:name="Shape191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line text:anchor-type="page" text:anchor-page-number="5" draw:z-index="244" draw:name="Shape438" draw:style-name="gr4" draw:text-style-name="P2" svg:x1="0.5201in" svg:y1="2.5799in" svg:x2="7.6465in" svg:y2="2.5799in">
        <text:p/>
      </draw:line>
      <draw:frame text:anchor-type="page" text:anchor-page-number="10" draw:z-index="243" draw:name="Shape853" draw:style-name="gr1" draw:text-style-name="P2" svg:width="2.9539in" svg:height="0.1449in" svg:x="0.3744in" svg:y="1.0366in">
        <draw:text-box>
          <text:p><text:span text:style-name="T6">SEZIONE 15. Informazioni sulla regolamentazione</text:span></text:p>
        </draw:text-box>
      </draw:frame>
      <draw:line text:anchor-type="page" text:anchor-page-number="4" draw:z-index="242" draw:name="Shape352" draw:style-name="gr4" draw:text-style-name="P2" svg:x1="0.5201in" svg:y1="8.7701in" svg:x2="7.6465in" svg:y2="8.7701in">
        <text:p/>
      </draw:line>
      <draw:frame text:anchor-type="page" text:anchor-page-number="6" draw:z-index="241" draw:name="Shape544" draw:style-name="gr1" draw:text-style-name="P2" svg:width="0.5579in" svg:height="0.0894in" svg:x="5.7299in" svg:y="0.6752in">
        <draw:text-box>
          <text:p><text:span text:style-name="T8">Pagina n. <text:s/>6 / 12</text:span></text:p>
        </draw:text-box>
      </draw:frame>
      <draw:frame text:anchor-type="page" text:anchor-page-number="7" draw:z-index="240" draw:name="Shape623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frame text:anchor-type="page" text:anchor-page-number="8" draw:z-index="239" draw:name="Shape766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1" draw:z-index="238" draw:name="Shape7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frame text:anchor-type="page" text:anchor-page-number="2" draw:z-index="237" draw:name="Shape110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11" draw:z-index="236" draw:name="Shape999" draw:style-name="gr1" draw:text-style-name="P2" svg:width="4.174in" svg:height="0.1276in" svg:x="0.5201in" svg:y="1.7701in">
        <draw:text-box>
          <text:p><text:span text:style-name="T2">- IC50: Concentrazione di immobilizzazione del 50% della popolazione soggetta a test</text:span></text:p>
        </draw:text-box>
      </draw:frame>
      <draw:frame text:anchor-type="page" text:anchor-page-number="12" draw:z-index="235" draw:name="Shape1081" draw:style-name="gr1" draw:text-style-name="P2" svg:width="5.0941in" svg:height="0.1276in" svg:x="0.5201in" svg:y="1.7701in">
        <draw:text-box>
          <text:p><text:span text:style-name="T2">e le disposizioni vigenti in materia di igiene e sicurezza. Non si assumono responsabilità per usi impropri.</text:span></text:p>
        </draw:text-box>
      </draw:frame>
      <draw:frame text:anchor-type="page" text:anchor-page-number="9" draw:z-index="234" draw:name="Shape772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3" draw:z-index="233" draw:name="Shape203" draw:style-name="gr1" draw:text-style-name="P2" svg:width="0.5579in" svg:height="0.0894in" svg:x="5.7299in" svg:y="0.6752in">
        <draw:text-box>
          <text:p><text:span text:style-name="T8">Pagina n. <text:s/>3 / 12</text:span></text:p>
        </draw:text-box>
      </draw:frame>
      <draw:frame text:anchor-type="page" text:anchor-page-number="3" draw:z-index="232" draw:name="Shape200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4" draw:z-index="231" draw:name="Shape346" draw:style-name="gr4" draw:text-style-name="P2" svg:x1="0.5201in" svg:y1="8.6346in" svg:x2="7.6465in" svg:y2="8.6346in">
        <text:p/>
      </draw:line>
      <draw:frame text:anchor-type="page" text:anchor-page-number="8" draw:z-index="230" draw:name="Shape702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7" draw:z-index="229" draw:name="Shape618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11" draw:z-index="228" draw:name="Shape998" draw:style-name="gr1" draw:text-style-name="P2" svg:width="5.5539in" svg:height="0.1276in" svg:x="0.5201in" svg:y="1.6346in">
        <draw:text-box>
          <text:p><text:span text:style-name="T2">- IATA DGR: Regolamento per il trasporto di merci pericolose della Associazione internazionale del trasporto aereo</text:span></text:p>
        </draw:text-box>
      </draw:frame>
      <draw:frame text:anchor-type="page" text:anchor-page-number="10" draw:z-index="227" draw:name="Shape978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frame text:anchor-type="page" text:anchor-page-number="12" draw:z-index="226" draw:name="Shape1080" draw:style-name="gr1" draw:text-style-name="P2" svg:width="6.7531in" svg:height="0.1276in" svg:x="0.5201in" svg:y="1.6346in">
        <draw:text-box>
          <text:p><text:span text:style-name="T2">Poichè l'uso del prodotto non cade sotto il nostro diretto controllo, è obbligo dell'utilizzatore osservare sotto la propria responsabilità le leggi</text:span></text:p>
        </draw:text-box>
      </draw:frame>
      <draw:line text:anchor-type="page" text:anchor-page-number="9" draw:z-index="225" draw:name="Shape837" draw:style-name="gr2" draw:text-style-name="P2" svg:x1="0.5201in" svg:y1="10.7913in" svg:x2="3.1303in" svg:y2="10.7913in">
        <text:p/>
      </draw:line>
      <draw:frame text:anchor-type="page" text:anchor-page-number="6" draw:z-index="224" draw:name="Shape541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frame text:anchor-type="page" text:anchor-page-number="1" draw:z-index="223" draw:name="Shape6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2" draw:z-index="222" draw:name="Shape109" draw:style-name="gr1" draw:text-style-name="P2" svg:width="0.5579in" svg:height="0.0894in" svg:x="5.7299in" svg:y="0.6752in">
        <draw:text-box>
          <text:p><text:span text:style-name="T8">Pagina n. <text:s/>2 / 12</text:span></text:p>
        </draw:text-box>
      </draw:frame>
      <draw:frame text:anchor-type="page" text:anchor-page-number="8" draw:z-index="221" draw:name="Shape701" draw:style-name="gr1" draw:text-style-name="P2" svg:width="0.5579in" svg:height="0.0894in" svg:x="5.7299in" svg:y="0.6752in">
        <draw:text-box>
          <text:p><text:span text:style-name="T8">Pagina n. <text:s/>8 / 12</text:span></text:p>
        </draw:text-box>
      </draw:frame>
      <draw:frame text:anchor-type="page" text:anchor-page-number="6" draw:z-index="220" draw:name="Shape540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10" draw:z-index="219" draw:name="Shape851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frame text:anchor-type="page" text:anchor-page-number="3" draw:z-index="218" draw:name="Shape199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line text:anchor-type="page" text:anchor-page-number="7" draw:z-index="217" draw:name="Shape687" draw:style-name="gr2" draw:text-style-name="P2" svg:x1="0.5201in" svg:y1="10.1449in" svg:x2="2.5685in" svg:y2="10.1449in">
        <text:p/>
      </draw:line>
      <draw:frame text:anchor-type="page" text:anchor-page-number="2" draw:z-index="216" draw:name="Shape106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frame text:anchor-type="page" text:anchor-page-number="12" draw:z-index="215" draw:name="Shape1079" draw:style-name="gr1" draw:text-style-name="P2" svg:width="4.735in" svg:height="0.1276in" svg:x="0.5201in" svg:y="1.4992in">
        <draw:text-box>
          <text:p><text:span text:style-name="T2">Non si deve interpretare tale documento come garanzia di alcuna proprietà specifica del prodotto.</text:span></text:p>
        </draw:text-box>
      </draw:frame>
      <draw:frame text:anchor-type="page" text:anchor-page-number="1" draw:z-index="214" draw:name="Shape5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11" draw:z-index="213" draw:name="Shape997" draw:style-name="gr1" draw:text-style-name="P2" svg:width="4.5996in" svg:height="0.1276in" svg:x="0.5201in" svg:y="1.4992in">
        <draw:text-box>
          <text:p><text:span text:style-name="T2">- GHS: Sistema armonizzato globale per la classificazione e la etichettatura dei prodotti chimici</text:span></text:p>
        </draw:text-box>
      </draw:frame>
      <draw:line text:anchor-type="page" text:anchor-page-number="9" draw:z-index="212" draw:name="Shape834" draw:style-name="gr2" draw:text-style-name="P2" svg:x1="0.5201in" svg:y1="10.3854in" svg:x2="3.1299in" svg:y2="10.3854in">
        <text:p/>
      </draw:line>
      <draw:polygon text:anchor-type="page" text:anchor-page-number="5" draw:z-index="211" draw:name="Shape435" draw:style-name="gr3" draw:text-style-name="P3" svg:width="7.137in" svg:height="0.1354in" svg:x="0.5094in" svg:y="2.4445in" svg:viewBox="0 0 18129 345" draw:points="0,0 18129,0 18129,345 0,345">
        <text:p/>
      </draw:polygon>
      <draw:line text:anchor-type="page" text:anchor-page-number="5" draw:z-index="210" draw:name="Shape436" draw:style-name="gr4" draw:text-style-name="P2" svg:x1="0.5201in" svg:y1="2.4445in" svg:x2="7.6465in" svg:y2="2.4445in">
        <text:p/>
      </draw:line>
      <draw:polygon text:anchor-type="page" text:anchor-page-number="4" draw:z-index="209" draw:name="Shape339" draw:style-name="gr5" draw:text-style-name="P4" svg:width="7.137in" svg:height="0.4161in" svg:x="0.5094in" svg:y="8.4996in" svg:viewBox="0 0 18129 1058" draw:points="0,0 18129,0 18129,1058 0,1058">
        <text:p/>
      </draw:polygon>
      <draw:frame text:anchor-type="page" text:anchor-page-number="2" draw:z-index="208" draw:name="Shape105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10" draw:z-index="207" draw:name="Shape850" draw:style-name="gr1" draw:text-style-name="P2" svg:width="0.6004in" svg:height="0.0894in" svg:x="5.7299in" svg:y="0.6752in">
        <draw:text-box>
          <text:p><text:span text:style-name="T8">Pagina n. <text:s/>10 / 12</text:span></text:p>
        </draw:text-box>
      </draw:frame>
      <draw:frame text:anchor-type="page" text:anchor-page-number="11" draw:z-index="206" draw:name="Shape996" draw:style-name="gr1" draw:text-style-name="P2" svg:width="1.4106in" svg:height="0.1276in" svg:x="0.5201in" svg:y="1.3646in">
        <draw:text-box>
          <text:p><text:span text:style-name="T2">- EmS: Emergency Schedule</text:span></text:p>
        </draw:text-box>
      </draw:frame>
      <draw:frame text:anchor-type="page" text:anchor-page-number="8" draw:z-index="205" draw:name="Shape698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7" draw:z-index="204" draw:name="Shape684" draw:style-name="gr2" draw:text-style-name="P2" svg:x1="0.5201in" svg:y1="9.6039in" svg:x2="5.0583in" svg:y2="9.6039in">
        <text:p/>
      </draw:line>
      <draw:line text:anchor-type="page" text:anchor-page-number="9" draw:z-index="203" draw:name="Shape831" draw:style-name="gr2" draw:text-style-name="P2" svg:x1="0.5201in" svg:y1="9.9795in" svg:x2="4.9031in" svg:y2="9.9795in">
        <text:p/>
      </draw:line>
      <draw:frame text:anchor-type="page" text:anchor-page-number="3" draw:z-index="202" draw:name="Shape198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12" draw:z-index="201" draw:name="Shape1078" draw:style-name="gr1" draw:text-style-name="P2" svg:width="5.1921in" svg:height="0.1276in" svg:x="0.5201in" svg:y="1.3646in">
        <draw:text-box>
          <text:p><text:span text:style-name="T2">deve assicurarsi della idoneità e completezza delle informazioni in relazione allo specifico uso del prodotto.</text:span></text:p>
        </draw:text-box>
      </draw:frame>
      <draw:frame text:anchor-type="page" text:anchor-page-number="6" draw:z-index="200" draw:name="Shape539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frame text:anchor-type="page" text:anchor-page-number="1" draw:z-index="199" draw:name="Shape9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line text:anchor-type="page" text:anchor-page-number="7" draw:z-index="198" draw:name="Shape681" draw:style-name="gr2" draw:text-style-name="P2" svg:x1="0.5201in" svg:y1="9.063in" svg:x2="5.0102in" svg:y2="9.063in">
        <text:p/>
      </draw:line>
      <draw:frame text:anchor-type="page" text:anchor-page-number="6" draw:z-index="197" draw:name="Shape543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frame text:anchor-type="page" text:anchor-page-number="8" draw:z-index="196" draw:name="Shape697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12" draw:z-index="195" draw:name="Shape1076" draw:style-name="gr1" draw:text-style-name="P2" svg:width="0.3169in" svg:height="0.1287in" svg:x="2.3189in" svg:y="1.039in">
        <draw:text-box>
          <text:p><text:span text:style-name="T1">... / &gt;&gt;</text:span></text:p>
        </draw:text-box>
      </draw:frame>
      <draw:frame text:anchor-type="page" text:anchor-page-number="2" draw:z-index="194" draw:name="Shape104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line text:anchor-type="page" text:anchor-page-number="5" draw:z-index="193" draw:name="Shape433" draw:style-name="gr4" draw:text-style-name="P2" svg:x1="0.5201in" svg:y1="2.174in" svg:x2="7.6465in" svg:y2="2.174in">
        <text:p/>
      </draw:line>
      <draw:frame text:anchor-type="page" text:anchor-page-number="10" draw:z-index="192" draw:name="Shape847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4" draw:z-index="191" draw:name="Shape340" draw:style-name="gr4" draw:text-style-name="P2" svg:x1="0.5201in" svg:y1="8.4996in" svg:x2="7.6465in" svg:y2="8.4996in">
        <text:p/>
      </draw:line>
      <draw:frame text:anchor-type="page" text:anchor-page-number="11" draw:z-index="190" draw:name="Shape994" draw:style-name="gr1" draw:text-style-name="P2" svg:width="0.3169in" svg:height="0.1287in" svg:x="2.3189in" svg:y="1.039in">
        <draw:text-box>
          <text:p><text:span text:style-name="T1">... / &gt;&gt;</text:span></text:p>
        </draw:text-box>
      </draw:frame>
      <draw:frame text:anchor-type="page" text:anchor-page-number="3" draw:z-index="189" draw:name="Shape202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line text:anchor-type="page" text:anchor-page-number="9" draw:z-index="188" draw:name="Shape828" draw:style-name="gr2" draw:text-style-name="P2" svg:x1="0.5201in" svg:y1="9.574in" svg:x2="3.6in" svg:y2="9.574in">
        <text:p/>
      </draw:line>
      <draw:frame text:anchor-type="page" text:anchor-page-number="1" draw:z-index="187" draw:name="Shape4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3" draw:z-index="186" draw:name="Shape197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6" draw:z-index="185" draw:name="Shape538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2" draw:z-index="184" draw:name="Shape108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line text:anchor-type="page" text:anchor-page-number="9" draw:z-index="183" draw:name="Shape825" draw:style-name="gr2" draw:text-style-name="P2" svg:x1="0.5201in" svg:y1="9.1681in" svg:x2="2.7929in" svg:y2="9.1681in">
        <text:p/>
      </draw:line>
      <draw:frame text:anchor-type="page" text:anchor-page-number="11" draw:z-index="182" draw:name="Shape993" draw:style-name="gr1" draw:text-style-name="P2" svg:width="1.8516in" svg:height="0.1449in" svg:x="0.3744in" svg:y="1.0366in">
        <draw:text-box>
          <text:p><text:span text:style-name="T6">SEZIONE 16. Altre informazioni</text:span></text:p>
        </draw:text-box>
      </draw:frame>
      <draw:frame text:anchor-type="page" text:anchor-page-number="10" draw:z-index="181" draw:name="Shape846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8" draw:z-index="180" draw:name="Shape696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line text:anchor-type="page" text:anchor-page-number="1" draw:z-index="179" draw:name="Shape87" draw:style-name="gr2" draw:text-style-name="P2" svg:x1="0.3327in" svg:y1="8.876in" svg:x2="7.7402in" svg:y2="8.876in">
        <text:p/>
      </draw:line>
      <draw:frame text:anchor-type="page" text:anchor-page-number="12" draw:z-index="178" draw:name="Shape1075" draw:style-name="gr1" draw:text-style-name="P2" svg:width="1.8516in" svg:height="0.1449in" svg:x="0.3744in" svg:y="1.0366in">
        <draw:text-box>
          <text:p><text:span text:style-name="T6">SEZIONE 16. Altre informazioni</text:span></text:p>
        </draw:text-box>
      </draw:frame>
      <draw:line text:anchor-type="page" text:anchor-page-number="5" draw:z-index="177" draw:name="Shape431" draw:style-name="gr4" draw:text-style-name="P2" svg:x1="0.5201in" svg:y1="2.039in" svg:x2="7.6465in" svg:y2="2.039in">
        <text:p/>
      </draw:line>
      <draw:line text:anchor-type="page" text:anchor-page-number="7" draw:z-index="176" draw:name="Shape678" draw:style-name="gr2" draw:text-style-name="P2" svg:x1="0.5201in" svg:y1="8.522in" svg:x2="2.4783in" svg:y2="8.522in">
        <text:p/>
      </draw:line>
      <draw:line text:anchor-type="page" text:anchor-page-number="6" draw:z-index="175" draw:name="Shape610" draw:style-name="gr2" draw:text-style-name="P2" svg:x1="0.5201in" svg:y1="10.3843in" svg:x2="2.8209in" svg:y2="10.3843in">
        <text:p/>
      </draw:line>
      <draw:polygon text:anchor-type="page" text:anchor-page-number="4" draw:z-index="174" draw:name="Shape337" draw:style-name="gr3" draw:text-style-name="P3" svg:width="7.137in" svg:height="0.135in" svg:x="0.5094in" svg:y="8.3646in" svg:viewBox="0 0 18129 344" draw:points="0,0 18129,0 18129,344 0,344">
        <text:p/>
      </draw:polygon>
      <draw:frame text:anchor-type="page" text:anchor-page-number="2" draw:z-index="173" draw:name="Shape103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frame text:anchor-type="page" text:anchor-page-number="10" draw:z-index="172" draw:name="Shape845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line text:anchor-type="page" text:anchor-page-number="7" draw:z-index="171" draw:name="Shape672" draw:style-name="gr2" draw:text-style-name="P2" svg:x1="0.5201in" svg:y1="7.4398in" svg:x2="1.6567in" svg:y2="7.4398in">
        <text:p/>
      </draw:line>
      <draw:line text:anchor-type="page" text:anchor-page-number="3" draw:z-index="170" draw:name="Shape253" draw:style-name="gr2" draw:text-style-name="P2" svg:x1="0.3327in" svg:y1="9.1567in" svg:x2="7.7402in" svg:y2="9.1567in">
        <text:p/>
      </draw:line>
      <draw:frame text:anchor-type="page" text:anchor-page-number="12" draw:z-index="169" draw:name="Shape1093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line text:anchor-type="page" text:anchor-page-number="5" draw:z-index="168" draw:name="Shape425" draw:style-name="gr4" draw:text-style-name="P2" svg:x1="0.5201in" svg:y1="1.9035in" svg:x2="7.6465in" svg:y2="1.9035in">
        <text:p/>
      </draw:line>
      <draw:frame text:anchor-type="page" text:anchor-page-number="8" draw:z-index="167" draw:name="Shape700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line text:anchor-type="page" text:anchor-page-number="9" draw:z-index="166" draw:name="Shape822" draw:style-name="gr2" draw:text-style-name="P2" svg:x1="0.5201in" svg:y1="8.7626in" svg:x2="5.598in" svg:y2="8.7626in">
        <text:p/>
      </draw:line>
      <draw:frame text:anchor-type="page" text:anchor-page-number="11" draw:z-index="165" draw:name="Shape1060" draw:style-name="gr1" draw:text-style-name="P2" svg:width="0.8268in" svg:height="0.0807in" svg:x="6.8563in" svg:y="10.9346in">
        <draw:text-box>
          <text:p><text:span text:style-name="T7">EPY 12.1.0 - SDS 1004.14</text:span></text:p>
        </draw:text-box>
      </draw:frame>
      <draw:line text:anchor-type="page" text:anchor-page-number="7" draw:z-index="164" draw:name="Shape669" draw:style-name="gr2" draw:text-style-name="P2" svg:x1="0.5201in" svg:y1="6.8988in" svg:x2="2.9815in" svg:y2="6.8988in">
        <text:p/>
      </draw:line>
      <draw:frame text:anchor-type="page" text:anchor-page-number="12" draw:z-index="163" draw:name="Shape1073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polygon text:anchor-type="page" text:anchor-page-number="1" draw:z-index="162" draw:name="Shape88" draw:style-name="gr3" draw:text-style-name="P3" svg:width="7.3866in" svg:height="0.1874in" svg:x="0.3433in" svg:y="8.876in" svg:viewBox="0 0 18763 477" draw:points="0,0 18763,0 18763,477 0,477">
        <text:p/>
      </draw:polygon>
      <draw:line text:anchor-type="page" text:anchor-page-number="6" draw:z-index="161" draw:name="Shape607" draw:style-name="gr2" draw:text-style-name="P2" svg:x1="0.5201in" svg:y1="9.8433in" svg:x2="3.8146in" svg:y2="9.8433in">
        <text:p/>
      </draw:line>
      <draw:frame text:anchor-type="page" text:anchor-page-number="10" draw:z-index="160" draw:name="Shape849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frame text:anchor-type="page" text:anchor-page-number="8" draw:z-index="159" draw:name="Shape695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line text:anchor-type="page" text:anchor-page-number="9" draw:z-index="158" draw:name="Shape810" draw:style-name="gr2" draw:text-style-name="P2" svg:x1="0.5929in" svg:y1="7.9508in" svg:x2="1.6402in" svg:y2="7.9508in">
        <text:p/>
      </draw:line>
      <draw:line text:anchor-type="page" text:anchor-page-number="5" draw:z-index="157" draw:name="Shape420" draw:style-name="gr4" draw:text-style-name="P2" svg:x1="0.5201in" svg:y1="1.7685in" svg:x2="7.6465in" svg:y2="1.7685in">
        <text:p/>
      </draw:line>
      <draw:line text:anchor-type="page" text:anchor-page-number="2" draw:z-index="156" draw:name="Shape184" draw:style-name="gr2" draw:text-style-name="P2" svg:x1="0.3327in" svg:y1="9.8331in" svg:x2="7.7402in" svg:y2="9.8331in">
        <text:p/>
      </draw:line>
      <draw:frame text:anchor-type="page" text:anchor-page-number="11" draw:z-index="155" draw:name="Shape991" draw:style-name="gr1" draw:text-style-name="P2" svg:width="1.8067in" svg:height="0.0894in" svg:x="5.7299in" svg:y="0.7626in">
        <draw:text-box>
          <text:p><text:span text:style-name="T8">Sostituisce la revisione:3 (Data revisione 10/01/2026)</text:span></text:p>
        </draw:text-box>
      </draw:frame>
      <draw:line text:anchor-type="page" text:anchor-page-number="4" draw:z-index="154" draw:name="Shape338" draw:style-name="gr4" draw:text-style-name="P2" svg:x1="0.5201in" svg:y1="8.3646in" svg:x2="7.6465in" svg:y2="8.3646in">
        <text:p/>
      </draw:line>
      <draw:line text:anchor-type="page" text:anchor-page-number="9" draw:z-index="153" draw:name="Shape808" draw:style-name="gr2" draw:text-style-name="P2" svg:x1="0.5201in" svg:y1="7.8157in" svg:x2="6.1445in" svg:y2="7.8157in">
        <text:p/>
      </draw:line>
      <draw:frame text:anchor-type="page" text:anchor-page-number="12" draw:z-index="152" draw:name="Shape1072" draw:style-name="gr1" draw:text-style-name="P2" svg:width="0.6004in" svg:height="0.0894in" svg:x="5.7299in" svg:y="0.6752in">
        <draw:text-box>
          <text:p><text:span text:style-name="T8">Pagina n. <text:s/>12 / 12</text:span></text:p>
        </draw:text-box>
      </draw:frame>
      <draw:line text:anchor-type="page" text:anchor-page-number="5" draw:z-index="151" draw:name="Shape414" draw:style-name="gr4" draw:text-style-name="P2" svg:x1="0.5201in" svg:y1="1.6331in" svg:x2="7.6465in" svg:y2="1.6331in">
        <text:p/>
      </draw:line>
      <draw:frame text:anchor-type="page" text:anchor-page-number="11" draw:z-index="150" draw:name="Shape990" draw:style-name="gr1" draw:text-style-name="P2" svg:width="0.5949in" svg:height="0.0894in" svg:x="5.7299in" svg:y="0.6752in">
        <draw:text-box>
          <text:p><text:span text:style-name="T8">Pagina n. <text:s/>11 / 12</text:span></text:p>
        </draw:text-box>
      </draw:frame>
      <draw:polygon text:anchor-type="page" text:anchor-page-number="3" draw:z-index="149" draw:name="Shape254" draw:style-name="gr3" draw:text-style-name="P3" svg:width="7.3866in" svg:height="0.1874in" svg:x="0.3433in" svg:y="9.1567in" svg:viewBox="0 0 18763 477" draw:points="0,0 18763,0 18763,477 0,477">
        <text:p/>
      </draw:polygon>
      <draw:frame text:anchor-type="page" text:anchor-page-number="10" draw:z-index="148" draw:name="Shape844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line text:anchor-type="page" text:anchor-page-number="8" draw:z-index="147" draw:name="Shape755" draw:style-name="gr2" draw:text-style-name="P2" svg:x1="0.3327in" svg:y1="9.2921in" svg:x2="7.7402in" svg:y2="9.2921in">
        <text:p/>
      </draw:line>
      <draw:line text:anchor-type="page" text:anchor-page-number="7" draw:z-index="146" draw:name="Shape664" draw:style-name="gr2" draw:text-style-name="P2" svg:x1="0.5201in" svg:y1="6.0874in" svg:x2="3.1972in" svg:y2="6.0874in">
        <text:p/>
      </draw:line>
      <draw:line text:anchor-type="page" text:anchor-page-number="4" draw:z-index="145" draw:name="Shape300" draw:style-name="gr2" draw:text-style-name="P2" svg:x1="0.3327in" svg:y1="5.2346in" svg:x2="7.7402in" svg:y2="5.2346in">
        <text:p/>
      </draw:line>
      <draw:line text:anchor-type="page" text:anchor-page-number="6" draw:z-index="144" draw:name="Shape598" draw:style-name="gr2" draw:text-style-name="P2" svg:x1="0.3327in" svg:y1="8.4807in" svg:x2="7.7402in" svg:y2="8.4807in">
        <text:p/>
      </draw:line>
      <draw:line text:anchor-type="page" text:anchor-page-number="1" draw:z-index="143" draw:name="Shape48" draw:style-name="gr4" draw:text-style-name="P2" svg:x1="0.5201in" svg:y1="4.2445in" svg:x2="7.4177in" svg:y2="4.2445in">
        <text:p/>
      </draw:line>
      <draw:frame text:anchor-type="page" text:anchor-page-number="11" draw:z-index="142" draw:name="Shape987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1" draw:z-index="141" draw:name="Shape31" draw:style-name="gr4" draw:text-style-name="P2" svg:x1="0.5201in" svg:y1="3.5268in" svg:x2="7.4177in" svg:y2="3.5268in">
        <text:p/>
      </draw:line>
      <draw:line text:anchor-type="page" text:anchor-page-number="9" draw:z-index="140" draw:name="Shape806" draw:style-name="gr2" draw:text-style-name="P2" svg:x1="0.5201in" svg:y1="7.5453in" svg:x2="2.6535in" svg:y2="7.5453in">
        <text:p/>
      </draw:line>
      <draw:line text:anchor-type="page" text:anchor-page-number="7" draw:z-index="139" draw:name="Shape661" draw:style-name="gr2" draw:text-style-name="P2" svg:x1="0.5201in" svg:y1="5.5465in" svg:x2="3.1992in" svg:y2="5.5465in">
        <text:p/>
      </draw:line>
      <draw:line text:anchor-type="page" text:anchor-page-number="10" draw:z-index="138" draw:name="Shape865" draw:style-name="gr2" draw:text-style-name="P2" svg:x1="0.3327in" svg:y1="3.0185in" svg:x2="7.7402in" svg:y2="3.0185in">
        <text:p/>
      </draw:line>
      <draw:polygon text:anchor-type="page" text:anchor-page-number="2" draw:z-index="137" draw:name="Shape185" draw:style-name="gr3" draw:text-style-name="P3" svg:width="7.3866in" svg:height="0.1874in" svg:x="0.3433in" svg:y="9.8331in" svg:viewBox="0 0 18763 477" draw:points="0,0 18763,0 18763,477 0,477">
        <text:p/>
      </draw:polygon>
      <draw:frame text:anchor-type="page" text:anchor-page-number="12" draw:z-index="136" draw:name="Shape1069" draw:style-name="gr1" draw:text-style-name="P2" svg:width="0.787in" svg:height="0.0894in" svg:x="5.7299in" svg:y="0.5874in">
        <draw:text-box>
          <text:p><text:span text:style-name="T8">Stampata il 24/03/2026</text:span></text:p>
        </draw:text-box>
      </draw:frame>
      <draw:line text:anchor-type="page" text:anchor-page-number="3" draw:z-index="135" draw:name="Shape233" draw:style-name="gr2" draw:text-style-name="P2" svg:x1="0.3327in" svg:y1="5.7236in" svg:x2="7.7402in" svg:y2="5.7236in">
        <text:p/>
      </draw:line>
      <draw:frame text:anchor-type="page" text:anchor-page-number="12" draw:z-index="134" draw:name="Shape1068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frame text:anchor-type="page" text:anchor-page-number="11" draw:z-index="133" draw:name="Shape986" draw:style-name="gr1" draw:text-style-name="P2" svg:width="0.8933in" svg:height="0.0894in" svg:x="5.7299in" svg:y="0.5in">
        <draw:text-box>
          <text:p><text:span text:style-name="T8">Data revisione 24/03/2026</text:span></text:p>
        </draw:text-box>
      </draw:frame>
      <draw:polygon text:anchor-type="page" text:anchor-page-number="5" draw:z-index="132" draw:name="Shape407" draw:style-name="gr5" draw:text-style-name="P4" svg:width="7.137in" svg:height="0.4161in" svg:x="0.5094in" svg:y="1.498in" svg:viewBox="0 0 18129 1058" draw:points="0,0 18129,0 18129,1058 0,1058">
        <text:p/>
      </draw:polygon>
      <draw:line text:anchor-type="page" text:anchor-page-number="1" draw:z-index="131" draw:name="Shape26" draw:style-name="gr4" draw:text-style-name="P2" svg:x1="0.5201in" svg:y1="3.3913in" svg:x2="7.4177in" svg:y2="3.3913in">
        <text:p/>
      </draw:line>
      <draw:polygon text:anchor-type="page" text:anchor-page-number="8" draw:z-index="130" draw:name="Shape756" draw:style-name="gr3" draw:text-style-name="P3" svg:width="7.3866in" svg:height="0.1874in" svg:x="0.3433in" svg:y="9.2921in" svg:viewBox="0 0 18763 477" draw:points="0,0 18763,0 18763,477 0,477">
        <text:p/>
      </draw:polygon>
      <draw:line text:anchor-type="page" text:anchor-page-number="7" draw:z-index="129" draw:name="Shape658" draw:style-name="gr2" draw:text-style-name="P2" svg:x1="0.5201in" svg:y1="5.0055in" svg:x2="3.2535in" svg:y2="5.0055in">
        <text:p/>
      </draw:line>
      <draw:line text:anchor-type="page" text:anchor-page-number="9" draw:z-index="128" draw:name="Shape800" draw:style-name="gr2" draw:text-style-name="P2" svg:x1="0.3327in" svg:y1="6.7224in" svg:x2="7.7402in" svg:y2="6.7224in">
        <text:p/>
      </draw:line>
      <draw:polygon text:anchor-type="page" text:anchor-page-number="6" draw:z-index="127" draw:name="Shape599" draw:style-name="gr3" draw:text-style-name="P3" svg:width="7.3866in" svg:height="0.187in" svg:x="0.3433in" svg:y="8.4807in" svg:viewBox="0 0 18763 476" draw:points="0,0 18763,0 18763,476 0,476">
        <text:p/>
      </draw:polygon>
      <draw:line text:anchor-type="page" text:anchor-page-number="2" draw:z-index="126" draw:name="Shape145" draw:style-name="gr2" draw:text-style-name="P2" svg:x1="0.3327in" svg:y1="5.7236in" svg:x2="7.7402in" svg:y2="5.7236in">
        <text:p/>
      </draw:line>
      <draw:polygon text:anchor-type="page" text:anchor-page-number="4" draw:z-index="125" draw:name="Shape301" draw:style-name="gr3" draw:text-style-name="P3" svg:width="7.3866in" svg:height="0.1874in" svg:x="0.3433in" svg:y="5.2346in" svg:viewBox="0 0 18763 477" draw:points="0,0 18763,0 18763,477 0,477">
        <text:p/>
      </draw:polygon>
      <draw:line text:anchor-type="page" text:anchor-page-number="5" draw:z-index="124" draw:name="Shape408" draw:style-name="gr4" draw:text-style-name="P2" svg:x1="0.5201in" svg:y1="1.498in" svg:x2="7.6465in" svg:y2="1.498in">
        <text:p/>
      </draw:line>
      <draw:frame text:anchor-type="page" text:anchor-page-number="11" draw:z-index="123" draw:name="Shape985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line text:anchor-type="page" text:anchor-page-number="7" draw:z-index="122" draw:name="Shape637" draw:style-name="gr2" draw:text-style-name="P2" svg:x1="0.5201in" svg:y1="2.5709in" svg:x2="1.552in" svg:y2="2.5709in">
        <text:p/>
      </draw:line>
      <draw:line text:anchor-type="page" text:anchor-page-number="6" draw:z-index="121" draw:name="Shape579" draw:style-name="gr2" draw:text-style-name="P2" svg:x1="0.3327in" svg:y1="4.6417in" svg:x2="7.7402in" svg:y2="4.6417in">
        <text:p/>
      </draw:line>
      <draw:line text:anchor-type="page" text:anchor-page-number="4" draw:z-index="120" draw:name="Shape288" draw:style-name="gr2" draw:text-style-name="P2" svg:x1="0.3327in" svg:y1="2.8835in" svg:x2="7.7402in" svg:y2="2.8835in">
        <text:p/>
      </draw:line>
      <draw:polygon text:anchor-type="page" text:anchor-page-number="3" draw:z-index="119" draw:name="Shape234" draw:style-name="gr3" draw:text-style-name="P3" svg:width="7.3866in" svg:height="0.1874in" svg:x="0.3433in" svg:y="5.7236in" svg:viewBox="0 0 18763 477" draw:points="0,0 18763,0 18763,477 0,477">
        <text:p/>
      </draw:polygon>
      <draw:frame text:anchor-type="page" text:anchor-page-number="12" draw:z-index="118" draw:name="Shape1067" draw:style-name="gr1" draw:text-style-name="P2" svg:width="0.4642in" svg:height="0.0894in" svg:x="5.7299in" svg:y="0.4126in">
        <draw:text-box>
          <text:p><text:span text:style-name="T8">Revisione n.4</text:span></text:p>
        </draw:text-box>
      </draw:frame>
      <draw:polygon text:anchor-type="page" text:anchor-page-number="10" draw:z-index="117" draw:name="Shape866" draw:style-name="gr3" draw:text-style-name="P3" svg:width="7.3866in" svg:height="0.187in" svg:x="0.3433in" svg:y="3.0189in" svg:viewBox="0 0 18763 476" draw:points="0,0 18763,0 18763,476 0,476">
        <text:p/>
      </draw:polygon>
      <draw:line text:anchor-type="page" text:anchor-page-number="8" draw:z-index="116" draw:name="Shape710" draw:style-name="gr2" draw:text-style-name="P2" svg:x1="0.3327in" svg:y1="1.9366in" svg:x2="7.7402in" svg:y2="1.9366in">
        <text:p/>
      </draw:line>
      <draw:polygon text:anchor-type="page" text:anchor-page-number="2" draw:z-index="115" draw:name="Shape146" draw:style-name="gr3" draw:text-style-name="P3" svg:width="7.3866in" svg:height="0.1874in" svg:x="0.3433in" svg:y="5.7236in" svg:viewBox="0 0 18763 477" draw:points="0,0 18763,0 18763,477 0,477">
        <text:p/>
      </draw:polygon>
      <draw:frame text:anchor-type="page" text:anchor-page-number="11" draw:z-index="114" draw:name="Shape989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line text:anchor-type="page" text:anchor-page-number="10" draw:z-index="113" draw:name="Shape861" draw:style-name="gr2" draw:text-style-name="P2" svg:x1="0.5201in" svg:y1="2.1665in" svg:x2="2.0303in" svg:y2="2.1665in">
        <text:p/>
      </draw:line>
      <draw:polygon text:anchor-type="page" text:anchor-page-number="9" draw:z-index="112" draw:name="Shape801" draw:style-name="gr3" draw:text-style-name="P3" svg:width="7.3866in" svg:height="0.1874in" svg:x="0.3433in" svg:y="6.7224in" svg:viewBox="0 0 18763 477" draw:points="0,0 18763,0 18763,477 0,477">
        <text:p/>
      </draw:polygon>
      <draw:line text:anchor-type="page" text:anchor-page-number="7" draw:z-index="111" draw:name="Shape634" draw:style-name="gr2" draw:text-style-name="P2" svg:x1="0.5201in" svg:y1="2.0299in" svg:x2="1.328in" svg:y2="2.0299in">
        <text:p/>
      </draw:line>
      <draw:frame text:anchor-type="page" text:anchor-page-number="12" draw:z-index="110" draw:name="Shape1071" draw:style-name="gr1" draw:text-style-name="P2" svg:width="3.3469in" svg:height="0.2961in" svg:x="1.2327in" svg:y="0.672in">
        <draw:text-box>
          <text:p><text:span text:style-name="T9">SUPER TRASPIRA BIANCO</text:span></text:p>
        </draw:text-box>
      </draw:frame>
      <draw:line text:anchor-type="page" text:anchor-page-number="3" draw:z-index="109" draw:name="Shape231" draw:style-name="gr2" draw:text-style-name="P2" svg:x1="0.5201in" svg:y1="5.276in" svg:x2="5.0787in" svg:y2="5.276in">
        <text:p/>
      </draw:line>
      <draw:polygon text:anchor-type="page" text:anchor-page-number="1" draw:z-index="108" draw:name="Shape25" draw:style-name="gr3" draw:text-style-name="P3" svg:width="7.137in" svg:height="0.1354in" svg:x="0.5094in" svg:y="3.3913in" svg:viewBox="0 0 18129 345" draw:points="0,0 18129,0 18129,345 0,345">
        <text:p/>
      </draw:polygon>
      <draw:polygon text:anchor-type="page" text:anchor-page-number="6" draw:z-index="107" draw:name="Shape580" draw:style-name="gr3" draw:text-style-name="P3" svg:width="7.3866in" svg:height="0.1874in" svg:x="0.3433in" svg:y="4.6417in" svg:viewBox="0 0 18763 477" draw:points="0,0 18763,0 18763,477 0,477">
        <text:p/>
      </draw:polygon>
      <draw:line text:anchor-type="page" text:anchor-page-number="10" draw:z-index="106" draw:name="Shape858" draw:style-name="gr2" draw:text-style-name="P2" svg:x1="0.5201in" svg:y1="1.7606in" svg:x2="1.3957in" svg:y2="1.7606in">
        <text:p/>
      </draw:line>
      <draw:line text:anchor-type="page" text:anchor-page-number="3" draw:z-index="105" draw:name="Shape218" draw:style-name="gr2" draw:text-style-name="P2" svg:x1="0.5201in" svg:y1="2.7063in" svg:x2="1.8646in" svg:y2="2.7063in">
        <text:p/>
      </draw:line>
      <draw:polygon text:anchor-type="page" text:anchor-page-number="4" draw:z-index="104" draw:name="Shape289" draw:style-name="gr3" draw:text-style-name="P3" svg:width="7.3866in" svg:height="0.1874in" svg:x="0.3433in" svg:y="2.8835in" svg:viewBox="0 0 18763 477" draw:points="0,0 18763,0 18763,477 0,477">
        <text:p/>
      </draw:polygon>
      <draw:line text:anchor-type="page" text:anchor-page-number="2" draw:z-index="103" draw:name="Shape136" draw:style-name="gr2" draw:text-style-name="P2" svg:x1="0.5201in" svg:y1="4.1953in" svg:x2="2.0303in" svg:y2="4.1953in">
        <text:p/>
      </draw:line>
      <draw:polygon text:anchor-type="page" text:anchor-page-number="8" draw:z-index="102" draw:name="Shape711" draw:style-name="gr3" draw:text-style-name="P3" svg:width="7.3866in" svg:height="0.1874in" svg:x="0.3433in" svg:y="1.9366in" svg:viewBox="0 0 18763 477" draw:points="0,0 18763,0 18763,477 0,477">
        <text:p/>
      </draw:polygon>
      <draw:line text:anchor-type="page" text:anchor-page-number="1" draw:z-index="101" draw:name="Shape15" draw:style-name="gr2" draw:text-style-name="P2" svg:x1="0.3327in" svg:y1="2.0201in" svg:x2="7.7402in" svg:y2="2.0201in">
        <text:p/>
      </draw:line>
      <draw:frame text:anchor-type="page" text:anchor-page-number="11" draw:z-index="100" draw:name="Shape984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polygon text:anchor-type="page" text:anchor-page-number="5" draw:z-index="99" draw:name="Shape406" draw:style-name="gr3" draw:text-style-name="P3" svg:width="7.137in" svg:height="0.1354in" svg:x="0.5094in" svg:y="1.3626in" svg:viewBox="0 0 18129 345" draw:points="0,0 18129,0 18129,345 0,345">
        <text:p/>
      </draw:polygon>
      <draw:line text:anchor-type="page" text:anchor-page-number="7" draw:z-index="98" draw:name="Shape631" draw:style-name="gr2" draw:text-style-name="P2" svg:x1="0.5201in" svg:y1="1.489in" svg:x2="5.1437in" svg:y2="1.489in">
        <text:p/>
      </draw:line>
      <draw:frame text:anchor-type="page" text:anchor-page-number="12" draw:z-index="97" draw:name="Shape1066" draw:style-name="gr1" draw:text-style-name="P2" svg:width="2.1094in" svg:height="0.2961in" svg:x="1.8362in" svg:y="0.35in">
        <draw:text-box>
          <text:p><text:span text:style-name="T9">ITALMONT S.R.L.</text:span></text:p>
        </draw:text-box>
      </draw:frame>
      <draw:line text:anchor-type="page" text:anchor-page-number="9" draw:z-index="96" draw:name="Shape781" draw:style-name="gr2" draw:text-style-name="P2" svg:x1="0.3327in" svg:y1="1.5311in" svg:x2="7.7402in" svg:y2="1.5311in">
        <text:p/>
      </draw:line>
      <draw:polygon text:anchor-type="page" text:anchor-page-number="5" draw:z-index="95" draw:name="Shape404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12" draw:z-index="94" draw:name="Shape1077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4" draw:z-index="93" draw:name="Shape280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9" draw:z-index="92" draw:name="Shape782" draw:style-name="gr3" draw:text-style-name="P3" svg:width="7.3866in" svg:height="0.187in" svg:x="0.3433in" svg:y="1.5311in" svg:viewBox="0 0 18763 476" draw:points="0,0 18763,0 18763,476 0,476">
        <text:p/>
      </draw:polygon>
      <draw:polygon text:anchor-type="page" text:anchor-page-number="1" draw:z-index="91" draw:name="Shape16" draw:style-name="gr3" draw:text-style-name="P3" svg:width="7.3866in" svg:height="0.1874in" svg:x="0.3433in" svg:y="2.0201in" svg:viewBox="0 0 18763 477" draw:points="0,0 18763,0 18763,477 0,477">
        <text:p/>
      </draw:polygon>
      <draw:polygon text:anchor-type="page" text:anchor-page-number="2" draw:z-index="90" draw:name="Shape114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7" draw:z-index="89" draw:name="Shape629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11" draw:z-index="88" draw:name="Shape995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6" draw:z-index="87" draw:name="Shape549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10" draw:z-index="86" draw:name="Shape855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8" draw:z-index="85" draw:name="Shape706" draw:style-name="gr3" draw:text-style-name="P3" svg:width="7.3866in" svg:height="0.1354in" svg:x="0.3433in" svg:y="1.039in" svg:viewBox="0 0 18763 345" draw:points="0,0 18763,0 18763,345 0,345">
        <text:p/>
      </draw:polygon>
      <draw:polygon text:anchor-type="page" text:anchor-page-number="3" draw:z-index="84" draw:name="Shape208" draw:style-name="gr3" draw:text-style-name="P3" svg:width="7.3866in" svg:height="0.1354in" svg:x="0.3433in" svg:y="1.039in" svg:viewBox="0 0 18763 345" draw:points="0,0 18763,0 18763,345 0,345">
        <text:p/>
      </draw:polygon>
      <draw:frame text:anchor-type="page" text:anchor-page-number="7" draw:z-index="83" draw:name="Shape690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12" draw:z-index="82" draw:name="Shape1094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11" draw:z-index="81" draw:name="Shape1061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5" draw:z-index="80" draw:name="Shape533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2" draw:z-index="79" draw:name="Shape192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6" draw:z-index="78" draw:name="Shape613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8" draw:z-index="77" draw:name="Shape767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4" draw:z-index="76" draw:name="Shape388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3" draw:z-index="75" draw:name="Shape264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10" draw:z-index="74" draw:name="Shape979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1" draw:z-index="73" draw:name="Shape98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frame text:anchor-type="page" text:anchor-page-number="9" draw:z-index="72" draw:name="Shape839" draw:style-name="gr6" draw:text-style-name="P2" svg:width="0.0689in" svg:height="0.0697in" svg:x="6.7638in" svg:y="10.9437in">
        <draw:image xlink:href="Pictures/100000000000001000000012883BC245.jpg" xlink:type="simple" xlink:show="embed" xlink:actuate="onLoad" draw:mime-type="image/jpeg">
          <text:p/>
        </draw:image>
      </draw:frame>
      <draw:polygon text:anchor-type="page" text:anchor-page-number="4" draw:z-index="71" draw:name="Shape389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5" draw:z-index="70" draw:name="Shape534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6" draw:z-index="69" draw:name="Shape614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12" draw:z-index="68" draw:name="Shape1095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7" draw:z-index="67" draw:name="Shape691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3" draw:z-index="66" draw:name="Shape265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8" draw:z-index="65" draw:name="Shape768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9" draw:z-index="64" draw:name="Shape840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2" draw:z-index="63" draw:name="Shape193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10" draw:z-index="62" draw:name="Shape980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11" draw:z-index="61" draw:name="Shape1062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1" draw:z-index="60" draw:name="Shape99" draw:style-name="gr7" draw:text-style-name="P5" svg:width="0.8614in" svg:height="0.0693in" svg:x="6.8469in" svg:y="10.9165in" svg:viewBox="0 0 2189 177" draw:points="0,0 2189,0 2189,177 0,177">
        <text:p/>
      </draw:polygon>
      <draw:polygon text:anchor-type="page" text:anchor-page-number="10" draw:z-index="59" draw:name="Shape852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9" draw:z-index="58" draw:name="Shape780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8" draw:z-index="57" draw:name="Shape703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11" draw:z-index="56" draw:name="Shape992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1" draw:z-index="55" draw:name="Shape12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6" draw:z-index="54" draw:name="Shape546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12" draw:z-index="53" draw:name="Shape1074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5" draw:z-index="52" draw:name="Shape401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7" draw:z-index="51" draw:name="Shape626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2" draw:z-index="50" draw:name="Shape111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4" draw:z-index="49" draw:name="Shape277" draw:style-name="gr2" draw:text-style-name="P2" svg:width="7.4177in" svg:height="10.0346in" svg:x="0.3327in" svg:y="0.9882in" svg:viewBox="0 0 18842 25489" draw:points="0,0 18842,0 18842,25489 0,25489">
        <text:p/>
      </draw:polygon>
      <draw:polygon text:anchor-type="page" text:anchor-page-number="3" draw:z-index="48" draw:name="Shape205" draw:style-name="gr2" draw:text-style-name="P2" svg:width="7.4177in" svg:height="10.0346in" svg:x="0.3327in" svg:y="0.9882in" svg:viewBox="0 0 18842 25489" draw:points="0,0 18842,0 18842,25489 0,25489">
        <text:p/>
      </draw:polygon>
      <draw:line text:anchor-type="page" text:anchor-page-number="9" draw:z-index="47" draw:name="Shape776" draw:style-name="gr2" draw:text-style-name="P2" svg:x1="5.524in" svg:y1="0.6657in" svg:x2="5.524in" svg:y2="0.9882in">
        <text:p/>
      </draw:line>
      <draw:line text:anchor-type="page" text:anchor-page-number="3" draw:z-index="46" draw:name="Shape201" draw:style-name="gr2" draw:text-style-name="P2" svg:x1="5.524in" svg:y1="0.6657in" svg:x2="5.524in" svg:y2="0.9882in">
        <text:p/>
      </draw:line>
      <draw:line text:anchor-type="page" text:anchor-page-number="8" draw:z-index="45" draw:name="Shape699" draw:style-name="gr2" draw:text-style-name="P2" svg:x1="5.524in" svg:y1="0.6657in" svg:x2="5.524in" svg:y2="0.9882in">
        <text:p/>
      </draw:line>
      <draw:line text:anchor-type="page" text:anchor-page-number="11" draw:z-index="44" draw:name="Shape988" draw:style-name="gr2" draw:text-style-name="P2" svg:x1="5.524in" svg:y1="0.6657in" svg:x2="5.524in" svg:y2="0.9882in">
        <text:p/>
      </draw:line>
      <draw:line text:anchor-type="page" text:anchor-page-number="2" draw:z-index="43" draw:name="Shape107" draw:style-name="gr2" draw:text-style-name="P2" svg:x1="5.524in" svg:y1="0.6657in" svg:x2="5.524in" svg:y2="0.9882in">
        <text:p/>
      </draw:line>
      <draw:line text:anchor-type="page" text:anchor-page-number="7" draw:z-index="42" draw:name="Shape622" draw:style-name="gr2" draw:text-style-name="P2" svg:x1="5.524in" svg:y1="0.6657in" svg:x2="5.524in" svg:y2="0.9882in">
        <text:p/>
      </draw:line>
      <draw:line text:anchor-type="page" text:anchor-page-number="1" draw:z-index="41" draw:name="Shape8" draw:style-name="gr2" draw:text-style-name="P2" svg:x1="5.524in" svg:y1="0.6657in" svg:x2="5.524in" svg:y2="0.9882in">
        <text:p/>
      </draw:line>
      <draw:line text:anchor-type="page" text:anchor-page-number="4" draw:z-index="40" draw:name="Shape273" draw:style-name="gr2" draw:text-style-name="P2" svg:x1="5.524in" svg:y1="0.6657in" svg:x2="5.524in" svg:y2="0.9882in">
        <text:p/>
      </draw:line>
      <draw:line text:anchor-type="page" text:anchor-page-number="5" draw:z-index="39" draw:name="Shape397" draw:style-name="gr2" draw:text-style-name="P2" svg:x1="5.524in" svg:y1="0.6657in" svg:x2="5.524in" svg:y2="0.9882in">
        <text:p/>
      </draw:line>
      <draw:line text:anchor-type="page" text:anchor-page-number="6" draw:z-index="38" draw:name="Shape542" draw:style-name="gr2" draw:text-style-name="P2" svg:x1="5.524in" svg:y1="0.6657in" svg:x2="5.524in" svg:y2="0.9882in">
        <text:p/>
      </draw:line>
      <draw:line text:anchor-type="page" text:anchor-page-number="10" draw:z-index="37" draw:name="Shape848" draw:style-name="gr2" draw:text-style-name="P2" svg:x1="5.524in" svg:y1="0.6657in" svg:x2="5.524in" svg:y2="0.9882in">
        <text:p/>
      </draw:line>
      <draw:line text:anchor-type="page" text:anchor-page-number="12" draw:z-index="36" draw:name="Shape1070" draw:style-name="gr2" draw:text-style-name="P2" svg:x1="5.524in" svg:y1="0.6657in" svg:x2="5.524in" svg:y2="0.9882in">
        <text:p/>
      </draw:line>
      <draw:polygon text:anchor-type="page" text:anchor-page-number="10" draw:z-index="35" draw:name="Shape843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5" draw:z-index="34" draw:name="Shape392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3" draw:z-index="33" draw:name="Shape196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9" draw:z-index="32" draw:name="Shape771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11" draw:z-index="31" draw:name="Shape983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1" draw:z-index="30" draw:name="Shape3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8" draw:z-index="29" draw:name="Shape694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6" draw:z-index="28" draw:name="Shape537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2" draw:z-index="27" draw:name="Shape102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7" draw:z-index="26" draw:name="Shape617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4" draw:z-index="25" draw:name="Shape268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12" draw:z-index="24" draw:name="Shape1065" draw:style-name="gr2" draw:text-style-name="P2" svg:width="5.1913in" svg:height="0.3224in" svg:x="0.3327in" svg:y="0.3433in" svg:viewBox="0 0 13187 820" draw:points="0,0 13187,0 13187,820 0,820">
        <text:p/>
      </draw:polygon>
      <draw:polygon text:anchor-type="page" text:anchor-page-number="11" draw:z-index="23" draw:name="Shape982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2" draw:z-index="22" draw:name="Shape101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12" draw:z-index="21" draw:name="Shape1064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5" draw:z-index="20" draw:name="Shape391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6" draw:z-index="19" draw:name="Shape536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7" draw:z-index="18" draw:name="Shape616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1" draw:z-index="17" draw:name="Shape2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8" draw:z-index="16" draw:name="Shape693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9" draw:z-index="15" draw:name="Shape770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3" draw:z-index="14" draw:name="Shape195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10" draw:z-index="13" draw:name="Shape842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4" draw:z-index="12" draw:name="Shape267" draw:style-name="gr2" draw:text-style-name="P2" svg:width="7.4177in" svg:height="0.6449in" svg:x="0.3327in" svg:y="0.3433in" svg:viewBox="0 0 18842 1639" draw:points="0,0 18842,0 18842,1639 0,1639">
        <text:p/>
      </draw:polygon>
      <draw:polygon text:anchor-type="page" text:anchor-page-number="9" draw:z-index="11" draw:name="Shape769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11" draw:z-index="10" draw:name="Shape981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8" draw:z-index="9" draw:name="Shape692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4" draw:z-index="8" draw:name="Shape266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12" draw:z-index="7" draw:name="Shape1063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3" draw:z-index="6" draw:name="Shape194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7" draw:z-index="5" draw:name="Shape615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10" draw:z-index="4" draw:name="Shape841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6" draw:z-index="3" draw:name="Shape535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2" draw:z-index="2" draw:name="Shape100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1" draw:z-index="1" draw:name="Shape1" draw:style-name="gr7" draw:text-style-name="P5" svg:width="7.4165in" svg:height="0.639in" svg:x="0.3193in" svg:y="0.3331in" svg:viewBox="0 0 18839 1624" draw:points="0,0 18839,0 18839,1624 0,1624">
        <text:p/>
      </draw:polygon>
      <draw:polygon text:anchor-type="page" text:anchor-page-number="5" draw:z-index="0" draw:name="Shape390" draw:style-name="gr7" draw:text-style-name="P5" svg:width="7.4165in" svg:height="0.639in" svg:x="0.3193in" svg:y="0.3331in" svg:viewBox="0 0 18839 1624" draw:points="0,0 18839,0 18839,1624 0,1624">
        <text:p/>
      </draw:polyg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1665in" fo:page-height="11.5583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2" meta:paragraph-count="0" meta:word-count="0" meta:character-count="0" meta:non-whitespace-character-count="0"/>
    <meta:generator>LibreOffice/25.8.5.2$Linux_X86_64 LibreOffice_project/580$Build-2</meta:generator>
  </office:meta>
</office:document-meta>
</file>