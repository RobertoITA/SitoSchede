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DESCRIÇÃ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Tubos respiráveis para interiores, caracterizados por bom poder de cobertura e bom ponto branco. Fácil de aplicar, tem uma boa escovagem para ser usado também em rolo e um bom rendimento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Característic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APARTAMENTO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Opaq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PESO ESPECÍFICO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ARQUIAS: 1,54 Kg/l ± 0,05 a 20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RESIDUÇÃO SECCO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RESISTÊNCIA AO TRABALHO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PERMEBILIDADE AO VALOR ACQUEAL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Baix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CO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Branco (corável com corantes<text:s/></text:span><text:span text:style-name="T114">Univers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DESPESAS</text:p>
            <text:p text:style-name="P118">(dados referentes a 20°C e 65% das U.R.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para cobrir: 6 horas</text:p>
            <text:p text:style-name="P121">completo: 48 ho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INVESTIGAÇÃO PRÁTICA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11 m2/L por mão</text:p>
            <text:p text:style-name="P127">de acordo com a absorção de su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DECLARAÇÃO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mão: adicionar 35% água potável</text:span></text:p>
            <text:p text:style-name="Nessunaspaziatura"><text:span text:style-name="T135">2</text:span><text:span text:style-name="T136">a</text:span><text:span text:style-name="T137"><text:s/>Mão:<text:s/></text:span><text:span text:style-name="T138">adicionar 30% de água potável</text:span></text:p>
            <text:p text:style-name="P139">Spray sem ar: adicionar entre 30% e 40% de água potável. bicos sugeridos: LP419–LP519–LP619– LP421 – LP52 1 –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EQUIPAMENTO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pincel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Rolo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pulverizar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APOIOS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gesso civil, gesso,<text:s/>Fibração, paredes reboc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PEDI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REPARAÇÃO DO APO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O suporte deve ser saudável, seco, limpo e consistente, livre de manchas de umidade, vestígios de sujeira, graxa, molde, etc. Tintas velhas incoerentes ou florescentes<text:s/>deve ser removido escovando ou lixando a superfície. Imperfeições, splits, folhetos, devem ser eliminados e esboçados adequadamente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OVOS APOIOS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APOI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MUITOS</text:p>
          </table:table-cell>
          <table:table-cell table:number-columns-spanned="2" table:style-name="TableCell188">
            <text:p text:style-name="P189">CARTONAGEM<text:s/></text:p>
          </table:table-cell>
          <table:covered-table-cell/>
          <table:table-cell table:style-name="TableCell190">
            <text:p text:style-name="P191">MUITOS</text:p>
          </table:table-cell>
          <table:table-cell table:number-columns-spanned="2" table:style-name="TableCell192">
            <text:p text:style-name="P193"><text:span text:style-name="T194">respirável ou dormência</text:span></text:p>
          </table:table-cell>
          <table:covered-table-cell/>
          <table:table-cell table:style-name="TableCell195">
            <text:p text:style-name="P196">MUITOS</text:p>
          </table:table-cell>
          <table:table-cell table:number-columns-spanned="2" table:style-name="TableCell197">
            <text:p text:style-name="P198"><text:span text:style-name="T199">bem lavável ancorado</text:span></text:p>
          </table:table-cell>
          <table:covered-table-cell/>
          <table:table-cell table:style-name="TableCell200">
            <text:p text:style-name="P201">MUITOS</text:p>
          </table:table-cell>
        </table:table-row>
        <table:table-row table:style-name="TableRow202">
          <table:table-cell table:style-name="TableCell203">
            <text:p text:style-name="P204">MULHERES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FINALIZAÇÃO</text:span></text:p>
          </table:table-cell>
          <table:table-cell table:style-name="TableCell225">
            <text:p text:style-name="P226"><text:span text:style-name="T227">TIRQUIAS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IRQUIAS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IRQUIAS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IRQUIA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COMUNICAÇÕES GERA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ão alterar as propriedades respiráveis típicas do produto, o<text:s/></text:span><text:span text:style-name="T254">quantidade de cor básica não deve exceder 20%. Manter o produto fresco e preservar da geada. N</text:span><text:span text:style-name="T255">aplicar o produto com temperaturas inferiores a 5 ° ou superiores a 30 ° centígrado, com humidade relativa superior a 85% ou nas paredes expostas ao vento ou ao sol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