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Tahoma" svg:font-family="Tahoma" svg:panose-1="2 11 6 4 3 5 4 4 2 4"/>
    <style:font-face style:font-family-generic="swiss" style:font-pitch="variable" style:name="Arial" svg:font-family="Arial" svg:panose-1="2 11 6 4 2 2 2 2 2 4"/>
    <style:font-face style:font-family-generic="swiss" style:font-pitch="variable" style:name="Arial Black" svg:font-family="Arial Black" svg:panose-1="2 11 10 4 2 1 2 2 2 4"/>
    <style:font-face style:font-family-generic="swiss" style:font-pitch="variable" style:name="Aptos Display" svg:font-family="Aptos Display"/>
    <style:font-face style:font-family-generic="swiss" style:font-pitch="variable" style:name="Aptos" svg:font-family="Aptos"/>
  </office:font-face-decls>
  <office:automatic-styles>
    <style:style style:family="paragraph" style:master-page-name="MP0" style:name="P1" style:parent-style-name="Normale">
      <style:paragraph-properties fo:break-before="page"/>
      <style:text-properties fo:font-size="1pt" style:font-size-asian="1pt"/>
    </style:style>
    <style:style style:family="paragraph" style:name="P54" style:parent-style-name="Normale">
      <style:paragraph-properties fo:line-height="100%" fo:margin-bottom="0in" fo:text-align="justify" style:text-autospace="none"/>
    </style:style>
    <style:style style:family="table-column" style:name="TableColumn56">
      <style:table-column-properties style:column-width="0.7493in"/>
    </style:style>
    <style:style style:family="table-column" style:name="TableColumn57">
      <style:table-column-properties style:column-width="0.8347in"/>
    </style:style>
    <style:style style:family="table-column" style:name="TableColumn58">
      <style:table-column-properties style:column-width="0.4541in"/>
    </style:style>
    <style:style style:family="table-column" style:name="TableColumn59">
      <style:table-column-properties style:column-width="0.8013in"/>
    </style:style>
    <style:style style:family="table-column" style:name="TableColumn60">
      <style:table-column-properties style:column-width="0.2381in"/>
    </style:style>
    <style:style style:family="table-column" style:name="TableColumn61">
      <style:table-column-properties style:column-width="0.434in"/>
    </style:style>
    <style:style style:family="table-column" style:name="TableColumn62">
      <style:table-column-properties style:column-width="0.8062in"/>
    </style:style>
    <style:style style:family="table-column" style:name="TableColumn63">
      <style:table-column-properties style:column-width="0.7097in"/>
    </style:style>
    <style:style style:family="table-column" style:name="TableColumn64">
      <style:table-column-properties style:column-width="0.468in"/>
    </style:style>
    <style:style style:family="table-column" style:name="TableColumn65">
      <style:table-column-properties style:column-width="0.2868in"/>
    </style:style>
    <style:style style:family="table-column" style:name="TableColumn66">
      <style:table-column-properties style:column-width="0.6701in"/>
    </style:style>
    <style:style style:family="table-column" style:name="TableColumn67">
      <style:table-column-properties style:column-width="0.6069in"/>
    </style:style>
    <style:style style:family="table" style:name="Table55">
      <style:table-properties fo:margin-left="0in" style:width="7.0597in" table:align="center"/>
    </style:style>
    <style:style style:family="table-row" style:name="TableRow68">
      <style:table-row-properties style:min-row-height="0.2652in"/>
    </style:style>
    <style:style style:family="table-cell" style:name="TableCell69">
      <style:table-cell-properties fo:border="none" fo:padding-bottom="0in" fo:padding-left="0.075in" fo:padding-right="0.075in" fo:padding-top="0in" style:vertical-align="middle" style:writing-mode="lr-tb"/>
    </style:style>
    <style:style style:family="paragraph" style:name="P70" style:parent-style-name="Citazione">
      <style:paragraph-properties fo:margin-bottom="0.0694in" fo:margin-top="0.0694in" fo:text-align="center"/>
    </style:style>
    <style:style style:family="text" style:name="T71" style:parent-style-name="Car.predefinitoparagrafo">
      <style:text-properties fo:color="#FFFF00" fo:font-size="14pt" fo:font-weight="bold" style:font-size-asian="14pt" style:font-weight-asian="bold"/>
    </style:style>
    <style:style style:family="table-row" style:name="TableRow72">
      <style:table-row-properties/>
    </style:style>
    <style:style style:family="table-cell" style:name="TableCell73">
      <style:table-cell-properties fo:border="none" fo:padding-bottom="0in" fo:padding-left="0.075in" fo:padding-right="0.075in" fo:padding-top="0in" style:vertical-align="middle" style:writing-mode="lr-tb"/>
    </style:style>
    <style:style style:family="paragraph" style:name="P74" style:parent-style-name="Nessunaspaziatura">
      <style:text-properties fo:font-size="12pt" style:country-asian="IT" style:font-name="Arial" style:font-name-complex="Arial" style:font-size-asian="12pt" style:language-asian="it"/>
    </style:style>
    <style:style style:family="table-row" style:name="TableRow75">
      <style:table-row-properties/>
    </style:style>
    <style:style style:family="table-cell" style:name="TableCell76">
      <style:table-cell-properties fo:border="none" fo:padding-bottom="0in" fo:padding-left="0.075in" fo:padding-right="0.075in" fo:padding-top="0in" style:vertical-align="middle" style:writing-mode="lr-tb"/>
    </style:style>
    <style:style style:family="paragraph" style:name="P77" style:parent-style-name="Citazione">
      <style:paragraph-properties fo:margin-bottom="0.0694in" fo:margin-top="0.0694in" fo:text-align="center"/>
      <style:text-properties fo:color="#FFFF00" fo:font-size="14pt" fo:font-weight="bold" style:font-size-asian="14pt" style:font-weight-asian="bold"/>
    </style:style>
    <style:style style:family="table-row" style:name="TableRow78">
      <style:table-row-properties/>
    </style:style>
    <style:style style:family="table-cell" style:name="TableCell79">
      <style:table-cell-properties fo:border="none" fo:padding-bottom="0in" fo:padding-left="0.075in" fo:padding-right="0.075in" fo:padding-top="0in" style:vertical-align="middle" style:writing-mode="lr-tb"/>
    </style:style>
    <style:style style:family="text" style:name="T80" style:parent-style-name="Car.predefinitoparagrafo">
      <style:text-properties style:country-asian="IT" style:language-asian="it"/>
    </style:style>
    <style:style style:family="table-cell" style:name="TableCell81">
      <style:table-cell-properties fo:border="none" fo:padding-bottom="0in" fo:padding-left="0.075in" fo:padding-right="0.075in" fo:padding-top="0in" style:vertical-align="middle" style:writing-mode="lr-tb"/>
    </style:style>
    <style:style style:family="text" style:name="T82" style:parent-style-name="Car.predefinitoparagrafo">
      <style:text-properties style:country-asian="IT" style:language-asian="it"/>
    </style:style>
    <style:style style:family="table-row" style:name="TableRow83">
      <style:table-row-properties/>
    </style:style>
    <style:style style:family="table-cell" style:name="TableCell84">
      <style:table-cell-properties fo:border="none" fo:padding-bottom="0in" fo:padding-left="0.075in" fo:padding-right="0.075in" fo:padding-top="0in" style:vertical-align="middle" style:writing-mode="lr-tb"/>
    </style:style>
    <style:style style:family="text" style:name="T85" style:parent-style-name="Car.predefinitoparagrafo">
      <style:text-properties style:country-asian="IT" style:language-asian="it"/>
    </style:style>
    <style:style style:family="table-cell" style:name="TableCell86">
      <style:table-cell-properties fo:border="none" fo:padding-bottom="0in" fo:padding-left="0.075in" fo:padding-right="0.075in" fo:padding-top="0in" style:vertical-align="middle" style:writing-mode="lr-tb"/>
    </style:style>
    <style:style style:family="text" style:name="T87" style:parent-style-name="Car.predefinitoparagrafo">
      <style:text-properties fo:country="US" fo:language="en" style:country-asian="IT" style:language-asian="it"/>
    </style:style>
    <style:style style:family="table-row" style:name="TableRow88">
      <style:table-row-properties/>
    </style:style>
    <style:style style:family="table-cell" style:name="TableCell89">
      <style:table-cell-properties fo:border="none" fo:padding-bottom="0in" fo:padding-left="0.075in" fo:padding-right="0.075in" fo:padding-top="0in" style:vertical-align="middle" style:writing-mode="lr-tb"/>
    </style:style>
    <style:style style:family="text" style:name="T90" style:parent-style-name="Car.predefinitoparagrafo">
      <style:text-properties style:country-asian="IT" style:language-asian="it"/>
    </style:style>
    <style:style style:family="table-cell" style:name="TableCell91">
      <style:table-cell-properties fo:border="none" fo:padding-bottom="0in" fo:padding-left="0.075in" fo:padding-right="0.075in" fo:padding-top="0in" style:vertical-align="middle" style:writing-mode="lr-tb"/>
    </style:style>
    <style:style style:family="text" style:name="T92" style:parent-style-name="Car.predefinitoparagrafo">
      <style:text-properties style:font-name="Tahoma" style:font-name-complex="Tahoma"/>
    </style:style>
    <style:style style:family="text" style:name="T93" style:parent-style-name="Car.predefinitoparagrafo">
      <style:text-properties style:country-asian="IT" style:language-asian="it"/>
    </style:style>
    <style:style style:family="table-row" style:name="TableRow94">
      <style:table-row-properties/>
    </style:style>
    <style:style style:family="table-cell" style:name="TableCell95">
      <style:table-cell-properties fo:border="none" fo:padding-bottom="0in" fo:padding-left="0.075in" fo:padding-right="0.075in" fo:padding-top="0in" style:vertical-align="middle" style:writing-mode="lr-tb"/>
    </style:style>
    <style:style style:family="text" style:name="T96" style:parent-style-name="Car.predefinitoparagrafo">
      <style:text-properties style:country-asian="IT" style:language-asian="it"/>
    </style:style>
    <style:style style:family="table-cell" style:name="TableCell97">
      <style:table-cell-properties fo:border="none" fo:padding-bottom="0in" fo:padding-left="0.075in" fo:padding-right="0.075in" fo:padding-top="0in" style:vertical-align="middle" style:writing-mode="lr-tb"/>
    </style:style>
    <style:style style:family="text" style:name="T98" style:parent-style-name="Car.predefinitoparagrafo">
      <style:text-properties style:country-asian="IT" style:language-asian="it"/>
    </style:style>
    <style:style style:family="table-row" style:name="TableRow99">
      <style:table-row-properties/>
    </style:style>
    <style:style style:family="table-cell" style:name="TableCell100">
      <style:table-cell-properties fo:border="none" fo:padding-bottom="0in" fo:padding-left="0.075in" fo:padding-right="0.075in" fo:padding-top="0in" style:vertical-align="middle" style:writing-mode="lr-tb"/>
    </style:style>
    <style:style style:family="text" style:name="T101" style:parent-style-name="Car.predefinitoparagrafo">
      <style:text-properties style:country-asian="IT" style:language-asian="it"/>
    </style:style>
    <style:style style:family="table-cell" style:name="TableCell102">
      <style:table-cell-properties fo:border="none" fo:padding-bottom="0in" fo:padding-left="0.075in" fo:padding-right="0.075in" fo:padding-top="0in" style:vertical-align="middle" style:writing-mode="lr-tb"/>
    </style:style>
    <style:style style:family="text" style:name="T103" style:parent-style-name="Car.predefinitoparagrafo">
      <style:text-properties style:country-asian="IT" style:language-asian="it"/>
    </style:style>
    <style:style style:family="table-row" style:name="TableRow104">
      <style:table-row-properties/>
    </style:style>
    <style:style style:family="table-cell" style:name="TableCell105">
      <style:table-cell-properties fo:border="none" fo:padding-bottom="0in" fo:padding-left="0.075in" fo:padding-right="0.075in" fo:padding-top="0in" style:vertical-align="middle" style:writing-mode="lr-tb"/>
    </style:style>
    <style:style style:family="text" style:name="T106" style:parent-style-name="Car.predefinitoparagrafo">
      <style:text-properties style:country-asian="IT" style:language-asian="it"/>
    </style:style>
    <style:style style:family="table-cell" style:name="TableCell107">
      <style:table-cell-properties fo:border="none" fo:padding-bottom="0in" fo:padding-left="0.075in" fo:padding-right="0.075in" fo:padding-top="0in" style:vertical-align="middle" style:writing-mode="lr-tb"/>
    </style:style>
    <style:style style:family="text" style:name="T108" style:parent-style-name="Car.predefinitoparagrafo">
      <style:text-properties style:country-asian="IT" style:language-asian="it"/>
    </style:style>
    <style:style style:family="table-row" style:name="TableRow109">
      <style:table-row-properties/>
    </style:style>
    <style:style style:family="table-cell" style:name="TableCell110">
      <style:table-cell-properties fo:border="none" fo:padding-bottom="0in" fo:padding-left="0.075in" fo:padding-right="0.075in" fo:padding-top="0in" style:vertical-align="middle" style:writing-mode="lr-tb"/>
    </style:style>
    <style:style style:family="text" style:name="T111" style:parent-style-name="Car.predefinitoparagrafo">
      <style:text-properties style:country-asian="IT" style:language-asian="it"/>
    </style:style>
    <style:style style:family="table-cell" style:name="TableCell112">
      <style:table-cell-properties fo:border="none" fo:padding-bottom="0in" fo:padding-left="0.075in" fo:padding-right="0.075in" fo:padding-top="0in" style:vertical-align="middle" style:writing-mode="lr-tb"/>
    </style:style>
    <style:style style:family="text" style:name="T113" style:parent-style-name="Car.predefinitoparagrafo">
      <style:text-properties fo:color="#000000" style:country-asian="IT" style:language-asian="it"/>
    </style:style>
    <style:style style:family="text" style:name="T114" style:parent-style-name="Car.predefinitoparagrafo">
      <style:text-properties fo:color="#000000" style:country-asian="IT" style:language-asian="it"/>
    </style:style>
    <style:style style:family="table-row" style:name="TableRow115">
      <style:table-row-properties/>
    </style:style>
    <style:style style:family="table-cell" style:name="TableCell116">
      <style:table-cell-properties fo:border="none" fo:padding-bottom="0in" fo:padding-left="0.075in" fo:padding-right="0.075in" fo:padding-top="0in" style:vertical-align="middle" style:writing-mode="lr-tb"/>
    </style:style>
    <style:style style:family="paragraph" style:name="P117" style:parent-style-name="Nessunaspaziatura">
      <style:text-properties style:country-asian="IT" style:language-asian="it"/>
    </style:style>
    <style:style style:family="paragraph" style:name="P118" style:parent-style-name="Nessunaspaziatura">
      <style:text-properties style:country-asian="IT" style:language-asian="it"/>
    </style:style>
    <style:style style:family="table-cell" style:name="TableCell119">
      <style:table-cell-properties fo:border="none" fo:padding-bottom="0in" fo:padding-left="0.075in" fo:padding-right="0.075in" fo:padding-top="0in" style:vertical-align="middle" style:writing-mode="lr-tb"/>
    </style:style>
    <style:style style:family="paragraph" style:name="P120" style:parent-style-name="Nessunaspaziatura">
      <style:text-properties style:country-asian="IT" style:language-asian="it"/>
    </style:style>
    <style:style style:family="paragraph" style:name="P121" style:parent-style-name="Nessunaspaziatura">
      <style:text-properties style:country-asian="IT" style:language-asian="it"/>
    </style:style>
    <style:style style:family="table-row" style:name="TableRow122">
      <style:table-row-properties/>
    </style:style>
    <style:style style:family="table-cell" style:name="TableCell123">
      <style:table-cell-properties fo:border="none" fo:padding-bottom="0in" fo:padding-left="0.075in" fo:padding-right="0.075in" fo:padding-top="0in" style:vertical-align="middle" style:writing-mode="lr-tb"/>
    </style:style>
    <style:style style:family="paragraph" style:name="P124" style:parent-style-name="Nessunaspaziatura">
      <style:text-properties style:country-asian="IT" style:language-asian="it"/>
    </style:style>
    <style:style style:family="table-cell" style:name="TableCell125">
      <style:table-cell-properties fo:border="none" fo:padding-bottom="0in" fo:padding-left="0.075in" fo:padding-right="0.075in" fo:padding-top="0in" style:vertical-align="middle" style:writing-mode="lr-tb"/>
    </style:style>
    <style:style style:family="paragraph" style:name="P126" style:parent-style-name="Nessunaspaziatura">
      <style:text-properties style:country-asian="IT" style:language-asian="it"/>
    </style:style>
    <style:style style:family="paragraph" style:name="P127" style:parent-style-name="Nessunaspaziatura">
      <style:text-properties style:country-asian="IT" style:language-asian="it"/>
    </style:style>
    <style:style style:family="table-row" style:name="TableRow128">
      <style:table-row-properties/>
    </style:style>
    <style:style style:family="table-cell" style:name="TableCell129">
      <style:table-cell-properties fo:border="none" fo:padding-bottom="0in" fo:padding-left="0.075in" fo:padding-right="0.075in" fo:padding-top="0in" style:vertical-align="middle" style:writing-mode="lr-tb"/>
    </style:style>
    <style:style style:family="paragraph" style:name="P130" style:parent-style-name="Nessunaspaziatura">
      <style:text-properties style:country-asian="IT" style:language-asian="it"/>
    </style:style>
    <style:style style:family="table-cell" style:name="TableCell131">
      <style:table-cell-properties fo:border="none" fo:padding-bottom="0in" fo:padding-left="0.075in" fo:padding-right="0.075in" fo:padding-top="0in" style:vertical-align="middle" style:writing-mode="lr-tb"/>
    </style:style>
    <style:style style:family="text" style:name="T132" style:parent-style-name="Car.predefinitoparagrafo">
      <style:text-properties style:country-asian="IT" style:language-asian="it"/>
    </style:style>
    <style:style style:family="text" style:name="T133" style:parent-style-name="Car.predefinitoparagrafo">
      <style:text-properties style:country-asian="IT" style:language-asian="it" style:text-position="super 63.6%"/>
    </style:style>
    <style:style style:family="text" style:name="T134" style:parent-style-name="Car.predefinitoparagrafo">
      <style:text-properties style:country-asian="IT" style:language-asian="it"/>
    </style:style>
    <style:style style:family="text" style:name="T135" style:parent-style-name="Car.predefinitoparagrafo">
      <style:text-properties style:country-asian="IT" style:language-asian="it"/>
    </style:style>
    <style:style style:family="text" style:name="T136" style:parent-style-name="Car.predefinitoparagrafo">
      <style:text-properties style:country-asian="IT" style:language-asian="it" style:text-position="super 63.6%"/>
    </style:style>
    <style:style style:family="text" style:name="T137" style:parent-style-name="Car.predefinitoparagrafo">
      <style:text-properties style:country-asian="IT" style:language-asian="it"/>
    </style:style>
    <style:style style:family="text" style:name="T138" style:parent-style-name="Car.predefinitoparagrafo">
      <style:text-properties style:country-asian="IT" style:language-asian="it"/>
    </style:style>
    <style:style style:family="paragraph" style:name="P139" style:parent-style-name="Nessunaspaziatura">
      <style:text-properties style:country-asian="IT" style:language-asian="it"/>
    </style:style>
    <style:style style:family="table-row" style:name="TableRow140">
      <style:table-row-properties/>
    </style:style>
    <style:style style:family="table-cell" style:name="TableCell141">
      <style:table-cell-properties fo:border="none" fo:padding-bottom="0in" fo:padding-left="0.075in" fo:padding-right="0.075in" fo:padding-top="0in" style:vertical-align="middle" style:writing-mode="lr-tb"/>
    </style:style>
    <style:style style:family="paragraph" style:name="P142" style:parent-style-name="Nessunaspaziatura">
      <style:text-properties style:country-asian="IT" style:language-asian="it"/>
    </style:style>
    <style:style style:family="table-cell" style:name="TableCell143">
      <style:table-cell-properties fo:border="none" fo:padding-bottom="0in" fo:padding-left="0.075in" fo:padding-right="0.075in" fo:padding-top="0in" style:vertical-align="middle" style:writing-mode="lr-tb"/>
    </style:style>
    <style:style style:family="paragraph" style:name="P144" style:parent-style-name="Nessunaspaziatura">
      <style:paragraph-properties fo:text-align="center"/>
    </style:style>
    <style:style style:family="text" style:name="T145" style:parent-style-name="Car.predefinitoparagrafo">
      <style:text-properties style:country-asian="IT" style:language-asian="it"/>
    </style:style>
    <style:style style:family="paragraph" style:name="P146" style:parent-style-name="Nessunaspaziatura">
      <style:paragraph-properties fo:text-align="center"/>
      <style:text-properties style:country-asian="IT" style:language-asian="it"/>
    </style:style>
    <style:style style:family="table-cell" style:name="TableCell147">
      <style:table-cell-properties fo:border="none" fo:padding-bottom="0in" fo:padding-left="0.075in" fo:padding-right="0.075in" fo:padding-top="0in" style:vertical-align="middle" style:writing-mode="lr-tb"/>
    </style:style>
    <style:style style:family="paragraph" style:name="P148" style:parent-style-name="Nessunaspaziatura">
      <style:paragraph-properties fo:text-align="center"/>
    </style:style>
    <style:style style:family="text" style:name="T149" style:parent-style-name="Car.predefinitoparagrafo">
      <style:text-properties style:country-asian="IT" style:language-asian="it"/>
    </style:style>
    <style:style style:family="paragraph" style:name="P150" style:parent-style-name="Nessunaspaziatura">
      <style:paragraph-properties fo:text-align="center"/>
      <style:text-properties style:country-asian="IT" style:language-asian="it"/>
    </style:style>
    <style:style style:family="table-cell" style:name="TableCell151">
      <style:table-cell-properties fo:border="none" fo:padding-bottom="0in" fo:padding-left="0.075in" fo:padding-right="0.075in" fo:padding-top="0in" style:vertical-align="middle" style:writing-mode="lr-tb"/>
    </style:style>
    <style:style style:family="paragraph" style:name="P152" style:parent-style-name="Nessunaspaziatura">
      <style:paragraph-properties fo:text-align="center"/>
    </style:style>
    <style:style style:family="text" style:name="T153" style:parent-style-name="Car.predefinitoparagrafo">
      <style:text-properties style:country-asian="IT" style:language-asian="it"/>
    </style:style>
    <style:style style:family="paragraph" style:name="P154" style:parent-style-name="Nessunaspaziatura">
      <style:paragraph-properties fo:text-align="center"/>
      <style:text-properties style:country-asian="IT" style:language-asian="it"/>
    </style:style>
    <style:style style:family="table-row" style:name="TableRow155">
      <style:table-row-properties/>
    </style:style>
    <style:style style:family="table-cell" style:name="TableCell156">
      <style:table-cell-properties fo:border="none" fo:padding-bottom="0in" fo:padding-left="0.075in" fo:padding-right="0.075in" fo:padding-top="0in" style:vertical-align="middle" style:writing-mode="lr-tb"/>
    </style:style>
    <style:style style:family="paragraph" style:name="P157" style:parent-style-name="Nessunaspaziatura">
      <style:text-properties style:country-asian="IT" style:language-asian="it"/>
    </style:style>
    <style:style style:family="table-cell" style:name="TableCell158">
      <style:table-cell-properties fo:border="none" fo:padding-bottom="0in" fo:padding-left="0.075in" fo:padding-right="0.075in" fo:padding-top="0in" style:vertical-align="middle" style:writing-mode="lr-tb"/>
    </style:style>
    <style:style style:family="paragraph" style:name="P159" style:parent-style-name="Nessunaspaziatura">
      <style:text-properties style:country-asian="IT" style:language-asian="it"/>
    </style:style>
    <style:style style:family="table-row" style:name="TableRow160">
      <style:table-row-properties style:min-row-height="0.2437in"/>
    </style:style>
    <style:style style:family="table-cell" style:name="TableCell161">
      <style:table-cell-properties fo:border="none" fo:padding-bottom="0in" fo:padding-left="0.075in" fo:padding-right="0.075in" fo:padding-top="0in" style:vertical-align="middle" style:writing-mode="lr-tb"/>
    </style:style>
    <style:style style:family="paragraph" style:name="P162" style:parent-style-name="Citazione">
      <style:paragraph-properties fo:margin-bottom="0.0694in" fo:margin-top="0.0694in" fo:text-align="center"/>
    </style:style>
    <style:style style:family="text" style:name="T163" style:parent-style-name="Car.predefinitoparagrafo">
      <style:text-properties fo:color="#FFFF00" fo:font-size="14pt" fo:font-weight="bold" style:font-size-asian="14pt" style:font-weight-asian="bold"/>
    </style:style>
    <style:style style:family="table-row" style:name="TableRow164">
      <style:table-row-properties style:min-row-height="0.2437in"/>
    </style:style>
    <style:style style:family="table-cell" style:name="TableCell165">
      <style:table-cell-properties fo:border="none" fo:padding-bottom="0in" fo:padding-left="0.075in" fo:padding-right="0.075in" fo:padding-top="0in" style:vertical-align="middle" style:writing-mode="lr-tb"/>
    </style:style>
    <style:style style:family="paragraph" style:name="P166" style:parent-style-name="Citazione">
      <style:paragraph-properties fo:margin-bottom="0.0694in" fo:margin-top="0.0694in" fo:text-align="center"/>
    </style:style>
    <style:style style:family="text" style:name="T167" style:parent-style-name="Car.predefinitoparagrafo">
      <style:text-properties fo:font-style="normal" fo:font-weight="bold" style:font-style-asian="normal" style:font-weight-asian="bold"/>
    </style:style>
    <style:style style:family="table-row" style:name="TableRow168">
      <style:table-row-properties style:min-row-height="0.6694in"/>
    </style:style>
    <style:style style:family="table-cell" style:name="TableCell169">
      <style:table-cell-properties fo:border="none" fo:padding-bottom="0in" fo:padding-left="0.075in" fo:padding-right="0.075in" fo:padding-top="0in" style:vertical-align="middle" style:writing-mode="lr-tb"/>
    </style:style>
    <style:style style:family="paragraph" style:name="P170" style:parent-style-name="Normale">
      <style:paragraph-properties fo:line-height="100%" fo:margin-bottom="0in" fo:text-align="justify" style:text-autospace="none"/>
      <style:text-properties fo:color="#000000" style:country-asian="IT" style:font-name="Arial" style:font-name-complex="Arial" style:font-size-complex="10pt" style:language-asian="it"/>
    </style:style>
    <style:style style:family="paragraph" style:name="P171" style:parent-style-name="Normale">
      <style:paragraph-properties fo:line-height="100%" fo:margin-bottom="0in" fo:text-align="justify" style:text-autospace="none"/>
      <style:text-properties fo:color="#000000" fo:font-size="10pt" style:country-asian="IT" style:font-name="Arial" style:font-name-complex="Arial" style:font-size-asian="10pt" style:font-size-complex="10pt" style:language-asian="it"/>
    </style:style>
    <style:style style:family="table-row" style:name="TableRow172">
      <style:table-row-properties style:min-row-height="0.2451in"/>
    </style:style>
    <style:style style:family="table-cell" style:name="TableCell173">
      <style:table-cell-properties fo:border="none" fo:padding-bottom="0in" fo:padding-left="0.075in" fo:padding-right="0.075in" fo:padding-top="0in" style:vertical-align="middle" style:writing-mode="lr-tb"/>
    </style:style>
    <style:style style:family="paragraph" style:name="P174" style:parent-style-name="Normale">
      <style:paragraph-properties fo:margin-left="-0.0368in" fo:margin-right="-0.0534in" fo:text-align="center" style:text-autospace="none">
        <style:tab-stops/>
      </style:paragraph-properties>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175">
      <style:table-cell-properties fo:border="none" fo:padding-bottom="0in" fo:padding-left="0.075in" fo:padding-right="0.075in" fo:padding-top="0in" style:vertical-align="middle" style:writing-mode="lr-tb"/>
    </style:style>
    <style:style style:family="paragraph" style:name="P176" style:parent-style-name="Normale">
      <style:paragraph-properties fo:line-height="100%" fo:margin-bottom="0in" fo:text-align="center" style:text-autospace="none"/>
    </style:style>
    <style:style style:family="text" style:name="T177" style:parent-style-name="Car.predefinitoparagrafo">
      <style:text-properties fo:color="#000000" fo:font-size="10pt" fo:font-weight="bold" style:country-asian="IT" style:font-name="Arial" style:font-name-complex="Arial" style:font-size-asian="10pt" style:font-size-complex="10pt" style:font-weight-asian="bold" style:font-weight-complex="bold" style:language-asian="it"/>
    </style:style>
    <style:style style:family="table-cell" style:name="TableCell178">
      <style:table-cell-properties fo:border="none" fo:padding-bottom="0in" fo:padding-left="0.075in" fo:padding-right="0.075in" fo:padding-top="0in" style:vertical-align="middle" style:writing-mode="lr-tb"/>
    </style:style>
    <style:style style:family="paragraph" style:name="P179" style:parent-style-name="Normale">
      <style:paragraph-properties fo:line-height="100%" fo:margin-bottom="0in" fo:text-align="center" style:text-autospace="none"/>
    </style:style>
    <style:style style:family="text" style:name="T180" style:parent-style-name="Car.predefinitoparagrafo">
      <style:text-properties fo:color="#000000" fo:font-size="10pt" fo:font-weight="bold" style:country-asian="IT" style:font-name="Arial" style:font-name-complex="Arial" style:font-size-asian="10pt" style:font-size-complex="10pt" style:font-weight-asian="bold" style:font-weight-complex="bold" style:language-asian="it"/>
    </style:style>
    <style:style style:family="table-row" style:name="TableRow181">
      <style:table-row-properties style:min-row-height="0.2791in"/>
    </style:style>
    <style:style style:family="paragraph" style:name="P182" style:parent-style-name="Normale">
      <style:paragraph-properties fo:line-height="100%" fo:margin-bottom="0in" fo:margin-left="-0.0368in" fo:margin-right="-0.0534in" fo:text-align="center" style:text-autospace="none">
        <style:tab-stops/>
      </style:paragraph-properties>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183">
      <style:table-cell-properties fo:border="none" fo:padding-bottom="0in" fo:padding-left="0.075in" fo:padding-right="0.075in" fo:padding-top="0in" style:vertical-align="middle" style:writing-mode="lr-tb"/>
    </style:style>
    <style:style style:family="paragraph" style:name="P184" style:parent-style-name="Normale">
      <style:paragraph-properties fo:line-height="100%" fo:margin-bottom="0in" fo:text-align="center" style:text-autospace="none"/>
    </style:style>
    <style:style style:family="text" style:name="T185" style:parent-style-name="Car.predefinitoparagrafo">
      <style:text-properties fo:color="#000000" fo:font-size="8pt" fo:font-weight="bold" style:country-asian="IT" style:font-name="Arial" style:font-name-complex="Arial" style:font-size-asian="8pt" style:font-size-complex="9pt" style:font-weight-asian="bold" style:language-asian="it"/>
    </style:style>
    <style:style style:family="table-cell" style:name="TableCell186">
      <style:table-cell-properties fo:border="none" fo:padding-bottom="0in" fo:padding-left="0.075in" fo:padding-right="0.075in" fo:padding-top="0in" style:vertical-align="middle" style:writing-mode="lr-tb"/>
    </style:style>
    <style:style style:family="paragraph" style:name="P187"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188">
      <style:table-cell-properties fo:border="none" fo:padding-bottom="0in" fo:padding-left="0.075in" fo:padding-right="0.075in" fo:padding-top="0in" style:vertical-align="middle" style:writing-mode="lr-tb"/>
    </style:style>
    <style:style style:family="paragraph" style:name="P189"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9pt" style:font-weight-asian="bold" style:language-asian="it"/>
    </style:style>
    <style:style style:family="table-cell" style:name="TableCell190">
      <style:table-cell-properties fo:border="none" fo:padding-bottom="0in" fo:padding-left="0.075in" fo:padding-right="0.075in" fo:padding-top="0in" style:vertical-align="middle" style:writing-mode="lr-tb"/>
    </style:style>
    <style:style style:family="paragraph" style:name="P191"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192">
      <style:table-cell-properties fo:border="none" fo:padding-bottom="0in" fo:padding-left="0.075in" fo:padding-right="0.075in" fo:padding-top="0in" style:vertical-align="middle" style:writing-mode="lr-tb"/>
    </style:style>
    <style:style style:family="paragraph" style:name="P193" style:parent-style-name="Normale">
      <style:paragraph-properties fo:line-height="100%" fo:margin-bottom="0in" fo:text-align="center" style:text-autospace="none"/>
    </style:style>
    <style:style style:family="text" style:name="T194" style:parent-style-name="Car.predefinitoparagrafo">
      <style:text-properties fo:color="#000000" fo:font-size="8pt" fo:font-weight="bold" fo:text-transform="uppercase" style:country-asian="IT" style:font-name="Arial" style:font-name-complex="Arial" style:font-size-asian="8pt" style:font-size-complex="9pt" style:font-weight-asian="bold" style:language-asian="it"/>
    </style:style>
    <style:style style:family="table-cell" style:name="TableCell195">
      <style:table-cell-properties fo:border="none" fo:padding-bottom="0in" fo:padding-left="0.075in" fo:padding-right="0.075in" fo:padding-top="0in" style:vertical-align="middle" style:writing-mode="lr-tb"/>
    </style:style>
    <style:style style:family="paragraph" style:name="P196"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197">
      <style:table-cell-properties fo:border="none" fo:padding-bottom="0in" fo:padding-left="0.075in" fo:padding-right="0.075in" fo:padding-top="0in" style:vertical-align="middle" style:writing-mode="lr-tb"/>
    </style:style>
    <style:style style:family="paragraph" style:name="P198" style:parent-style-name="Normale">
      <style:paragraph-properties fo:line-height="100%" fo:margin-bottom="0in" fo:text-align="center" style:text-autospace="none"/>
    </style:style>
    <style:style style:family="text" style:name="T199" style:parent-style-name="Car.predefinitoparagrafo">
      <style:text-properties fo:color="#000000" fo:font-size="8pt" fo:font-weight="bold" fo:text-transform="uppercase" style:country-asian="IT" style:font-name="Arial" style:font-name-complex="Arial" style:font-size-asian="8pt" style:font-size-complex="9pt" style:font-weight-asian="bold" style:language-asian="it"/>
    </style:style>
    <style:style style:family="table-cell" style:name="TableCell200">
      <style:table-cell-properties fo:border="none" fo:padding-bottom="0in" fo:padding-left="0.075in" fo:padding-right="0.075in" fo:padding-top="0in" style:vertical-align="middle" style:writing-mode="lr-tb"/>
    </style:style>
    <style:style style:family="paragraph" style:name="P201"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row" style:name="TableRow202">
      <style:table-row-properties/>
    </style:style>
    <style:style style:family="table-cell" style:name="TableCell203">
      <style:table-cell-properties fo:border="none" fo:padding-bottom="0in" fo:padding-left="0.075in" fo:padding-right="0.075in" fo:padding-top="0in" style:vertical-align="middle" style:writing-mode="lr-tb"/>
    </style:style>
    <style:style style:family="paragraph" style:name="P204" style:parent-style-name="Normale">
      <style:paragraph-properties fo:line-height="100%" fo:margin-bottom="0in" fo:text-align="center" style:text-autospace="none"/>
      <style:text-properties fo:color="#000000" fo:font-size="8pt" fo:font-weight="bold" style:country-asian="IT" style:font-name="Arial Black" style:font-name-complex="Arial Black" style:font-size-asian="8pt" style:font-size-complex="10pt" style:font-weight-asian="bold" style:font-weight-complex="bold" style:language-asian="it"/>
    </style:style>
    <style:style style:family="table-cell" style:name="TableCell205">
      <style:table-cell-properties fo:border="none" fo:padding-bottom="0in" fo:padding-left="0.075in" fo:padding-right="0.075in" fo:padding-top="0in" style:vertical-align="middle" style:writing-mode="lr-tb"/>
    </style:style>
    <style:style style:family="paragraph" style:name="P206"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07">
      <style:table-cell-properties fo:border="none" fo:padding-bottom="0in" fo:padding-left="0.075in" fo:padding-right="0.075in" fo:padding-top="0in" style:vertical-align="middle" style:writing-mode="lr-tb"/>
    </style:style>
    <style:style style:family="paragraph" style:name="P208"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09">
      <style:table-cell-properties fo:border="none" fo:padding-bottom="0in" fo:padding-left="0.075in" fo:padding-right="0.075in" fo:padding-top="0in" style:vertical-align="middle" style:writing-mode="lr-tb"/>
    </style:style>
    <style:style style:family="paragraph" style:name="P210"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11">
      <style:table-cell-properties fo:border="none" fo:padding-bottom="0in" fo:padding-left="0.075in" fo:padding-right="0.075in" fo:padding-top="0in" style:vertical-align="middle" style:writing-mode="lr-tb"/>
    </style:style>
    <style:style style:family="paragraph" style:name="P212"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13">
      <style:table-cell-properties fo:border="none" fo:padding-bottom="0in" fo:padding-left="0.075in" fo:padding-right="0.075in" fo:padding-top="0in" style:vertical-align="middle" style:writing-mode="lr-tb"/>
    </style:style>
    <style:style style:family="paragraph" style:name="P214"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15">
      <style:table-cell-properties fo:border="none" fo:padding-bottom="0in" fo:padding-left="0.075in" fo:padding-right="0.075in" fo:padding-top="0in" style:vertical-align="middle" style:writing-mode="lr-tb"/>
    </style:style>
    <style:style style:family="paragraph" style:name="P216"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17">
      <style:table-cell-properties fo:border="none" fo:padding-bottom="0in" fo:padding-left="0.075in" fo:padding-right="0.075in" fo:padding-top="0in" style:vertical-align="middle" style:writing-mode="lr-tb"/>
    </style:style>
    <style:style style:family="paragraph" style:name="P218"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19">
      <style:table-cell-properties fo:border="none" fo:padding-bottom="0in" fo:padding-left="0.075in" fo:padding-right="0.075in" fo:padding-top="0in" style:vertical-align="middle" style:writing-mode="lr-tb"/>
    </style:style>
    <style:style style:family="paragraph" style:name="P220"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row" style:name="TableRow221">
      <style:table-row-properties/>
    </style:style>
    <style:style style:family="table-cell" style:name="TableCell222">
      <style:table-cell-properties fo:border="none" fo:padding-bottom="0in" fo:padding-left="0.075in" fo:padding-right="0.075in" fo:padding-top="0in" style:vertical-align="middle" style:writing-mode="lr-tb"/>
    </style:style>
    <style:style style:family="paragraph" style:name="P223" style:parent-style-name="Normale">
      <style:paragraph-properties fo:line-height="100%" fo:margin-bottom="0in" fo:text-align="center" style:text-autospace="none"/>
    </style:style>
    <style:style style:family="text" style:name="T224" style:parent-style-name="Car.predefinitoparagrafo">
      <style:text-properties fo:color="#000000" fo:font-size="8pt" fo:font-weight="bold" style:country-asian="IT" style:font-name="Arial Black" style:font-name-complex="Arial Black" style:font-size-asian="8pt" style:font-size-complex="10pt" style:font-weight-asian="bold" style:font-weight-complex="bold" style:language-asian="it"/>
    </style:style>
    <style:style style:family="table-cell" style:name="TableCell225">
      <style:table-cell-properties fo:border="none" fo:padding-bottom="0in" fo:padding-left="0.075in" fo:padding-right="0.075in" fo:padding-top="0in" style:vertical-align="middle" style:writing-mode="lr-tb"/>
    </style:style>
    <style:style style:family="paragraph" style:name="P226" style:parent-style-name="Normale">
      <style:paragraph-properties fo:line-height="100%" fo:margin-bottom="0in" fo:text-align="center" style:text-autospace="none"/>
    </style:style>
    <style:style style:family="text" style:name="T227" style:parent-style-name="Car.predefinitoparagrafo">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28">
      <style:table-cell-properties fo:border="none" fo:padding-bottom="0in" fo:padding-left="0.075in" fo:padding-right="0.075in" fo:padding-top="0in" style:vertical-align="middle" style:writing-mode="lr-tb"/>
    </style:style>
    <style:style style:family="paragraph" style:name="P229"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8pt" style:font-weight-asian="bold" style:font-weight-complex="bold" style:language-asian="it"/>
    </style:style>
    <style:style style:family="table-cell" style:name="TableCell230">
      <style:table-cell-properties fo:border="none" fo:padding-bottom="0in" fo:padding-left="0.075in" fo:padding-right="0.075in" fo:padding-top="0in" style:vertical-align="middle" style:writing-mode="lr-tb"/>
    </style:style>
    <style:style style:family="paragraph" style:name="P231" style:parent-style-name="Normale">
      <style:paragraph-properties fo:line-height="100%" fo:margin-bottom="0in" fo:text-align="center" style:text-autospace="none"/>
    </style:style>
    <style:style style:family="text" style:name="T232" style:parent-style-name="Car.predefinitoparagrafo">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33">
      <style:table-cell-properties fo:border="none" fo:padding-bottom="0in" fo:padding-left="0.075in" fo:padding-right="0.075in" fo:padding-top="0in" style:vertical-align="middle" style:writing-mode="lr-tb"/>
    </style:style>
    <style:style style:family="paragraph" style:name="P234"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8pt" style:font-weight-asian="bold" style:font-weight-complex="bold" style:language-asian="it"/>
    </style:style>
    <style:style style:family="table-cell" style:name="TableCell235">
      <style:table-cell-properties fo:border="none" fo:padding-bottom="0in" fo:padding-left="0.075in" fo:padding-right="0.075in" fo:padding-top="0in" style:vertical-align="middle" style:writing-mode="lr-tb"/>
    </style:style>
    <style:style style:family="paragraph" style:name="P236"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37">
      <style:table-cell-properties fo:border="none" fo:padding-bottom="0in" fo:padding-left="0.075in" fo:padding-right="0.075in" fo:padding-top="0in" style:vertical-align="middle" style:writing-mode="lr-tb"/>
    </style:style>
    <style:style style:family="paragraph" style:name="P238"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8pt" style:font-weight-asian="bold" style:font-weight-complex="bold" style:language-asian="it"/>
    </style:style>
    <style:style style:family="table-cell" style:name="TableCell239">
      <style:table-cell-properties fo:border="none" fo:padding-bottom="0in" fo:padding-left="0.075in" fo:padding-right="0.075in" fo:padding-top="0in" style:vertical-align="middle" style:writing-mode="lr-tb"/>
    </style:style>
    <style:style style:family="paragraph" style:name="P240"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cell" style:name="TableCell241">
      <style:table-cell-properties fo:border="none" fo:padding-bottom="0in" fo:padding-left="0.075in" fo:padding-right="0.075in" fo:padding-top="0in" style:vertical-align="middle" style:writing-mode="lr-tb"/>
    </style:style>
    <style:style style:family="paragraph" style:name="P242"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table-row" style:name="TableRow243">
      <style:table-row-properties/>
    </style:style>
    <style:style style:family="table-cell" style:name="TableCell244">
      <style:table-cell-properties fo:border="none" fo:padding-bottom="0in" fo:padding-left="0.075in" fo:padding-right="0.075in" fo:padding-top="0in" style:vertical-align="middle" style:writing-mode="lr-tb"/>
    </style:style>
    <style:style style:family="paragraph" style:name="P245" style:parent-style-name="Normale">
      <style:paragraph-properties fo:line-height="100%" fo:margin-bottom="0in" fo:text-align="center" style:text-autospace="none"/>
      <style:text-properties fo:font-size="8pt" fo:font-weight="bold" style:font-size-asian="8pt" style:font-weight-asian="bold"/>
    </style:style>
    <style:style style:family="table-row" style:name="TableRow246">
      <style:table-row-properties/>
    </style:style>
    <style:style style:family="table-cell" style:name="TableCell247">
      <style:table-cell-properties fo:border="none" fo:padding-bottom="0in" fo:padding-left="0.075in" fo:padding-right="0.075in" fo:padding-top="0in" style:vertical-align="middle" style:writing-mode="lr-tb"/>
    </style:style>
    <style:style style:family="paragraph" style:name="P248" style:parent-style-name="Normale">
      <style:paragraph-properties fo:line-height="100%" fo:margin-bottom="0in" fo:text-align="center" style:text-autospace="none"/>
    </style:style>
    <style:style style:family="text" style:name="T249" style:parent-style-name="Car.predefinitoparagrafo">
      <style:text-properties fo:color="#FFFF00" fo:font-size="14pt" fo:font-weight="bold" style:font-size-asian="14pt" style:font-weight-asian="bold"/>
    </style:style>
    <style:style style:family="table-row" style:name="TableRow250">
      <style:table-row-properties/>
    </style:style>
    <style:style style:family="table-cell" style:name="TableCell251">
      <style:table-cell-properties fo:border="none" fo:padding-bottom="0in" fo:padding-left="0.075in" fo:padding-right="0.075in" fo:padding-top="0in" style:vertical-align="middle" style:writing-mode="lr-tb"/>
    </style:style>
    <style:style style:family="paragraph" style:name="P252" style:parent-style-name="Normale">
      <style:paragraph-properties fo:line-height="100%" fo:margin-bottom="0in" fo:text-align="justify" style:text-autospace="none"/>
    </style:style>
    <style:style style:family="text" style:name="T253" style:parent-style-name="Car.predefinitoparagrafo">
      <style:text-properties fo:color="#000000" style:country-asian="IT" style:font-name="Arial" style:font-name-complex="Arial" style:font-size-complex="10pt" style:language-asian="it"/>
    </style:style>
    <style:style style:family="text" style:name="T254" style:parent-style-name="Car.predefinitoparagrafo">
      <style:text-properties fo:color="#000000" style:country-asian="IT" style:font-name="Arial" style:font-name-complex="Arial" style:font-size-complex="10pt" style:language-asian="it"/>
    </style:style>
    <style:style style:family="text" style:name="T255" style:parent-style-name="Car.predefinitoparagrafo">
      <style:text-properties fo:color="#000000" style:font-name="Arial" style:font-name-complex="Arial" style:font-size-complex="10pt"/>
    </style:style>
    <style:style style:family="paragraph" style:name="P256" style:parent-style-name="Normale">
      <style:paragraph-properties fo:line-height="100%" fo:margin-bottom="0in" fo:text-align="center" style:text-autospace="none"/>
      <style:text-properties fo:color="#000000" fo:font-size="8pt" fo:font-weight="bold" style:country-asian="IT" style:font-name="Arial" style:font-name-complex="Arial" style:font-size-asian="8pt" style:font-size-complex="10pt" style:font-weight-asian="bold" style:font-weight-complex="bold" style:language-asian="it"/>
    </style:style>
    <style:style style:family="graphic" style:name="a6" style:parent-style-name="Graphics">
      <style:graphic-properties fo:background-color="transparent" fo:border="0.01042in none" fo:clip="rect(0in, 0in, 0in, 0in)"/>
    </style:style>
    <style:style style:family="graphic" style:name="a4" style:parent-style-name="Graphics">
      <style:graphic-properties fo:background-color="transparent" fo:border="0.01042in none" fo:clip="rect(0in, 0in, 0in, 0in)"/>
    </style:style>
    <style:style style:family="graphic" style:name="a5" style:parent-style-name="Graphics">
      <style:graphic-properties fo:background-color="transparent" fo:border="0.01042in none" fo:clip="rect(0in, 0in, 0in, 0in)"/>
    </style:style>
  </office:automatic-styles>
  <office:body>
    <office:text text:use-soft-page-breaks="true">
      <text:p text:style-name="P1"/>
      <text:p text:style-name="P54"/>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number-columns-spanned="12" table:style-name="TableCell69">
            <text:p text:style-name="P70"><text:bookmark-start text:name="OLE_LINK1"/><text:bookmark-start text:name="OLE_LINK2"/><text:span text:style-name="T71">BESCHRIJVIN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2">
          <table:table-cell table:number-columns-spanned="12" table:style-name="TableCell73">
            <text:p text:style-name="P74">Ademende slang voor interieurs, gekenmerkt door goede bekleding vermogen en goed wit punt. Eenvoudig aan te brengen, het heeft een goede borstel te gebruiken ook in roller en een goede opbrengst.<tex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5">
          <table:table-cell table:number-columns-spanned="12" table:style-name="TableCell76">
            <text:p text:style-name="P77">KENMERKE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8">
          <table:table-cell table:number-columns-spanned="4" table:style-name="TableCell79">
            <text:p text:style-name="Nessunaspaziatura"><text:span text:style-name="T80">DEEL</text:span></text:p>
          </table:table-cell>
          <table:covered-table-cell/>
          <table:covered-table-cell/>
          <table:covered-table-cell/>
          <table:table-cell table:number-columns-spanned="8" table:style-name="TableCell81">
            <text:p text:style-name="Nessunaspaziatura"><text:span text:style-name="T82">Ondoorzichtig</text:span></text:p>
          </table:table-cell>
          <table:covered-table-cell/>
          <table:covered-table-cell/>
          <table:covered-table-cell/>
          <table:covered-table-cell/>
          <table:covered-table-cell/>
          <table:covered-table-cell/>
          <table:covered-table-cell/>
        </table:table-row>
        <table:table-row table:style-name="TableRow83">
          <table:table-cell table:number-columns-spanned="4" table:style-name="TableCell84">
            <text:p text:style-name="Nessunaspaziatura"><text:span text:style-name="T85">SPECIFIEKE PESO</text:span></text:p>
          </table:table-cell>
          <table:covered-table-cell/>
          <table:covered-table-cell/>
          <table:covered-table-cell/>
          <table:table-cell table:number-columns-spanned="8" table:style-name="TableCell86">
            <text:p text:style-name="Nessunaspaziatura"><text:span text:style-name="T87">TYRKYS: 1,54 Kg/l ± 0,05 bij 20°C</text:span></text:p>
          </table:table-cell>
          <table:covered-table-cell/>
          <table:covered-table-cell/>
          <table:covered-table-cell/>
          <table:covered-table-cell/>
          <table:covered-table-cell/>
          <table:covered-table-cell/>
          <table:covered-table-cell/>
        </table:table-row>
        <table:table-row table:style-name="TableRow88">
          <table:table-cell table:number-columns-spanned="4" table:style-name="TableCell89">
            <text:p text:style-name="Nessunaspaziatura"><text:span text:style-name="T90">SECCO-RESIDUTION</text:span></text:p>
          </table:table-cell>
          <table:covered-table-cell/>
          <table:covered-table-cell/>
          <table:covered-table-cell/>
          <table:table-cell table:number-columns-spanned="8" table:style-name="TableCell91">
            <text:p text:style-name="Nessunaspaziatura"><text:span text:style-name="T92">57<text:s/></text:span><text:span text:style-name="T93">± 0,5 % p/p</text:span></text:p>
          </table:table-cell>
          <table:covered-table-cell/>
          <table:covered-table-cell/>
          <table:covered-table-cell/>
          <table:covered-table-cell/>
          <table:covered-table-cell/>
          <table:covered-table-cell/>
          <table:covered-table-cell/>
        </table:table-row>
        <table:table-row table:style-name="TableRow94">
          <table:table-cell table:number-columns-spanned="4" table:style-name="TableCell95">
            <text:p text:style-name="Nessunaspaziatura"><text:span text:style-name="T96">ARBEIDSRESISTANCE</text:span></text:p>
          </table:table-cell>
          <table:covered-table-cell/>
          <table:covered-table-cell/>
          <table:covered-table-cell/>
          <table:table-cell table:number-columns-spanned="8" table:style-name="TableCell97">
            <text:p text:style-name="Nessunaspaziatura"><text:span text:style-name="T98"/></text:p>
          </table:table-cell>
          <table:covered-table-cell/>
          <table:covered-table-cell/>
          <table:covered-table-cell/>
          <table:covered-table-cell/>
          <table:covered-table-cell/>
          <table:covered-table-cell/>
          <table:covered-table-cell/>
        </table:table-row>
        <table:table-row table:style-name="TableRow99">
          <table:table-cell table:number-columns-spanned="4" table:style-name="TableCell100">
            <text:p text:style-name="Nessunaspaziatura"><text:span text:style-name="T101">PERMEBILITEIT VOOR DE ACQUENALISELE VAPOUR</text:span></text:p>
          </table:table-cell>
          <table:covered-table-cell/>
          <table:covered-table-cell/>
          <table:covered-table-cell/>
          <table:table-cell table:number-columns-spanned="8" table:style-name="TableCell102">
            <text:p text:style-name="Nessunaspaziatura"><text:span text:style-name="T103">Hoog</text:span></text:p>
          </table:table-cell>
          <table:covered-table-cell/>
          <table:covered-table-cell/>
          <table:covered-table-cell/>
          <table:covered-table-cell/>
          <table:covered-table-cell/>
          <table:covered-table-cell/>
          <table:covered-table-cell/>
        </table:table-row>
        <table:table-row table:style-name="TableRow104">
          <table:table-cell table:number-columns-spanned="4" table:style-name="TableCell105">
            <text:p text:style-name="Nessunaspaziatura"><text:span text:style-name="T106"/></text:p>
          </table:table-cell>
          <table:covered-table-cell/>
          <table:covered-table-cell/>
          <table:covered-table-cell/>
          <table:table-cell table:number-columns-spanned="8" table:style-name="TableCell107">
            <text:p text:style-name="Nessunaspaziatura"><text:span text:style-name="T108">Laag</text:span></text:p>
          </table:table-cell>
          <table:covered-table-cell/>
          <table:covered-table-cell/>
          <table:covered-table-cell/>
          <table:covered-table-cell/>
          <table:covered-table-cell/>
          <table:covered-table-cell/>
          <table:covered-table-cell/>
        </table:table-row>
        <table:table-row table:style-name="TableRow109">
          <table:table-cell table:number-columns-spanned="4" table:style-name="TableCell110">
            <text:p text:style-name="Nessunaspaziatura"><text:span text:style-name="T111">KLEUR</text:span></text:p>
          </table:table-cell>
          <table:covered-table-cell/>
          <table:covered-table-cell/>
          <table:covered-table-cell/>
          <table:table-cell table:number-columns-spanned="8" table:style-name="TableCell112">
            <text:p text:style-name="Nessunaspaziatura"><text:span text:style-name="T113">Wit (kleurbaar met kleurstoffen<text:s/></text:span><text:span text:style-name="T114">Universeel)</text:span></text:p>
          </table:table-cell>
          <table:covered-table-cell/>
          <table:covered-table-cell/>
          <table:covered-table-cell/>
          <table:covered-table-cell/>
          <table:covered-table-cell/>
          <table:covered-table-cell/>
          <table:covered-table-cell/>
        </table:table-row>
        <table:table-row table:style-name="TableRow115">
          <table:table-cell table:number-columns-spanned="4" table:style-name="TableCell116">
            <text:p text:style-name="P117">UITGAVEN</text:p>
            <text:p text:style-name="P118">(gegevens betreffende 20°C en 65% U.R.)</text:p>
          </table:table-cell>
          <table:covered-table-cell/>
          <table:covered-table-cell/>
          <table:covered-table-cell/>
          <table:table-cell table:number-columns-spanned="8" table:style-name="TableCell119">
            <text:p text:style-name="P120">voor dekking: 6 uur</text:p>
            <text:p text:style-name="P121">compleet: 48 uur</text:p>
          </table:table-cell>
          <table:covered-table-cell/>
          <table:covered-table-cell/>
          <table:covered-table-cell/>
          <table:covered-table-cell/>
          <table:covered-table-cell/>
          <table:covered-table-cell/>
          <table:covered-table-cell/>
        </table:table-row>
        <table:table-row table:style-name="TableRow122">
          <table:table-cell table:number-columns-spanned="4" table:style-name="TableCell123">
            <text:p text:style-name="P124">PRATISCHE ONDERZOEK</text:p>
          </table:table-cell>
          <table:covered-table-cell/>
          <table:covered-table-cell/>
          <table:covered-table-cell/>
          <table:table-cell table:number-columns-spanned="8" table:style-name="TableCell125">
            <text:p text:style-name="P126">9-11 m2/l per hand</text:p>
            <text:p text:style-name="P127">volgens ondersteuningsabsorptie</text:p>
          </table:table-cell>
          <table:covered-table-cell/>
          <table:covered-table-cell/>
          <table:covered-table-cell/>
          <table:covered-table-cell/>
          <table:covered-table-cell/>
          <table:covered-table-cell/>
          <table:covered-table-cell/>
        </table:table-row>
        <table:table-row table:style-name="TableRow128">
          <table:table-cell table:number-columns-spanned="4" table:style-name="TableCell129">
            <text:p text:style-name="P130">VERKLARING</text:p>
          </table:table-cell>
          <table:covered-table-cell/>
          <table:covered-table-cell/>
          <table:covered-table-cell/>
          <table:table-cell table:number-columns-spanned="8" table:style-name="TableCell131">
            <text:p text:style-name="Nessunaspaziatura"><text:span text:style-name="T132">1</text:span><text:span text:style-name="T133">a<text:s/></text:span><text:span text:style-name="T134">hand: voeg 35% drinkwater toe</text:span></text:p>
            <text:p text:style-name="Nessunaspaziatura"><text:span text:style-name="T135">2</text:span><text:span text:style-name="T136">a</text:span><text:span text:style-name="T137"><text:s/>Hand:<text:s/></text:span><text:span text:style-name="T138">30% drinkwater toevoegen</text:span></text:p>
            <text:p text:style-name="P139">Luchtloze spray: voeg tussen 30% en 40% drinkwater toe. Aanbevolen sproeiers: LP419</text:p>
          </table:table-cell>
          <table:covered-table-cell/>
          <table:covered-table-cell/>
          <table:covered-table-cell/>
          <table:covered-table-cell/>
          <table:covered-table-cell/>
          <table:covered-table-cell/>
          <table:covered-table-cell/>
        </table:table-row>
        <table:table-row table:style-name="TableRow140">
          <table:table-cell table:number-columns-spanned="4" table:style-name="TableCell141">
            <text:p text:style-name="P142">UITRUSTING</text:p>
          </table:table-cell>
          <table:covered-table-cell/>
          <table:covered-table-cell/>
          <table:covered-table-cell/>
          <table:table-cell table:number-columns-spanned="3" table:style-name="TableCell143">
            <text:p text:style-name="P144"><text:span text:style-name="T145"><draw:frame draw:name="Immagine 4" draw:style-name="a4" style:rel-height="scale" style:rel-width="scale" svg:height="0.30208in" svg:width="0.30208in" svg:x="0in" svg:y="0in" text:anchor-type="as-char"><draw:image xlink:actuate="onLoad" xlink:href="media/image3.png" xlink:show="embed" xlink:type="simple"/><svg:title/><svg:desc/></draw:frame></text:span></text:p>
            <text:p text:style-name="P146">penseel</text:p>
          </table:table-cell>
          <table:covered-table-cell/>
          <table:covered-table-cell/>
          <table:table-cell table:number-columns-spanned="3" table:style-name="TableCell147">
            <text:p text:style-name="P148"><text:span text:style-name="T149"><draw:frame draw:name="Immagine 3" draw:style-name="a5" style:rel-height="scale" style:rel-width="scale" svg:height="0.30208in" svg:width="0.30208in" svg:x="0in" svg:y="0in" text:anchor-type="as-char"><draw:image xlink:actuate="onLoad" xlink:href="media/image4.png" xlink:show="embed" xlink:type="simple"/><svg:title/><svg:desc/></draw:frame></text:span></text:p>
            <text:p text:style-name="P150">Roller</text:p>
          </table:table-cell>
          <table:covered-table-cell/>
          <table:covered-table-cell/>
          <table:table-cell table:number-columns-spanned="2" table:style-name="TableCell151">
            <text:p text:style-name="P152"><text:span text:style-name="T153"><draw:frame draw:name="Immagine 3" draw:style-name="a6" style:rel-height="scale" style:rel-width="scale" svg:height="0.30208in" svg:width="0.30208in" svg:x="0in" svg:y="0in" text:anchor-type="as-char"><draw:image xlink:actuate="onLoad" xlink:href="media/image5.png" xlink:show="embed" xlink:type="simple"/><svg:title/><svg:desc/></draw:frame></text:span></text:p>
            <text:p text:style-name="P154">spray</text:p>
          </table:table-cell>
          <table:covered-table-cell/>
        </table:table-row>
        <table:table-row table:style-name="TableRow155">
          <table:table-cell table:number-columns-spanned="4" table:style-name="TableCell156">
            <text:p text:style-name="P157">STEUN</text:p>
          </table:table-cell>
          <table:covered-table-cell/>
          <table:covered-table-cell/>
          <table:covered-table-cell/>
          <table:table-cell table:number-columns-spanned="8" table:style-name="TableCell158">
            <text:p text:style-name="P159">civiel gips, gipsplaat,<text:s/>Fibrocement, gepleisterde muren</text:p>
          </table:table-cell>
          <table:covered-table-cell/>
          <table:covered-table-cell/>
          <table:covered-table-cell/>
          <table:covered-table-cell/>
          <table:covered-table-cell/>
          <table:covered-table-cell/>
          <table:covered-table-cell/>
        </table:table-row>
        <table:table-row table:style-name="TableRow160">
          <table:table-cell table:number-columns-spanned="12" table:style-name="TableCell161">
            <text:p text:style-name="P162"><text:span text:style-name="T163">TOEPASSIN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4">
          <table:table-cell table:number-columns-spanned="12" table:style-name="TableCell165">
            <text:p text:style-name="P166"><text:span text:style-name="T167">VOORBEREIDING VAN DE STEU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8">
          <table:table-cell table:number-columns-spanned="12" table:style-name="TableCell169">
            <text:p text:style-name="P170">De steun moet gezond, droog, schoon en consistent zijn, vrij van vochtvlekken, sporen van vuil, vet, schimmel, enz. Oude verf onsamenhangend of bloeiend<text:s/>moeten worden verwijderd door het oppervlak te poetsen of te schuren. Imperfecties, splits, folders, moeten op de juiste wijze worden geëlimineerd en gestuceerd.</text:p>
            <text:p text:style-name="P1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2">
          <table:table-cell table:number-rows-spanned="2" table:style-name="TableCell173">
            <text:p text:style-name="P174"/>
          </table:table-cell>
          <table:table-cell table:number-columns-spanned="5" table:style-name="TableCell175">
            <text:p text:style-name="P176"><text:span text:style-name="T177">NIEUWE STEUNEN</text:span></text:p>
          </table:table-cell>
          <table:covered-table-cell/>
          <table:covered-table-cell/>
          <table:covered-table-cell/>
          <table:covered-table-cell/>
          <table:table-cell table:number-columns-spanned="6" table:style-name="TableCell178">
            <text:p text:style-name="P179"><text:span text:style-name="T180">STEUN</text:span></text:p>
          </table:table-cell>
          <table:covered-table-cell/>
          <table:covered-table-cell/>
          <table:covered-table-cell/>
          <table:covered-table-cell/>
          <table:covered-table-cell/>
        </table:table-row>
        <table:table-row table:style-name="TableRow181">
          <table:covered-table-cell>
            <text:p text:style-name="P182"/>
          </table:covered-table-cell>
          <table:table-cell table:style-name="TableCell183">
            <text:p text:style-name="P184"><text:span text:style-name="T185"/></text:p>
          </table:table-cell>
          <table:table-cell table:style-name="TableCell186">
            <text:p text:style-name="P187">Veel</text:p>
          </table:table-cell>
          <table:table-cell table:number-columns-spanned="2" table:style-name="TableCell188">
            <text:p text:style-name="P189">DOOS<text:s/></text:p>
          </table:table-cell>
          <table:covered-table-cell/>
          <table:table-cell table:style-name="TableCell190">
            <text:p text:style-name="P191">Veel</text:p>
          </table:table-cell>
          <table:table-cell table:number-columns-spanned="2" table:style-name="TableCell192">
            <text:p text:style-name="P193"><text:span text:style-name="T194">ademend of gevoelloos</text:span></text:p>
          </table:table-cell>
          <table:covered-table-cell/>
          <table:table-cell table:style-name="TableCell195">
            <text:p text:style-name="P196">Veel</text:p>
          </table:table-cell>
          <table:table-cell table:number-columns-spanned="2" table:style-name="TableCell197">
            <text:p text:style-name="P198"><text:span text:style-name="T199">wasbaar goed verankerd</text:span></text:p>
          </table:table-cell>
          <table:covered-table-cell/>
          <table:table-cell table:style-name="TableCell200">
            <text:p text:style-name="P201">Veel</text:p>
          </table:table-cell>
        </table:table-row>
        <table:table-row table:style-name="TableRow202">
          <table:table-cell table:style-name="TableCell203">
            <text:p text:style-name="P204">VROUWEN</text:p>
          </table:table-cell>
          <table:table-cell table:style-name="TableCell205">
            <text:p text:style-name="P206">JANTAR</text:p>
          </table:table-cell>
          <table:table-cell table:style-name="TableCell207">
            <text:p text:style-name="P208">1</text:p>
          </table:table-cell>
          <table:table-cell table:number-columns-spanned="2" table:style-name="TableCell209">
            <text:p text:style-name="P210">REFON</text:p>
          </table:table-cell>
          <table:covered-table-cell/>
          <table:table-cell table:style-name="TableCell211">
            <text:p text:style-name="P212">1</text:p>
          </table:table-cell>
          <table:table-cell table:number-columns-spanned="2" table:style-name="TableCell213">
            <text:p text:style-name="P214">JANTAR</text:p>
          </table:table-cell>
          <table:covered-table-cell/>
          <table:table-cell table:style-name="TableCell215">
            <text:p text:style-name="P216">1</text:p>
          </table:table-cell>
          <table:table-cell table:number-columns-spanned="2" table:style-name="TableCell217">
            <text:p text:style-name="P218"/>
          </table:table-cell>
          <table:covered-table-cell/>
          <table:table-cell table:style-name="TableCell219">
            <text:p text:style-name="P220"/>
          </table:table-cell>
        </table:table-row>
        <table:table-row table:style-name="TableRow221">
          <table:table-cell table:style-name="TableCell222">
            <text:p text:style-name="P223"><text:span text:style-name="T224">AFWERKING</text:span></text:p>
          </table:table-cell>
          <table:table-cell table:style-name="TableCell225">
            <text:p text:style-name="P226"><text:span text:style-name="T227">TYRKYS</text:span></text:p>
          </table:table-cell>
          <table:table-cell table:style-name="TableCell228">
            <text:p text:style-name="P229">2</text:p>
          </table:table-cell>
          <table:table-cell table:number-columns-spanned="2" table:style-name="TableCell230">
            <text:p text:style-name="P231"><text:span text:style-name="T232">TYRKYS</text:span></text:p>
          </table:table-cell>
          <table:covered-table-cell/>
          <table:table-cell table:style-name="TableCell233">
            <text:p text:style-name="P234">1</text:p>
          </table:table-cell>
          <table:table-cell table:number-columns-spanned="2" table:style-name="TableCell235">
            <text:p text:style-name="P236">TYRKYS</text:p>
          </table:table-cell>
          <table:covered-table-cell/>
          <table:table-cell table:style-name="TableCell237">
            <text:p text:style-name="P238">2</text:p>
          </table:table-cell>
          <table:table-cell table:number-columns-spanned="2" table:style-name="TableCell239">
            <text:p text:style-name="P240">TYRKYS</text:p>
          </table:table-cell>
          <table:covered-table-cell/>
          <table:table-cell table:style-name="TableCell241">
            <text:p text:style-name="P242">2</text:p>
          </table:table-cell>
        </table:table-row>
        <table:table-row table:style-name="TableRow243">
          <table:table-cell table:number-columns-spanned="12" table:style-name="TableCell244">
            <text:p text:style-name="P24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6">
          <table:table-cell table:number-columns-spanned="12" table:style-name="TableCell247">
            <text:p text:style-name="P248"><text:span text:style-name="T249">ALGEMENE MEDEDELINGE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0">
          <table:table-cell table:number-columns-spanned="12" table:style-name="TableCell251">
            <text:p text:style-name="P252"><text:span text:style-name="T253">Niet om de ademende eigenschappen van het product te veranderen, de<text:s/></text:span><text:span text:style-name="T254">basiskleur hoeveelheid mag niet meer dan 20%. Houd het product vers en bewaar tegen vorst. N</text:span><text:span text:style-name="T255">bij toepassing van het product bij temperaturen beneden 5 ° of boven 30 ° C, met een relatieve vochtigheid van meer dan 85% of op aan wind of zon blootgestelde muren.</text:span></text:p>
            <text:p text:style-name="P25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Normale"><text:bookmark-end text:name="OLE_LINK1"/><text:bookmark-end text:name="OLE_LINK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Normale" style:display-name="Normale" style:family="paragraph">
      <style:paragraph-properties fo:margin-bottom="0.1388in" fo:line-height="115%"/>
      <style:text-properties fo:font-size="11pt" style:font-size-asian="11pt" style:font-size-complex="11pt" style:language-asian="en" style:country-asian="US" fo:hyphenate="false"/>
    </style:style>
    <style:style style:name="Car.predefinitoparagrafo" style:display-name="Car. predefinito paragrafo" style:family="text"/>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text-properties style:font-name="Tahoma" style:font-name-complex="Tahoma" fo:font-size="8pt" style:font-size-asian="8pt" style:font-size-complex="8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Titolo1Carattere" style:display-name="Titolo 1 Carattere"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en" style:country-asian="US"/>
    </style:style>
    <style:style style:name="Nessunaspaziatura" style:display-name="Nessuna spaziatura" style:family="paragraph">
      <style:text-properties fo:font-size="11pt" style:font-size-asian="11pt" style:font-size-complex="11pt" style:language-asian="en" style:country-asian="US" fo:hyphenate="false"/>
    </style:style>
    <style:style style:name="Titolo2Carattere" style:display-name="Titolo 2 Carattere"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en" style:country-asian="US"/>
    </style:style>
    <style:style style:name="NormaleWeb" style:display-name="Normale (Web)" style:family="paragraph" style:parent-style-name="Normale">
      <style:paragraph-properties fo:margin-top="0.0694in" fo:margin-bottom="0.0826in" fo:line-height="100%"/>
      <style:text-properties style:font-name="Times New Roman" style:font-name-asian="Times New Roman" fo:font-size="12pt" style:font-size-asian="12pt" style:font-size-complex="12pt" style:language-asian="it" style:country-asian="I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text-properties fo:font-style="italic" style:font-style-asian="italic" style:font-style-complex="italic" fo:color="#000000" fo:font-size="11pt" style:font-size-asian="11pt" style:font-size-complex="11pt" style:language-asian="en" style:country-asian="US"/>
    </style:style>
    <style:style style:name="apple-style-span" style:display-name="apple-style-span"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2958in" fo:margin-left="0.7875in" fo:margin-bottom="0.0854in" fo:margin-right="0.5895in" style:num-format="1" style:writing-mode="lr-tb">
        <style:footnote-sep style:width="0.007in" style:rel-width="33%" style:color="#000000" style:line-style="solid" style:adjustment="left"/>
      </style:page-layout-properties>
      <style:header-style>
        <style:header-footer-properties style:dynamic-spacing="true" fo:min-height="0.9645in"/>
      </style:header-style>
      <style:footer-style>
        <style:header-footer-properties style:dynamic-spacing="true" fo:min-height="0.5055in"/>
      </style:footer-style>
    </style:page-layout>
    <style:style style:name="TableColumn3" style:family="table-column">
      <style:table-column-properties style:column-width="1.477in" style:use-optimal-column-width="false"/>
    </style:style>
    <style:style style:name="TableColumn4" style:family="table-column">
      <style:table-column-properties style:column-width="4.109in" style:use-optimal-column-width="false"/>
    </style:style>
    <style:style style:name="TableColumn5" style:family="table-column">
      <style:table-column-properties style:column-width="1.6006in" style:use-optimal-column-width="false"/>
    </style:style>
    <style:style style:name="Table2" style:family="table">
      <style:table-properties style:width="7.1868in" fo:margin-left="-0.1222in" table:align="left"/>
    </style:style>
    <style:style style:name="TableRow6" style:family="table-row">
      <style:table-row-properties style:min-row-height="0.1861in" style:use-optimal-row-height="false"/>
    </style:style>
    <style:style style:name="TableCell7" style:family="table-cell">
      <style:table-cell-properties fo:border="0.0069in solid #FFFFFF" style:writing-mode="lr-tb" fo:padding-top="0in" fo:padding-left="0.075in" fo:padding-bottom="0in" fo:padding-right="0.075in"/>
    </style:style>
    <style:style style:name="P8" style:parent-style-name="Intestazione" style:family="paragraph">
      <style:paragraph-properties>
        <style:tab-stops>
          <style:tab-stop style:type="center" style:position="2.7562in"/>
          <style:tab-stop style:type="right" style:position="3.5437in"/>
        </style:tab-stops>
      </style:paragraph-properties>
      <style:text-properties fo:font-size="1pt" style:font-size-asian="1pt"/>
    </style:style>
    <style:style style:name="P9" style:parent-style-name="Intestazione" style:family="paragraph">
      <style:paragraph-properties fo:text-align="center">
        <style:tab-stops>
          <style:tab-stop style:type="center" style:position="2.7562in"/>
          <style:tab-stop style:type="center" style:position="3.3465in"/>
          <style:tab-stop style:type="right" style:position="6.693in"/>
        </style:tab-stops>
      </style:paragraph-properties>
    </style:style>
    <style:style style:name="P10" style:parent-style-name="Intestazione" style:family="paragraph">
      <style:paragraph-properties fo:text-align="center">
        <style:tab-stops>
          <style:tab-stop style:type="center" style:position="2.7562in"/>
          <style:tab-stop style:type="center" style:position="3.3465in"/>
          <style:tab-stop style:type="right" style:position="6.693in"/>
        </style:tab-stops>
      </style:paragraph-properties>
      <style:text-properties fo:color="#808080" fo:font-size="7pt" style:font-size-asian="7pt" style:font-size-complex="7pt"/>
    </style:style>
    <style:style style:name="P11" style:parent-style-name="Intestazione" style:family="paragraph">
      <style:paragraph-properties fo:text-align="center">
        <style:tab-stops>
          <style:tab-stop style:type="center" style:position="2.7562in"/>
          <style:tab-stop style:type="center" style:position="3.3465in"/>
          <style:tab-stop style:type="right" style:position="6.693in"/>
        </style:tab-stops>
      </style:paragraph-properties>
      <style:text-properties fo:color="#808080" fo:font-size="7pt" style:font-size-asian="7pt" style:font-size-complex="7pt"/>
    </style:style>
    <style:style style:name="P12" style:parent-style-name="Intestazione" style:family="paragraph">
      <style:paragraph-properties fo:text-align="center">
        <style:tab-stops>
          <style:tab-stop style:type="center" style:position="2.7562in"/>
          <style:tab-stop style:type="center" style:position="3.3465in"/>
          <style:tab-stop style:type="right" style:position="6.693in"/>
        </style:tab-stops>
      </style:paragraph-properties>
    </style:style>
    <style:style style:name="T13" style:parent-style-name="Car.predefinitoparagrafo" style:family="text">
      <style:text-properties fo:color="#808080" fo:font-size="7pt" style:font-size-asian="7pt" style:font-size-complex="7pt"/>
    </style:style>
    <style:style style:name="TableCell14" style:family="table-cell">
      <style:table-cell-properties fo:border="0.0069in solid #FFFFFF" style:writing-mode="lr-tb" style:vertical-align="middle" fo:padding-top="0in" fo:padding-left="0.075in" fo:padding-bottom="0in" fo:padding-right="0.075in"/>
    </style:style>
    <style:style style:name="P15" style:parent-style-name="Intestazione" style:family="paragraph">
      <style:paragraph-properties fo:text-align="center">
        <style:tab-stops>
          <style:tab-stop style:type="center" style:position="2.7562in"/>
          <style:tab-stop style:type="right" style:position="3.5437in"/>
        </style:tab-stops>
      </style:paragraph-properties>
      <style:text-properties fo:font-weight="bold" style:font-weight-asian="bold" style:language-asian="it" style:country-asian="IT"/>
    </style:style>
    <style:style style:name="TableCell16" style:family="table-cell">
      <style:table-cell-properties fo:border="0.0069in solid #FFFFFF" style:writing-mode="lr-tb" fo:padding-top="0in" fo:padding-left="0.075in" fo:padding-bottom="0in" fo:padding-right="0.075in"/>
    </style:style>
    <style:style style:name="P17" style:parent-style-name="Normale" style:family="paragraph">
      <style:paragraph-properties fo:text-align="center"/>
    </style:style>
    <style:style style:name="T18" style:parent-style-name="Car.predefinitoparagrafo" style:family="text">
      <style:text-properties style:language-asian="it" style:country-asian="IT"/>
    </style:style>
    <style:style style:name="TableRow19" style:family="table-row">
      <style:table-row-properties style:min-row-height="0.6847in" style:use-optimal-row-height="false"/>
    </style:style>
    <style:style style:name="P20" style:parent-style-name="Intestazione" style:family="paragraph">
      <style:paragraph-properties>
        <style:tab-stops>
          <style:tab-stop style:type="center" style:position="2.7562in"/>
          <style:tab-stop style:type="right" style:position="6.693in"/>
        </style:tab-stops>
      </style:paragraph-properties>
      <style:text-properties style:language-asian="it" style:country-asian="IT"/>
    </style:style>
    <style:style style:name="TableCell21" style:family="table-cell">
      <style:table-cell-properties fo:border="0.0069in solid #FFFFFF" style:writing-mode="lr-tb" style:vertical-align="middle" fo:padding-top="0in" fo:padding-left="0.075in" fo:padding-bottom="0in" fo:padding-right="0.075in"/>
    </style:style>
    <style:style style:name="P22" style:parent-style-name="Intestazione" style:family="paragraph">
      <style:paragraph-properties fo:text-align="center">
        <style:tab-stops>
          <style:tab-stop style:type="center" style:position="2.7562in"/>
          <style:tab-stop style:type="right" style:position="6.693in"/>
        </style:tab-stops>
      </style:paragraph-properties>
      <style:text-properties fo:font-weight="bold" style:font-weight-asian="bold" fo:font-size="42pt" style:font-size-asian="42pt" style:font-size-complex="42pt" style:language-asian="it" style:country-asian="IT"/>
    </style:style>
    <style:style style:name="P23" style:parent-style-name="Intestazione" style:family="paragraph">
      <style:paragraph-properties fo:text-align="center">
        <style:tab-stops>
          <style:tab-stop style:type="center" style:position="2.7562in"/>
          <style:tab-stop style:type="right" style:position="6.693in"/>
        </style:tab-stops>
      </style:paragraph-properties>
      <style:text-properties fo:font-weight="bold" style:font-weight-asian="bold" fo:font-size="42pt" style:font-size-asian="42pt" style:font-size-complex="42pt" style:language-asian="it" style:country-asian="IT"/>
    </style:style>
    <style:style style:name="TableRow24" style:family="table-row">
      <style:table-row-properties style:min-row-height="0.1631in" style:use-optimal-row-height="false"/>
    </style:style>
    <style:style style:name="P25" style:parent-style-name="Intestazione" style:family="paragraph">
      <style:paragraph-properties fo:text-align="center">
        <style:tab-stops>
          <style:tab-stop style:type="center" style:position="2.7562in"/>
          <style:tab-stop style:type="right" style:position="6.693in"/>
        </style:tab-stops>
      </style:paragraph-properties>
      <style:text-properties fo:font-size="8pt" style:font-size-asian="8pt" style:font-size-complex="8pt" style:language-asian="it" style:country-asian="IT"/>
    </style:style>
    <style:style style:name="TableCell26" style:family="table-cell">
      <style:table-cell-properties fo:border="0.0069in solid #FFFFFF" style:writing-mode="lr-tb" style:vertical-align="middle" fo:padding-top="0in" fo:padding-left="0.075in" fo:padding-bottom="0in" fo:padding-right="0.075in"/>
    </style:style>
    <style:style style:name="P27" style:parent-style-name="Intestazione" style:family="paragraph">
      <style:paragraph-properties fo:text-align="center">
        <style:tab-stops>
          <style:tab-stop style:type="center" style:position="2.7562in"/>
          <style:tab-stop style:type="right" style:position="6.693in"/>
        </style:tab-stops>
      </style:paragraph-properties>
      <style:text-properties fo:font-weight="bold" style:font-weight-asian="bold" fo:font-size="8pt" style:font-size-asian="8pt" style:font-size-complex="8pt" style:language-asian="it" style:country-asian="IT"/>
    </style:style>
    <style:style style:name="P28" style:parent-style-name="Intestazione" style:family="paragraph">
      <style:paragraph-properties fo:text-align="justify">
        <style:tab-stops>
          <style:tab-stop style:type="center" style:position="2.7562in"/>
          <style:tab-stop style:type="right" style:position="6.693in"/>
        </style:tab-stops>
      </style:paragraph-properties>
      <style:text-properties fo:font-weight="bold" style:font-weight-asian="bold" fo:font-size="8pt" style:font-size-asian="8pt" style:font-size-complex="8pt" style:language-asian="it" style:country-asian="IT"/>
    </style:style>
    <style:style style:name="T29" style:parent-style-name="Car.predefinitoparagrafo" style:family="text">
      <style:text-properties style:language-asian="it" style:country-asian="IT"/>
    </style:style>
    <style:style style:name="TableColumn31" style:family="table-column">
      <style:table-column-properties style:column-width="2.0437in"/>
    </style:style>
    <style:style style:name="TableColumn32" style:family="table-column">
      <style:table-column-properties style:column-width="1.3312in"/>
    </style:style>
    <style:style style:name="TableColumn33" style:family="table-column">
      <style:table-column-properties style:column-width="2.0673in"/>
    </style:style>
    <style:style style:name="TableColumn34" style:family="table-column">
      <style:table-column-properties style:column-width="1.6944in"/>
    </style:style>
    <style:style style:name="Table30" style:family="table">
      <style:table-properties style:width="7.1368in" fo:margin-left="0in" table:align="left"/>
    </style:style>
    <style:style style:name="TableRow35" style:family="table-row">
      <style:table-row-properties/>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Pièdipagina" style:family="paragraph">
      <style:paragraph-properties fo:text-align="center"/>
    </style:style>
    <style:style style:name="T38" style:parent-style-name="Car.predefinitoparagrafo" style:family="text">
      <style:text-properties fo:font-size="9pt" style:font-size-asian="9pt" style:language-asian="it" style:country-asian="IT"/>
    </style:style>
    <style:style style:name="T39" style:parent-style-name="Car.predefinitoparagrafo" style:family="text">
      <style:text-properties style:font-name="Tahoma" style:font-name-complex="Tahoma" fo:font-weight="bold" style:font-weight-asian="bold" style:font-weight-complex="bold" fo:color="#000000" fo:font-size="8pt" style:font-size-asian="8pt" style:font-size-complex="10pt" fo:language="en" fo:country="US"/>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Pièdipagina" style:family="paragraph">
      <style:text-properties fo:font-size="8pt" style:font-size-asian="8pt" style:font-size-complex="8pt" fo:language="en" fo:country="US"/>
    </style:style>
    <style:style style:name="TableRow42" style:family="table-row">
      <style:table-row-properties/>
    </style:style>
    <style:style style:name="P43" style:parent-style-name="Pièdipagina" style:family="paragraph">
      <style:paragraph-properties fo:text-align="center"/>
      <style:text-properties fo:language="en" fo:country="US"/>
    </style:style>
    <style:style style:name="TableCell44" style:family="table-cell">
      <style:table-cell-properties fo:border="none" style:writing-mode="lr-tb" style:vertical-align="middle" fo:padding-top="0in" fo:padding-left="0.075in" fo:padding-bottom="0in" fo:padding-right="0.075in"/>
    </style:style>
    <style:style style:name="P45" style:parent-style-name="Pièdipagina" style:family="paragraph">
      <style:paragraph-properties fo:text-align="center"/>
    </style:style>
    <style:style style:name="T46" style:parent-style-name="Car.predefinitoparagrafo" style:family="text">
      <style:text-properties fo:font-size="8pt" style:font-size-asian="8pt" style:font-size-complex="8pt"/>
    </style:style>
    <style:style style:name="T47" style:parent-style-name="Car.predefinitoparagrafo" style:family="text">
      <style:text-properties fo:font-size="8pt" style:font-size-asian="8pt" style:font-size-complex="8pt"/>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Pièdipagina" style:family="paragraph">
      <style:paragraph-properties fo:text-align="center"/>
      <style:text-properties fo:font-size="8pt" style:font-size-asian="8pt" style:font-size-complex="8pt" fo:language="en" fo:country="US"/>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Pièdipagina" style:family="paragraph">
      <style:paragraph-properties fo:text-align="center"/>
    </style:style>
    <style:style style:name="T52" style:parent-style-name="Car.predefinitoparagrafo" style:family="text">
      <style:text-properties style:font-name="Tahoma" style:font-name-complex="Tahoma" fo:color="#000000" fo:font-size="8pt" style:font-size-asian="8pt" style:font-size-complex="8pt"/>
    </style:style>
    <style:style style:name="P53" style:parent-style-name="Pièdipagina"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3125in" svg:stroke-color="#000000" svg:stroke-opacity="100%" draw:stroke-linejoin="round" svg:stroke-linecap="butt" style:horizontal-rel="paragraph" style:vertical-rel="paragraph" style:horizontal-pos="from-left" style:vertical-pos="from-top" draw:shadow="visible" draw:shadow-offset-x="0in" draw:shadow-offset-y="-0.05556in" draw:shadow-color="#808080" draw:shadow-opacity="50%"/>
    </style:style>
    <style:style style:family="graphic" style:name="a3">
      <style:graphic-properties style:wrap="run-through" style:run-through="foreground" draw:fill="none" draw:stroke="solid" svg:stroke-width="0.03125in" svg:stroke-color="#000000" svg:stroke-opacity="100%" draw:stroke-linejoin="round" svg:stroke-linecap="butt" style:horizontal-rel="paragraph" style:vertical-rel="paragraph" style:horizontal-pos="from-left" style:vertical-pos="from-top" draw:shadow="visible" draw:shadow-offset-x="0in" draw:shadow-offset-y="0.05556in" draw:shadow-color="#808080" draw:shadow-opacity="5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3">
              <text:p text:style-name="P8"/>
              <text:p text:style-name="P9"><draw:frame draw:style-name="a0" draw:name="Immagine 2" text:anchor-type="as-char" svg:x="0in" svg:y="0in" svg:width="1.29167in" svg:height="0.86458in" style:rel-width="scale" style:rel-height="scale"><draw:image xlink:href="media/image1.jpeg" xlink:type="simple" xlink:show="embed" xlink:actuate="onLoad"/><svg:title/><svg:desc/></draw:frame></text:p>
              <text:p text:style-name="P10">Created 01/02/2011</text:p>
              <text:p text:style-name="P11">Rev. 2 – 12/09/2019</text:p>
              <text:p text:style-name="P12"><text:span text:style-name="T13">Rev. 3 – 06/06/2024</text:span></text:p>
            </table:table-cell>
            <table:table-cell table:style-name="TableCell14">
              <text:p text:style-name="P15">SCHEDA TECNICA DEL PRODOTTO:</text:p>
            </table:table-cell>
            <table:table-cell table:style-name="TableCell16" table:number-rows-spanned="3">
              <text:p text:style-name="P17"><text:span text:style-name="T18"><draw:frame draw:style-name="a1" draw:name="Immagine 1" text:anchor-type="as-char" svg:x="0in" svg:y="0in" svg:width="0.85156in" svg:height="0.98494in" style:rel-width="scale" style:rel-height="scale"><draw:image xlink:href="media/image2.png" xlink:type="simple" xlink:show="embed" xlink:actuate="onLoad"/><svg:title/><svg:desc/></draw:frame></text:span></text:p>
            </table:table-cell>
          </table:table-row>
          <table:table-row table:style-name="TableRow19">
            <table:covered-table-cell>
              <text:p text:style-name="P20"/>
            </table:covered-table-cell>
            <table:table-cell table:style-name="TableCell21">
              <text:p text:style-name="P22">TYRKYS</text:p>
            </table:table-cell>
            <table:covered-table-cell>
              <text:p text:style-name="P23"/>
            </table:covered-table-cell>
          </table:table-row>
          <table:table-row table:style-name="TableRow24">
            <table:covered-table-cell>
              <text:p text:style-name="P25"/>
            </table:covered-table-cell>
            <table:table-cell table:style-name="TableCell26">
              <text:p text:style-name="P27">TYRKYS5 <text:s text:c="21"/>TYRKYS12.5 <text:s text:c="17"/>KGTYRKYS</text:p>
            </table:table-cell>
            <table:covered-table-cell>
              <text:p text:style-name="P28"/>
            </table:covered-table-cell>
          </table:table-row>
        </table:table>
        <text:p text:style-name="Intestazione"><text:span text:style-name="T29"><draw:connector draw:type="line" svg:x1="-0.17014in" svg:y1="0.14722in" svg:x2="6.93542in" svg:y2="0.14722in" draw:z-index="251659264" draw:id="id0" draw:style-name="a2" draw:name="AutoShape 9" text:anchor-type="paragraph"><svg:title/><svg:desc/></draw:connector></text:span></text:p>
      </style:header>
      <style:footer>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able:number-rows-spanned="2">
              <text:p text:style-name="P37"><text:span text:style-name="T38"><draw:connector draw:type="line" svg:x1="-0.22431in" svg:y1="-0.19306in" svg:x2="7.10486in" svg:y2="-0.19306in" draw:z-index="251661312" draw:id="id1" draw:style-name="a3" draw:name="AutoShape 29" text:anchor-type="paragraph"><svg:title/><svg:desc/></draw:connector></text:span><text:span text:style-name="T39">ITALMONT SRL - SOCIO UNICO</text:span></text:p>
            </table:table-cell>
            <table:table-cell table:style-name="TableCell40" table:number-columns-spanned="3">
              <text:p text:style-name="P41">VIA IV NOVEMBRE, 13 63078 PAGLIARE DEL TRONTO –<text:s/>Fraz. Di SPINETOLI</text:p>
            </table:table-cell>
            <table:covered-table-cell/>
            <table:covered-table-cell/>
          </table:table-row>
          <table:table-row table:style-name="TableRow42">
            <table:covered-table-cell>
              <text:p text:style-name="P43"/>
            </table:covered-table-cell>
            <table:table-cell table:style-name="TableCell44">
              <text:p text:style-name="P45"><text:span text:style-name="T46">e-mail:</text:span><text:s/><text:span text:style-name="T47">info@italmont.it</text:span></text:p>
            </table:table-cell>
            <table:table-cell table:style-name="TableCell48">
              <text:p text:style-name="P49">Internet: http://www.italmont.it/</text:p>
            </table:table-cell>
            <table:table-cell table:style-name="TableCell50">
              <text:p text:style-name="P51"><text:span text:style-name="T52">tel.: +39 736 899238</text:span></text:p>
            </table:table-cell>
          </table:table-row>
        </table:table>
        <text:p text:style-name="P5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roberto</meta:initial-creator>
    <dc:creator>Roberto ITA</dc:creator>
    <meta:creation-date>2026-06-09T09:55:00Z</meta:creation-date>
    <dc:date>2026-06-09T09:56:00Z</dc:date>
    <meta:print-date>2014-10-13T20:57:00Z</meta:print-date>
    <meta:template xlink:href="Normal" xlink:type="simple"/>
    <meta:editing-cycles>3</meta:editing-cycles>
    <meta:editing-duration>PT60S</meta:editing-duration>
    <meta:document-statistic meta:page-count="1" meta:paragraph-count="3" meta:word-count="290" meta:character-count="1946" meta:row-count="13" meta:non-whitespace-character-count="1659"/>
  </office:meta>
</office:document-meta>
</file>