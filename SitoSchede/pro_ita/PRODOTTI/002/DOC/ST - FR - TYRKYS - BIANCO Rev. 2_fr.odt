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  <style:font-face style:font-family-generic="swiss" style:font-pitch="variable" style:name="Tahoma" svg:font-family="Tahoma" svg:panose-1="2 11 6 4 3 5 4 4 2 4"/>
    <style:font-face style:font-family-generic="swiss" style:font-pitch="variable" style:name="Arial" svg:font-family="Arial" svg:panose-1="2 11 6 4 2 2 2 2 2 4"/>
    <style:font-face style:font-family-generic="swiss" style:font-pitch="variable" style:name="Arial Black" svg:font-family="Arial Black" svg:panose-1="2 11 10 4 2 1 2 2 2 4"/>
    <style:font-face style:font-family-generic="swiss" style:font-pitch="variable" style:name="Aptos Display" svg:font-family="Aptos Display"/>
    <style:font-face style:font-family-generic="swiss" style:font-pitch="variable" style:name="Aptos" svg:font-family="Aptos"/>
  </office:font-face-decls>
  <office:automatic-styles>
    <style:style style:family="paragraph" style:master-page-name="MP0" style:name="P1" style:parent-style-name="Normale">
      <style:paragraph-properties fo:break-before="page"/>
      <style:text-properties fo:font-size="1pt" style:font-size-asian="1pt"/>
    </style:style>
    <style:style style:family="paragraph" style:name="P54" style:parent-style-name="Normale">
      <style:paragraph-properties fo:line-height="100%" fo:margin-bottom="0in" fo:text-align="justify" style:text-autospace="none"/>
    </style:style>
    <style:style style:family="table-column" style:name="TableColumn56">
      <style:table-column-properties style:column-width="0.7493in"/>
    </style:style>
    <style:style style:family="table-column" style:name="TableColumn57">
      <style:table-column-properties style:column-width="0.8347in"/>
    </style:style>
    <style:style style:family="table-column" style:name="TableColumn58">
      <style:table-column-properties style:column-width="0.4541in"/>
    </style:style>
    <style:style style:family="table-column" style:name="TableColumn59">
      <style:table-column-properties style:column-width="0.8013in"/>
    </style:style>
    <style:style style:family="table-column" style:name="TableColumn60">
      <style:table-column-properties style:column-width="0.2381in"/>
    </style:style>
    <style:style style:family="table-column" style:name="TableColumn61">
      <style:table-column-properties style:column-width="0.434in"/>
    </style:style>
    <style:style style:family="table-column" style:name="TableColumn62">
      <style:table-column-properties style:column-width="0.8062in"/>
    </style:style>
    <style:style style:family="table-column" style:name="TableColumn63">
      <style:table-column-properties style:column-width="0.7097in"/>
    </style:style>
    <style:style style:family="table-column" style:name="TableColumn64">
      <style:table-column-properties style:column-width="0.468in"/>
    </style:style>
    <style:style style:family="table-column" style:name="TableColumn65">
      <style:table-column-properties style:column-width="0.2868in"/>
    </style:style>
    <style:style style:family="table-column" style:name="TableColumn66">
      <style:table-column-properties style:column-width="0.6701in"/>
    </style:style>
    <style:style style:family="table-column" style:name="TableColumn67">
      <style:table-column-properties style:column-width="0.6069in"/>
    </style:style>
    <style:style style:family="table" style:name="Table55">
      <style:table-properties fo:margin-left="0in" style:width="7.0597in" table:align="center"/>
    </style:style>
    <style:style style:family="table-row" style:name="TableRow68">
      <style:table-row-properties style:min-row-height="0.2652in"/>
    </style:style>
    <style:style style:family="table-cell" style:name="TableCell6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0" style:parent-style-name="Citazione">
      <style:paragraph-properties fo:margin-bottom="0.0694in" fo:margin-top="0.0694in" fo:text-align="center"/>
    </style:style>
    <style:style style:family="text" style:name="T71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72">
      <style:table-row-properties/>
    </style:style>
    <style:style style:family="table-cell" style:name="TableCell7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4" style:parent-style-name="Nessunaspaziatura">
      <style:text-properties fo:font-size="12pt" style:country-asian="IT" style:font-name="Arial" style:font-name-complex="Arial" style:font-size-asian="12pt" style:language-asian="it"/>
    </style:style>
    <style:style style:family="table-row" style:name="TableRow75">
      <style:table-row-properties/>
    </style:style>
    <style:style style:family="table-cell" style:name="TableCell7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7" style:parent-style-name="Citazione">
      <style:paragraph-properties fo:margin-bottom="0.0694in" fo:margin-top="0.0694in" fo:text-align="center"/>
      <style:text-properties fo:color="#FFFF00" fo:font-size="14pt" fo:font-weight="bold" style:font-size-asian="14pt" style:font-weight-asian="bold"/>
    </style:style>
    <style:style style:family="table-row" style:name="TableRow78">
      <style:table-row-properties/>
    </style:style>
    <style:style style:family="table-cell" style:name="TableCell79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0" style:parent-style-name="Car.predefinitoparagrafo">
      <style:text-properties style:country-asian="IT" style:language-asian="it"/>
    </style:style>
    <style:style style:family="table-cell" style:name="TableCell8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2" style:parent-style-name="Car.predefinitoparagrafo">
      <style:text-properties style:country-asian="IT" style:language-asian="it"/>
    </style:style>
    <style:style style:family="table-row" style:name="TableRow83">
      <style:table-row-properties/>
    </style:style>
    <style:style style:family="table-cell" style:name="TableCell84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5" style:parent-style-name="Car.predefinitoparagrafo">
      <style:text-properties style:country-asian="IT" style:language-asian="it"/>
    </style:style>
    <style:style style:family="table-cell" style:name="TableCell86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7" style:parent-style-name="Car.predefinitoparagrafo">
      <style:text-properties fo:country="US" fo:language="en" style:country-asian="IT" style:language-asian="it"/>
    </style:style>
    <style:style style:family="table-row" style:name="TableRow88">
      <style:table-row-properties/>
    </style:style>
    <style:style style:family="table-cell" style:name="TableCell89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0" style:parent-style-name="Car.predefinitoparagrafo">
      <style:text-properties style:country-asian="IT" style:language-asian="it"/>
    </style:style>
    <style:style style:family="table-cell" style:name="TableCell9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2" style:parent-style-name="Car.predefinitoparagrafo">
      <style:text-properties style:font-name="Tahoma" style:font-name-complex="Tahoma"/>
    </style:style>
    <style:style style:family="text" style:name="T93" style:parent-style-name="Car.predefinitoparagrafo">
      <style:text-properties style:country-asian="IT" style:language-asian="it"/>
    </style:style>
    <style:style style:family="table-row" style:name="TableRow94">
      <style:table-row-properties/>
    </style:style>
    <style:style style:family="table-cell" style:name="TableCell95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6" style:parent-style-name="Car.predefinitoparagrafo">
      <style:text-properties style:country-asian="IT" style:language-asian="it"/>
    </style:style>
    <style:style style:family="table-cell" style:name="TableCell97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8" style:parent-style-name="Car.predefinitoparagrafo">
      <style:text-properties style:country-asian="IT" style:language-asian="it"/>
    </style:style>
    <style:style style:family="table-row" style:name="TableRow99">
      <style:table-row-properties/>
    </style:style>
    <style:style style:family="table-cell" style:name="TableCell100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1" style:parent-style-name="Car.predefinitoparagrafo">
      <style:text-properties style:country-asian="IT" style:language-asian="it"/>
    </style:style>
    <style:style style:family="table-cell" style:name="TableCell102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3" style:parent-style-name="Car.predefinitoparagrafo">
      <style:text-properties style:country-asian="IT" style:language-asian="it"/>
    </style:style>
    <style:style style:family="table-row" style:name="TableRow104">
      <style:table-row-properties/>
    </style:style>
    <style:style style:family="table-cell" style:name="TableCell105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6" style:parent-style-name="Car.predefinitoparagrafo">
      <style:text-properties style:country-asian="IT" style:language-asian="it"/>
    </style:style>
    <style:style style:family="table-cell" style:name="TableCell107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8" style:parent-style-name="Car.predefinitoparagrafo">
      <style:text-properties style:country-asian="IT" style:language-asian="it"/>
    </style:style>
    <style:style style:family="table-row" style:name="TableRow109">
      <style:table-row-properties/>
    </style:style>
    <style:style style:family="table-cell" style:name="TableCell110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11" style:parent-style-name="Car.predefinitoparagrafo">
      <style:text-properties style:country-asian="IT" style:language-asian="it"/>
    </style:style>
    <style:style style:family="table-cell" style:name="TableCell112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13" style:parent-style-name="Car.predefinitoparagrafo">
      <style:text-properties fo:color="#000000" style:country-asian="IT" style:language-asian="it"/>
    </style:style>
    <style:style style:family="text" style:name="T114" style:parent-style-name="Car.predefinitoparagrafo">
      <style:text-properties fo:color="#000000" style:country-asian="IT" style:language-asian="it"/>
    </style:style>
    <style:style style:family="table-row" style:name="TableRow115">
      <style:table-row-properties/>
    </style:style>
    <style:style style:family="table-cell" style:name="TableCell11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17" style:parent-style-name="Nessunaspaziatura">
      <style:text-properties style:country-asian="IT" style:language-asian="it"/>
    </style:style>
    <style:style style:family="paragraph" style:name="P118" style:parent-style-name="Nessunaspaziatura">
      <style:text-properties style:country-asian="IT" style:language-asian="it"/>
    </style:style>
    <style:style style:family="table-cell" style:name="TableCell11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0" style:parent-style-name="Nessunaspaziatura">
      <style:text-properties style:country-asian="IT" style:language-asian="it"/>
    </style:style>
    <style:style style:family="paragraph" style:name="P121" style:parent-style-name="Nessunaspaziatura">
      <style:text-properties style:country-asian="IT" style:language-asian="it"/>
    </style:style>
    <style:style style:family="table-row" style:name="TableRow122">
      <style:table-row-properties/>
    </style:style>
    <style:style style:family="table-cell" style:name="TableCell12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4" style:parent-style-name="Nessunaspaziatura">
      <style:text-properties style:country-asian="IT" style:language-asian="it"/>
    </style:style>
    <style:style style:family="table-cell" style:name="TableCell12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6" style:parent-style-name="Nessunaspaziatura">
      <style:text-properties style:country-asian="IT" style:language-asian="it"/>
    </style:style>
    <style:style style:family="paragraph" style:name="P127" style:parent-style-name="Nessunaspaziatura">
      <style:text-properties style:country-asian="IT" style:language-asian="it"/>
    </style:style>
    <style:style style:family="table-row" style:name="TableRow128">
      <style:table-row-properties/>
    </style:style>
    <style:style style:family="table-cell" style:name="TableCell12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30" style:parent-style-name="Nessunaspaziatura">
      <style:text-properties style:country-asian="IT" style:language-asian="it"/>
    </style:style>
    <style:style style:family="table-cell" style:name="TableCell13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32" style:parent-style-name="Car.predefinitoparagrafo">
      <style:text-properties style:country-asian="IT" style:language-asian="it"/>
    </style:style>
    <style:style style:family="text" style:name="T133" style:parent-style-name="Car.predefinitoparagrafo">
      <style:text-properties style:country-asian="IT" style:language-asian="it" style:text-position="super 63.6%"/>
    </style:style>
    <style:style style:family="text" style:name="T134" style:parent-style-name="Car.predefinitoparagrafo">
      <style:text-properties style:country-asian="IT" style:language-asian="it"/>
    </style:style>
    <style:style style:family="text" style:name="T135" style:parent-style-name="Car.predefinitoparagrafo">
      <style:text-properties style:country-asian="IT" style:language-asian="it"/>
    </style:style>
    <style:style style:family="text" style:name="T136" style:parent-style-name="Car.predefinitoparagrafo">
      <style:text-properties style:country-asian="IT" style:language-asian="it" style:text-position="super 63.6%"/>
    </style:style>
    <style:style style:family="text" style:name="T137" style:parent-style-name="Car.predefinitoparagrafo">
      <style:text-properties style:country-asian="IT" style:language-asian="it"/>
    </style:style>
    <style:style style:family="text" style:name="T138" style:parent-style-name="Car.predefinitoparagrafo">
      <style:text-properties style:country-asian="IT" style:language-asian="it"/>
    </style:style>
    <style:style style:family="paragraph" style:name="P139" style:parent-style-name="Nessunaspaziatura">
      <style:text-properties style:country-asian="IT" style:language-asian="it"/>
    </style:style>
    <style:style style:family="table-row" style:name="TableRow140">
      <style:table-row-properties/>
    </style:style>
    <style:style style:family="table-cell" style:name="TableCell14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2" style:parent-style-name="Nessunaspaziatura">
      <style:text-properties style:country-asian="IT" style:language-asian="it"/>
    </style:style>
    <style:style style:family="table-cell" style:name="TableCell14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4" style:parent-style-name="Nessunaspaziatura">
      <style:paragraph-properties fo:text-align="center"/>
    </style:style>
    <style:style style:family="text" style:name="T145" style:parent-style-name="Car.predefinitoparagrafo">
      <style:text-properties style:country-asian="IT" style:language-asian="it"/>
    </style:style>
    <style:style style:family="paragraph" style:name="P146" style:parent-style-name="Nessunaspaziatura">
      <style:paragraph-properties fo:text-align="center"/>
      <style:text-properties style:country-asian="IT" style:language-asian="it"/>
    </style:style>
    <style:style style:family="table-cell" style:name="TableCell14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8" style:parent-style-name="Nessunaspaziatura">
      <style:paragraph-properties fo:text-align="center"/>
    </style:style>
    <style:style style:family="text" style:name="T149" style:parent-style-name="Car.predefinitoparagrafo">
      <style:text-properties style:country-asian="IT" style:language-asian="it"/>
    </style:style>
    <style:style style:family="paragraph" style:name="P150" style:parent-style-name="Nessunaspaziatura">
      <style:paragraph-properties fo:text-align="center"/>
      <style:text-properties style:country-asian="IT" style:language-asian="it"/>
    </style:style>
    <style:style style:family="table-cell" style:name="TableCell15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2" style:parent-style-name="Nessunaspaziatura">
      <style:paragraph-properties fo:text-align="center"/>
    </style:style>
    <style:style style:family="text" style:name="T153" style:parent-style-name="Car.predefinitoparagrafo">
      <style:text-properties style:country-asian="IT" style:language-asian="it"/>
    </style:style>
    <style:style style:family="paragraph" style:name="P154" style:parent-style-name="Nessunaspaziatura">
      <style:paragraph-properties fo:text-align="center"/>
      <style:text-properties style:country-asian="IT" style:language-asian="it"/>
    </style:style>
    <style:style style:family="table-row" style:name="TableRow155">
      <style:table-row-properties/>
    </style:style>
    <style:style style:family="table-cell" style:name="TableCell15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7" style:parent-style-name="Nessunaspaziatura">
      <style:text-properties style:country-asian="IT" style:language-asian="it"/>
    </style:style>
    <style:style style:family="table-cell" style:name="TableCell15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9" style:parent-style-name="Nessunaspaziatura">
      <style:text-properties style:country-asian="IT" style:language-asian="it"/>
    </style:style>
    <style:style style:family="table-row" style:name="TableRow160">
      <style:table-row-properties style:min-row-height="0.2437in"/>
    </style:style>
    <style:style style:family="table-cell" style:name="TableCell16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62" style:parent-style-name="Citazione">
      <style:paragraph-properties fo:margin-bottom="0.0694in" fo:margin-top="0.0694in" fo:text-align="center"/>
    </style:style>
    <style:style style:family="text" style:name="T163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164">
      <style:table-row-properties style:min-row-height="0.2437in"/>
    </style:style>
    <style:style style:family="table-cell" style:name="TableCell16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66" style:parent-style-name="Citazione">
      <style:paragraph-properties fo:margin-bottom="0.0694in" fo:margin-top="0.0694in" fo:text-align="center"/>
    </style:style>
    <style:style style:family="text" style:name="T167" style:parent-style-name="Car.predefinitoparagrafo">
      <style:text-properties fo:font-style="normal" fo:font-weight="bold" style:font-style-asian="normal" style:font-weight-asian="bold"/>
    </style:style>
    <style:style style:family="table-row" style:name="TableRow168">
      <style:table-row-properties style:min-row-height="0.6694in"/>
    </style:style>
    <style:style style:family="table-cell" style:name="TableCell16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0" style:parent-style-name="Normale">
      <style:paragraph-properties fo:line-height="100%" fo:margin-bottom="0in" fo:text-align="justify" style:text-autospace="none"/>
      <style:text-properties fo:color="#000000" style:country-asian="IT" style:font-name="Arial" style:font-name-complex="Arial" style:font-size-complex="10pt" style:language-asian="it"/>
    </style:style>
    <style:style style:family="paragraph" style:name="P171" style:parent-style-name="Normale">
      <style:paragraph-properties fo:line-height="100%" fo:margin-bottom="0in" fo:text-align="justify" style:text-autospace="none"/>
      <style:text-properties fo:color="#000000" fo:font-size="10pt" style:country-asian="IT" style:font-name="Arial" style:font-name-complex="Arial" style:font-size-asian="10pt" style:font-size-complex="10pt" style:language-asian="it"/>
    </style:style>
    <style:style style:family="table-row" style:name="TableRow172">
      <style:table-row-properties style:min-row-height="0.2451in"/>
    </style:style>
    <style:style style:family="table-cell" style:name="TableCell17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4" style:parent-style-name="Normale">
      <style:paragraph-properties fo:margin-left="-0.0368in" fo:margin-right="-0.0534in" fo:text-align="center" style:text-autospace="none">
        <style:tab-stops/>
      </style:paragraph-properties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7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6" style:parent-style-name="Normale">
      <style:paragraph-properties fo:line-height="100%" fo:margin-bottom="0in" fo:text-align="center" style:text-autospace="none"/>
    </style:style>
    <style:style style:family="text" style:name="T177" style:parent-style-name="Car.predefinitoparagrafo">
      <style:text-properties fo:color="#000000" fo:font-size="10pt" fo:font-weight="bold" style:country-asian="IT" style:font-name="Arial" style:font-name-complex="Arial" style:font-size-asian="10pt" style:font-size-complex="10pt" style:font-weight-asian="bold" style:font-weight-complex="bold" style:language-asian="it"/>
    </style:style>
    <style:style style:family="table-cell" style:name="TableCell17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9" style:parent-style-name="Normale">
      <style:paragraph-properties fo:line-height="100%" fo:margin-bottom="0in" fo:text-align="center" style:text-autospace="none"/>
    </style:style>
    <style:style style:family="text" style:name="T180" style:parent-style-name="Car.predefinitoparagrafo">
      <style:text-properties fo:color="#000000" fo:font-size="10pt" fo:font-weight="bold" style:country-asian="IT" style:font-name="Arial" style:font-name-complex="Arial" style:font-size-asian="10pt" style:font-size-complex="10pt" style:font-weight-asian="bold" style:font-weight-complex="bold" style:language-asian="it"/>
    </style:style>
    <style:style style:family="table-row" style:name="TableRow181">
      <style:table-row-properties style:min-row-height="0.2791in"/>
    </style:style>
    <style:style style:family="paragraph" style:name="P182" style:parent-style-name="Normale">
      <style:paragraph-properties fo:line-height="100%" fo:margin-bottom="0in" fo:margin-left="-0.0368in" fo:margin-right="-0.0534in" fo:text-align="center" style:text-autospace="none">
        <style:tab-stops/>
      </style:paragraph-properties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8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4" style:parent-style-name="Normale">
      <style:paragraph-properties fo:line-height="100%" fo:margin-bottom="0in" fo:text-align="center" style:text-autospace="none"/>
    </style:style>
    <style:style style:family="text" style:name="T185" style:parent-style-name="Car.predefinitoparagrafo">
      <style:text-properties fo:color="#000000" fo:font-size="8pt" fo:font-weight="bold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8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7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8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9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9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1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92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3" style:parent-style-name="Normale">
      <style:paragraph-properties fo:line-height="100%" fo:margin-bottom="0in" fo:text-align="center" style:text-autospace="none"/>
    </style:style>
    <style:style style:family="text" style:name="T194" style:parent-style-name="Car.predefinitoparagrafo">
      <style:text-properties fo:color="#000000" fo:font-size="8pt" fo:font-weight="bold" fo:text-transform="uppercase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9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9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8" style:parent-style-name="Normale">
      <style:paragraph-properties fo:line-height="100%" fo:margin-bottom="0in" fo:text-align="center" style:text-autospace="none"/>
    </style:style>
    <style:style style:family="text" style:name="T199" style:parent-style-name="Car.predefinitoparagrafo">
      <style:text-properties fo:color="#000000" fo:font-size="8pt" fo:font-weight="bold" fo:text-transform="uppercase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20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1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02">
      <style:table-row-properties/>
    </style:style>
    <style:style style:family="table-cell" style:name="TableCell20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 Black" style:font-name-complex="Arial Black" style:font-size-asian="8pt" style:font-size-complex="10pt" style:font-weight-asian="bold" style:font-weight-complex="bold" style:language-asian="it"/>
    </style:style>
    <style:style style:family="table-cell" style:name="TableCell20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0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0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2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21">
      <style:table-row-properties/>
    </style:style>
    <style:style style:family="table-cell" style:name="TableCell222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3" style:parent-style-name="Normale">
      <style:paragraph-properties fo:line-height="100%" fo:margin-bottom="0in" fo:text-align="center" style:text-autospace="none"/>
    </style:style>
    <style:style style:family="text" style:name="T224" style:parent-style-name="Car.predefinitoparagrafo">
      <style:text-properties fo:color="#000000" fo:font-size="8pt" fo:font-weight="bold" style:country-asian="IT" style:font-name="Arial Black" style:font-name-complex="Arial Black" style:font-size-asian="8pt" style:font-size-complex="10pt" style:font-weight-asian="bold" style:font-weight-complex="bold" style:language-asian="it"/>
    </style:style>
    <style:style style:family="table-cell" style:name="TableCell22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6" style:parent-style-name="Normale">
      <style:paragraph-properties fo:line-height="100%" fo:margin-bottom="0in" fo:text-align="center" style:text-autospace="none"/>
    </style:style>
    <style:style style:family="text" style:name="T227" style:parent-style-name="Car.predefinitoparagrafo"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2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9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1" style:parent-style-name="Normale">
      <style:paragraph-properties fo:line-height="100%" fo:margin-bottom="0in" fo:text-align="center" style:text-autospace="none"/>
    </style:style>
    <style:style style:family="text" style:name="T232" style:parent-style-name="Car.predefinitoparagrafo"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3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3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4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2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43">
      <style:table-row-properties/>
    </style:style>
    <style:style style:family="table-cell" style:name="TableCell244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5" style:parent-style-name="Normale">
      <style:paragraph-properties fo:line-height="100%" fo:margin-bottom="0in" fo:text-align="center" style:text-autospace="none"/>
      <style:text-properties fo:font-size="8pt" fo:font-weight="bold" style:font-size-asian="8pt" style:font-weight-asian="bold"/>
    </style:style>
    <style:style style:family="table-row" style:name="TableRow246">
      <style:table-row-properties/>
    </style:style>
    <style:style style:family="table-cell" style:name="TableCell24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8" style:parent-style-name="Normale">
      <style:paragraph-properties fo:line-height="100%" fo:margin-bottom="0in" fo:text-align="center" style:text-autospace="none"/>
    </style:style>
    <style:style style:family="text" style:name="T249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250">
      <style:table-row-properties/>
    </style:style>
    <style:style style:family="table-cell" style:name="TableCell25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52" style:parent-style-name="Normale">
      <style:paragraph-properties fo:line-height="100%" fo:margin-bottom="0in" fo:text-align="justify" style:text-autospace="none"/>
    </style:style>
    <style:style style:family="text" style:name="T253" style:parent-style-name="Car.predefinitoparagrafo">
      <style:text-properties fo:color="#000000" style:country-asian="IT" style:font-name="Arial" style:font-name-complex="Arial" style:font-size-complex="10pt" style:language-asian="it"/>
    </style:style>
    <style:style style:family="text" style:name="T254" style:parent-style-name="Car.predefinitoparagrafo">
      <style:text-properties fo:color="#000000" style:country-asian="IT" style:font-name="Arial" style:font-name-complex="Arial" style:font-size-complex="10pt" style:language-asian="it"/>
    </style:style>
    <style:style style:family="text" style:name="T255" style:parent-style-name="Car.predefinitoparagrafo">
      <style:text-properties fo:color="#000000" style:font-name="Arial" style:font-name-complex="Arial" style:font-size-complex="10pt"/>
    </style:style>
    <style:style style:family="paragraph" style:name="P25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graphic" style:name="a6" style:parent-style-name="Graphics">
      <style:graphic-properties fo:background-color="transparent" fo:border="0.01042in none" fo:clip="rect(0in, 0in, 0in, 0in)"/>
    </style:style>
    <style:style style:family="graphic" style:name="a4" style:parent-style-name="Graphics">
      <style:graphic-properties fo:background-color="transparent" fo:border="0.01042in none" fo:clip="rect(0in, 0in, 0in, 0in)"/>
    </style:style>
    <style:style style:family="graphic" style:name="a5" style:parent-style-name="Graphics">
      <style:graphic-properties fo:background-color="transparent" fo:border="0.01042in none" fo:clip="rect(0in, 0in, 0in, 0in)"/>
    </style:style>
  </office:automatic-styles>
  <office:body>
    <office:text text:use-soft-page-breaks="true">
      <text:p text:style-name="P1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number-columns-spanned="12" table:style-name="TableCell69">
            <text:p text:style-name="P70"><text:bookmark-start text:name="OLE_LINK1"/><text:bookmark-start text:name="OLE_LINK2"/><text:span text:style-name="T71">DESCRIPTION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2">
          <table:table-cell table:number-columns-spanned="12" table:style-name="TableCell73">
            <text:p text:style-name="P74">Tuyau respirant pour les intérieurs, caractérisé par une bonne puissance de recouvrement et un bon point blanc. Facile à appliquer, il a un bon brossage à utiliser également dans le rouleau et un bon rendement.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number-columns-spanned="12" table:style-name="TableCell76">
            <text:p text:style-name="P77">CARACTÉRISTIQU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">
          <table:table-cell table:number-columns-spanned="4" table:style-name="TableCell79">
            <text:p text:style-name="Nessunaspaziatura"><text:span text:style-name="T80">PARTICIPATION</text:span></text:p>
          </table:table-cell>
          <table:covered-table-cell/>
          <table:covered-table-cell/>
          <table:covered-table-cell/>
          <table:table-cell table:number-columns-spanned="8" table:style-name="TableCell81">
            <text:p text:style-name="Nessunaspaziatura"><text:span text:style-name="T82">Opaqu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number-columns-spanned="4" table:style-name="TableCell84">
            <text:p text:style-name="Nessunaspaziatura"><text:span text:style-name="T85">ESPÈCE</text:span></text:p>
          </table:table-cell>
          <table:covered-table-cell/>
          <table:covered-table-cell/>
          <table:covered-table-cell/>
          <table:table-cell table:number-columns-spanned="8" table:style-name="TableCell86">
            <text:p text:style-name="Nessunaspaziatura"><text:span text:style-name="T87">TYRKYS: 1,54 Kg/l ± 0,05 à 20 °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number-columns-spanned="4" table:style-name="TableCell89">
            <text:p text:style-name="Nessunaspaziatura"><text:span text:style-name="T90">RÉSIDUS SECCO</text:span></text:p>
          </table:table-cell>
          <table:covered-table-cell/>
          <table:covered-table-cell/>
          <table:covered-table-cell/>
          <table:table-cell table:number-columns-spanned="8" table:style-name="TableCell91">
            <text:p text:style-name="Nessunaspaziatura"><text:span text:style-name="T92">57<text:s/></text:span><text:span text:style-name="T93">± 0,5 % p/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number-columns-spanned="4" table:style-name="TableCell95">
            <text:p text:style-name="Nessunaspaziatura"><text:span text:style-name="T96">RESISTANCE DU TRAVAIL</text:span></text:p>
          </table:table-cell>
          <table:covered-table-cell/>
          <table:covered-table-cell/>
          <table:covered-table-cell/>
          <table:table-cell table:number-columns-spanned="8" table:style-name="TableCell97">
            <text:p text:style-name="Nessunaspaziatura"><text:span text:style-name="T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table-cell table:number-columns-spanned="4" table:style-name="TableCell100">
            <text:p text:style-name="Nessunaspaziatura"><text:span text:style-name="T101">PERMEBILITÉ À LA VALEUR ACQUELLE</text:span></text:p>
          </table:table-cell>
          <table:covered-table-cell/>
          <table:covered-table-cell/>
          <table:covered-table-cell/>
          <table:table-cell table:number-columns-spanned="8" table:style-name="TableCell102">
            <text:p text:style-name="Nessunaspaziatura"><text:span text:style-name="T103">Ha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">
          <table:table-cell table:number-columns-spanned="4" table:style-name="TableCell105">
            <text:p text:style-name="Nessunaspaziatura"><text:span text:style-name="T106"/></text:p>
          </table:table-cell>
          <table:covered-table-cell/>
          <table:covered-table-cell/>
          <table:covered-table-cell/>
          <table:table-cell table:number-columns-spanned="8" table:style-name="TableCell107">
            <text:p text:style-name="Nessunaspaziatura"><text:span text:style-name="T108">Fai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">
          <table:table-cell table:number-columns-spanned="4" table:style-name="TableCell110">
            <text:p text:style-name="Nessunaspaziatura"><text:span text:style-name="T111">COULEUR</text:span></text:p>
          </table:table-cell>
          <table:covered-table-cell/>
          <table:covered-table-cell/>
          <table:covered-table-cell/>
          <table:table-cell table:number-columns-spanned="8" table:style-name="TableCell112">
            <text:p text:style-name="Nessunaspaziatura"><text:span text:style-name="T113">Blanc (couleur avec colorants)<text:s/></text:span><text:span text:style-name="T114">Universe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number-columns-spanned="4" table:style-name="TableCell116">
            <text:p text:style-name="P117">DÉPENSES</text:p>
            <text:p text:style-name="P118">(données relatives à 20°C et 65% des U.R.)</text:p>
          </table:table-cell>
          <table:covered-table-cell/>
          <table:covered-table-cell/>
          <table:covered-table-cell/>
          <table:table-cell table:number-columns-spanned="8" table:style-name="TableCell119">
            <text:p text:style-name="P120">pour couvrir: 6 heures</text:p>
            <text:p text:style-name="P121">terminée : 48 he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2">
          <table:table-cell table:number-columns-spanned="4" table:style-name="TableCell123">
            <text:p text:style-name="P124">RECHERCHE PRATIQUE</text:p>
          </table:table-cell>
          <table:covered-table-cell/>
          <table:covered-table-cell/>
          <table:covered-table-cell/>
          <table:table-cell table:number-columns-spanned="8" table:style-name="TableCell125">
            <text:p text:style-name="P126">9-11 m2/L par main</text:p>
            <text:p text:style-name="P127">selon absorption du sup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">
          <table:table-cell table:number-columns-spanned="4" table:style-name="TableCell129">
            <text:p text:style-name="P130">DÉCLARATION</text:p>
          </table:table-cell>
          <table:covered-table-cell/>
          <table:covered-table-cell/>
          <table:covered-table-cell/>
          <table:table-cell table:number-columns-spanned="8" table:style-name="TableCell131">
            <text:p text:style-name="Nessunaspaziatura"><text:span text:style-name="T132">1</text:span><text:span text:style-name="T133">a<text:s/></text:span><text:span text:style-name="T134">main: ajouter 35% d'eau potable</text:span></text:p>
            <text:p text:style-name="Nessunaspaziatura"><text:span text:style-name="T135">2</text:span><text:span text:style-name="T136">a</text:span><text:span text:style-name="T137"><text:s/>Main :<text:s/></text:span><text:span text:style-name="T138">ajouter 30 % d'eau potable</text:span></text:p>
            <text:p text:style-name="P139">Spray airless : ajouter entre 30% et 40% d'eau potable. Buses suggérées: LP419–LP519–LP619– LP421 – LP52 1 – LP6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0">
          <table:table-cell table:number-columns-spanned="4" table:style-name="TableCell141">
            <text:p text:style-name="P142">ÉQUIPEMENT</text:p>
          </table:table-cell>
          <table:covered-table-cell/>
          <table:covered-table-cell/>
          <table:covered-table-cell/>
          <table:table-cell table:number-columns-spanned="3" table:style-name="TableCell143">
            <text:p text:style-name="P144"><text:span text:style-name="T145"><draw:frame draw:name="Immagine 4" draw:style-name="a4" style:rel-height="scale" style:rel-width="scale" svg:height="0.30208in" svg:width="0.30208in" svg:x="0in" svg:y="0in" text:anchor-type="as-char"><draw:image xlink:actuate="onLoad" xlink:href="media/image3.png" xlink:show="embed" xlink:type="simple"/><svg:title/><svg:desc/></draw:frame></text:span></text:p>
            <text:p text:style-name="P146">brosse</text:p>
          </table:table-cell>
          <table:covered-table-cell/>
          <table:covered-table-cell/>
          <table:table-cell table:number-columns-spanned="3" table:style-name="TableCell147">
            <text:p text:style-name="P148"><text:span text:style-name="T149"><draw:frame draw:name="Immagine 3" draw:style-name="a5" style:rel-height="scale" style:rel-width="scale" svg:height="0.30208in" svg:width="0.30208in" svg:x="0in" svg:y="0in" text:anchor-type="as-char"><draw:image xlink:actuate="onLoad" xlink:href="media/image4.png" xlink:show="embed" xlink:type="simple"/><svg:title/><svg:desc/></draw:frame></text:span></text:p>
            <text:p text:style-name="P150">Rouleaux</text:p>
          </table:table-cell>
          <table:covered-table-cell/>
          <table:covered-table-cell/>
          <table:table-cell table:number-columns-spanned="2" table:style-name="TableCell151">
            <text:p text:style-name="P152"><text:span text:style-name="T153"><draw:frame draw:name="Immagine 3" draw:style-name="a6" style:rel-height="scale" style:rel-width="scale" svg:height="0.30208in" svg:width="0.30208in" svg:x="0in" svg:y="0in" text:anchor-type="as-char"><draw:image xlink:actuate="onLoad" xlink:href="media/image5.png" xlink:show="embed" xlink:type="simple"/><svg:title/><svg:desc/></draw:frame></text:span></text:p>
            <text:p text:style-name="P154">pulvérisation</text:p>
          </table:table-cell>
          <table:covered-table-cell/>
        </table:table-row>
        <table:table-row table:style-name="TableRow155">
          <table:table-cell table:number-columns-spanned="4" table:style-name="TableCell156">
            <text:p text:style-name="P157">SOUTIEN</text:p>
          </table:table-cell>
          <table:covered-table-cell/>
          <table:covered-table-cell/>
          <table:covered-table-cell/>
          <table:table-cell table:number-columns-spanned="8" table:style-name="TableCell158">
            <text:p text:style-name="P159">plâtre civil, plâtre,<text:s/>Fibrociment, murs plâtr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">
          <table:table-cell table:number-columns-spanned="12" table:style-name="TableCell161">
            <text:p text:style-name="P162"><text:span text:style-name="T163">DEMAND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4">
          <table:table-cell table:number-columns-spanned="12" table:style-name="TableCell165">
            <text:p text:style-name="P166"><text:span text:style-name="T167">PRÉPARATION DU SOUTIE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8">
          <table:table-cell table:number-columns-spanned="12" table:style-name="TableCell169">
            <text:p text:style-name="P170">Le support doit être sain, sec, propre et cohérent, exempt de taches d'humidité, de traces de saleté, de graisse, de moisissure, etc. Peintures anciennes incohérentes ou florissantes<text:s/>doivent être enlevés par brossage ou ponçage de la surface. Les imperfections, les fractions, les folioles, doivent être éliminées et le stuc doit être convenablement stupéfié.</text:p>
            <text:p text:style-name="P1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2">
          <table:table-cell table:number-rows-spanned="2" table:style-name="TableCell173">
            <text:p text:style-name="P174"/>
          </table:table-cell>
          <table:table-cell table:number-columns-spanned="5" table:style-name="TableCell175">
            <text:p text:style-name="P176"><text:span text:style-name="T177">NOUVEAUX APPUIS</text:span></text:p>
          </table:table-cell>
          <table:covered-table-cell/>
          <table:covered-table-cell/>
          <table:covered-table-cell/>
          <table:covered-table-cell/>
          <table:table-cell table:number-columns-spanned="6" table:style-name="TableCell178">
            <text:p text:style-name="P179"><text:span text:style-name="T180">SOUTI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1">
          <table:covered-table-cell>
            <text:p text:style-name="P182"/>
          </table:covered-table-cell>
          <table:table-cell table:style-name="TableCell183">
            <text:p text:style-name="P184"><text:span text:style-name="T185"/></text:p>
          </table:table-cell>
          <table:table-cell table:style-name="TableCell186">
            <text:p text:style-name="P187">NOMBRE</text:p>
          </table:table-cell>
          <table:table-cell table:number-columns-spanned="2" table:style-name="TableCell188">
            <text:p text:style-name="P189">CARTONGÉ<text:s/></text:p>
          </table:table-cell>
          <table:covered-table-cell/>
          <table:table-cell table:style-name="TableCell190">
            <text:p text:style-name="P191">NOMBRE</text:p>
          </table:table-cell>
          <table:table-cell table:number-columns-spanned="2" table:style-name="TableCell192">
            <text:p text:style-name="P193"><text:span text:style-name="T194">respirant ou engourdissant</text:span></text:p>
          </table:table-cell>
          <table:covered-table-cell/>
          <table:table-cell table:style-name="TableCell195">
            <text:p text:style-name="P196">NOMBRE</text:p>
          </table:table-cell>
          <table:table-cell table:number-columns-spanned="2" table:style-name="TableCell197">
            <text:p text:style-name="P198"><text:span text:style-name="T199">Lavable bien ancré</text:span></text:p>
          </table:table-cell>
          <table:covered-table-cell/>
          <table:table-cell table:style-name="TableCell200">
            <text:p text:style-name="P201">NOMBRE</text:p>
          </table:table-cell>
        </table:table-row>
        <table:table-row table:style-name="TableRow202">
          <table:table-cell table:style-name="TableCell203">
            <text:p text:style-name="P204">FEMMES</text:p>
          </table:table-cell>
          <table:table-cell table:style-name="TableCell205">
            <text:p text:style-name="P206">JANTAR</text:p>
          </table:table-cell>
          <table:table-cell table:style-name="TableCell207">
            <text:p text:style-name="P208">1</text:p>
          </table:table-cell>
          <table:table-cell table:number-columns-spanned="2" table:style-name="TableCell209">
            <text:p text:style-name="P210">REFON</text:p>
          </table:table-cell>
          <table:covered-table-cell/>
          <table:table-cell table:style-name="TableCell211">
            <text:p text:style-name="P212">1</text:p>
          </table:table-cell>
          <table:table-cell table:number-columns-spanned="2" table:style-name="TableCell213">
            <text:p text:style-name="P214">JANTAR</text:p>
          </table:table-cell>
          <table:covered-table-cell/>
          <table:table-cell table:style-name="TableCell215">
            <text:p text:style-name="P216">1</text:p>
          </table:table-cell>
          <table:table-cell table:number-columns-spanned="2" table:style-name="TableCell217">
            <text:p text:style-name="P218"/>
          </table:table-cell>
          <table:covered-table-cell/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<text:span text:style-name="T224">FINANCEMENT</text:span></text:p>
          </table:table-cell>
          <table:table-cell table:style-name="TableCell225">
            <text:p text:style-name="P226"><text:span text:style-name="T227">TYRKYS</text:span></text:p>
          </table:table-cell>
          <table:table-cell table:style-name="TableCell228">
            <text:p text:style-name="P229">2</text:p>
          </table:table-cell>
          <table:table-cell table:number-columns-spanned="2" table:style-name="TableCell230">
            <text:p text:style-name="P231"><text:span text:style-name="T232">TYRKYS</text:span></text:p>
          </table:table-cell>
          <table:covered-table-cell/>
          <table:table-cell table:style-name="TableCell233">
            <text:p text:style-name="P234">1</text:p>
          </table:table-cell>
          <table:table-cell table:number-columns-spanned="2" table:style-name="TableCell235">
            <text:p text:style-name="P236">TYRKYS</text:p>
          </table:table-cell>
          <table:covered-table-cell/>
          <table:table-cell table:style-name="TableCell237">
            <text:p text:style-name="P238">2</text:p>
          </table:table-cell>
          <table:table-cell table:number-columns-spanned="2" table:style-name="TableCell239">
            <text:p text:style-name="P240">TYRKYS</text:p>
          </table:table-cell>
          <table:covered-table-cell/>
          <table:table-cell table:style-name="TableCell241">
            <text:p text:style-name="P242">2</text:p>
          </table:table-cell>
        </table:table-row>
        <table:table-row table:style-name="TableRow243">
          <table:table-cell table:number-columns-spanned="12" table:style-name="TableCell244">
            <text:p text:style-name="P2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6">
          <table:table-cell table:number-columns-spanned="12" table:style-name="TableCell247">
            <text:p text:style-name="P248"><text:span text:style-name="T249">AVIS GÉNÉR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0">
          <table:table-cell table:number-columns-spanned="12" table:style-name="TableCell251">
            <text:p text:style-name="P252"><text:span text:style-name="T253">Ne pas modifier les propriétés respirantes typiques du produit,<text:s/></text:span><text:span text:style-name="T254">la quantité de couleur de base ne doit pas dépasser 20%. Conserver le produit frais et préserver du gel. N</text:span><text:span text:style-name="T255">sur appliquer le produit avec des températures inférieures à 5 ° ou supérieures à 30 ° centigrade, avec une humidité relative supérieure à 85% ou sur les parois exposées au vent ou au soleil.</text:span></text:p>
            <text:p text:style-name="P2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bookmark-end text:name="OLE_LINK1"/><text:bookmark-end text:name="OLE_LINK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e" style:display-name="Normale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Car.predefinitoparagrafo" style:display-name="Car. predefinito paragrafo" style:family="text"/>
    <style:style style:name="Testofumetto" style:display-name="Testo fumetto" style:family="paragraph" style:parent-style-name="Normale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>
      <style:text-properties style:font-name="Tahoma" style:font-name-complex="Tahoma" fo:font-size="8pt" style:font-size-asian="8pt" style:font-size-complex="8pt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olo1Carattere" style:display-name="Titolo 1 Carattere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Nessunaspaziatura" style:display-name="Nessuna spaziatura" style:family="paragraph">
      <style:text-properties fo:font-size="11pt" style:font-size-asian="11pt" style:font-size-complex="11pt" style:language-asian="en" style:country-asian="US" fo:hyphenate="false"/>
    </style:style>
    <style:style style:name="Titolo2Carattere" style:display-name="Titolo 2 Carattere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en" style:country-asian="US"/>
    </style:style>
    <style:style style:name="NormaleWeb" style:display-name="Normale (Web)" style:family="paragraph" style:parent-style-name="Normale">
      <style:paragraph-properties fo:margin-top="0.0694in" fo:margin-bottom="0.0826in" fo:line-height="100%"/>
      <style:text-properties style:font-name="Times New Roman" style:font-name-asian="Times New Roman" fo:font-size="12pt" style:font-size-asian="12pt" style:font-size-complex="12pt" style:language-asian="it" style:country-asian="IT" fo:hyphenate="false"/>
    </style:style>
    <style:style style:name="Citazione" style:display-name="Citazione" style:family="paragraph" style:parent-style-name="Normale" style:next-style-name="Normale">
      <style:text-properties fo:font-style="italic" style:font-style-asian="italic" style:font-style-complex="italic" fo:color="#000000" fo:hyphenate="false"/>
    </style:style>
    <style:style style:name="CitazioneCarattere" style:display-name="Citazione Carattere" style:family="text">
      <style:text-properties fo:font-style="italic" style:font-style-asian="italic" style:font-style-complex="italic" fo:color="#000000" fo:font-size="11pt" style:font-size-asian="11pt" style:font-size-complex="11pt" style:language-asian="en" style:country-asian="US"/>
    </style:style>
    <style:style style:name="apple-style-span" style:display-name="apple-style-span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7875in" fo:margin-bottom="0.0854in" fo:margin-right="0.5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645in"/>
      </style:header-style>
      <style:footer-style>
        <style:header-footer-properties style:dynamic-spacing="true" fo:min-height="0.5055in"/>
      </style:footer-style>
    </style:page-layout>
    <style:style style:name="TableColumn3" style:family="table-column">
      <style:table-column-properties style:column-width="1.477in" style:use-optimal-column-width="false"/>
    </style:style>
    <style:style style:name="TableColumn4" style:family="table-column">
      <style:table-column-properties style:column-width="4.109in" style:use-optimal-column-width="false"/>
    </style:style>
    <style:style style:name="TableColumn5" style:family="table-column">
      <style:table-column-properties style:column-width="1.6006in" style:use-optimal-column-width="false"/>
    </style:style>
    <style:style style:name="Table2" style:family="table">
      <style:table-properties style:width="7.1868in" fo:margin-left="-0.1222in" table:align="left"/>
    </style:style>
    <style:style style:name="TableRow6" style:family="table-row">
      <style:table-row-properties style:min-row-height="0.1861in" style:use-optimal-row-height="false"/>
    </style:style>
    <style:style style:name="TableCell7" style:family="table-cell">
      <style:table-cell-properties fo:border="0.0069in solid #FFFFFF" style:writing-mode="lr-tb" fo:padding-top="0in" fo:padding-left="0.075in" fo:padding-bottom="0in" fo:padding-right="0.075in"/>
    </style:style>
    <style:style style:name="P8" style:parent-style-name="Intestazione" style:family="paragraph">
      <style:paragraph-properties>
        <style:tab-stops>
          <style:tab-stop style:type="center" style:position="2.7562in"/>
          <style:tab-stop style:type="right" style:position="3.5437in"/>
        </style:tab-stops>
      </style:paragraph-properties>
      <style:text-properties fo:font-size="1pt" style:font-size-asian="1pt"/>
    </style:style>
    <style:style style:name="P9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</style:style>
    <style:style style:name="P10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  <style:text-properties fo:color="#808080" fo:font-size="7pt" style:font-size-asian="7pt" style:font-size-complex="7pt"/>
    </style:style>
    <style:style style:name="P11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  <style:text-properties fo:color="#808080" fo:font-size="7pt" style:font-size-asian="7pt" style:font-size-complex="7pt"/>
    </style:style>
    <style:style style:name="P12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</style:style>
    <style:style style:name="T13" style:parent-style-name="Car.predefinitoparagrafo" style:family="text">
      <style:text-properties fo:color="#808080" fo:font-size="7pt" style:font-size-asian="7pt" style:font-size-complex="7pt"/>
    </style:style>
    <style:style style:name="TableCell14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15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3.5437in"/>
        </style:tab-stops>
      </style:paragraph-properties>
      <style:text-properties fo:font-weight="bold" style:font-weight-asian="bold" style:language-asian="it" style:country-asian="IT"/>
    </style:style>
    <style:style style:name="TableCell16" style:family="table-cell">
      <style:table-cell-properties fo:border="0.0069in solid #FFFFFF" style:writing-mode="lr-tb" fo:padding-top="0in" fo:padding-left="0.075in" fo:padding-bottom="0in" fo:padding-right="0.075in"/>
    </style:style>
    <style:style style:name="P17" style:parent-style-name="Normale" style:family="paragraph">
      <style:paragraph-properties fo:text-align="center"/>
    </style:style>
    <style:style style:name="T18" style:parent-style-name="Car.predefinitoparagrafo" style:family="text">
      <style:text-properties style:language-asian="it" style:country-asian="IT"/>
    </style:style>
    <style:style style:name="TableRow19" style:family="table-row">
      <style:table-row-properties style:min-row-height="0.6847in" style:use-optimal-row-height="false"/>
    </style:style>
    <style:style style:name="P20" style:parent-style-name="Intestazione" style:family="paragraph">
      <style:paragraph-properties>
        <style:tab-stops>
          <style:tab-stop style:type="center" style:position="2.7562in"/>
          <style:tab-stop style:type="right" style:position="6.693in"/>
        </style:tab-stops>
      </style:paragraph-properties>
      <style:text-properties style:language-asian="it" style:country-asian="IT"/>
    </style:style>
    <style:style style:name="TableCell21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22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42pt" style:font-size-asian="42pt" style:font-size-complex="42pt" style:language-asian="it" style:country-asian="IT"/>
    </style:style>
    <style:style style:name="P23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42pt" style:font-size-asian="42pt" style:font-size-complex="42pt" style:language-asian="it" style:country-asian="IT"/>
    </style:style>
    <style:style style:name="TableRow24" style:family="table-row">
      <style:table-row-properties style:min-row-height="0.1631in" style:use-optimal-row-height="false"/>
    </style:style>
    <style:style style:name="P25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size="8pt" style:font-size-asian="8pt" style:font-size-complex="8pt" style:language-asian="it" style:country-asian="IT"/>
    </style:style>
    <style:style style:name="TableCell26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27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8pt" style:font-size-asian="8pt" style:font-size-complex="8pt" style:language-asian="it" style:country-asian="IT"/>
    </style:style>
    <style:style style:name="P28" style:parent-style-name="Intestazione" style:family="paragraph">
      <style:paragraph-properties fo:text-align="justify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8pt" style:font-size-asian="8pt" style:font-size-complex="8pt" style:language-asian="it" style:country-asian="IT"/>
    </style:style>
    <style:style style:name="T29" style:parent-style-name="Car.predefinitoparagrafo" style:family="text">
      <style:text-properties style:language-asian="it" style:country-asian="IT"/>
    </style:style>
    <style:style style:name="TableColumn31" style:family="table-column">
      <style:table-column-properties style:column-width="2.0437in"/>
    </style:style>
    <style:style style:name="TableColumn32" style:family="table-column">
      <style:table-column-properties style:column-width="1.3312in"/>
    </style:style>
    <style:style style:name="TableColumn33" style:family="table-column">
      <style:table-column-properties style:column-width="2.0673in"/>
    </style:style>
    <style:style style:name="TableColumn34" style:family="table-column">
      <style:table-column-properties style:column-width="1.6944in"/>
    </style:style>
    <style:style style:name="Table30" style:family="table">
      <style:table-properties style:width="7.1368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" style:parent-style-name="Pièdipagina" style:family="paragraph">
      <style:paragraph-properties fo:text-align="center"/>
    </style:style>
    <style:style style:name="T38" style:parent-style-name="Car.predefinitoparagrafo" style:family="text">
      <style:text-properties fo:font-size="9pt" style:font-size-asian="9pt" style:language-asian="it" style:country-asian="IT"/>
    </style:style>
    <style:style style:name="T39" style:parent-style-name="Car.predefinitoparagrafo" style:family="text">
      <style:text-properties style:font-name="Tahoma" style:font-name-complex="Tahoma" fo:font-weight="bold" style:font-weight-asian="bold" style:font-weight-complex="bold" fo:color="#000000" fo:font-size="8pt" style:font-size-asian="8pt" style:font-size-complex="10pt" fo:language="en" fo:country="US"/>
    </style:style>
    <style:style style:name="TableCell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" style:parent-style-name="Pièdipagina" style:family="paragraph">
      <style:text-properties fo:font-size="8pt" style:font-size-asian="8pt" style:font-size-complex="8pt" fo:language="en" fo:country="US"/>
    </style:style>
    <style:style style:name="TableRow42" style:family="table-row">
      <style:table-row-properties/>
    </style:style>
    <style:style style:name="P43" style:parent-style-name="Pièdipagina" style:family="paragraph">
      <style:paragraph-properties fo:text-align="center"/>
      <style:text-properties fo:language="en" fo:country="US"/>
    </style:style>
    <style:style style:name="TableCell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" style:parent-style-name="Pièdipagina" style:family="paragraph">
      <style:paragraph-properties fo:text-align="center"/>
    </style:style>
    <style:style style:name="T46" style:parent-style-name="Car.predefinitoparagrafo" style:family="text">
      <style:text-properties fo:font-size="8pt" style:font-size-asian="8pt" style:font-size-complex="8pt"/>
    </style:style>
    <style:style style:name="T47" style:parent-style-name="Car.predefinitoparagrafo" style:family="text">
      <style:text-properties fo:font-size="8pt" style:font-size-asian="8pt" style:font-size-complex="8pt"/>
    </style:style>
    <style:style style:name="TableCell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" style:parent-style-name="Pièdipagina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1" style:parent-style-name="Pièdipagina" style:family="paragraph">
      <style:paragraph-properties fo:text-align="center"/>
    </style:style>
    <style:style style:name="T52" style:parent-style-name="Car.predefinitoparagrafo" style:family="text">
      <style:text-properties style:font-name="Tahoma" style:font-name-complex="Tahoma" fo:color="#000000" fo:font-size="8pt" style:font-size-asian="8pt" style:font-size-complex="8pt"/>
    </style:style>
    <style:style style:name="P53" style:parent-style-name="Pièdipagina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-0.05556in" draw:shadow-color="#808080" draw:shadow-opacity="50%"/>
    </style:style>
    <style:style style:family="graphic" style:name="a3">
      <style:graphic-properties style:wrap="run-through" style:run-through="foreground" draw:fill="none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0.05556in" draw:shadow-color="#808080" draw:shadow-opacity="5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3">
              <text:p text:style-name="P8"/>
              <text:p text:style-name="P9"><draw:frame draw:style-name="a0" draw:name="Immagine 2" text:anchor-type="as-char" svg:x="0in" svg:y="0in" svg:width="1.29167in" svg:height="0.86458in" style:rel-width="scale" style:rel-height="scale"><draw:image xlink:href="media/image1.jpeg" xlink:type="simple" xlink:show="embed" xlink:actuate="onLoad"/><svg:title/><svg:desc/></draw:frame></text:p>
              <text:p text:style-name="P10">Created 01/02/2011</text:p>
              <text:p text:style-name="P11">Rev. 2 – 12/09/2019</text:p>
              <text:p text:style-name="P12"><text:span text:style-name="T13">Rev. 3 – 06/06/2024</text:span></text:p>
            </table:table-cell>
            <table:table-cell table:style-name="TableCell14">
              <text:p text:style-name="P15">SCHEDA TECNICA DEL PRODOTTO:</text:p>
            </table:table-cell>
            <table:table-cell table:style-name="TableCell16" table:number-rows-spanned="3">
              <text:p text:style-name="P17"><text:span text:style-name="T18"><draw:frame draw:style-name="a1" draw:name="Immagine 1" text:anchor-type="as-char" svg:x="0in" svg:y="0in" svg:width="0.85156in" svg:height="0.98494in" style:rel-width="scale" style:rel-height="scale"><draw:image xlink:href="media/image2.png" xlink:type="simple" xlink:show="embed" xlink:actuate="onLoad"/><svg:title/><svg:desc/></draw:frame></text:span></text:p>
            </table:table-cell>
          </table:table-row>
          <table:table-row table:style-name="TableRow19">
            <table:covered-table-cell>
              <text:p text:style-name="P20"/>
            </table:covered-table-cell>
            <table:table-cell table:style-name="TableCell21">
              <text:p text:style-name="P22">TYRKYS</text:p>
            </table:table-cell>
            <table:covered-table-cell>
              <text:p text:style-name="P23"/>
            </table:covered-table-cell>
          </table:table-row>
          <table:table-row table:style-name="TableRow24">
            <table:covered-table-cell>
              <text:p text:style-name="P25"/>
            </table:covered-table-cell>
            <table:table-cell table:style-name="TableCell26">
              <text:p text:style-name="P27">TYRKYS5 <text:s text:c="21"/>TYRKYS12.5 <text:s text:c="17"/>KGTYRKYS</text:p>
            </table:table-cell>
            <table:covered-table-cell>
              <text:p text:style-name="P28"/>
            </table:covered-table-cell>
          </table:table-row>
        </table:table>
        <text:p text:style-name="Intestazione"><text:span text:style-name="T29"><draw:connector draw:type="line" svg:x1="-0.17014in" svg:y1="0.14722in" svg:x2="6.93542in" svg:y2="0.14722in" draw:z-index="251659264" draw:id="id0" draw:style-name="a2" draw:name="AutoShape 9" text:anchor-type="paragraph"><svg:title/><svg:desc/></draw:connector></text:span></text:p>
      </style:header>
      <style:footer>
        <table:table table:style-name="Table30">
          <table:table-columns>
            <table:table-column table:style-name="TableColumn31"/>
            <table:table-column table:style-name="TableColumn32"/>
            <table:table-column table:style-name="TableColumn33"/>
            <table:table-column table:style-name="TableColumn34"/>
          </table:table-columns>
          <table:table-row table:style-name="TableRow35">
            <table:table-cell table:style-name="TableCell36" table:number-rows-spanned="2">
              <text:p text:style-name="P37"><text:span text:style-name="T38"><draw:connector draw:type="line" svg:x1="-0.22431in" svg:y1="-0.19306in" svg:x2="7.10486in" svg:y2="-0.19306in" draw:z-index="251661312" draw:id="id1" draw:style-name="a3" draw:name="AutoShape 29" text:anchor-type="paragraph"><svg:title/><svg:desc/></draw:connector></text:span><text:span text:style-name="T39">ITALMONT SRL - SOCIO UNICO</text:span></text:p>
            </table:table-cell>
            <table:table-cell table:style-name="TableCell40" table:number-columns-spanned="3">
              <text:p text:style-name="P41">VIA IV NOVEMBRE, 13 63078 PAGLIARE DEL TRONTO –<text:s/>Fraz. Di SPINETOLI</text:p>
            </table:table-cell>
            <table:covered-table-cell/>
            <table:covered-table-cell/>
          </table:table-row>
          <table:table-row table:style-name="TableRow42">
            <table:covered-table-cell>
              <text:p text:style-name="P43"/>
            </table:covered-table-cell>
            <table:table-cell table:style-name="TableCell44">
              <text:p text:style-name="P45"><text:span text:style-name="T46">e-mail:</text:span><text:s/><text:span text:style-name="T47">info@italmont.it</text:span></text:p>
            </table:table-cell>
            <table:table-cell table:style-name="TableCell48">
              <text:p text:style-name="P49">Internet: http://www.italmont.it/</text:p>
            </table:table-cell>
            <table:table-cell table:style-name="TableCell50">
              <text:p text:style-name="P51"><text:span text:style-name="T52">tel.: +39 736 899238</text:span></text:p>
            </table:table-cell>
          </table:table-row>
        </table:table>
        <text:p text:style-name="P5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roberto</meta:initial-creator>
    <dc:creator>Roberto ITA</dc:creator>
    <meta:creation-date>2026-06-09T09:55:00Z</meta:creation-date>
    <dc:date>2026-06-09T09:56:00Z</dc:date>
    <meta:print-date>2014-10-13T20:57:00Z</meta:print-date>
    <meta:template xlink:href="Normal" xlink:type="simple"/>
    <meta:editing-cycles>3</meta:editing-cycles>
    <meta:editing-duration>PT60S</meta:editing-duration>
    <meta:document-statistic meta:page-count="1" meta:paragraph-count="3" meta:word-count="290" meta:character-count="1946" meta:row-count="13" meta:non-whitespace-character-count="1659"/>
  </office:meta>
</office:document-meta>
</file>