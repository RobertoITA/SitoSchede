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aster-page3">
      <style:paragraph-properties style:page-number="auto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d3d3d3"/>
    </style:style>
    <style:style style:name="P6" style:family="paragraph">
      <loext:graphic-properties draw:fill="solid" draw:fill-color="#a8ffff"/>
    </style:style>
    <style:style style:name="T1" style:family="text">
      <style:text-properties fo:color="#000000" loext:opacity="100%" fo:font-family="Arial" fo:font-size="8.05000019073486pt" fo:font-weight="normal" style:font-family-asian="Arial" style:font-size-asian="8.05000019073486pt" style:font-weight-asian="normal" style:font-family-complex="Arial" style:font-size-complex="8.05000019073486pt" style:font-weight-complex="normal"/>
    </style:style>
    <style:style style:name="T2" style:family="text">
      <style:text-properties fo:color="#000000" loext:opacity="100%" fo:font-family="TimesNewRoman" fo:font-size="12pt" fo:font-weight="normal" style:font-family-asian="TimesNewRoman" style:font-size-asian="12pt" style:font-weight-asian="normal" style:font-family-complex="TimesNewRoman" style:font-size-complex="12pt" style:font-weight-complex="normal"/>
    </style:style>
    <style:style style:name="T3" style:family="text">
      <style:text-properties fo:color="#000000" loext:opacity="100%" fo:font-family="Arial" fo:font-size="8.05000019073486pt" fo:font-weight="bold" style:font-family-asian="Arial" style:font-size-asian="8.05000019073486pt" style:font-weight-asian="bold" style:font-family-complex="Arial" style:font-size-complex="8.05000019073486pt" style:font-weight-complex="bold"/>
    </style:style>
    <style:style style:name="T4" style:family="text">
      <style:text-properties fo:color="#000000" loext:opacity="100%" fo:font-family="Arial" fo:font-size="6.94999980926514pt" fo:font-weight="normal" style:font-family-asian="Arial" style:font-size-asian="6.94999980926514pt" style:font-weight-asian="normal" style:font-family-complex="Arial" style:font-size-complex="6.94999980926514pt" style:font-weight-complex="normal"/>
    </style:style>
    <style:style style:name="T5" style:family="text">
      <style:text-properties fo:color="#000000" loext:opacity="100%" fo:font-family="Arial" fo:font-size="6.94999980926514pt" fo:font-weight="bold" style:font-family-asian="Arial" style:font-size-asian="6.94999980926514pt" style:font-weight-asian="bold" style:font-family-complex="Arial" style:font-size-complex="6.94999980926514pt" style:font-weight-complex="bold"/>
    </style:style>
    <style:style style:name="T6" style:family="text">
      <style:text-properties fo:color="#000000" loext:opacity="100%" fo:font-family="Arial" fo:font-size="11.0500001907349pt" fo:font-weight="bold" style:font-family-asian="Arial" style:font-size-asian="11.0500001907349pt" style:font-weight-asian="bold" style:font-family-complex="Arial" style:font-size-complex="11.0500001907349pt" style:font-weight-complex="bold"/>
    </style:style>
    <style:style style:name="T7" style:family="text">
      <style:text-properties fo:color="#000000" loext:opacity="100%" fo:font-family="Arial" fo:font-size="15.9499998092651pt" fo:font-weight="bold" style:font-family-asian="Arial" style:font-size-asian="15.9499998092651pt" style:font-weight-asian="bold" style:font-family-complex="Arial" style:font-size-complex="15.9499998092651pt" style:font-weight-complex="bold"/>
    </style:style>
    <style:style style:name="T8" style:family="text">
      <style:text-properties fo:color="#000000" loext:opacity="100%" fo:font-family="TimesNewRoman" fo:font-size="11.0500001907349pt" fo:font-weight="normal" style:font-family-asian="TimesNewRoman" style:font-size-asian="11.0500001907349pt" style:font-weight-asian="normal" style:font-family-complex="TimesNewRoman" style:font-size-complex="11.0500001907349pt" style:font-weight-complex="normal"/>
    </style:style>
    <style:style style:name="T9" style:family="text">
      <style:text-properties fo:color="#000000" loext:opacity="100%" fo:font-family="Arial" fo:font-size="6pt" fo:font-weight="normal" style:font-family-asian="Arial" style:font-size-asian="6pt" style:font-weight-asian="normal" style:font-family-complex="Arial" style:font-size-complex="6pt" style:font-weight-complex="normal"/>
    </style:style>
    <style:style style:name="T10" style:family="text">
      <style:text-properties fo:color="#000000" loext:opacity="100%" fo:font-family="Arial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gr1" style:family="graphic">
      <style:graphic-properties draw:stroke="none" draw:fill="none" draw:textarea-horizontal-align="left" draw:textarea-vertical-align="top" draw:auto-grow-height="true" draw:auto-grow-width="true" fo:min-height="0.0008in" fo:min-width="0.0008in" fo:padding-top="0in" fo:padding-bottom="0in" fo:padding-left="0in" fo:padding-right="0in" loext:decorative="false" style:run-through="background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fffff" loext:decorative="fals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000000" loext:decorative="fals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d3d3d3" loext:decorative="fals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a8ffff" loext:decorative="fals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102in" svg:stroke-color="#000000" draw:stroke-linejoin="round" svg:stroke-linecap="butt" draw:fill="none" fo:padding-top="0.0047in" fo:padding-bottom="0.0047in" fo:padding-left="0.0047in" fo:padding-right="0.0047in" loext:decorative="fals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6" draw:z-index="5166" draw:name="Shape2716" draw:style-name="gr1" draw:text-style-name="P2" svg:width="0.9398in" svg:height="0.1295in" svg:x="0.3634in" svg:y="10.1453in">
        <draw:text-box>
          <text:p><text:span text:style-name="T1">Spessore: 0.3 mm </text:span></text:p>
        </draw:text-box>
      </draw:frame>
      <draw:frame text:anchor-type="page" text:anchor-page-number="6" draw:z-index="5165" draw:name="Shape2715" draw:style-name="gr1" draw:text-style-name="P2" svg:width="6.5461in" svg:height="0.1295in" svg:x="0.3634in" svg:y="10.0165in">
        <draw:text-box>
          <text:p><text:span text:style-name="T1">Per la scelta definitiva del materiale dei guanti da lavoro si devono considerare: compatibilità, degradazione, tempo di permeazione. </text:span></text:p>
        </draw:text-box>
      </draw:frame>
      <draw:frame text:anchor-type="page" text:anchor-page-number="6" draw:z-index="5164" draw:name="Shape2714" draw:style-name="gr1" draw:text-style-name="P2" svg:width="1.6732in" svg:height="0.1295in" svg:x="0.3634in" svg:y="9.8902in">
        <draw:text-box>
          <text:p><text:span text:style-name="T1">Materiale: Gomma nitrilica (NBR) </text:span></text:p>
        </draw:text-box>
      </draw:frame>
      <draw:frame text:anchor-type="page" text:anchor-page-number="6" draw:z-index="5163" draw:name="Shape2713" draw:style-name="gr1" draw:text-style-name="P2" svg:width="2.8732in" svg:height="0.1295in" svg:x="0.3634in" svg:y="9.7626in">
        <draw:text-box>
          <text:p><text:span text:style-name="T1">Proteggere le mani con guanti del tipo indicato di seguito: </text:span></text:p>
        </draw:text-box>
      </draw:frame>
      <draw:frame text:anchor-type="page" text:anchor-page-number="6" draw:z-index="5162" draw:name="Shape2712" draw:style-name="gr1" draw:text-style-name="P2" svg:width="0.0433in" svg:height="0.1925in" svg:x="0.3634in" svg:y="9.5717in">
        <draw:text-box>
          <text:p><text:span text:style-name="T2"><text:s/></text:span></text:p>
        </draw:text-box>
      </draw:frame>
      <draw:frame text:anchor-type="page" text:anchor-page-number="6" draw:z-index="5161" draw:name="Shape2711" draw:style-name="gr1" draw:text-style-name="P2" svg:width="3.6815in" svg:height="0.1295in" svg:x="0.3634in" svg:y="9.4425in">
        <draw:text-box>
          <text:p><text:span text:style-name="T1">hanno un tempo di usura che dipende dalla durata e dalla modalità d`uso. </text:span></text:p>
        </draw:text-box>
      </draw:frame>
      <draw:frame text:anchor-type="page" text:anchor-page-number="6" draw:z-index="5160" draw:name="Shape2710" draw:style-name="gr1" draw:text-style-name="P2" svg:width="7.3441in" svg:height="0.1295in" svg:x="0.3634in" svg:y="9.3154in">
        <draw:text-box>
          <text:p><text:span text:style-name="T1">Nel caso di preparati la resistenza dei guanti da lavoro agli agenti chimici deve essere verificata prima dell'utilizzo in quanto non prevedibile. I guanti </text:span></text:p>
        </draw:text-box>
      </draw:frame>
      <draw:frame text:anchor-type="page" text:anchor-page-number="6" draw:z-index="5159" draw:name="Shape2709" draw:style-name="gr1" draw:text-style-name="P2" svg:width="7.528in" svg:height="0.1295in" svg:x="0.3634in" svg:y="9.1866in">
        <draw:text-box>
          <text:p><text:span text:style-name="T1">Per la scelta definitiva del materiale dei guanti da lavoro (rif. norma EN 374) si devono considerare: compatibilità, degradazione, tempo di permeazione. </text:span></text:p>
        </draw:text-box>
      </draw:frame>
      <draw:frame text:anchor-type="page" text:anchor-page-number="6" draw:z-index="5158" draw:name="Shape2708" draw:style-name="gr1" draw:text-style-name="P2" svg:width="2.7803in" svg:height="0.1295in" svg:x="0.3634in" svg:y="9.0583in">
        <draw:text-box>
          <text:p><text:span text:style-name="T1">Proteggere le mani con guanti da lavoro di categoria III. </text:span></text:p>
        </draw:text-box>
      </draw:frame>
      <draw:frame text:anchor-type="page" text:anchor-page-number="6" draw:z-index="5157" draw:name="Shape2707" draw:style-name="gr1" draw:text-style-name="P2" svg:width="1.4551in" svg:height="0.1295in" svg:x="0.3634in" svg:y="8.9319in">
        <draw:text-box>
          <text:p><text:span text:style-name="T1">PROTEZIONE DELLE MANI </text:span></text:p>
        </draw:text-box>
      </draw:frame>
      <draw:frame text:anchor-type="page" text:anchor-page-number="6" draw:z-index="5156" draw:name="Shape2706" draw:style-name="gr1" draw:text-style-name="P2" svg:width="0.0433in" svg:height="0.1925in" svg:x="0.3634in" svg:y="8.7417in">
        <draw:text-box>
          <text:p><text:span text:style-name="T2"><text:s/></text:span></text:p>
        </draw:text-box>
      </draw:frame>
      <draw:frame text:anchor-type="page" text:anchor-page-number="6" draw:z-index="5155" draw:name="Shape2705" draw:style-name="gr1" draw:text-style-name="P2" svg:width="4.0114in" svg:height="0.1295in" svg:x="0.3634in" svg:y="8.6126in">
        <draw:text-box>
          <text:p><text:span text:style-name="T1">una buona ventilazione nel luogo di lavoro tramite un'efficace aspirazione locale. </text:span></text:p>
        </draw:text-box>
      </draw:frame>
      <draw:frame text:anchor-type="page" text:anchor-page-number="6" draw:z-index="5154" draw:name="Shape2704" draw:style-name="gr1" draw:text-style-name="P2" svg:width="7.5862in" svg:height="0.1295in" svg:x="0.3634in" svg:y="8.4839in">
        <draw:text-box>
          <text:p><text:span text:style-name="T1">Considerato che l'utilizzo di misure tecniche adeguate dovrebbe sempre avere la priorità rispetto agli equipaggiamenti di protezione personali, assicurare </text:span></text:p>
        </draw:text-box>
      </draw:frame>
      <draw:frame text:anchor-type="page" text:anchor-page-number="6" draw:z-index="5153" draw:name="Shape2703" draw:style-name="gr1" draw:text-style-name="P2" svg:width="0.0433in" svg:height="0.1925in" svg:x="0.3634in" svg:y="8.2945in">
        <draw:text-box>
          <text:p><text:span text:style-name="T2"><text:s/></text:span></text:p>
        </draw:text-box>
      </draw:frame>
      <draw:frame text:anchor-type="page" text:anchor-page-number="6" draw:z-index="5152" draw:name="Shape2702" draw:style-name="gr1" draw:text-style-name="P2" svg:width="0.0433in" svg:height="0.1925in" svg:x="0.3634in" svg:y="8.1035in">
        <draw:text-box>
          <text:p><text:span text:style-name="T2"><text:s/></text:span></text:p>
        </draw:text-box>
      </draw:frame>
      <draw:frame text:anchor-type="page" text:anchor-page-number="6" draw:z-index="5151" draw:name="Shape2698" draw:style-name="gr1" draw:text-style-name="P2" svg:width="0.0433in" svg:height="0.1925in" svg:x="2.0217in" svg:y="7.9252in">
        <draw:text-box>
          <text:p><text:span text:style-name="T2"><text:s/></text:span></text:p>
        </draw:text-box>
      </draw:frame>
      <draw:frame text:anchor-type="page" text:anchor-page-number="6" draw:z-index="5150" draw:name="Shape2701" draw:style-name="gr1" draw:text-style-name="P2" svg:width="1.5795in" svg:height="0.1295in" svg:x="0.4535in" svg:y="7.972in">
        <draw:text-box>
          <text:p><text:span text:style-name="T3">8.2. Controlli dell`esposizione</text:span></text:p>
        </draw:text-box>
      </draw:frame>
      <draw:frame text:anchor-type="page" text:anchor-page-number="6" draw:z-index="5149" draw:name="Shape2697" draw:style-name="gr1" draw:text-style-name="P2" svg:width="0.0433in" svg:height="0.1925in" svg:x="0.411in" svg:y="7.9252in">
        <draw:text-box>
          <text:p><text:span text:style-name="T2"><text:s/></text:span></text:p>
        </draw:text-box>
      </draw:frame>
      <draw:frame text:anchor-type="page" text:anchor-page-number="6" draw:z-index="5148" draw:name="Shape2696" draw:style-name="gr1" draw:text-style-name="P2" svg:width="0.0433in" svg:height="0.1925in" svg:x="0.3634in" svg:y="7.7835in">
        <draw:text-box>
          <text:p><text:span text:style-name="T2"><text:s/></text:span></text:p>
        </draw:text-box>
      </draw:frame>
      <draw:polygon text:anchor-type="page" text:anchor-page-number="6" draw:z-index="5147" draw:name="Shape2700" draw:style-name="gr2" draw:text-style-name="P3" svg:width="7.3835in" svg:height="0.128in" svg:x="0.4114in" svg:y="7.9717in" svg:viewBox="0 0 18755 326" draw:points="0,0 18755,0 18755,326 0,326">
        <text:p/>
      </draw:polygon>
      <draw:polygon text:anchor-type="page" text:anchor-page-number="6" draw:z-index="5146" draw:name="Shape2699" draw:style-name="gr2" draw:text-style-name="P3" svg:width="7.4803in" svg:height="0.128in" svg:x="0.363in" svg:y="7.9717in" svg:viewBox="0 0 19001 326" draw:points="0,0 19001,0 19001,326 0,326">
        <text:p/>
      </draw:polygon>
      <draw:frame text:anchor-type="page" text:anchor-page-number="6" draw:z-index="5145" draw:name="Shape2695" draw:style-name="gr1" draw:text-style-name="P2" svg:width="0.0433in" svg:height="0.1925in" svg:x="0.3634in" svg:y="7.5917in">
        <draw:text-box>
          <text:p><text:span text:style-name="T2"><text:s/></text:span></text:p>
        </draw:text-box>
      </draw:frame>
      <draw:frame text:anchor-type="page" text:anchor-page-number="6" draw:z-index="5144" draw:name="Shape2694" draw:style-name="gr1" draw:text-style-name="P2" svg:width="5.8177in" svg:height="0.1295in" svg:x="0.3634in" svg:y="7.4626in">
        <draw:text-box>
          <text:p><text:span text:style-name="T1">(C) = CEILING <text:s text:c="2"/>; <text:s text:c="2"/>INALAB = Frazione Inalabile <text:s text:c="2"/>; <text:s text:c="2"/>RESPIR = Frazione Respirabile <text:s text:c="2"/>; <text:s text:c="2"/>TORAC = Frazione Toracica. </text:span></text:p>
        </draw:text-box>
      </draw:frame>
      <draw:frame text:anchor-type="page" text:anchor-page-number="6" draw:z-index="5143" draw:name="Shape2693" draw:style-name="gr1" draw:text-style-name="P2" svg:width="0.0433in" svg:height="0.1925in" svg:x="0.3634in" svg:y="7.2717in">
        <draw:text-box>
          <text:p><text:span text:style-name="T2"><text:s/></text:span></text:p>
        </draw:text-box>
      </draw:frame>
      <draw:frame text:anchor-type="page" text:anchor-page-number="6" draw:z-index="5142" draw:name="Shape2692" draw:style-name="gr1" draw:text-style-name="P2" svg:width="0.0433in" svg:height="0.1925in" svg:x="0.3634in" svg:y="7.0799in">
        <draw:text-box>
          <text:p><text:span text:style-name="T2"><text:s/></text:span></text:p>
        </draw:text-box>
      </draw:frame>
      <draw:frame text:anchor-type="page" text:anchor-page-number="6" draw:z-index="5141" draw:name="Shape2691" draw:style-name="gr1" draw:text-style-name="P2" svg:width="0.4988in" svg:height="0.1295in" svg:x="0.3634in" svg:y="6.9508in">
        <draw:text-box>
          <text:p><text:span text:style-name="T1">Legenda: </text:span></text:p>
        </draw:text-box>
      </draw:frame>
      <draw:frame text:anchor-type="page" text:anchor-page-number="6" draw:z-index="5140" draw:name="Shape2690" draw:style-name="gr1" draw:text-style-name="P2" svg:width="0.0433in" svg:height="0.1925in" svg:x="0.3634in" svg:y="6.761in">
        <draw:text-box>
          <text:p><text:span text:style-name="T2"><text:s/></text:span></text:p>
        </draw:text-box>
      </draw:frame>
      <draw:frame text:anchor-type="page" text:anchor-page-number="6" draw:z-index="5139" draw:name="Shape2689" draw:style-name="gr1" draw:text-style-name="P2" svg:width="0.0433in" svg:height="0.1925in" svg:x="6.7098in" svg:y="6.5693in">
        <draw:text-box>
          <text:p><text:span text:style-name="T2"><text:s/></text:span></text:p>
        </draw:text-box>
      </draw:frame>
      <draw:polygon text:anchor-type="page" text:anchor-page-number="6" draw:z-index="5138" draw:name="Shape2665" draw:style-name="gr3" draw:text-style-name="P4" svg:width="1.1717in" svg:height="0.0102in" svg:x="6.6732in" svg:y="6.5547in" svg:viewBox="0 0 2977 27" draw:points="0,0 2977,0 2977,27 0,27">
        <text:p/>
      </draw:polygon>
      <draw:polygon text:anchor-type="page" text:anchor-page-number="6" draw:z-index="5137" draw:name="Shape2664" draw:style-name="gr3" draw:text-style-name="P4" svg:width="0.0102in" svg:height="0.0102in" svg:x="6.663in" svg:y="6.5547in" svg:viewBox="0 0 27 27" draw:points="0,0 27,0 27,27 0,27">
        <text:p/>
      </draw:polygon>
      <draw:polygon text:anchor-type="page" text:anchor-page-number="6" draw:z-index="5136" draw:name="Shape2663" draw:style-name="gr3" draw:text-style-name="P4" svg:width="0.7783in" svg:height="0.0102in" svg:x="5.8846in" svg:y="6.5547in" svg:viewBox="0 0 1978 27" draw:points="0,0 1978,0 1978,27 0,27">
        <text:p/>
      </draw:polygon>
      <draw:polygon text:anchor-type="page" text:anchor-page-number="6" draw:z-index="5135" draw:name="Shape2662" draw:style-name="gr3" draw:text-style-name="P4" svg:width="0.0098in" svg:height="0.0102in" svg:x="5.8748in" svg:y="6.5547in" svg:viewBox="0 0 26 27" draw:points="0,0 26,0 26,27 0,27">
        <text:p/>
      </draw:polygon>
      <draw:polygon text:anchor-type="page" text:anchor-page-number="6" draw:z-index="5134" draw:name="Shape2661" draw:style-name="gr3" draw:text-style-name="P4" svg:width="0.5799in" svg:height="0.0102in" svg:x="5.2949in" svg:y="6.5547in" svg:viewBox="0 0 1474 27" draw:points="0,0 1474,0 1474,27 0,27">
        <text:p/>
      </draw:polygon>
      <draw:polygon text:anchor-type="page" text:anchor-page-number="6" draw:z-index="5133" draw:name="Shape2660" draw:style-name="gr3" draw:text-style-name="P4" svg:width="0.0102in" svg:height="0.0102in" svg:x="5.2846in" svg:y="6.5547in" svg:viewBox="0 0 27 27" draw:points="0,0 27,0 27,27 0,27">
        <text:p/>
      </draw:polygon>
      <draw:polygon text:anchor-type="page" text:anchor-page-number="6" draw:z-index="5132" draw:name="Shape2659" draw:style-name="gr3" draw:text-style-name="P4" svg:width="1.1717in" svg:height="0.0102in" svg:x="4.113in" svg:y="6.5547in" svg:viewBox="0 0 2977 27" draw:points="0,0 2977,0 2977,27 0,27">
        <text:p/>
      </draw:polygon>
      <draw:polygon text:anchor-type="page" text:anchor-page-number="6" draw:z-index="5131" draw:name="Shape2658" draw:style-name="gr3" draw:text-style-name="P4" svg:width="0.0098in" svg:height="0.0102in" svg:x="4.1031in" svg:y="6.5547in" svg:viewBox="0 0 26 27" draw:points="0,0 26,0 26,27 0,27">
        <text:p/>
      </draw:polygon>
      <draw:polygon text:anchor-type="page" text:anchor-page-number="6" draw:z-index="5130" draw:name="Shape2657" draw:style-name="gr3" draw:text-style-name="P4" svg:width="0.5799in" svg:height="0.0102in" svg:x="3.5232in" svg:y="6.5547in" svg:viewBox="0 0 1474 27" draw:points="0,0 1474,0 1474,27 0,27">
        <text:p/>
      </draw:polygon>
      <draw:polygon text:anchor-type="page" text:anchor-page-number="6" draw:z-index="5129" draw:name="Shape2656" draw:style-name="gr3" draw:text-style-name="P4" svg:width="0.0102in" svg:height="0.0102in" svg:x="3.513in" svg:y="6.5547in" svg:viewBox="0 0 27 27" draw:points="0,0 27,0 27,27 0,27">
        <text:p/>
      </draw:polygon>
      <draw:polygon text:anchor-type="page" text:anchor-page-number="6" draw:z-index="5128" draw:name="Shape2655" draw:style-name="gr3" draw:text-style-name="P4" svg:width="1.1717in" svg:height="0.0102in" svg:x="2.3413in" svg:y="6.5547in" svg:viewBox="0 0 2977 27" draw:points="0,0 2977,0 2977,27 0,27">
        <text:p/>
      </draw:polygon>
      <draw:polygon text:anchor-type="page" text:anchor-page-number="6" draw:z-index="5127" draw:name="Shape2654" draw:style-name="gr3" draw:text-style-name="P4" svg:width="0.0098in" svg:height="0.0102in" svg:x="2.3315in" svg:y="6.5547in" svg:viewBox="0 0 26 27" draw:points="0,0 26,0 26,27 0,27">
        <text:p/>
      </draw:polygon>
      <draw:polygon text:anchor-type="page" text:anchor-page-number="6" draw:z-index="5126" draw:name="Shape2653" draw:style-name="gr3" draw:text-style-name="P4" svg:width="0.7768in" svg:height="0.0102in" svg:x="1.5547in" svg:y="6.5547in" svg:viewBox="0 0 1974 27" draw:points="0,0 1974,0 1974,27 0,27">
        <text:p/>
      </draw:polygon>
      <draw:polygon text:anchor-type="page" text:anchor-page-number="6" draw:z-index="5125" draw:name="Shape2652" draw:style-name="gr3" draw:text-style-name="P4" svg:width="0.0098in" svg:height="0.0102in" svg:x="1.5449in" svg:y="6.5547in" svg:viewBox="0 0 26 27" draw:points="0,0 26,0 26,27 0,27">
        <text:p/>
      </draw:polygon>
      <draw:polygon text:anchor-type="page" text:anchor-page-number="6" draw:z-index="5124" draw:name="Shape2651" draw:style-name="gr3" draw:text-style-name="P4" svg:width="1.1819in" svg:height="0.0102in" svg:x="0.363in" svg:y="6.5547in" svg:viewBox="0 0 3003 27" draw:points="0,0 3003,0 3003,27 0,27">
        <text:p/>
      </draw:polygon>
      <draw:frame text:anchor-type="page" text:anchor-page-number="6" draw:z-index="5123" draw:name="Shape2650" draw:style-name="gr1" draw:text-style-name="P2" svg:width="0.0433in" svg:height="0.1925in" svg:x="6.2846in" svg:y="6.5075in">
        <draw:text-box>
          <text:p><text:span text:style-name="T2"><text:s/></text:span></text:p>
        </draw:text-box>
      </draw:frame>
      <draw:polygon text:anchor-type="page" text:anchor-page-number="6" draw:z-index="5122" draw:name="Shape2688" draw:style-name="gr2" draw:text-style-name="P3" svg:width="1.085in" svg:height="0.1917in" svg:x="6.7098in" svg:y="6.5665in" svg:viewBox="0 0 2757 488" draw:points="0,0 2757,0 2757,488 0,488">
        <text:p/>
      </draw:polygon>
      <draw:polygon text:anchor-type="page" text:anchor-page-number="6" draw:z-index="5121" draw:name="Shape2687" draw:style-name="gr2" draw:text-style-name="P3" svg:width="1.1819in" svg:height="0.1917in" svg:x="6.6614in" svg:y="6.5665in" svg:viewBox="0 0 3003 488" draw:points="0,0 3003,0 3003,488 0,488">
        <text:p/>
      </draw:polygon>
      <draw:frame text:anchor-type="page" text:anchor-page-number="6" draw:z-index="5120" draw:name="Shape2677" draw:style-name="gr1" draw:text-style-name="P2" svg:width="0.3614in" svg:height="0.113in" svg:x="5.9228in" svg:y="6.5689in">
        <draw:text-box>
          <text:p><text:span text:style-name="T4">RESPIR</text:span></text:p>
        </draw:text-box>
      </draw:frame>
      <draw:frame text:anchor-type="page" text:anchor-page-number="6" draw:z-index="5119" draw:name="Shape2684" draw:style-name="gr1" draw:text-style-name="P2" svg:width="0.0433in" svg:height="0.1925in" svg:x="5.3335in" svg:y="6.5693in">
        <draw:text-box>
          <text:p><text:span text:style-name="T2"><text:s/></text:span></text:p>
        </draw:text-box>
      </draw:frame>
      <draw:polygon text:anchor-type="page" text:anchor-page-number="6" draw:z-index="5118" draw:name="Shape2686" draw:style-name="gr2" draw:text-style-name="P3" svg:width="0.6898in" svg:height="0.1114in" svg:x="5.9232in" svg:y="6.5665in" svg:viewBox="0 0 1753 284" draw:points="0,0 1753,0 1753,284 0,284">
        <text:p/>
      </draw:polygon>
      <draw:polygon text:anchor-type="page" text:anchor-page-number="6" draw:z-index="5117" draw:name="Shape2685" draw:style-name="gr2" draw:text-style-name="P3" svg:width="0.7866in" svg:height="0.1917in" svg:x="5.8748in" svg:y="6.5665in" svg:viewBox="0 0 1999 488" draw:points="0,0 1999,0 1999,488 0,488">
        <text:p/>
      </draw:polygon>
      <draw:frame text:anchor-type="page" text:anchor-page-number="6" draw:z-index="5116" draw:name="Shape2681" draw:style-name="gr1" draw:text-style-name="P2" svg:width="0.0433in" svg:height="0.1925in" svg:x="4.1516in" svg:y="6.5693in">
        <draw:text-box>
          <text:p><text:span text:style-name="T2"><text:s/></text:span></text:p>
        </draw:text-box>
      </draw:frame>
      <draw:polygon text:anchor-type="page" text:anchor-page-number="6" draw:z-index="5115" draw:name="Shape2683" draw:style-name="gr2" draw:text-style-name="P3" svg:width="0.4917in" svg:height="0.1917in" svg:x="5.3331in" svg:y="6.5665in" svg:viewBox="0 0 1250 488" draw:points="0,0 1250,0 1250,488 0,488">
        <text:p/>
      </draw:polygon>
      <draw:polygon text:anchor-type="page" text:anchor-page-number="6" draw:z-index="5114" draw:name="Shape2682" draw:style-name="gr2" draw:text-style-name="P3" svg:width="0.5917in" svg:height="0.1917in" svg:x="5.2831in" svg:y="6.5665in" svg:viewBox="0 0 1504 488" draw:points="0,0 1504,0 1504,488 0,488">
        <text:p/>
      </draw:polygon>
      <draw:frame text:anchor-type="page" text:anchor-page-number="6" draw:z-index="5113" draw:name="Shape2678" draw:style-name="gr1" draw:text-style-name="P2" svg:width="0.0433in" svg:height="0.1925in" svg:x="3.561in" svg:y="6.5693in">
        <draw:text-box>
          <text:p><text:span text:style-name="T2"><text:s/></text:span></text:p>
        </draw:text-box>
      </draw:frame>
      <draw:polygon text:anchor-type="page" text:anchor-page-number="6" draw:z-index="5112" draw:name="Shape2680" draw:style-name="gr2" draw:text-style-name="P3" svg:width="1.0831in" svg:height="0.1917in" svg:x="4.1516in" svg:y="6.5665in" svg:viewBox="0 0 2752 488" draw:points="0,0 2752,0 2752,488 0,488">
        <text:p/>
      </draw:polygon>
      <draw:polygon text:anchor-type="page" text:anchor-page-number="6" draw:z-index="5111" draw:name="Shape2679" draw:style-name="gr2" draw:text-style-name="P3" svg:width="1.1799in" svg:height="0.1917in" svg:x="4.1031in" svg:y="6.5665in" svg:viewBox="0 0 2998 488" draw:points="0,0 2998,0 2998,488 0,488">
        <text:p/>
      </draw:polygon>
      <draw:frame text:anchor-type="page" text:anchor-page-number="6" draw:z-index="5110" draw:name="Shape2649" draw:style-name="gr1" draw:text-style-name="P2" svg:width="0.0433in" svg:height="0.1925in" svg:x="2.5154in" svg:y="6.5075in">
        <draw:text-box>
          <text:p><text:span text:style-name="T2"><text:s/></text:span></text:p>
        </draw:text-box>
      </draw:frame>
      <draw:polygon text:anchor-type="page" text:anchor-page-number="6" draw:z-index="5109" draw:name="Shape2676" draw:style-name="gr2" draw:text-style-name="P3" svg:width="0.4933in" svg:height="0.1917in" svg:x="3.5614in" svg:y="6.5665in" svg:viewBox="0 0 1254 488" draw:points="0,0 1254,0 1254,488 0,488">
        <text:p/>
      </draw:polygon>
      <draw:polygon text:anchor-type="page" text:anchor-page-number="6" draw:z-index="5108" draw:name="Shape2675" draw:style-name="gr2" draw:text-style-name="P3" svg:width="0.5902in" svg:height="0.1917in" svg:x="3.513in" svg:y="6.5665in" svg:viewBox="0 0 1500 488" draw:points="0,0 1500,0 1500,488 0,488">
        <text:p/>
      </draw:polygon>
      <draw:frame text:anchor-type="page" text:anchor-page-number="6" draw:z-index="5107" draw:name="Shape2671" draw:style-name="gr1" draw:text-style-name="P2" svg:width="0.1358in" svg:height="0.113in" svg:x="2.3799in" svg:y="6.5689in">
        <draw:text-box>
          <text:p><text:span text:style-name="T4"><text:s text:c="3"/>3</text:span></text:p>
        </draw:text-box>
      </draw:frame>
      <draw:frame text:anchor-type="page" text:anchor-page-number="6" draw:z-index="5106" draw:name="Shape2672" draw:style-name="gr1" draw:text-style-name="P2" svg:width="0.0433in" svg:height="0.1925in" svg:x="1.5917in" svg:y="6.5693in">
        <draw:text-box>
          <text:p><text:span text:style-name="T2"><text:s/></text:span></text:p>
        </draw:text-box>
      </draw:frame>
      <draw:polygon text:anchor-type="page" text:anchor-page-number="6" draw:z-index="5105" draw:name="Shape2674" draw:style-name="gr2" draw:text-style-name="P3" svg:width="1.0831in" svg:height="0.1114in" svg:x="2.3799in" svg:y="6.5665in" svg:viewBox="0 0 2752 284" draw:points="0,0 2752,0 2752,284 0,284">
        <text:p/>
      </draw:polygon>
      <draw:polygon text:anchor-type="page" text:anchor-page-number="6" draw:z-index="5104" draw:name="Shape2673" draw:style-name="gr2" draw:text-style-name="P3" svg:width="1.1815in" svg:height="0.1917in" svg:x="2.3315in" svg:y="6.5665in" svg:viewBox="0 0 3002 488" draw:points="0,0 3002,0 3002,488 0,488">
        <text:p/>
      </draw:polygon>
      <draw:frame text:anchor-type="page" text:anchor-page-number="6" draw:z-index="5103" draw:name="Shape2648" draw:style-name="gr1" draw:text-style-name="P2" svg:width="0.0433in" svg:height="0.1925in" svg:x="0.9717in" svg:y="6.5075in">
        <draw:text-box>
          <text:p><text:span text:style-name="T2"><text:s/></text:span></text:p>
        </draw:text-box>
      </draw:frame>
      <draw:polygon text:anchor-type="page" text:anchor-page-number="6" draw:z-index="5102" draw:name="Shape2670" draw:style-name="gr2" draw:text-style-name="P3" svg:width="0.6917in" svg:height="0.1917in" svg:x="1.5913in" svg:y="6.5665in" svg:viewBox="0 0 1758 488" draw:points="0,0 1758,0 1758,488 0,488">
        <text:p/>
      </draw:polygon>
      <draw:polygon text:anchor-type="page" text:anchor-page-number="6" draw:z-index="5101" draw:name="Shape2669" draw:style-name="gr2" draw:text-style-name="P3" svg:width="0.7882in" svg:height="0.1917in" svg:x="1.5433in" svg:y="6.5665in" svg:viewBox="0 0 2003 488" draw:points="0,0 2003,0 2003,488 0,488">
        <text:p/>
      </draw:polygon>
      <draw:frame text:anchor-type="page" text:anchor-page-number="6" draw:z-index="5100" draw:name="Shape2668" draw:style-name="gr1" draw:text-style-name="P2" svg:width="0.5039in" svg:height="0.113in" svg:x="0.4535in" svg:y="6.5689in">
        <draw:text-box>
          <text:p><text:span text:style-name="T4">TLV-ACGIH</text:span></text:p>
        </draw:text-box>
      </draw:frame>
      <draw:frame text:anchor-type="page" text:anchor-page-number="6" draw:z-index="5099" draw:name="Shape2647" draw:style-name="gr1" draw:text-style-name="P2" svg:width="0.0433in" svg:height="0.1925in" svg:x="0.411in" svg:y="6.5075in">
        <draw:text-box>
          <text:p><text:span text:style-name="T2"><text:s/></text:span></text:p>
        </draw:text-box>
      </draw:frame>
      <draw:frame text:anchor-type="page" text:anchor-page-number="6" draw:z-index="5098" draw:name="Shape2646" draw:style-name="gr1" draw:text-style-name="P2" svg:width="0.0433in" svg:height="0.1925in" svg:x="6.7098in" svg:y="6.3661in">
        <draw:text-box>
          <text:p><text:span text:style-name="T2"><text:s/></text:span></text:p>
        </draw:text-box>
      </draw:frame>
      <draw:polygon text:anchor-type="page" text:anchor-page-number="6" draw:z-index="5097" draw:name="Shape2667" draw:style-name="gr2" draw:text-style-name="P3" svg:width="1.0835in" svg:height="0.1114in" svg:x="0.4114in" svg:y="6.5665in" svg:viewBox="0 0 2753 284" draw:points="0,0 2753,0 2753,284 0,284">
        <text:p/>
      </draw:polygon>
      <draw:polygon text:anchor-type="page" text:anchor-page-number="6" draw:z-index="5096" draw:name="Shape2666" draw:style-name="gr2" draw:text-style-name="P3" svg:width="1.1803in" svg:height="0.1917in" svg:x="0.363in" svg:y="6.5665in" svg:viewBox="0 0 2999 488" draw:points="0,0 2999,0 2999,488 0,488">
        <text:p/>
      </draw:polygon>
      <draw:polygon text:anchor-type="page" text:anchor-page-number="6" draw:z-index="5095" draw:name="Shape2612" draw:style-name="gr3" draw:text-style-name="P4" svg:width="1.1717in" svg:height="0.0098in" svg:x="6.6732in" svg:y="6.3531in" svg:viewBox="0 0 2977 26" draw:points="0,0 2977,0 2977,26 0,26">
        <text:p/>
      </draw:polygon>
      <draw:polygon text:anchor-type="page" text:anchor-page-number="6" draw:z-index="5094" draw:name="Shape2611" draw:style-name="gr3" draw:text-style-name="P4" svg:width="0.0102in" svg:height="0.0098in" svg:x="6.663in" svg:y="6.3531in" svg:viewBox="0 0 27 26" draw:points="0,0 27,0 27,26 0,26">
        <text:p/>
      </draw:polygon>
      <draw:polygon text:anchor-type="page" text:anchor-page-number="6" draw:z-index="5093" draw:name="Shape2609" draw:style-name="gr3" draw:text-style-name="P4" svg:width="0.7783in" svg:height="0.0098in" svg:x="5.8846in" svg:y="6.3531in" svg:viewBox="0 0 1978 26" draw:points="0,0 1978,0 1978,26 0,26">
        <text:p/>
      </draw:polygon>
      <draw:polygon text:anchor-type="page" text:anchor-page-number="6" draw:z-index="5092" draw:name="Shape2608" draw:style-name="gr3" draw:text-style-name="P4" svg:width="0.0098in" svg:height="0.0098in" svg:x="5.8748in" svg:y="6.3531in" svg:viewBox="0 0 26 26" draw:points="0,0 26,0 26,26 0,26">
        <text:p/>
      </draw:polygon>
      <draw:polygon text:anchor-type="page" text:anchor-page-number="6" draw:z-index="5091" draw:name="Shape2598" draw:style-name="gr3" draw:text-style-name="P4" svg:width="0.5799in" svg:height="0.0098in" svg:x="5.2949in" svg:y="6.3531in" svg:viewBox="0 0 1474 26" draw:points="0,0 1474,0 1474,26 0,26">
        <text:p/>
      </draw:polygon>
      <draw:polygon text:anchor-type="page" text:anchor-page-number="6" draw:z-index="5090" draw:name="Shape2628" draw:style-name="gr3" draw:text-style-name="P4" svg:width="0.0102in" svg:height="0.0098in" svg:x="5.2846in" svg:y="6.3531in" svg:viewBox="0 0 27 26" draw:points="0,0 27,0 27,26 0,26">
        <text:p/>
      </draw:polygon>
      <draw:polygon text:anchor-type="page" text:anchor-page-number="6" draw:z-index="5089" draw:name="Shape2627" draw:style-name="gr3" draw:text-style-name="P4" svg:width="1.1717in" svg:height="0.0098in" svg:x="4.113in" svg:y="6.3531in" svg:viewBox="0 0 2977 26" draw:points="0,0 2977,0 2977,26 0,26">
        <text:p/>
      </draw:polygon>
      <draw:polygon text:anchor-type="page" text:anchor-page-number="6" draw:z-index="5088" draw:name="Shape2626" draw:style-name="gr3" draw:text-style-name="P4" svg:width="0.0098in" svg:height="0.0098in" svg:x="4.1031in" svg:y="6.3531in" svg:viewBox="0 0 26 26" draw:points="0,0 26,0 26,26 0,26">
        <text:p/>
      </draw:polygon>
      <draw:polygon text:anchor-type="page" text:anchor-page-number="6" draw:z-index="5087" draw:name="Shape2625" draw:style-name="gr3" draw:text-style-name="P4" svg:width="0.5799in" svg:height="0.0098in" svg:x="3.5232in" svg:y="6.3531in" svg:viewBox="0 0 1474 26" draw:points="0,0 1474,0 1474,26 0,26">
        <text:p/>
      </draw:polygon>
      <draw:polygon text:anchor-type="page" text:anchor-page-number="6" draw:z-index="5086" draw:name="Shape2624" draw:style-name="gr3" draw:text-style-name="P4" svg:width="0.0102in" svg:height="0.0098in" svg:x="3.513in" svg:y="6.3531in" svg:viewBox="0 0 27 26" draw:points="0,0 27,0 27,26 0,26">
        <text:p/>
      </draw:polygon>
      <draw:polygon text:anchor-type="page" text:anchor-page-number="6" draw:z-index="5085" draw:name="Shape2623" draw:style-name="gr3" draw:text-style-name="P4" svg:width="1.1717in" svg:height="0.0098in" svg:x="2.3413in" svg:y="6.3531in" svg:viewBox="0 0 2977 26" draw:points="0,0 2977,0 2977,26 0,26">
        <text:p/>
      </draw:polygon>
      <draw:polygon text:anchor-type="page" text:anchor-page-number="6" draw:z-index="5084" draw:name="Shape2621" draw:style-name="gr3" draw:text-style-name="P4" svg:width="0.0098in" svg:height="0.0098in" svg:x="2.3315in" svg:y="6.3531in" svg:viewBox="0 0 26 26" draw:points="0,0 26,0 26,26 0,26">
        <text:p/>
      </draw:polygon>
      <draw:polygon text:anchor-type="page" text:anchor-page-number="6" draw:z-index="5083" draw:name="Shape2607" draw:style-name="gr3" draw:text-style-name="P4" svg:width="0.7768in" svg:height="0.0098in" svg:x="1.5547in" svg:y="6.3531in" svg:viewBox="0 0 1974 26" draw:points="0,0 1974,0 1974,26 0,26">
        <text:p/>
      </draw:polygon>
      <draw:polygon text:anchor-type="page" text:anchor-page-number="6" draw:z-index="5082" draw:name="Shape2606" draw:style-name="gr3" draw:text-style-name="P4" svg:width="0.0098in" svg:height="0.0098in" svg:x="1.5449in" svg:y="6.3531in" svg:viewBox="0 0 26 26" draw:points="0,0 26,0 26,26 0,26">
        <text:p/>
      </draw:polygon>
      <draw:polygon text:anchor-type="page" text:anchor-page-number="6" draw:z-index="5081" draw:name="Shape2605" draw:style-name="gr3" draw:text-style-name="P4" svg:width="1.1819in" svg:height="0.0098in" svg:x="0.363in" svg:y="6.3531in" svg:viewBox="0 0 3003 26" draw:points="0,0 3003,0 3003,26 0,26">
        <text:p/>
      </draw:polygon>
      <draw:frame text:anchor-type="page" text:anchor-page-number="6" draw:z-index="5080" draw:name="Shape2604" draw:style-name="gr1" draw:text-style-name="P2" svg:width="0.0433in" svg:height="0.1925in" svg:x="6.2693in" svg:y="6.3047in">
        <draw:text-box>
          <text:p><text:span text:style-name="T2"><text:s/></text:span></text:p>
        </draw:text-box>
      </draw:frame>
      <draw:polygon text:anchor-type="page" text:anchor-page-number="6" draw:z-index="5079" draw:name="Shape2645" draw:style-name="gr2" draw:text-style-name="P3" svg:width="1.085in" svg:height="0.1917in" svg:x="6.7098in" svg:y="6.363in" svg:viewBox="0 0 2757 488" draw:points="0,0 2757,0 2757,488 0,488">
        <text:p/>
      </draw:polygon>
      <draw:polygon text:anchor-type="page" text:anchor-page-number="6" draw:z-index="5078" draw:name="Shape2644" draw:style-name="gr2" draw:text-style-name="P3" svg:width="1.1819in" svg:height="0.1917in" svg:x="6.6614in" svg:y="6.363in" svg:viewBox="0 0 3003 488" draw:points="0,0 3003,0 3003,488 0,488">
        <text:p/>
      </draw:polygon>
      <draw:frame text:anchor-type="page" text:anchor-page-number="6" draw:z-index="5077" draw:name="Shape2631" draw:style-name="gr1" draw:text-style-name="P2" svg:width="0.3449in" svg:height="0.113in" svg:x="5.9228in" svg:y="6.3661in">
        <draw:text-box>
          <text:p><text:span text:style-name="T4">INALAB</text:span></text:p>
        </draw:text-box>
      </draw:frame>
      <draw:frame text:anchor-type="page" text:anchor-page-number="6" draw:z-index="5076" draw:name="Shape2641" draw:style-name="gr1" draw:text-style-name="P2" svg:width="0.0433in" svg:height="0.1925in" svg:x="5.3335in" svg:y="6.3661in">
        <draw:text-box>
          <text:p><text:span text:style-name="T2"><text:s/></text:span></text:p>
        </draw:text-box>
      </draw:frame>
      <draw:polygon text:anchor-type="page" text:anchor-page-number="6" draw:z-index="5075" draw:name="Shape2643" draw:style-name="gr2" draw:text-style-name="P3" svg:width="0.6898in" svg:height="0.1134in" svg:x="5.9232in" svg:y="6.363in" svg:viewBox="0 0 1753 289" draw:points="0,0 1753,0 1753,289 0,289">
        <text:p/>
      </draw:polygon>
      <draw:polygon text:anchor-type="page" text:anchor-page-number="6" draw:z-index="5074" draw:name="Shape2642" draw:style-name="gr2" draw:text-style-name="P3" svg:width="0.7866in" svg:height="0.1917in" svg:x="5.8748in" svg:y="6.363in" svg:viewBox="0 0 1999 488" draw:points="0,0 1999,0 1999,488 0,488">
        <text:p/>
      </draw:polygon>
      <draw:frame text:anchor-type="page" text:anchor-page-number="6" draw:z-index="5073" draw:name="Shape2638" draw:style-name="gr1" draw:text-style-name="P2" svg:width="0.0433in" svg:height="0.1925in" svg:x="4.1516in" svg:y="6.3661in">
        <draw:text-box>
          <text:p><text:span text:style-name="T2"><text:s/></text:span></text:p>
        </draw:text-box>
      </draw:frame>
      <draw:polygon text:anchor-type="page" text:anchor-page-number="6" draw:z-index="5072" draw:name="Shape2640" draw:style-name="gr2" draw:text-style-name="P3" svg:width="0.4917in" svg:height="0.1917in" svg:x="5.3331in" svg:y="6.363in" svg:viewBox="0 0 1250 488" draw:points="0,0 1250,0 1250,488 0,488">
        <text:p/>
      </draw:polygon>
      <draw:polygon text:anchor-type="page" text:anchor-page-number="6" draw:z-index="5071" draw:name="Shape2639" draw:style-name="gr2" draw:text-style-name="P3" svg:width="0.5917in" svg:height="0.1917in" svg:x="5.2831in" svg:y="6.363in" svg:viewBox="0 0 1504 488" draw:points="0,0 1504,0 1504,488 0,488">
        <text:p/>
      </draw:polygon>
      <draw:frame text:anchor-type="page" text:anchor-page-number="6" draw:z-index="5070" draw:name="Shape2635" draw:style-name="gr1" draw:text-style-name="P2" svg:width="0.0433in" svg:height="0.1925in" svg:x="3.561in" svg:y="6.3661in">
        <draw:text-box>
          <text:p><text:span text:style-name="T2"><text:s/></text:span></text:p>
        </draw:text-box>
      </draw:frame>
      <draw:polygon text:anchor-type="page" text:anchor-page-number="6" draw:z-index="5069" draw:name="Shape2637" draw:style-name="gr2" draw:text-style-name="P3" svg:width="1.0831in" svg:height="0.1917in" svg:x="4.1516in" svg:y="6.363in" svg:viewBox="0 0 2752 488" draw:points="0,0 2752,0 2752,488 0,488">
        <text:p/>
      </draw:polygon>
      <draw:polygon text:anchor-type="page" text:anchor-page-number="6" draw:z-index="5068" draw:name="Shape2636" draw:style-name="gr2" draw:text-style-name="P3" svg:width="1.1799in" svg:height="0.1917in" svg:x="4.1031in" svg:y="6.363in" svg:viewBox="0 0 2998 488" draw:points="0,0 2998,0 2998,488 0,488">
        <text:p/>
      </draw:polygon>
      <draw:frame text:anchor-type="page" text:anchor-page-number="6" draw:z-index="5067" draw:name="Shape2596" draw:style-name="gr1" draw:text-style-name="P2" svg:width="0.0433in" svg:height="0.1925in" svg:x="2.5417in" svg:y="6.3047in">
        <draw:text-box>
          <text:p><text:span text:style-name="T2"><text:s/></text:span></text:p>
        </draw:text-box>
      </draw:frame>
      <draw:polygon text:anchor-type="page" text:anchor-page-number="6" draw:z-index="5066" draw:name="Shape2634" draw:style-name="gr2" draw:text-style-name="P3" svg:width="0.4933in" svg:height="0.1917in" svg:x="3.5614in" svg:y="6.363in" svg:viewBox="0 0 1254 488" draw:points="0,0 1254,0 1254,488 0,488">
        <text:p/>
      </draw:polygon>
      <draw:polygon text:anchor-type="page" text:anchor-page-number="6" draw:z-index="5065" draw:name="Shape2633" draw:style-name="gr2" draw:text-style-name="P3" svg:width="0.5902in" svg:height="0.1917in" svg:x="3.513in" svg:y="6.363in" svg:viewBox="0 0 1500 488" draw:points="0,0 1500,0 1500,488 0,488">
        <text:p/>
      </draw:polygon>
      <draw:frame text:anchor-type="page" text:anchor-page-number="6" draw:z-index="5064" draw:name="Shape2630" draw:style-name="gr1" draw:text-style-name="P2" svg:width="0.163in" svg:height="0.113in" svg:x="2.3799in" svg:y="6.3661in">
        <draw:text-box>
          <text:p><text:span text:style-name="T4"><text:s text:c="2"/>10</text:span></text:p>
        </draw:text-box>
      </draw:frame>
      <draw:frame text:anchor-type="page" text:anchor-page-number="6" draw:z-index="5063" draw:name="Shape2632" draw:style-name="gr1" draw:text-style-name="P2" svg:width="0.0433in" svg:height="0.1925in" svg:x="1.5917in" svg:y="6.3661in">
        <draw:text-box>
          <text:p><text:span text:style-name="T2"><text:s/></text:span></text:p>
        </draw:text-box>
      </draw:frame>
      <draw:polygon text:anchor-type="page" text:anchor-page-number="6" draw:z-index="5062" draw:name="Shape2629" draw:style-name="gr2" draw:text-style-name="P3" svg:width="1.0831in" svg:height="0.1134in" svg:x="2.3799in" svg:y="6.363in" svg:viewBox="0 0 2752 289" draw:points="0,0 2752,0 2752,289 0,289">
        <text:p/>
      </draw:polygon>
      <draw:polygon text:anchor-type="page" text:anchor-page-number="6" draw:z-index="5061" draw:name="Shape2622" draw:style-name="gr2" draw:text-style-name="P3" svg:width="1.1815in" svg:height="0.1917in" svg:x="2.3315in" svg:y="6.363in" svg:viewBox="0 0 3002 488" draw:points="0,0 3002,0 3002,488 0,488">
        <text:p/>
      </draw:polygon>
      <draw:frame text:anchor-type="page" text:anchor-page-number="6" draw:z-index="5060" draw:name="Shape2595" draw:style-name="gr1" draw:text-style-name="P2" svg:width="0.0433in" svg:height="0.1925in" svg:x="0.9717in" svg:y="6.3047in">
        <draw:text-box>
          <text:p><text:span text:style-name="T2"><text:s/></text:span></text:p>
        </draw:text-box>
      </draw:frame>
      <draw:polygon text:anchor-type="page" text:anchor-page-number="6" draw:z-index="5059" draw:name="Shape2620" draw:style-name="gr2" draw:text-style-name="P3" svg:width="0.6917in" svg:height="0.1917in" svg:x="1.5913in" svg:y="6.363in" svg:viewBox="0 0 1758 488" draw:points="0,0 1758,0 1758,488 0,488">
        <text:p/>
      </draw:polygon>
      <draw:polygon text:anchor-type="page" text:anchor-page-number="6" draw:z-index="5058" draw:name="Shape2619" draw:style-name="gr2" draw:text-style-name="P3" svg:width="0.7882in" svg:height="0.1917in" svg:x="1.5433in" svg:y="6.363in" svg:viewBox="0 0 2003 488" draw:points="0,0 2003,0 2003,488 0,488">
        <text:p/>
      </draw:polygon>
      <draw:frame text:anchor-type="page" text:anchor-page-number="6" draw:z-index="5057" draw:name="Shape2618" draw:style-name="gr1" draw:text-style-name="P2" svg:width="0.5039in" svg:height="0.113in" svg:x="0.4535in" svg:y="6.3661in">
        <draw:text-box>
          <text:p><text:span text:style-name="T4">TLV-ACGIH</text:span></text:p>
        </draw:text-box>
      </draw:frame>
      <draw:frame text:anchor-type="page" text:anchor-page-number="6" draw:z-index="5056" draw:name="Shape2615" draw:style-name="gr1" draw:text-style-name="P2" svg:width="0.0433in" svg:height="0.1925in" svg:x="0.411in" svg:y="6.3047in">
        <draw:text-box>
          <text:p><text:span text:style-name="T2"><text:s/></text:span></text:p>
        </draw:text-box>
      </draw:frame>
      <draw:frame text:anchor-type="page" text:anchor-page-number="6" draw:z-index="5055" draw:name="Shape2614" draw:style-name="gr1" draw:text-style-name="P2" svg:width="0.0433in" svg:height="0.1925in" svg:x="6.7098in" svg:y="6.1646in">
        <draw:text-box>
          <text:p><text:span text:style-name="T2"><text:s/></text:span></text:p>
        </draw:text-box>
      </draw:frame>
      <draw:polygon text:anchor-type="page" text:anchor-page-number="6" draw:z-index="5054" draw:name="Shape2617" draw:style-name="gr2" draw:text-style-name="P3" svg:width="1.0835in" svg:height="0.1134in" svg:x="0.4114in" svg:y="6.363in" svg:viewBox="0 0 2753 289" draw:points="0,0 2753,0 2753,289 0,289">
        <text:p/>
      </draw:polygon>
      <draw:polygon text:anchor-type="page" text:anchor-page-number="6" draw:z-index="5053" draw:name="Shape2616" draw:style-name="gr2" draw:text-style-name="P3" svg:width="1.1803in" svg:height="0.1917in" svg:x="0.363in" svg:y="6.363in" svg:viewBox="0 0 2999 488" draw:points="0,0 2999,0 2999,488 0,488">
        <text:p/>
      </draw:polygon>
      <draw:polygon text:anchor-type="page" text:anchor-page-number="6" draw:z-index="5052" draw:name="Shape2573" draw:style-name="gr3" draw:text-style-name="P4" svg:width="1.1717in" svg:height="0.0098in" svg:x="6.6732in" svg:y="6.1516in" svg:viewBox="0 0 2977 26" draw:points="0,0 2977,0 2977,26 0,26">
        <text:p/>
      </draw:polygon>
      <draw:polygon text:anchor-type="page" text:anchor-page-number="6" draw:z-index="5051" draw:name="Shape2572" draw:style-name="gr3" draw:text-style-name="P4" svg:width="0.0102in" svg:height="0.0098in" svg:x="6.663in" svg:y="6.1516in" svg:viewBox="0 0 27 26" draw:points="0,0 27,0 27,26 0,26">
        <text:p/>
      </draw:polygon>
      <draw:polygon text:anchor-type="page" text:anchor-page-number="6" draw:z-index="5050" draw:name="Shape2570" draw:style-name="gr3" draw:text-style-name="P4" svg:width="0.7783in" svg:height="0.0098in" svg:x="5.8846in" svg:y="6.1516in" svg:viewBox="0 0 1978 26" draw:points="0,0 1978,0 1978,26 0,26">
        <text:p/>
      </draw:polygon>
      <draw:polygon text:anchor-type="page" text:anchor-page-number="6" draw:z-index="5049" draw:name="Shape2569" draw:style-name="gr3" draw:text-style-name="P4" svg:width="0.0098in" svg:height="0.0098in" svg:x="5.8748in" svg:y="6.1516in" svg:viewBox="0 0 26 26" draw:points="0,0 26,0 26,26 0,26">
        <text:p/>
      </draw:polygon>
      <draw:polygon text:anchor-type="page" text:anchor-page-number="6" draw:z-index="5048" draw:name="Shape2568" draw:style-name="gr3" draw:text-style-name="P4" svg:width="0.5799in" svg:height="0.0098in" svg:x="5.2949in" svg:y="6.1516in" svg:viewBox="0 0 1474 26" draw:points="0,0 1474,0 1474,26 0,26">
        <text:p/>
      </draw:polygon>
      <draw:polygon text:anchor-type="page" text:anchor-page-number="6" draw:z-index="5047" draw:name="Shape2567" draw:style-name="gr3" draw:text-style-name="P4" svg:width="0.0102in" svg:height="0.0098in" svg:x="5.2846in" svg:y="6.1516in" svg:viewBox="0 0 27 26" draw:points="0,0 27,0 27,26 0,26">
        <text:p/>
      </draw:polygon>
      <draw:polygon text:anchor-type="page" text:anchor-page-number="6" draw:z-index="5046" draw:name="Shape2566" draw:style-name="gr3" draw:text-style-name="P4" svg:width="1.1717in" svg:height="0.0098in" svg:x="4.113in" svg:y="6.1516in" svg:viewBox="0 0 2977 26" draw:points="0,0 2977,0 2977,26 0,26">
        <text:p/>
      </draw:polygon>
      <draw:polygon text:anchor-type="page" text:anchor-page-number="6" draw:z-index="5045" draw:name="Shape2565" draw:style-name="gr3" draw:text-style-name="P4" svg:width="0.0098in" svg:height="0.0098in" svg:x="4.1031in" svg:y="6.1516in" svg:viewBox="0 0 26 26" draw:points="0,0 26,0 26,26 0,26">
        <text:p/>
      </draw:polygon>
      <draw:polygon text:anchor-type="page" text:anchor-page-number="6" draw:z-index="5044" draw:name="Shape2564" draw:style-name="gr3" draw:text-style-name="P4" svg:width="0.5799in" svg:height="0.0098in" svg:x="3.5232in" svg:y="6.1516in" svg:viewBox="0 0 1474 26" draw:points="0,0 1474,0 1474,26 0,26">
        <text:p/>
      </draw:polygon>
      <draw:polygon text:anchor-type="page" text:anchor-page-number="6" draw:z-index="5043" draw:name="Shape2563" draw:style-name="gr3" draw:text-style-name="P4" svg:width="0.0102in" svg:height="0.0098in" svg:x="3.513in" svg:y="6.1516in" svg:viewBox="0 0 27 26" draw:points="0,0 27,0 27,26 0,26">
        <text:p/>
      </draw:polygon>
      <draw:polygon text:anchor-type="page" text:anchor-page-number="6" draw:z-index="5042" draw:name="Shape2562" draw:style-name="gr3" draw:text-style-name="P4" svg:width="1.1717in" svg:height="0.0098in" svg:x="2.3413in" svg:y="6.1516in" svg:viewBox="0 0 2977 26" draw:points="0,0 2977,0 2977,26 0,26">
        <text:p/>
      </draw:polygon>
      <draw:polygon text:anchor-type="page" text:anchor-page-number="6" draw:z-index="5041" draw:name="Shape2561" draw:style-name="gr3" draw:text-style-name="P4" svg:width="0.0098in" svg:height="0.0098in" svg:x="2.3315in" svg:y="6.1516in" svg:viewBox="0 0 26 26" draw:points="0,0 26,0 26,26 0,26">
        <text:p/>
      </draw:polygon>
      <draw:polygon text:anchor-type="page" text:anchor-page-number="6" draw:z-index="5040" draw:name="Shape2560" draw:style-name="gr3" draw:text-style-name="P4" svg:width="0.7768in" svg:height="0.0098in" svg:x="1.5547in" svg:y="6.1516in" svg:viewBox="0 0 1974 26" draw:points="0,0 1974,0 1974,26 0,26">
        <text:p/>
      </draw:polygon>
      <draw:polygon text:anchor-type="page" text:anchor-page-number="6" draw:z-index="5039" draw:name="Shape2559" draw:style-name="gr3" draw:text-style-name="P4" svg:width="0.0098in" svg:height="0.0098in" svg:x="1.5449in" svg:y="6.1516in" svg:viewBox="0 0 26 26" draw:points="0,0 26,0 26,26 0,26">
        <text:p/>
      </draw:polygon>
      <draw:polygon text:anchor-type="page" text:anchor-page-number="6" draw:z-index="5038" draw:name="Shape2558" draw:style-name="gr3" draw:text-style-name="P4" svg:width="1.1819in" svg:height="0.0098in" svg:x="0.363in" svg:y="6.1516in" svg:viewBox="0 0 3003 26" draw:points="0,0 3003,0 3003,26 0,26">
        <text:p/>
      </draw:polygon>
      <draw:frame text:anchor-type="page" text:anchor-page-number="6" draw:z-index="5037" draw:name="Shape2557" draw:style-name="gr1" draw:text-style-name="P2" svg:width="0.0433in" svg:height="0.1925in" svg:x="6.2693in" svg:y="6.1035in">
        <draw:text-box>
          <text:p><text:span text:style-name="T2"><text:s/></text:span></text:p>
        </draw:text-box>
      </draw:frame>
      <draw:polygon text:anchor-type="page" text:anchor-page-number="6" draw:z-index="5036" draw:name="Shape2613" draw:style-name="gr2" draw:text-style-name="P3" svg:width="1.085in" svg:height="0.1917in" svg:x="6.7098in" svg:y="6.1614in" svg:viewBox="0 0 2757 488" draw:points="0,0 2757,0 2757,488 0,488">
        <text:p/>
      </draw:polygon>
      <draw:polygon text:anchor-type="page" text:anchor-page-number="6" draw:z-index="5035" draw:name="Shape2610" draw:style-name="gr2" draw:text-style-name="P3" svg:width="1.1819in" svg:height="0.1917in" svg:x="6.6614in" svg:y="6.1614in" svg:viewBox="0 0 3003 488" draw:points="0,0 3003,0 3003,488 0,488">
        <text:p/>
      </draw:polygon>
      <draw:frame text:anchor-type="page" text:anchor-page-number="6" draw:z-index="5034" draw:name="Shape2602" draw:style-name="gr1" draw:text-style-name="P2" svg:width="0.3449in" svg:height="0.113in" svg:x="5.9228in" svg:y="6.1638in">
        <draw:text-box>
          <text:p><text:span text:style-name="T4">INALAB</text:span></text:p>
        </draw:text-box>
      </draw:frame>
      <draw:frame text:anchor-type="page" text:anchor-page-number="6" draw:z-index="5033" draw:name="Shape2603" draw:style-name="gr1" draw:text-style-name="P2" svg:width="0.0433in" svg:height="0.1925in" svg:x="5.3335in" svg:y="6.1646in">
        <draw:text-box>
          <text:p><text:span text:style-name="T2"><text:s/></text:span></text:p>
        </draw:text-box>
      </draw:frame>
      <draw:polygon text:anchor-type="page" text:anchor-page-number="6" draw:z-index="5032" draw:name="Shape2601" draw:style-name="gr2" draw:text-style-name="P3" svg:width="0.6898in" svg:height="0.1118in" svg:x="5.9232in" svg:y="6.1614in" svg:viewBox="0 0 1753 285" draw:points="0,0 1753,0 1753,285 0,285">
        <text:p/>
      </draw:polygon>
      <draw:polygon text:anchor-type="page" text:anchor-page-number="6" draw:z-index="5031" draw:name="Shape2600" draw:style-name="gr2" draw:text-style-name="P3" svg:width="0.7866in" svg:height="0.1917in" svg:x="5.8748in" svg:y="6.1614in" svg:viewBox="0 0 1999 488" draw:points="0,0 1999,0 1999,488 0,488">
        <text:p/>
      </draw:polygon>
      <draw:frame text:anchor-type="page" text:anchor-page-number="6" draw:z-index="5030" draw:name="Shape2594" draw:style-name="gr1" draw:text-style-name="P2" svg:width="0.0433in" svg:height="0.1925in" svg:x="4.1516in" svg:y="6.1646in">
        <draw:text-box>
          <text:p><text:span text:style-name="T2"><text:s/></text:span></text:p>
        </draw:text-box>
      </draw:frame>
      <draw:polygon text:anchor-type="page" text:anchor-page-number="6" draw:z-index="5029" draw:name="Shape2599" draw:style-name="gr2" draw:text-style-name="P3" svg:width="0.4917in" svg:height="0.1917in" svg:x="5.3331in" svg:y="6.1614in" svg:viewBox="0 0 1250 488" draw:points="0,0 1250,0 1250,488 0,488">
        <text:p/>
      </draw:polygon>
      <draw:polygon text:anchor-type="page" text:anchor-page-number="6" draw:z-index="5028" draw:name="Shape2597" draw:style-name="gr2" draw:text-style-name="P3" svg:width="0.5917in" svg:height="0.1917in" svg:x="5.2831in" svg:y="6.1614in" svg:viewBox="0 0 1504 488" draw:points="0,0 1504,0 1504,488 0,488">
        <text:p/>
      </draw:polygon>
      <draw:frame text:anchor-type="page" text:anchor-page-number="6" draw:z-index="5027" draw:name="Shape2591" draw:style-name="gr1" draw:text-style-name="P2" svg:width="0.0433in" svg:height="0.1925in" svg:x="3.561in" svg:y="6.1646in">
        <draw:text-box>
          <text:p><text:span text:style-name="T2"><text:s/></text:span></text:p>
        </draw:text-box>
      </draw:frame>
      <draw:polygon text:anchor-type="page" text:anchor-page-number="6" draw:z-index="5026" draw:name="Shape2593" draw:style-name="gr2" draw:text-style-name="P3" svg:width="1.0831in" svg:height="0.1917in" svg:x="4.1516in" svg:y="6.1614in" svg:viewBox="0 0 2752 488" draw:points="0,0 2752,0 2752,488 0,488">
        <text:p/>
      </draw:polygon>
      <draw:polygon text:anchor-type="page" text:anchor-page-number="6" draw:z-index="5025" draw:name="Shape2592" draw:style-name="gr2" draw:text-style-name="P3" svg:width="1.1799in" svg:height="0.1917in" svg:x="4.1031in" svg:y="6.1614in" svg:viewBox="0 0 2998 488" draw:points="0,0 2998,0 2998,488 0,488">
        <text:p/>
      </draw:polygon>
      <draw:frame text:anchor-type="page" text:anchor-page-number="6" draw:z-index="5024" draw:name="Shape2579" draw:style-name="gr1" draw:text-style-name="P2" svg:width="0.0433in" svg:height="0.1925in" svg:x="2.5417in" svg:y="6.1035in">
        <draw:text-box>
          <text:p><text:span text:style-name="T2"><text:s/></text:span></text:p>
        </draw:text-box>
      </draw:frame>
      <draw:polygon text:anchor-type="page" text:anchor-page-number="6" draw:z-index="5023" draw:name="Shape2590" draw:style-name="gr2" draw:text-style-name="P3" svg:width="0.4933in" svg:height="0.1917in" svg:x="3.5614in" svg:y="6.1614in" svg:viewBox="0 0 1254 488" draw:points="0,0 1254,0 1254,488 0,488">
        <text:p/>
      </draw:polygon>
      <draw:polygon text:anchor-type="page" text:anchor-page-number="6" draw:z-index="5022" draw:name="Shape2589" draw:style-name="gr2" draw:text-style-name="P3" svg:width="0.5902in" svg:height="0.1917in" svg:x="3.513in" svg:y="6.1614in" svg:viewBox="0 0 1500 488" draw:points="0,0 1500,0 1500,488 0,488">
        <text:p/>
      </draw:polygon>
      <draw:frame text:anchor-type="page" text:anchor-page-number="6" draw:z-index="5021" draw:name="Shape2588" draw:style-name="gr1" draw:text-style-name="P2" svg:width="0.163in" svg:height="0.113in" svg:x="2.3799in" svg:y="6.1638in">
        <draw:text-box>
          <text:p><text:span text:style-name="T4"><text:s text:c="2"/>10</text:span></text:p>
        </draw:text-box>
      </draw:frame>
      <draw:frame text:anchor-type="page" text:anchor-page-number="6" draw:z-index="5020" draw:name="Shape2578" draw:style-name="gr1" draw:text-style-name="P2" svg:width="0.0433in" svg:height="0.1925in" svg:x="1.7866in" svg:y="6.1035in">
        <draw:text-box>
          <text:p><text:span text:style-name="T2"><text:s/></text:span></text:p>
        </draw:text-box>
      </draw:frame>
      <draw:polygon text:anchor-type="page" text:anchor-page-number="6" draw:z-index="5019" draw:name="Shape2587" draw:style-name="gr2" draw:text-style-name="P3" svg:width="1.0831in" svg:height="0.1118in" svg:x="2.3799in" svg:y="6.1614in" svg:viewBox="0 0 2752 285" draw:points="0,0 2752,0 2752,285 0,285">
        <text:p/>
      </draw:polygon>
      <draw:polygon text:anchor-type="page" text:anchor-page-number="6" draw:z-index="5018" draw:name="Shape2586" draw:style-name="gr2" draw:text-style-name="P3" svg:width="1.1815in" svg:height="0.1917in" svg:x="2.3315in" svg:y="6.1614in" svg:viewBox="0 0 3002 488" draw:points="0,0 3002,0 3002,488 0,488">
        <text:p/>
      </draw:polygon>
      <draw:frame text:anchor-type="page" text:anchor-page-number="6" draw:z-index="5017" draw:name="Shape2585" draw:style-name="gr1" draw:text-style-name="P2" svg:width="0.1949in" svg:height="0.113in" svg:x="1.5917in" svg:y="6.1638in">
        <draw:text-box>
          <text:p><text:span text:style-name="T4">POL</text:span></text:p>
        </draw:text-box>
      </draw:frame>
      <draw:frame text:anchor-type="page" text:anchor-page-number="6" draw:z-index="5016" draw:name="Shape2577" draw:style-name="gr1" draw:text-style-name="P2" svg:width="0.0433in" svg:height="0.1925in" svg:x="1.0154in" svg:y="6.1035in">
        <draw:text-box>
          <text:p><text:span text:style-name="T2"><text:s/></text:span></text:p>
        </draw:text-box>
      </draw:frame>
      <draw:polygon text:anchor-type="page" text:anchor-page-number="6" draw:z-index="5015" draw:name="Shape2584" draw:style-name="gr2" draw:text-style-name="P3" svg:width="0.6917in" svg:height="0.1118in" svg:x="1.5913in" svg:y="6.1614in" svg:viewBox="0 0 1758 285" draw:points="0,0 1758,0 1758,285 0,285">
        <text:p/>
      </draw:polygon>
      <draw:polygon text:anchor-type="page" text:anchor-page-number="6" draw:z-index="5014" draw:name="Shape2583" draw:style-name="gr2" draw:text-style-name="P3" svg:width="0.7882in" svg:height="0.1917in" svg:x="1.5433in" svg:y="6.1614in" svg:viewBox="0 0 2003 488" draw:points="0,0 2003,0 2003,488 0,488">
        <text:p/>
      </draw:polygon>
      <draw:frame text:anchor-type="page" text:anchor-page-number="6" draw:z-index="5013" draw:name="Shape2582" draw:style-name="gr1" draw:text-style-name="P2" svg:width="0.5594in" svg:height="0.113in" svg:x="0.4535in" svg:y="6.1638in">
        <draw:text-box>
          <text:p><text:span text:style-name="T4">NDS/NDSCh</text:span></text:p>
        </draw:text-box>
      </draw:frame>
      <draw:frame text:anchor-type="page" text:anchor-page-number="6" draw:z-index="5012" draw:name="Shape2576" draw:style-name="gr1" draw:text-style-name="P2" svg:width="0.0433in" svg:height="0.1925in" svg:x="0.411in" svg:y="6.1035in">
        <draw:text-box>
          <text:p><text:span text:style-name="T2"><text:s/></text:span></text:p>
        </draw:text-box>
      </draw:frame>
      <draw:frame text:anchor-type="page" text:anchor-page-number="6" draw:z-index="5011" draw:name="Shape2575" draw:style-name="gr1" draw:text-style-name="P2" svg:width="0.0433in" svg:height="0.1925in" svg:x="6.7098in" svg:y="5.9634in">
        <draw:text-box>
          <text:p><text:span text:style-name="T2"><text:s/></text:span></text:p>
        </draw:text-box>
      </draw:frame>
      <draw:polygon text:anchor-type="page" text:anchor-page-number="6" draw:z-index="5010" draw:name="Shape2581" draw:style-name="gr2" draw:text-style-name="P3" svg:width="1.0835in" svg:height="0.1118in" svg:x="0.4114in" svg:y="6.1614in" svg:viewBox="0 0 2753 285" draw:points="0,0 2753,0 2753,285 0,285">
        <text:p/>
      </draw:polygon>
      <draw:polygon text:anchor-type="page" text:anchor-page-number="6" draw:z-index="5009" draw:name="Shape2580" draw:style-name="gr2" draw:text-style-name="P3" svg:width="1.1803in" svg:height="0.1917in" svg:x="0.363in" svg:y="6.1614in" svg:viewBox="0 0 2999 488" draw:points="0,0 2999,0 2999,488 0,488">
        <text:p/>
      </draw:polygon>
      <draw:polygon text:anchor-type="page" text:anchor-page-number="6" draw:z-index="5008" draw:name="Shape2537" draw:style-name="gr3" draw:text-style-name="P4" svg:width="1.1717in" svg:height="0.0106in" svg:x="6.6732in" svg:y="5.95in" svg:viewBox="0 0 2977 28" draw:points="0,0 2977,0 2977,28 0,28">
        <text:p/>
      </draw:polygon>
      <draw:polygon text:anchor-type="page" text:anchor-page-number="6" draw:z-index="5007" draw:name="Shape2536" draw:style-name="gr3" draw:text-style-name="P4" svg:width="0.0102in" svg:height="0.0106in" svg:x="6.663in" svg:y="5.95in" svg:viewBox="0 0 27 28" draw:points="0,0 27,0 27,28 0,28">
        <text:p/>
      </draw:polygon>
      <draw:polygon text:anchor-type="page" text:anchor-page-number="6" draw:z-index="5006" draw:name="Shape2535" draw:style-name="gr3" draw:text-style-name="P4" svg:width="0.7783in" svg:height="0.0106in" svg:x="5.8846in" svg:y="5.95in" svg:viewBox="0 0 1978 28" draw:points="0,0 1978,0 1978,28 0,28">
        <text:p/>
      </draw:polygon>
      <draw:polygon text:anchor-type="page" text:anchor-page-number="6" draw:z-index="5005" draw:name="Shape2534" draw:style-name="gr3" draw:text-style-name="P4" svg:width="0.0098in" svg:height="0.0106in" svg:x="5.8748in" svg:y="5.95in" svg:viewBox="0 0 26 28" draw:points="0,0 26,0 26,28 0,28">
        <text:p/>
      </draw:polygon>
      <draw:polygon text:anchor-type="page" text:anchor-page-number="6" draw:z-index="5004" draw:name="Shape2533" draw:style-name="gr3" draw:text-style-name="P4" svg:width="0.5799in" svg:height="0.0106in" svg:x="5.2949in" svg:y="5.95in" svg:viewBox="0 0 1474 28" draw:points="0,0 1474,0 1474,28 0,28">
        <text:p/>
      </draw:polygon>
      <draw:polygon text:anchor-type="page" text:anchor-page-number="6" draw:z-index="5003" draw:name="Shape2532" draw:style-name="gr3" draw:text-style-name="P4" svg:width="0.0102in" svg:height="0.0106in" svg:x="5.2846in" svg:y="5.95in" svg:viewBox="0 0 27 28" draw:points="0,0 27,0 27,28 0,28">
        <text:p/>
      </draw:polygon>
      <draw:polygon text:anchor-type="page" text:anchor-page-number="6" draw:z-index="5002" draw:name="Shape2531" draw:style-name="gr3" draw:text-style-name="P4" svg:width="1.1717in" svg:height="0.0106in" svg:x="4.113in" svg:y="5.95in" svg:viewBox="0 0 2977 28" draw:points="0,0 2977,0 2977,28 0,28">
        <text:p/>
      </draw:polygon>
      <draw:polygon text:anchor-type="page" text:anchor-page-number="6" draw:z-index="5001" draw:name="Shape2530" draw:style-name="gr3" draw:text-style-name="P4" svg:width="0.0098in" svg:height="0.0106in" svg:x="4.1031in" svg:y="5.95in" svg:viewBox="0 0 26 28" draw:points="0,0 26,0 26,28 0,28">
        <text:p/>
      </draw:polygon>
      <draw:polygon text:anchor-type="page" text:anchor-page-number="6" draw:z-index="5000" draw:name="Shape2529" draw:style-name="gr3" draw:text-style-name="P4" svg:width="0.5799in" svg:height="0.0106in" svg:x="3.5232in" svg:y="5.95in" svg:viewBox="0 0 1474 28" draw:points="0,0 1474,0 1474,28 0,28">
        <text:p/>
      </draw:polygon>
      <draw:polygon text:anchor-type="page" text:anchor-page-number="6" draw:z-index="4999" draw:name="Shape2528" draw:style-name="gr3" draw:text-style-name="P4" svg:width="0.0102in" svg:height="0.0106in" svg:x="3.513in" svg:y="5.95in" svg:viewBox="0 0 27 28" draw:points="0,0 27,0 27,28 0,28">
        <text:p/>
      </draw:polygon>
      <draw:polygon text:anchor-type="page" text:anchor-page-number="6" draw:z-index="4998" draw:name="Shape2527" draw:style-name="gr3" draw:text-style-name="P4" svg:width="1.1717in" svg:height="0.0106in" svg:x="2.3413in" svg:y="5.95in" svg:viewBox="0 0 2977 28" draw:points="0,0 2977,0 2977,28 0,28">
        <text:p/>
      </draw:polygon>
      <draw:polygon text:anchor-type="page" text:anchor-page-number="6" draw:z-index="4997" draw:name="Shape2526" draw:style-name="gr3" draw:text-style-name="P4" svg:width="0.0098in" svg:height="0.0106in" svg:x="2.3315in" svg:y="5.95in" svg:viewBox="0 0 26 28" draw:points="0,0 26,0 26,28 0,28">
        <text:p/>
      </draw:polygon>
      <draw:polygon text:anchor-type="page" text:anchor-page-number="6" draw:z-index="4996" draw:name="Shape2525" draw:style-name="gr3" draw:text-style-name="P4" svg:width="0.7768in" svg:height="0.0106in" svg:x="1.5547in" svg:y="5.95in" svg:viewBox="0 0 1974 28" draw:points="0,0 1974,0 1974,28 0,28">
        <text:p/>
      </draw:polygon>
      <draw:polygon text:anchor-type="page" text:anchor-page-number="6" draw:z-index="4995" draw:name="Shape2524" draw:style-name="gr3" draw:text-style-name="P4" svg:width="0.0098in" svg:height="0.0106in" svg:x="1.5449in" svg:y="5.95in" svg:viewBox="0 0 26 28" draw:points="0,0 26,0 26,28 0,28">
        <text:p/>
      </draw:polygon>
      <draw:polygon text:anchor-type="page" text:anchor-page-number="6" draw:z-index="4994" draw:name="Shape2521" draw:style-name="gr3" draw:text-style-name="P4" svg:width="1.1819in" svg:height="0.0106in" svg:x="0.363in" svg:y="5.95in" svg:viewBox="0 0 3003 28" draw:points="0,0 3003,0 3003,28 0,28">
        <text:p/>
      </draw:polygon>
      <draw:frame text:anchor-type="page" text:anchor-page-number="6" draw:z-index="4993" draw:name="Shape2556" draw:style-name="gr1" draw:text-style-name="P2" svg:width="0.0433in" svg:height="0.1925in" svg:x="5.9228in" svg:y="5.9634in">
        <draw:text-box>
          <text:p><text:span text:style-name="T2"><text:s/></text:span></text:p>
        </draw:text-box>
      </draw:frame>
      <draw:polygon text:anchor-type="page" text:anchor-page-number="6" draw:z-index="4992" draw:name="Shape2574" draw:style-name="gr2" draw:text-style-name="P3" svg:width="1.085in" svg:height="0.1917in" svg:x="6.7098in" svg:y="5.9598in" svg:viewBox="0 0 2757 488" draw:points="0,0 2757,0 2757,488 0,488">
        <text:p/>
      </draw:polygon>
      <draw:polygon text:anchor-type="page" text:anchor-page-number="6" draw:z-index="4991" draw:name="Shape2571" draw:style-name="gr2" draw:text-style-name="P3" svg:width="1.1819in" svg:height="0.1917in" svg:x="6.6614in" svg:y="5.9598in" svg:viewBox="0 0 3003 488" draw:points="0,0 3003,0 3003,488 0,488">
        <text:p/>
      </draw:polygon>
      <draw:frame text:anchor-type="page" text:anchor-page-number="6" draw:z-index="4990" draw:name="Shape2553" draw:style-name="gr1" draw:text-style-name="P2" svg:width="0.0433in" svg:height="0.1925in" svg:x="5.3335in" svg:y="5.9634in">
        <draw:text-box>
          <text:p><text:span text:style-name="T2"><text:s/></text:span></text:p>
        </draw:text-box>
      </draw:frame>
      <draw:polygon text:anchor-type="page" text:anchor-page-number="6" draw:z-index="4989" draw:name="Shape2555" draw:style-name="gr2" draw:text-style-name="P3" svg:width="0.6898in" svg:height="0.1917in" svg:x="5.9232in" svg:y="5.9598in" svg:viewBox="0 0 1753 488" draw:points="0,0 1753,0 1753,488 0,488">
        <text:p/>
      </draw:polygon>
      <draw:polygon text:anchor-type="page" text:anchor-page-number="6" draw:z-index="4988" draw:name="Shape2554" draw:style-name="gr2" draw:text-style-name="P3" svg:width="0.7866in" svg:height="0.1917in" svg:x="5.8748in" svg:y="5.9598in" svg:viewBox="0 0 1999 488" draw:points="0,0 1999,0 1999,488 0,488">
        <text:p/>
      </draw:polygon>
      <draw:frame text:anchor-type="page" text:anchor-page-number="6" draw:z-index="4987" draw:name="Shape2550" draw:style-name="gr1" draw:text-style-name="P2" svg:width="0.0433in" svg:height="0.1925in" svg:x="4.1516in" svg:y="5.9634in">
        <draw:text-box>
          <text:p><text:span text:style-name="T2"><text:s/></text:span></text:p>
        </draw:text-box>
      </draw:frame>
      <draw:polygon text:anchor-type="page" text:anchor-page-number="6" draw:z-index="4986" draw:name="Shape2552" draw:style-name="gr2" draw:text-style-name="P3" svg:width="0.4917in" svg:height="0.1917in" svg:x="5.3331in" svg:y="5.9598in" svg:viewBox="0 0 1250 488" draw:points="0,0 1250,0 1250,488 0,488">
        <text:p/>
      </draw:polygon>
      <draw:polygon text:anchor-type="page" text:anchor-page-number="6" draw:z-index="4985" draw:name="Shape2551" draw:style-name="gr2" draw:text-style-name="P3" svg:width="0.5917in" svg:height="0.1917in" svg:x="5.2831in" svg:y="5.9598in" svg:viewBox="0 0 1504 488" draw:points="0,0 1504,0 1504,488 0,488">
        <text:p/>
      </draw:polygon>
      <draw:frame text:anchor-type="page" text:anchor-page-number="6" draw:z-index="4984" draw:name="Shape2547" draw:style-name="gr1" draw:text-style-name="P2" svg:width="0.0433in" svg:height="0.1925in" svg:x="3.561in" svg:y="5.9634in">
        <draw:text-box>
          <text:p><text:span text:style-name="T2"><text:s/></text:span></text:p>
        </draw:text-box>
      </draw:frame>
      <draw:polygon text:anchor-type="page" text:anchor-page-number="6" draw:z-index="4983" draw:name="Shape2549" draw:style-name="gr2" draw:text-style-name="P3" svg:width="1.0831in" svg:height="0.1917in" svg:x="4.1516in" svg:y="5.9598in" svg:viewBox="0 0 2752 488" draw:points="0,0 2752,0 2752,488 0,488">
        <text:p/>
      </draw:polygon>
      <draw:polygon text:anchor-type="page" text:anchor-page-number="6" draw:z-index="4982" draw:name="Shape2548" draw:style-name="gr2" draw:text-style-name="P3" svg:width="1.1799in" svg:height="0.1917in" svg:x="4.1031in" svg:y="5.9598in" svg:viewBox="0 0 2998 488" draw:points="0,0 2998,0 2998,488 0,488">
        <text:p/>
      </draw:polygon>
      <draw:frame text:anchor-type="page" text:anchor-page-number="6" draw:z-index="4981" draw:name="Shape2520" draw:style-name="gr1" draw:text-style-name="P2" svg:width="0.0433in" svg:height="0.1925in" svg:x="2.5417in" svg:y="5.9016in">
        <draw:text-box>
          <text:p><text:span text:style-name="T2"><text:s/></text:span></text:p>
        </draw:text-box>
      </draw:frame>
      <draw:polygon text:anchor-type="page" text:anchor-page-number="6" draw:z-index="4980" draw:name="Shape2546" draw:style-name="gr2" draw:text-style-name="P3" svg:width="0.4933in" svg:height="0.1917in" svg:x="3.5614in" svg:y="5.9598in" svg:viewBox="0 0 1254 488" draw:points="0,0 1254,0 1254,488 0,488">
        <text:p/>
      </draw:polygon>
      <draw:polygon text:anchor-type="page" text:anchor-page-number="6" draw:z-index="4979" draw:name="Shape2545" draw:style-name="gr2" draw:text-style-name="P3" svg:width="0.5902in" svg:height="0.1917in" svg:x="3.513in" svg:y="5.9598in" svg:viewBox="0 0 1500 488" draw:points="0,0 1500,0 1500,488 0,488">
        <text:p/>
      </draw:polygon>
      <draw:frame text:anchor-type="page" text:anchor-page-number="6" draw:z-index="4978" draw:name="Shape2544" draw:style-name="gr1" draw:text-style-name="P2" svg:width="0.163in" svg:height="0.113in" svg:x="2.3799in" svg:y="5.9626in">
        <draw:text-box>
          <text:p><text:span text:style-name="T4"><text:s text:c="2"/>10</text:span></text:p>
        </draw:text-box>
      </draw:frame>
      <draw:frame text:anchor-type="page" text:anchor-page-number="6" draw:z-index="4977" draw:name="Shape2519" draw:style-name="gr1" draw:text-style-name="P2" svg:width="0.0433in" svg:height="0.1925in" svg:x="1.7866in" svg:y="5.9016in">
        <draw:text-box>
          <text:p><text:span text:style-name="T2"><text:s/></text:span></text:p>
        </draw:text-box>
      </draw:frame>
      <draw:polygon text:anchor-type="page" text:anchor-page-number="6" draw:z-index="4976" draw:name="Shape2543" draw:style-name="gr2" draw:text-style-name="P3" svg:width="1.0831in" svg:height="0.1118in" svg:x="2.3799in" svg:y="5.9598in" svg:viewBox="0 0 2752 285" draw:points="0,0 2752,0 2752,285 0,285">
        <text:p/>
      </draw:polygon>
      <draw:polygon text:anchor-type="page" text:anchor-page-number="6" draw:z-index="4975" draw:name="Shape2542" draw:style-name="gr2" draw:text-style-name="P3" svg:width="1.1815in" svg:height="0.1917in" svg:x="2.3315in" svg:y="5.9598in" svg:viewBox="0 0 3002 488" draw:points="0,0 3002,0 3002,488 0,488">
        <text:p/>
      </draw:polygon>
      <draw:frame text:anchor-type="page" text:anchor-page-number="6" draw:z-index="4974" draw:name="Shape2541" draw:style-name="gr1" draw:text-style-name="P2" svg:width="0.1949in" svg:height="0.113in" svg:x="1.5917in" svg:y="5.9626in">
        <draw:text-box>
          <text:p><text:span text:style-name="T4">FRA</text:span></text:p>
        </draw:text-box>
      </draw:frame>
      <draw:frame text:anchor-type="page" text:anchor-page-number="6" draw:z-index="4973" draw:name="Shape2518" draw:style-name="gr1" draw:text-style-name="P2" svg:width="0.0433in" svg:height="0.1925in" svg:x="0.7016in" svg:y="5.9016in">
        <draw:text-box>
          <text:p><text:span text:style-name="T2"><text:s/></text:span></text:p>
        </draw:text-box>
      </draw:frame>
      <draw:polygon text:anchor-type="page" text:anchor-page-number="6" draw:z-index="4972" draw:name="Shape2540" draw:style-name="gr2" draw:text-style-name="P3" svg:width="0.6917in" svg:height="0.1118in" svg:x="1.5913in" svg:y="5.9598in" svg:viewBox="0 0 1758 285" draw:points="0,0 1758,0 1758,285 0,285">
        <text:p/>
      </draw:polygon>
      <draw:polygon text:anchor-type="page" text:anchor-page-number="6" draw:z-index="4971" draw:name="Shape2539" draw:style-name="gr2" draw:text-style-name="P3" svg:width="0.7882in" svg:height="0.1917in" svg:x="1.5433in" svg:y="5.9598in" svg:viewBox="0 0 2003 488" draw:points="0,0 2003,0 2003,488 0,488">
        <text:p/>
      </draw:polygon>
      <draw:frame text:anchor-type="page" text:anchor-page-number="6" draw:z-index="4970" draw:name="Shape2538" draw:style-name="gr1" draw:text-style-name="P2" svg:width="0.248in" svg:height="0.113in" svg:x="0.4535in" svg:y="5.9626in">
        <draw:text-box>
          <text:p><text:span text:style-name="T4">VLEP</text:span></text:p>
        </draw:text-box>
      </draw:frame>
      <draw:frame text:anchor-type="page" text:anchor-page-number="6" draw:z-index="4969" draw:name="Shape2517" draw:style-name="gr1" draw:text-style-name="P2" svg:width="0.0433in" svg:height="0.1925in" svg:x="0.411in" svg:y="5.9016in">
        <draw:text-box>
          <text:p><text:span text:style-name="T2"><text:s/></text:span></text:p>
        </draw:text-box>
      </draw:frame>
      <draw:frame text:anchor-type="page" text:anchor-page-number="6" draw:z-index="4968" draw:name="Shape2516" draw:style-name="gr1" draw:text-style-name="P2" svg:width="0.0433in" svg:height="0.1925in" svg:x="6.7098in" svg:y="5.761in">
        <draw:text-box>
          <text:p><text:span text:style-name="T2"><text:s/></text:span></text:p>
        </draw:text-box>
      </draw:frame>
      <draw:polygon text:anchor-type="page" text:anchor-page-number="6" draw:z-index="4967" draw:name="Shape2523" draw:style-name="gr2" draw:text-style-name="P3" svg:width="1.0835in" svg:height="0.1118in" svg:x="0.4114in" svg:y="5.9598in" svg:viewBox="0 0 2753 285" draw:points="0,0 2753,0 2753,285 0,285">
        <text:p/>
      </draw:polygon>
      <draw:polygon text:anchor-type="page" text:anchor-page-number="6" draw:z-index="4966" draw:name="Shape2522" draw:style-name="gr2" draw:text-style-name="P3" svg:width="1.1803in" svg:height="0.1917in" svg:x="0.363in" svg:y="5.9598in" svg:viewBox="0 0 2999 488" draw:points="0,0 2999,0 2999,488 0,488">
        <text:p/>
      </draw:polygon>
      <draw:polygon text:anchor-type="page" text:anchor-page-number="6" draw:z-index="4965" draw:name="Shape2492" draw:style-name="gr3" draw:text-style-name="P4" svg:width="1.1717in" svg:height="0.0098in" svg:x="6.6732in" svg:y="5.7465in" svg:viewBox="0 0 2977 26" draw:points="0,0 2977,0 2977,26 0,26">
        <text:p/>
      </draw:polygon>
      <draw:polygon text:anchor-type="page" text:anchor-page-number="6" draw:z-index="4964" draw:name="Shape2491" draw:style-name="gr3" draw:text-style-name="P4" svg:width="0.0102in" svg:height="0.0098in" svg:x="6.663in" svg:y="5.7465in" svg:viewBox="0 0 27 26" draw:points="0,0 27,0 27,26 0,26">
        <text:p/>
      </draw:polygon>
      <draw:polygon text:anchor-type="page" text:anchor-page-number="6" draw:z-index="4963" draw:name="Shape2486" draw:style-name="gr3" draw:text-style-name="P4" svg:width="0.7783in" svg:height="0.0098in" svg:x="5.8846in" svg:y="5.7465in" svg:viewBox="0 0 1978 26" draw:points="0,0 1978,0 1978,26 0,26">
        <text:p/>
      </draw:polygon>
      <draw:polygon text:anchor-type="page" text:anchor-page-number="6" draw:z-index="4962" draw:name="Shape2485" draw:style-name="gr3" draw:text-style-name="P4" svg:width="0.0098in" svg:height="0.0098in" svg:x="5.8748in" svg:y="5.7465in" svg:viewBox="0 0 26 26" draw:points="0,0 26,0 26,26 0,26">
        <text:p/>
      </draw:polygon>
      <draw:polygon text:anchor-type="page" text:anchor-page-number="6" draw:z-index="4961" draw:name="Shape2480" draw:style-name="gr3" draw:text-style-name="P4" svg:width="0.5799in" svg:height="0.0098in" svg:x="5.2949in" svg:y="5.7465in" svg:viewBox="0 0 1474 26" draw:points="0,0 1474,0 1474,26 0,26">
        <text:p/>
      </draw:polygon>
      <draw:polygon text:anchor-type="page" text:anchor-page-number="6" draw:z-index="4960" draw:name="Shape2479" draw:style-name="gr3" draw:text-style-name="P4" svg:width="0.0102in" svg:height="0.0098in" svg:x="5.2846in" svg:y="5.7465in" svg:viewBox="0 0 27 26" draw:points="0,0 27,0 27,26 0,26">
        <text:p/>
      </draw:polygon>
      <draw:polygon text:anchor-type="page" text:anchor-page-number="6" draw:z-index="4959" draw:name="Shape2478" draw:style-name="gr3" draw:text-style-name="P4" svg:width="1.1717in" svg:height="0.0098in" svg:x="4.113in" svg:y="5.7465in" svg:viewBox="0 0 2977 26" draw:points="0,0 2977,0 2977,26 0,26">
        <text:p/>
      </draw:polygon>
      <draw:polygon text:anchor-type="page" text:anchor-page-number="6" draw:z-index="4958" draw:name="Shape2477" draw:style-name="gr3" draw:text-style-name="P4" svg:width="0.0098in" svg:height="0.0098in" svg:x="4.1031in" svg:y="5.7465in" svg:viewBox="0 0 26 26" draw:points="0,0 26,0 26,26 0,26">
        <text:p/>
      </draw:polygon>
      <draw:polygon text:anchor-type="page" text:anchor-page-number="6" draw:z-index="4957" draw:name="Shape2476" draw:style-name="gr3" draw:text-style-name="P4" svg:width="0.5799in" svg:height="0.0098in" svg:x="3.5232in" svg:y="5.7465in" svg:viewBox="0 0 1474 26" draw:points="0,0 1474,0 1474,26 0,26">
        <text:p/>
      </draw:polygon>
      <draw:polygon text:anchor-type="page" text:anchor-page-number="6" draw:z-index="4956" draw:name="Shape2475" draw:style-name="gr3" draw:text-style-name="P4" svg:width="0.0102in" svg:height="0.0098in" svg:x="3.513in" svg:y="5.7465in" svg:viewBox="0 0 27 26" draw:points="0,0 27,0 27,26 0,26">
        <text:p/>
      </draw:polygon>
      <draw:polygon text:anchor-type="page" text:anchor-page-number="6" draw:z-index="4955" draw:name="Shape2474" draw:style-name="gr3" draw:text-style-name="P4" svg:width="1.1717in" svg:height="0.0098in" svg:x="2.3413in" svg:y="5.7465in" svg:viewBox="0 0 2977 26" draw:points="0,0 2977,0 2977,26 0,26">
        <text:p/>
      </draw:polygon>
      <draw:polygon text:anchor-type="page" text:anchor-page-number="6" draw:z-index="4954" draw:name="Shape2473" draw:style-name="gr3" draw:text-style-name="P4" svg:width="0.0098in" svg:height="0.0098in" svg:x="2.3315in" svg:y="5.7465in" svg:viewBox="0 0 26 26" draw:points="0,0 26,0 26,26 0,26">
        <text:p/>
      </draw:polygon>
      <draw:polygon text:anchor-type="page" text:anchor-page-number="6" draw:z-index="4953" draw:name="Shape2472" draw:style-name="gr3" draw:text-style-name="P4" svg:width="0.7768in" svg:height="0.0098in" svg:x="1.5547in" svg:y="5.7465in" svg:viewBox="0 0 1974 26" draw:points="0,0 1974,0 1974,26 0,26">
        <text:p/>
      </draw:polygon>
      <draw:polygon text:anchor-type="page" text:anchor-page-number="6" draw:z-index="4952" draw:name="Shape2471" draw:style-name="gr3" draw:text-style-name="P4" svg:width="0.0098in" svg:height="0.0098in" svg:x="1.5449in" svg:y="5.7465in" svg:viewBox="0 0 26 26" draw:points="0,0 26,0 26,26 0,26">
        <text:p/>
      </draw:polygon>
      <draw:polygon text:anchor-type="page" text:anchor-page-number="6" draw:z-index="4951" draw:name="Shape2470" draw:style-name="gr3" draw:text-style-name="P4" svg:width="1.1819in" svg:height="0.0098in" svg:x="0.363in" svg:y="5.7465in" svg:viewBox="0 0 3003 26" draw:points="0,0 3003,0 3003,26 0,26">
        <text:p/>
      </draw:polygon>
      <draw:frame text:anchor-type="page" text:anchor-page-number="6" draw:z-index="4950" draw:name="Shape2513" draw:style-name="gr1" draw:text-style-name="P2" svg:width="0.0433in" svg:height="0.1925in" svg:x="5.9228in" svg:y="5.761in">
        <draw:text-box>
          <text:p><text:span text:style-name="T2"><text:s/></text:span></text:p>
        </draw:text-box>
      </draw:frame>
      <draw:polygon text:anchor-type="page" text:anchor-page-number="6" draw:z-index="4949" draw:name="Shape2515" draw:style-name="gr4" draw:text-style-name="P5" svg:width="1.085in" svg:height="0.1913in" svg:x="6.7098in" svg:y="5.7583in" svg:viewBox="0 0 2757 487" draw:points="0,0 2757,0 2757,487 0,487">
        <text:p/>
      </draw:polygon>
      <draw:polygon text:anchor-type="page" text:anchor-page-number="6" draw:z-index="4948" draw:name="Shape2514" draw:style-name="gr4" draw:text-style-name="P5" svg:width="1.1819in" svg:height="0.1913in" svg:x="6.6614in" svg:y="5.7583in" svg:viewBox="0 0 3003 487" draw:points="0,0 3003,0 3003,487 0,487">
        <text:p/>
      </draw:polygon>
      <draw:frame text:anchor-type="page" text:anchor-page-number="6" draw:z-index="4947" draw:name="Shape2469" draw:style-name="gr1" draw:text-style-name="P2" svg:width="0.0433in" svg:height="0.1925in" svg:x="5.5217in" svg:y="5.6992in">
        <draw:text-box>
          <text:p><text:span text:style-name="T2"><text:s/></text:span></text:p>
        </draw:text-box>
      </draw:frame>
      <draw:polygon text:anchor-type="page" text:anchor-page-number="6" draw:z-index="4946" draw:name="Shape2512" draw:style-name="gr4" draw:text-style-name="P5" svg:width="0.6898in" svg:height="0.1913in" svg:x="5.9232in" svg:y="5.7583in" svg:viewBox="0 0 1753 487" draw:points="0,0 1753,0 1753,487 0,487">
        <text:p/>
      </draw:polygon>
      <draw:polygon text:anchor-type="page" text:anchor-page-number="6" draw:z-index="4945" draw:name="Shape2511" draw:style-name="gr4" draw:text-style-name="P5" svg:width="0.7866in" svg:height="0.1913in" svg:x="5.8748in" svg:y="5.7583in" svg:viewBox="0 0 1999 487" draw:points="0,0 1999,0 1999,487 0,487">
        <text:p/>
      </draw:polygon>
      <draw:frame text:anchor-type="page" text:anchor-page-number="6" draw:z-index="4944" draw:name="Shape2510" draw:style-name="gr1" draw:text-style-name="P2" svg:width="0.1894in" svg:height="0.113in" svg:x="5.3335in" svg:y="5.7602in">
        <draw:text-box>
          <text:p><text:span text:style-name="T4">ppm</text:span></text:p>
        </draw:text-box>
      </draw:frame>
      <draw:frame text:anchor-type="page" text:anchor-page-number="6" draw:z-index="4943" draw:name="Shape2468" draw:style-name="gr1" draw:text-style-name="P2" svg:width="0.0433in" svg:height="0.1925in" svg:x="4.448in" svg:y="5.6992in">
        <draw:text-box>
          <text:p><text:span text:style-name="T2"><text:s/></text:span></text:p>
        </draw:text-box>
      </draw:frame>
      <draw:polygon text:anchor-type="page" text:anchor-page-number="6" draw:z-index="4942" draw:name="Shape2509" draw:style-name="gr4" draw:text-style-name="P5" svg:width="0.4917in" svg:height="0.1114in" svg:x="5.3331in" svg:y="5.7583in" svg:viewBox="0 0 1250 284" draw:points="0,0 1250,0 1250,284 0,284">
        <text:p/>
      </draw:polygon>
      <draw:polygon text:anchor-type="page" text:anchor-page-number="6" draw:z-index="4941" draw:name="Shape2508" draw:style-name="gr4" draw:text-style-name="P5" svg:width="0.5917in" svg:height="0.1913in" svg:x="5.2831in" svg:y="5.7583in" svg:viewBox="0 0 1504 487" draw:points="0,0 1504,0 1504,487 0,487">
        <text:p/>
      </draw:polygon>
      <draw:frame text:anchor-type="page" text:anchor-page-number="6" draw:z-index="4940" draw:name="Shape2497" draw:style-name="gr1" draw:text-style-name="P2" svg:width="0.2969in" svg:height="0.113in" svg:x="4.1516in" svg:y="5.7602in">
        <draw:text-box>
          <text:p><text:span text:style-name="T4">mg/m3</text:span></text:p>
        </draw:text-box>
      </draw:frame>
      <draw:frame text:anchor-type="page" text:anchor-page-number="6" draw:z-index="4939" draw:name="Shape2467" draw:style-name="gr1" draw:text-style-name="P2" svg:width="0.0433in" svg:height="0.1925in" svg:x="3.75in" svg:y="5.6992in">
        <draw:text-box>
          <text:p><text:span text:style-name="T2"><text:s/></text:span></text:p>
        </draw:text-box>
      </draw:frame>
      <draw:polygon text:anchor-type="page" text:anchor-page-number="6" draw:z-index="4938" draw:name="Shape2507" draw:style-name="gr4" draw:text-style-name="P5" svg:width="1.0831in" svg:height="0.1114in" svg:x="4.1516in" svg:y="5.7583in" svg:viewBox="0 0 2752 284" draw:points="0,0 2752,0 2752,284 0,284">
        <text:p/>
      </draw:polygon>
      <draw:polygon text:anchor-type="page" text:anchor-page-number="6" draw:z-index="4937" draw:name="Shape2506" draw:style-name="gr4" draw:text-style-name="P5" svg:width="1.1799in" svg:height="0.1913in" svg:x="4.1031in" svg:y="5.7583in" svg:viewBox="0 0 2998 487" draw:points="0,0 2998,0 2998,487 0,487">
        <text:p/>
      </draw:polygon>
      <draw:frame text:anchor-type="page" text:anchor-page-number="6" draw:z-index="4936" draw:name="Shape2496" draw:style-name="gr1" draw:text-style-name="P2" svg:width="0.1894in" svg:height="0.113in" svg:x="3.561in" svg:y="5.7602in">
        <draw:text-box>
          <text:p><text:span text:style-name="T4">ppm</text:span></text:p>
        </draw:text-box>
      </draw:frame>
      <draw:frame text:anchor-type="page" text:anchor-page-number="6" draw:z-index="4935" draw:name="Shape2466" draw:style-name="gr1" draw:text-style-name="P2" svg:width="0.0433in" svg:height="0.1925in" svg:x="2.6764in" svg:y="5.6992in">
        <draw:text-box>
          <text:p><text:span text:style-name="T2"><text:s/></text:span></text:p>
        </draw:text-box>
      </draw:frame>
      <draw:polygon text:anchor-type="page" text:anchor-page-number="6" draw:z-index="4934" draw:name="Shape2505" draw:style-name="gr4" draw:text-style-name="P5" svg:width="0.4933in" svg:height="0.1114in" svg:x="3.5614in" svg:y="5.7583in" svg:viewBox="0 0 1254 284" draw:points="0,0 1254,0 1254,284 0,284">
        <text:p/>
      </draw:polygon>
      <draw:polygon text:anchor-type="page" text:anchor-page-number="6" draw:z-index="4933" draw:name="Shape2504" draw:style-name="gr4" draw:text-style-name="P5" svg:width="0.5902in" svg:height="0.1913in" svg:x="3.513in" svg:y="5.7583in" svg:viewBox="0 0 1500 487" draw:points="0,0 1500,0 1500,487 0,487">
        <text:p/>
      </draw:polygon>
      <draw:frame text:anchor-type="page" text:anchor-page-number="6" draw:z-index="4932" draw:name="Shape2495" draw:style-name="gr1" draw:text-style-name="P2" svg:width="0.2969in" svg:height="0.113in" svg:x="2.3799in" svg:y="5.7602in">
        <draw:text-box>
          <text:p><text:span text:style-name="T4">mg/m3</text:span></text:p>
        </draw:text-box>
      </draw:frame>
      <draw:frame text:anchor-type="page" text:anchor-page-number="6" draw:z-index="4931" draw:name="Shape2501" draw:style-name="gr1" draw:text-style-name="P2" svg:width="0.0433in" svg:height="0.1925in" svg:x="1.5917in" svg:y="5.761in">
        <draw:text-box>
          <text:p><text:span text:style-name="T2"><text:s/></text:span></text:p>
        </draw:text-box>
      </draw:frame>
      <draw:polygon text:anchor-type="page" text:anchor-page-number="6" draw:z-index="4930" draw:name="Shape2503" draw:style-name="gr4" draw:text-style-name="P5" svg:width="1.0831in" svg:height="0.1114in" svg:x="2.3799in" svg:y="5.7583in" svg:viewBox="0 0 2752 284" draw:points="0,0 2752,0 2752,284 0,284">
        <text:p/>
      </draw:polygon>
      <draw:polygon text:anchor-type="page" text:anchor-page-number="6" draw:z-index="4929" draw:name="Shape2502" draw:style-name="gr4" draw:text-style-name="P5" svg:width="1.1815in" svg:height="0.1913in" svg:x="2.3315in" svg:y="5.7583in" svg:viewBox="0 0 3002 487" draw:points="0,0 3002,0 3002,487 0,487">
        <text:p/>
      </draw:polygon>
      <draw:frame text:anchor-type="page" text:anchor-page-number="6" draw:z-index="4928" draw:name="Shape2498" draw:style-name="gr1" draw:text-style-name="P2" svg:width="0.085in" svg:height="0.1925in" svg:x="0.411in" svg:y="5.761in">
        <draw:text-box>
          <text:p><text:span text:style-name="T2"><text:s text:c="2"/></text:span></text:p>
        </draw:text-box>
      </draw:frame>
      <draw:polygon text:anchor-type="page" text:anchor-page-number="6" draw:z-index="4927" draw:name="Shape2500" draw:style-name="gr4" draw:text-style-name="P5" svg:width="0.6917in" svg:height="0.1913in" svg:x="1.5913in" svg:y="5.7583in" svg:viewBox="0 0 1758 487" draw:points="0,0 1758,0 1758,487 0,487">
        <text:p/>
      </draw:polygon>
      <draw:polygon text:anchor-type="page" text:anchor-page-number="6" draw:z-index="4926" draw:name="Shape2499" draw:style-name="gr4" draw:text-style-name="P5" svg:width="0.7882in" svg:height="0.1913in" svg:x="1.5433in" svg:y="5.7583in" svg:viewBox="0 0 2003 487" draw:points="0,0 2003,0 2003,487 0,487">
        <text:p/>
      </draw:polygon>
      <draw:frame text:anchor-type="page" text:anchor-page-number="6" draw:z-index="4925" draw:name="Shape2483" draw:style-name="gr1" draw:text-style-name="P2" svg:width="0.0433in" svg:height="0.1925in" svg:x="6.7098in" svg:y="5.5264in">
        <draw:text-box>
          <text:p><text:span text:style-name="T2"><text:s/></text:span></text:p>
        </draw:text-box>
      </draw:frame>
      <draw:polygon text:anchor-type="page" text:anchor-page-number="6" draw:z-index="4924" draw:name="Shape2494" draw:style-name="gr4" draw:text-style-name="P5" svg:width="1.0835in" svg:height="0.1913in" svg:x="0.4114in" svg:y="5.7583in" svg:viewBox="0 0 2753 487" draw:points="0,0 2753,0 2753,487 0,487">
        <text:p/>
      </draw:polygon>
      <draw:polygon text:anchor-type="page" text:anchor-page-number="6" draw:z-index="4923" draw:name="Shape2493" draw:style-name="gr4" draw:text-style-name="P5" svg:width="1.1803in" svg:height="0.1913in" svg:x="0.363in" svg:y="5.7583in" svg:viewBox="0 0 2999 487" draw:points="0,0 2999,0 2999,487 0,487">
        <text:p/>
      </draw:polygon>
      <draw:polygon text:anchor-type="page" text:anchor-page-number="6" draw:z-index="4922" draw:name="Shape2448" draw:style-name="gr3" draw:text-style-name="P4" svg:width="1.1717in" svg:height="0.0102in" svg:x="6.6732in" svg:y="5.513in" svg:viewBox="0 0 2977 27" draw:points="0,0 2977,0 2977,27 0,27">
        <text:p/>
      </draw:polygon>
      <draw:polygon text:anchor-type="page" text:anchor-page-number="6" draw:z-index="4921" draw:name="Shape2447" draw:style-name="gr3" draw:text-style-name="P4" svg:width="0.0102in" svg:height="0.0102in" svg:x="6.663in" svg:y="5.513in" svg:viewBox="0 0 27 27" draw:points="0,0 27,0 27,27 0,27">
        <text:p/>
      </draw:polygon>
      <draw:polygon text:anchor-type="page" text:anchor-page-number="6" draw:z-index="4920" draw:name="Shape2446" draw:style-name="gr3" draw:text-style-name="P4" svg:width="0.7783in" svg:height="0.0102in" svg:x="5.8846in" svg:y="5.513in" svg:viewBox="0 0 1978 27" draw:points="0,0 1978,0 1978,27 0,27">
        <text:p/>
      </draw:polygon>
      <draw:polygon text:anchor-type="page" text:anchor-page-number="6" draw:z-index="4919" draw:name="Shape2445" draw:style-name="gr3" draw:text-style-name="P4" svg:width="0.0098in" svg:height="0.0102in" svg:x="5.8748in" svg:y="5.513in" svg:viewBox="0 0 26 27" draw:points="0,0 26,0 26,27 0,27">
        <text:p/>
      </draw:polygon>
      <draw:polygon text:anchor-type="page" text:anchor-page-number="6" draw:z-index="4918" draw:name="Shape2444" draw:style-name="gr3" draw:text-style-name="P4" svg:width="0.5799in" svg:height="0.0102in" svg:x="5.2949in" svg:y="5.513in" svg:viewBox="0 0 1474 27" draw:points="0,0 1474,0 1474,27 0,27">
        <text:p/>
      </draw:polygon>
      <draw:polygon text:anchor-type="page" text:anchor-page-number="6" draw:z-index="4917" draw:name="Shape2443" draw:style-name="gr3" draw:text-style-name="P4" svg:width="0.0102in" svg:height="0.0102in" svg:x="5.2846in" svg:y="5.513in" svg:viewBox="0 0 27 27" draw:points="0,0 27,0 27,27 0,27">
        <text:p/>
      </draw:polygon>
      <draw:polygon text:anchor-type="page" text:anchor-page-number="6" draw:z-index="4916" draw:name="Shape2442" draw:style-name="gr3" draw:text-style-name="P4" svg:width="1.1717in" svg:height="0.0102in" svg:x="4.113in" svg:y="5.513in" svg:viewBox="0 0 2977 27" draw:points="0,0 2977,0 2977,27 0,27">
        <text:p/>
      </draw:polygon>
      <draw:polygon text:anchor-type="page" text:anchor-page-number="6" draw:z-index="4915" draw:name="Shape2441" draw:style-name="gr3" draw:text-style-name="P4" svg:width="0.0098in" svg:height="0.0102in" svg:x="4.1031in" svg:y="5.513in" svg:viewBox="0 0 26 27" draw:points="0,0 26,0 26,27 0,27">
        <text:p/>
      </draw:polygon>
      <draw:polygon text:anchor-type="page" text:anchor-page-number="6" draw:z-index="4914" draw:name="Shape2440" draw:style-name="gr3" draw:text-style-name="P4" svg:width="0.5799in" svg:height="0.0102in" svg:x="3.5232in" svg:y="5.513in" svg:viewBox="0 0 1474 27" draw:points="0,0 1474,0 1474,27 0,27">
        <text:p/>
      </draw:polygon>
      <draw:polygon text:anchor-type="page" text:anchor-page-number="6" draw:z-index="4913" draw:name="Shape2439" draw:style-name="gr3" draw:text-style-name="P4" svg:width="0.0102in" svg:height="0.0102in" svg:x="3.513in" svg:y="5.513in" svg:viewBox="0 0 27 27" draw:points="0,0 27,0 27,27 0,27">
        <text:p/>
      </draw:polygon>
      <draw:polygon text:anchor-type="page" text:anchor-page-number="6" draw:z-index="4912" draw:name="Shape2438" draw:style-name="gr3" draw:text-style-name="P4" svg:width="1.1717in" svg:height="0.0102in" svg:x="2.3413in" svg:y="5.513in" svg:viewBox="0 0 2977 27" draw:points="0,0 2977,0 2977,27 0,27">
        <text:p/>
      </draw:polygon>
      <draw:polygon text:anchor-type="page" text:anchor-page-number="6" draw:z-index="4911" draw:name="Shape2437" draw:style-name="gr3" draw:text-style-name="P4" svg:width="0.0098in" svg:height="0.0102in" svg:x="2.3315in" svg:y="5.513in" svg:viewBox="0 0 26 27" draw:points="0,0 26,0 26,27 0,27">
        <text:p/>
      </draw:polygon>
      <draw:polygon text:anchor-type="page" text:anchor-page-number="6" draw:z-index="4910" draw:name="Shape2436" draw:style-name="gr3" draw:text-style-name="P4" svg:width="0.7768in" svg:height="0.0102in" svg:x="1.5547in" svg:y="5.513in" svg:viewBox="0 0 1974 27" draw:points="0,0 1974,0 1974,27 0,27">
        <text:p/>
      </draw:polygon>
      <draw:polygon text:anchor-type="page" text:anchor-page-number="6" draw:z-index="4909" draw:name="Shape2435" draw:style-name="gr3" draw:text-style-name="P4" svg:width="0.0098in" svg:height="0.0102in" svg:x="1.5449in" svg:y="5.513in" svg:viewBox="0 0 26 27" draw:points="0,0 26,0 26,27 0,27">
        <text:p/>
      </draw:polygon>
      <draw:polygon text:anchor-type="page" text:anchor-page-number="6" draw:z-index="4908" draw:name="Shape2425" draw:style-name="gr3" draw:text-style-name="P4" svg:width="1.1819in" svg:height="0.0102in" svg:x="0.363in" svg:y="5.513in" svg:viewBox="0 0 3003 27" draw:points="0,0 3003,0 3003,27 0,27">
        <text:p/>
      </draw:polygon>
      <draw:frame text:anchor-type="page" text:anchor-page-number="6" draw:z-index="4907" draw:name="Shape2484" draw:style-name="gr1" draw:text-style-name="P2" svg:width="0.0433in" svg:height="0.1925in" svg:x="6.4846in" svg:y="5.5764in">
        <draw:text-box>
          <text:p><text:span text:style-name="T2"><text:s/></text:span></text:p>
        </draw:text-box>
      </draw:frame>
      <draw:polygon text:anchor-type="page" text:anchor-page-number="6" draw:z-index="4906" draw:name="Shape2490" draw:style-name="gr4" draw:text-style-name="P5" svg:width="1.085in" svg:height="0.1917in" svg:x="6.7098in" svg:y="5.5232in" svg:viewBox="0 0 2757 488" draw:points="0,0 2757,0 2757,488 0,488">
        <text:p/>
      </draw:polygon>
      <draw:polygon text:anchor-type="page" text:anchor-page-number="6" draw:z-index="4905" draw:name="Shape2489" draw:style-name="gr4" draw:text-style-name="P5" svg:width="1.1819in" svg:height="0.2232in" svg:x="6.6614in" svg:y="5.5232in" svg:viewBox="0 0 3003 568" draw:points="0,0 3003,0 3003,568 0,568">
        <text:p/>
      </draw:polygon>
      <draw:frame text:anchor-type="page" text:anchor-page-number="6" draw:z-index="4904" draw:name="Shape2488" draw:style-name="gr1" draw:text-style-name="P2" svg:width="0.5594in" svg:height="0.113in" svg:x="5.9228in" svg:y="5.6374in">
        <draw:text-box>
          <text:p><text:span text:style-name="T4">Osservazioni</text:span></text:p>
        </draw:text-box>
      </draw:frame>
      <draw:frame text:anchor-type="page" text:anchor-page-number="6" draw:z-index="4903" draw:name="Shape2459" draw:style-name="gr1" draw:text-style-name="P2" svg:width="0.2858in" svg:height="0.113in" svg:x="5.9228in" svg:y="5.5256in">
        <draw:text-box>
          <text:p><text:span text:style-name="T4">Note / </text:span></text:p>
        </draw:text-box>
      </draw:frame>
      <draw:polygon text:anchor-type="page" text:anchor-page-number="6" draw:z-index="4902" draw:name="Shape2487" draw:style-name="gr4" draw:text-style-name="P5" svg:width="0.6898in" svg:height="0.1118in" svg:x="5.9232in" svg:y="5.6346in" svg:viewBox="0 0 1753 285" draw:points="0,0 1753,0 1753,285 0,285">
        <text:p/>
      </draw:polygon>
      <draw:frame text:anchor-type="page" text:anchor-page-number="6" draw:z-index="4901" draw:name="Shape2465" draw:style-name="gr1" draw:text-style-name="P2" svg:width="0.0433in" svg:height="0.1925in" svg:x="5.3335in" svg:y="5.5264in">
        <draw:text-box>
          <text:p><text:span text:style-name="T2"><text:s/></text:span></text:p>
        </draw:text-box>
      </draw:frame>
      <draw:polygon text:anchor-type="page" text:anchor-page-number="6" draw:z-index="4900" draw:name="Shape2482" draw:style-name="gr4" draw:text-style-name="P5" svg:width="0.6898in" svg:height="0.1114in" svg:x="5.9232in" svg:y="5.5232in" svg:viewBox="0 0 1753 284" draw:points="0,0 1753,0 1753,284 0,284">
        <text:p/>
      </draw:polygon>
      <draw:polygon text:anchor-type="page" text:anchor-page-number="6" draw:z-index="4899" draw:name="Shape2481" draw:style-name="gr4" draw:text-style-name="P5" svg:width="0.7866in" svg:height="0.2232in" svg:x="5.8748in" svg:y="5.5232in" svg:viewBox="0 0 1999 568" draw:points="0,0 1999,0 1999,568 0,568">
        <text:p/>
      </draw:polygon>
      <draw:frame text:anchor-type="page" text:anchor-page-number="6" draw:z-index="4898" draw:name="Shape2432" draw:style-name="gr1" draw:text-style-name="P2" svg:width="0.0433in" svg:height="0.1925in" svg:x="4.6866in" svg:y="5.4646in">
        <draw:text-box>
          <text:p><text:span text:style-name="T2"><text:s/></text:span></text:p>
        </draw:text-box>
      </draw:frame>
      <draw:polygon text:anchor-type="page" text:anchor-page-number="6" draw:z-index="4897" draw:name="Shape2464" draw:style-name="gr4" draw:text-style-name="P5" svg:width="0.4917in" svg:height="0.1917in" svg:x="5.3331in" svg:y="5.5232in" svg:viewBox="0 0 1250 488" draw:points="0,0 1250,0 1250,488 0,488">
        <text:p/>
      </draw:polygon>
      <draw:polygon text:anchor-type="page" text:anchor-page-number="6" draw:z-index="4896" draw:name="Shape2463" draw:style-name="gr4" draw:text-style-name="P5" svg:width="0.5917in" svg:height="0.2232in" svg:x="5.2831in" svg:y="5.5232in" svg:viewBox="0 0 1504 568" draw:points="0,0 1504,0 1504,568 0,568">
        <text:p/>
      </draw:polygon>
      <draw:frame text:anchor-type="page" text:anchor-page-number="6" draw:z-index="4895" draw:name="Shape2458" draw:style-name="gr1" draw:text-style-name="P2" svg:width="0.5331in" svg:height="0.113in" svg:x="4.1516in" svg:y="5.5256in">
        <draw:text-box>
          <text:p><text:span text:style-name="T4">STEL/15min</text:span></text:p>
        </draw:text-box>
      </draw:frame>
      <draw:frame text:anchor-type="page" text:anchor-page-number="6" draw:z-index="4894" draw:name="Shape2460" draw:style-name="gr1" draw:text-style-name="P2" svg:width="0.0433in" svg:height="0.1925in" svg:x="3.561in" svg:y="5.5264in">
        <draw:text-box>
          <text:p><text:span text:style-name="T2"><text:s/></text:span></text:p>
        </draw:text-box>
      </draw:frame>
      <draw:polygon text:anchor-type="page" text:anchor-page-number="6" draw:z-index="4893" draw:name="Shape2462" draw:style-name="gr4" draw:text-style-name="P5" svg:width="1.0831in" svg:height="0.1114in" svg:x="4.1516in" svg:y="5.5232in" svg:viewBox="0 0 2752 284" draw:points="0,0 2752,0 2752,284 0,284">
        <text:p/>
      </draw:polygon>
      <draw:polygon text:anchor-type="page" text:anchor-page-number="6" draw:z-index="4892" draw:name="Shape2461" draw:style-name="gr4" draw:text-style-name="P5" svg:width="1.1799in" svg:height="0.2232in" svg:x="4.1031in" svg:y="5.5232in" svg:viewBox="0 0 2998 568" draw:points="0,0 2998,0 2998,568 0,568">
        <text:p/>
      </draw:polygon>
      <draw:frame text:anchor-type="page" text:anchor-page-number="6" draw:z-index="4891" draw:name="Shape2431" draw:style-name="gr1" draw:text-style-name="P2" svg:width="0.0433in" svg:height="0.1925in" svg:x="2.7311in" svg:y="5.4646in">
        <draw:text-box>
          <text:p><text:span text:style-name="T2"><text:s/></text:span></text:p>
        </draw:text-box>
      </draw:frame>
      <draw:polygon text:anchor-type="page" text:anchor-page-number="6" draw:z-index="4890" draw:name="Shape2457" draw:style-name="gr4" draw:text-style-name="P5" svg:width="0.4933in" svg:height="0.1917in" svg:x="3.5614in" svg:y="5.5232in" svg:viewBox="0 0 1254 488" draw:points="0,0 1254,0 1254,488 0,488">
        <text:p/>
      </draw:polygon>
      <draw:polygon text:anchor-type="page" text:anchor-page-number="6" draw:z-index="4889" draw:name="Shape2456" draw:style-name="gr4" draw:text-style-name="P5" svg:width="0.5902in" svg:height="0.2232in" svg:x="3.513in" svg:y="5.5232in" svg:viewBox="0 0 1500 568" draw:points="0,0 1500,0 1500,568 0,568">
        <text:p/>
      </draw:polygon>
      <draw:frame text:anchor-type="page" text:anchor-page-number="6" draw:z-index="4888" draw:name="Shape2455" draw:style-name="gr1" draw:text-style-name="P2" svg:width="0.3469in" svg:height="0.113in" svg:x="2.3799in" svg:y="5.5256in">
        <draw:text-box>
          <text:p><text:span text:style-name="T4">TWA/8h</text:span></text:p>
        </draw:text-box>
      </draw:frame>
      <draw:frame text:anchor-type="page" text:anchor-page-number="6" draw:z-index="4887" draw:name="Shape2430" draw:style-name="gr1" draw:text-style-name="P2" svg:width="0.0433in" svg:height="0.1925in" svg:x="1.8181in" svg:y="5.4646in">
        <draw:text-box>
          <text:p><text:span text:style-name="T2"><text:s/></text:span></text:p>
        </draw:text-box>
      </draw:frame>
      <draw:polygon text:anchor-type="page" text:anchor-page-number="6" draw:z-index="4886" draw:name="Shape2454" draw:style-name="gr4" draw:text-style-name="P5" svg:width="1.0831in" svg:height="0.1114in" svg:x="2.3799in" svg:y="5.5232in" svg:viewBox="0 0 2752 284" draw:points="0,0 2752,0 2752,284 0,284">
        <text:p/>
      </draw:polygon>
      <draw:polygon text:anchor-type="page" text:anchor-page-number="6" draw:z-index="4885" draw:name="Shape2453" draw:style-name="gr4" draw:text-style-name="P5" svg:width="1.1815in" svg:height="0.2232in" svg:x="2.3315in" svg:y="5.5232in" svg:viewBox="0 0 3002 568" draw:points="0,0 3002,0 3002,568 0,568">
        <text:p/>
      </draw:polygon>
      <draw:frame text:anchor-type="page" text:anchor-page-number="6" draw:z-index="4884" draw:name="Shape2452" draw:style-name="gr1" draw:text-style-name="P2" svg:width="0.2276in" svg:height="0.113in" svg:x="1.5917in" svg:y="5.5256in">
        <draw:text-box>
          <text:p><text:span text:style-name="T4">Stato</text:span></text:p>
        </draw:text-box>
      </draw:frame>
      <draw:frame text:anchor-type="page" text:anchor-page-number="6" draw:z-index="4883" draw:name="Shape2429" draw:style-name="gr1" draw:text-style-name="P2" svg:width="0.0433in" svg:height="0.1925in" svg:x="0.6417in" svg:y="5.4646in">
        <draw:text-box>
          <text:p><text:span text:style-name="T2"><text:s/></text:span></text:p>
        </draw:text-box>
      </draw:frame>
      <draw:polygon text:anchor-type="page" text:anchor-page-number="6" draw:z-index="4882" draw:name="Shape2451" draw:style-name="gr4" draw:text-style-name="P5" svg:width="0.6917in" svg:height="0.1114in" svg:x="1.5913in" svg:y="5.5232in" svg:viewBox="0 0 1758 284" draw:points="0,0 1758,0 1758,284 0,284">
        <text:p/>
      </draw:polygon>
      <draw:polygon text:anchor-type="page" text:anchor-page-number="6" draw:z-index="4881" draw:name="Shape2450" draw:style-name="gr4" draw:text-style-name="P5" svg:width="0.7882in" svg:height="0.2232in" svg:x="1.5433in" svg:y="5.5232in" svg:viewBox="0 0 2003 568" draw:points="0,0 2003,0 2003,568 0,568">
        <text:p/>
      </draw:polygon>
      <draw:frame text:anchor-type="page" text:anchor-page-number="6" draw:z-index="4880" draw:name="Shape2449" draw:style-name="gr1" draw:text-style-name="P2" svg:width="0.1858in" svg:height="0.113in" svg:x="0.4535in" svg:y="5.5256in">
        <draw:text-box>
          <text:p><text:span text:style-name="T4">Tipo</text:span></text:p>
        </draw:text-box>
      </draw:frame>
      <draw:frame text:anchor-type="page" text:anchor-page-number="6" draw:z-index="4879" draw:name="Shape2428" draw:style-name="gr1" draw:text-style-name="P2" svg:width="0.0433in" svg:height="0.1925in" svg:x="0.411in" svg:y="5.4646in">
        <draw:text-box>
          <text:p><text:span text:style-name="T2"><text:s/></text:span></text:p>
        </draw:text-box>
      </draw:frame>
      <draw:frame text:anchor-type="page" text:anchor-page-number="6" draw:z-index="4878" draw:name="Shape2423" draw:style-name="gr1" draw:text-style-name="P2" svg:width="0.0433in" svg:height="0.1925in" svg:x="1.5953in" svg:y="5.3374in">
        <draw:text-box>
          <text:p><text:span text:style-name="T2"><text:s/></text:span></text:p>
        </draw:text-box>
      </draw:frame>
      <draw:polygon text:anchor-type="page" text:anchor-page-number="6" draw:z-index="4877" draw:name="Shape2434" draw:style-name="gr4" draw:text-style-name="P5" svg:width="1.0835in" svg:height="0.1114in" svg:x="0.4114in" svg:y="5.5232in" svg:viewBox="0 0 2753 284" draw:points="0,0 2753,0 2753,284 0,284">
        <text:p/>
      </draw:polygon>
      <draw:polygon text:anchor-type="page" text:anchor-page-number="6" draw:z-index="4876" draw:name="Shape2433" draw:style-name="gr4" draw:text-style-name="P5" svg:width="1.1803in" svg:height="0.2232in" svg:x="0.363in" svg:y="5.5232in" svg:viewBox="0 0 2999 568" draw:points="0,0 2999,0 2999,568 0,568">
        <text:p/>
      </draw:polygon>
      <draw:frame text:anchor-type="page" text:anchor-page-number="6" draw:z-index="4875" draw:name="Shape2427" draw:style-name="gr1" draw:text-style-name="P2" svg:width="1.1449in" svg:height="0.1295in" svg:x="0.4535in" svg:y="5.3854in">
        <draw:text-box>
          <text:p><text:span text:style-name="T3">Valore limite di soglia</text:span></text:p>
        </draw:text-box>
      </draw:frame>
      <draw:frame text:anchor-type="page" text:anchor-page-number="6" draw:z-index="4874" draw:name="Shape2422" draw:style-name="gr1" draw:text-style-name="P2" svg:width="0.0433in" svg:height="0.1925in" svg:x="0.411in" svg:y="5.3374in">
        <draw:text-box>
          <text:p><text:span text:style-name="T2"><text:s/></text:span></text:p>
        </draw:text-box>
      </draw:frame>
      <draw:frame text:anchor-type="page" text:anchor-page-number="6" draw:z-index="4873" draw:name="Shape2418" draw:style-name="gr1" draw:text-style-name="P2" svg:width="0.0433in" svg:height="0.1925in" svg:x="1.6311in" svg:y="5.2098in">
        <draw:text-box>
          <text:p><text:span text:style-name="T2"><text:s/></text:span></text:p>
        </draw:text-box>
      </draw:frame>
      <draw:polygon text:anchor-type="page" text:anchor-page-number="6" draw:z-index="4872" draw:name="Shape2426" draw:style-name="gr4" draw:text-style-name="P5" svg:width="7.3835in" svg:height="0.1283in" svg:x="0.4114in" svg:y="5.3846in" svg:viewBox="0 0 18755 327" draw:points="0,0 18755,0 18755,327 0,327">
        <text:p/>
      </draw:polygon>
      <draw:polygon text:anchor-type="page" text:anchor-page-number="6" draw:z-index="4871" draw:name="Shape2424" draw:style-name="gr4" draw:text-style-name="P5" svg:width="7.4803in" svg:height="0.1283in" svg:x="0.363in" svg:y="5.3846in" svg:viewBox="0 0 19001 327" draw:points="0,0 19001,0 19001,327 0,327">
        <text:p/>
      </draw:polygon>
      <draw:frame text:anchor-type="page" text:anchor-page-number="6" draw:z-index="4870" draw:name="Shape2419" draw:style-name="gr1" draw:text-style-name="P2" svg:width="1.1776in" svg:height="0.1295in" svg:x="0.4535in" svg:y="5.2571in">
        <draw:text-box>
          <text:p><text:span text:style-name="T3">CALCIO CARBONATO</text:span></text:p>
        </draw:text-box>
      </draw:frame>
      <draw:frame text:anchor-type="page" text:anchor-page-number="6" draw:z-index="4869" draw:name="Shape2417" draw:style-name="gr1" draw:text-style-name="P2" svg:width="0.0433in" svg:height="0.1925in" svg:x="0.411in" svg:y="5.2098in">
        <draw:text-box>
          <text:p><text:span text:style-name="T2"><text:s/></text:span></text:p>
        </draw:text-box>
      </draw:frame>
      <draw:frame text:anchor-type="page" text:anchor-page-number="6" draw:z-index="4868" draw:name="Shape2416" draw:style-name="gr1" draw:text-style-name="P2" svg:width="0.0433in" svg:height="0.1925in" svg:x="0.3634in" svg:y="5.0693in">
        <draw:text-box>
          <text:p><text:span text:style-name="T2"><text:s/></text:span></text:p>
        </draw:text-box>
      </draw:frame>
      <draw:polygon text:anchor-type="page" text:anchor-page-number="6" draw:z-index="4867" draw:name="Shape2421" draw:style-name="gr5" draw:text-style-name="P6" svg:width="7.3835in" svg:height="0.1264in" svg:x="0.4114in" svg:y="5.2583in" svg:viewBox="0 0 18755 322" draw:points="0,0 18755,0 18755,322 0,322">
        <text:p/>
      </draw:polygon>
      <draw:polygon text:anchor-type="page" text:anchor-page-number="6" draw:z-index="4866" draw:name="Shape2420" draw:style-name="gr5" draw:text-style-name="P6" svg:width="7.4803in" svg:height="0.1264in" svg:x="0.363in" svg:y="5.2583in" svg:viewBox="0 0 19001 322" draw:points="0,0 19001,0 19001,322 0,322">
        <text:p/>
      </draw:polygon>
      <draw:frame text:anchor-type="page" text:anchor-page-number="6" draw:z-index="4865" draw:name="Shape2415" draw:style-name="gr1" draw:text-style-name="P2" svg:width="0.0433in" svg:height="0.1925in" svg:x="6.7098in" svg:y="4.878in">
        <draw:text-box>
          <text:p><text:span text:style-name="T2"><text:s/></text:span></text:p>
        </draw:text-box>
      </draw:frame>
      <draw:polygon text:anchor-type="page" text:anchor-page-number="6" draw:z-index="4864" draw:name="Shape2386" draw:style-name="gr3" draw:text-style-name="P4" svg:width="1.1717in" svg:height="0.0098in" svg:x="6.6732in" svg:y="4.865in" svg:viewBox="0 0 2977 26" draw:points="0,0 2977,0 2977,26 0,26">
        <text:p/>
      </draw:polygon>
      <draw:polygon text:anchor-type="page" text:anchor-page-number="6" draw:z-index="4863" draw:name="Shape2385" draw:style-name="gr3" draw:text-style-name="P4" svg:width="0.0102in" svg:height="0.0098in" svg:x="6.663in" svg:y="4.865in" svg:viewBox="0 0 27 26" draw:points="0,0 27,0 27,26 0,26">
        <text:p/>
      </draw:polygon>
      <draw:polygon text:anchor-type="page" text:anchor-page-number="6" draw:z-index="4862" draw:name="Shape2383" draw:style-name="gr3" draw:text-style-name="P4" svg:width="0.7783in" svg:height="0.0098in" svg:x="5.8846in" svg:y="4.865in" svg:viewBox="0 0 1978 26" draw:points="0,0 1978,0 1978,26 0,26">
        <text:p/>
      </draw:polygon>
      <draw:polygon text:anchor-type="page" text:anchor-page-number="6" draw:z-index="4861" draw:name="Shape2382" draw:style-name="gr3" draw:text-style-name="P4" svg:width="0.0098in" svg:height="0.0098in" svg:x="5.8748in" svg:y="4.865in" svg:viewBox="0 0 26 26" draw:points="0,0 26,0 26,26 0,26">
        <text:p/>
      </draw:polygon>
      <draw:polygon text:anchor-type="page" text:anchor-page-number="6" draw:z-index="4860" draw:name="Shape2381" draw:style-name="gr3" draw:text-style-name="P4" svg:width="0.5799in" svg:height="0.0098in" svg:x="5.2949in" svg:y="4.865in" svg:viewBox="0 0 1474 26" draw:points="0,0 1474,0 1474,26 0,26">
        <text:p/>
      </draw:polygon>
      <draw:polygon text:anchor-type="page" text:anchor-page-number="6" draw:z-index="4859" draw:name="Shape2380" draw:style-name="gr3" draw:text-style-name="P4" svg:width="0.0102in" svg:height="0.0098in" svg:x="5.2846in" svg:y="4.865in" svg:viewBox="0 0 27 26" draw:points="0,0 27,0 27,26 0,26">
        <text:p/>
      </draw:polygon>
      <draw:polygon text:anchor-type="page" text:anchor-page-number="6" draw:z-index="4858" draw:name="Shape2379" draw:style-name="gr3" draw:text-style-name="P4" svg:width="1.1717in" svg:height="0.0098in" svg:x="4.113in" svg:y="4.865in" svg:viewBox="0 0 2977 26" draw:points="0,0 2977,0 2977,26 0,26">
        <text:p/>
      </draw:polygon>
      <draw:polygon text:anchor-type="page" text:anchor-page-number="6" draw:z-index="4857" draw:name="Shape2378" draw:style-name="gr3" draw:text-style-name="P4" svg:width="0.0098in" svg:height="0.0098in" svg:x="4.1031in" svg:y="4.865in" svg:viewBox="0 0 26 26" draw:points="0,0 26,0 26,26 0,26">
        <text:p/>
      </draw:polygon>
      <draw:polygon text:anchor-type="page" text:anchor-page-number="6" draw:z-index="4856" draw:name="Shape2377" draw:style-name="gr3" draw:text-style-name="P4" svg:width="0.5799in" svg:height="0.0098in" svg:x="3.5232in" svg:y="4.865in" svg:viewBox="0 0 1474 26" draw:points="0,0 1474,0 1474,26 0,26">
        <text:p/>
      </draw:polygon>
      <draw:polygon text:anchor-type="page" text:anchor-page-number="6" draw:z-index="4855" draw:name="Shape2376" draw:style-name="gr3" draw:text-style-name="P4" svg:width="0.0102in" svg:height="0.0098in" svg:x="3.513in" svg:y="4.865in" svg:viewBox="0 0 27 26" draw:points="0,0 27,0 27,26 0,26">
        <text:p/>
      </draw:polygon>
      <draw:polygon text:anchor-type="page" text:anchor-page-number="6" draw:z-index="4854" draw:name="Shape2375" draw:style-name="gr3" draw:text-style-name="P4" svg:width="1.1717in" svg:height="0.0098in" svg:x="2.3413in" svg:y="4.865in" svg:viewBox="0 0 2977 26" draw:points="0,0 2977,0 2977,26 0,26">
        <text:p/>
      </draw:polygon>
      <draw:polygon text:anchor-type="page" text:anchor-page-number="6" draw:z-index="4853" draw:name="Shape2374" draw:style-name="gr3" draw:text-style-name="P4" svg:width="0.0098in" svg:height="0.0098in" svg:x="2.3315in" svg:y="4.865in" svg:viewBox="0 0 26 26" draw:points="0,0 26,0 26,26 0,26">
        <text:p/>
      </draw:polygon>
      <draw:polygon text:anchor-type="page" text:anchor-page-number="6" draw:z-index="4852" draw:name="Shape2373" draw:style-name="gr3" draw:text-style-name="P4" svg:width="0.7768in" svg:height="0.0098in" svg:x="1.5547in" svg:y="4.865in" svg:viewBox="0 0 1974 26" draw:points="0,0 1974,0 1974,26 0,26">
        <text:p/>
      </draw:polygon>
      <draw:polygon text:anchor-type="page" text:anchor-page-number="6" draw:z-index="4851" draw:name="Shape2372" draw:style-name="gr3" draw:text-style-name="P4" svg:width="0.0098in" svg:height="0.0098in" svg:x="1.5449in" svg:y="4.865in" svg:viewBox="0 0 26 26" draw:points="0,0 26,0 26,26 0,26">
        <text:p/>
      </draw:polygon>
      <draw:polygon text:anchor-type="page" text:anchor-page-number="6" draw:z-index="4850" draw:name="Shape2371" draw:style-name="gr3" draw:text-style-name="P4" svg:width="1.1819in" svg:height="0.0098in" svg:x="0.363in" svg:y="4.865in" svg:viewBox="0 0 3003 26" draw:points="0,0 3003,0 3003,26 0,26">
        <text:p/>
      </draw:polygon>
      <draw:frame text:anchor-type="page" text:anchor-page-number="6" draw:z-index="4849" draw:name="Shape2370" draw:style-name="gr1" draw:text-style-name="P2" svg:width="0.0433in" svg:height="0.1925in" svg:x="6.2693in" svg:y="4.8161in">
        <draw:text-box>
          <text:p><text:span text:style-name="T2"><text:s/></text:span></text:p>
        </draw:text-box>
      </draw:frame>
      <draw:polygon text:anchor-type="page" text:anchor-page-number="6" draw:z-index="4848" draw:name="Shape2414" draw:style-name="gr2" draw:text-style-name="P3" svg:width="1.085in" svg:height="0.1917in" svg:x="6.7098in" svg:y="4.8748in" svg:viewBox="0 0 2757 488" draw:points="0,0 2757,0 2757,488 0,488">
        <text:p/>
      </draw:polygon>
      <draw:polygon text:anchor-type="page" text:anchor-page-number="6" draw:z-index="4847" draw:name="Shape2413" draw:style-name="gr2" draw:text-style-name="P3" svg:width="1.1819in" svg:height="0.1917in" svg:x="6.6614in" svg:y="4.8748in" svg:viewBox="0 0 3003 488" draw:points="0,0 3003,0 3003,488 0,488">
        <text:p/>
      </draw:polygon>
      <draw:frame text:anchor-type="page" text:anchor-page-number="6" draw:z-index="4846" draw:name="Shape2411" draw:style-name="gr1" draw:text-style-name="P2" svg:width="0.3449in" svg:height="0.113in" svg:x="5.9228in" svg:y="4.8772in">
        <draw:text-box>
          <text:p><text:span text:style-name="T4">INALAB</text:span></text:p>
        </draw:text-box>
      </draw:frame>
      <draw:frame text:anchor-type="page" text:anchor-page-number="6" draw:z-index="4845" draw:name="Shape2412" draw:style-name="gr1" draw:text-style-name="P2" svg:width="0.0433in" svg:height="0.1925in" svg:x="5.3335in" svg:y="4.878in">
        <draw:text-box>
          <text:p><text:span text:style-name="T2"><text:s/></text:span></text:p>
        </draw:text-box>
      </draw:frame>
      <draw:polygon text:anchor-type="page" text:anchor-page-number="6" draw:z-index="4844" draw:name="Shape2410" draw:style-name="gr2" draw:text-style-name="P3" svg:width="0.6898in" svg:height="0.1118in" svg:x="5.9232in" svg:y="4.8748in" svg:viewBox="0 0 1753 285" draw:points="0,0 1753,0 1753,285 0,285">
        <text:p/>
      </draw:polygon>
      <draw:polygon text:anchor-type="page" text:anchor-page-number="6" draw:z-index="4843" draw:name="Shape2409" draw:style-name="gr2" draw:text-style-name="P3" svg:width="0.7866in" svg:height="0.1917in" svg:x="5.8748in" svg:y="4.8748in" svg:viewBox="0 0 1999 488" draw:points="0,0 1999,0 1999,488 0,488">
        <text:p/>
      </draw:polygon>
      <draw:frame text:anchor-type="page" text:anchor-page-number="6" draw:z-index="4842" draw:name="Shape2363" draw:style-name="gr1" draw:text-style-name="P2" svg:width="0.0433in" svg:height="0.1925in" svg:x="4.3134in" svg:y="4.8161in">
        <draw:text-box>
          <text:p><text:span text:style-name="T2"><text:s/></text:span></text:p>
        </draw:text-box>
      </draw:frame>
      <draw:polygon text:anchor-type="page" text:anchor-page-number="6" draw:z-index="4841" draw:name="Shape2408" draw:style-name="gr2" draw:text-style-name="P3" svg:width="0.4917in" svg:height="0.1917in" svg:x="5.3331in" svg:y="4.8748in" svg:viewBox="0 0 1250 488" draw:points="0,0 1250,0 1250,488 0,488">
        <text:p/>
      </draw:polygon>
      <draw:polygon text:anchor-type="page" text:anchor-page-number="6" draw:z-index="4840" draw:name="Shape2407" draw:style-name="gr2" draw:text-style-name="P3" svg:width="0.5917in" svg:height="0.1917in" svg:x="5.2831in" svg:y="4.8748in" svg:viewBox="0 0 1504 488" draw:points="0,0 1504,0 1504,488 0,488">
        <text:p/>
      </draw:polygon>
      <draw:frame text:anchor-type="page" text:anchor-page-number="6" draw:z-index="4839" draw:name="Shape2403" draw:style-name="gr1" draw:text-style-name="P2" svg:width="0.163in" svg:height="0.113in" svg:x="4.1516in" svg:y="4.8772in">
        <draw:text-box>
          <text:p><text:span text:style-name="T4"><text:s/>0.4</text:span></text:p>
        </draw:text-box>
      </draw:frame>
      <draw:frame text:anchor-type="page" text:anchor-page-number="5" draw:z-index="4838" draw:name="Shape1741" draw:style-name="gr1" draw:text-style-name="P2" svg:width="0.0433in" svg:height="0.1925in" svg:x="5.728in" svg:y="10.0717in">
        <draw:text-box>
          <text:p><text:span text:style-name="T2"><text:s/></text:span></text:p>
        </draw:text-box>
      </draw:frame>
      <draw:frame text:anchor-type="page" text:anchor-page-number="6" draw:z-index="4837" draw:name="Shape2404" draw:style-name="gr1" draw:text-style-name="P2" svg:width="0.0433in" svg:height="0.1925in" svg:x="3.561in" svg:y="4.878in">
        <draw:text-box>
          <text:p><text:span text:style-name="T2"><text:s/></text:span></text:p>
        </draw:text-box>
      </draw:frame>
      <draw:frame text:anchor-type="page" text:anchor-page-number="5" draw:z-index="4836" draw:name="Shape1742" draw:style-name="gr1" draw:text-style-name="P2" svg:width="5.3016in" svg:height="0.1295in" svg:x="0.4535in" svg:y="10.1189in">
        <draw:text-box>
          <text:p><text:span text:style-name="T3">BIOSSIDO DI TITANIO (in polvere contenente &lt; 1% di particelle con diametro aerodinamico ≤ 10 μm)</text:span></text:p>
        </draw:text-box>
      </draw:frame>
      <draw:polygon text:anchor-type="page" text:anchor-page-number="6" draw:z-index="4835" draw:name="Shape2406" draw:style-name="gr2" draw:text-style-name="P3" svg:width="1.0831in" svg:height="0.1118in" svg:x="4.1516in" svg:y="4.8748in" svg:viewBox="0 0 2752 285" draw:points="0,0 2752,0 2752,285 0,285">
        <text:p/>
      </draw:polygon>
      <draw:frame text:anchor-type="page" text:anchor-page-number="5" draw:z-index="4834" draw:name="Shape1740" draw:style-name="gr1" draw:text-style-name="P2" svg:width="0.0433in" svg:height="0.1925in" svg:x="0.411in" svg:y="10.0717in">
        <draw:text-box>
          <text:p><text:span text:style-name="T2"><text:s/></text:span></text:p>
        </draw:text-box>
      </draw:frame>
      <draw:polygon text:anchor-type="page" text:anchor-page-number="6" draw:z-index="4833" draw:name="Shape2405" draw:style-name="gr2" draw:text-style-name="P3" svg:width="1.1799in" svg:height="0.1917in" svg:x="4.1031in" svg:y="4.8748in" svg:viewBox="0 0 2998 488" draw:points="0,0 2998,0 2998,488 0,488">
        <text:p/>
      </draw:polygon>
      <draw:frame text:anchor-type="page" text:anchor-page-number="5" draw:z-index="4832" draw:name="Shape1739" draw:style-name="gr1" draw:text-style-name="P2" svg:width="0.0433in" svg:height="0.1925in" svg:x="0.3634in" svg:y="9.9311in">
        <draw:text-box>
          <text:p><text:span text:style-name="T2"><text:s/></text:span></text:p>
        </draw:text-box>
      </draw:frame>
      <draw:frame text:anchor-type="page" text:anchor-page-number="6" draw:z-index="4831" draw:name="Shape2356" draw:style-name="gr1" draw:text-style-name="P2" svg:width="0.0433in" svg:height="0.1925in" svg:x="2.5417in" svg:y="4.8161in">
        <draw:text-box>
          <text:p><text:span text:style-name="T2"><text:s/></text:span></text:p>
        </draw:text-box>
      </draw:frame>
      <draw:polygon text:anchor-type="page" text:anchor-page-number="5" draw:z-index="4830" draw:name="Shape1744" draw:style-name="gr5" draw:text-style-name="P6" svg:width="7.3835in" svg:height="0.1268in" svg:x="0.4114in" svg:y="10.1197in" svg:viewBox="0 0 18755 323" draw:points="0,0 18755,0 18755,323 0,323">
        <text:p/>
      </draw:polygon>
      <draw:polygon text:anchor-type="page" text:anchor-page-number="6" draw:z-index="4829" draw:name="Shape2402" draw:style-name="gr2" draw:text-style-name="P3" svg:width="0.4933in" svg:height="0.1917in" svg:x="3.5614in" svg:y="4.8748in" svg:viewBox="0 0 1254 488" draw:points="0,0 1254,0 1254,488 0,488">
        <text:p/>
      </draw:polygon>
      <draw:polygon text:anchor-type="page" text:anchor-page-number="6" draw:z-index="4828" draw:name="Shape2401" draw:style-name="gr2" draw:text-style-name="P3" svg:width="0.5902in" svg:height="0.1917in" svg:x="3.513in" svg:y="4.8748in" svg:viewBox="0 0 1500 488" draw:points="0,0 1500,0 1500,488 0,488">
        <text:p/>
      </draw:polygon>
      <draw:polygon text:anchor-type="page" text:anchor-page-number="5" draw:z-index="4827" draw:name="Shape1743" draw:style-name="gr5" draw:text-style-name="P6" svg:width="7.4803in" svg:height="0.1268in" svg:x="0.363in" svg:y="10.1197in" svg:viewBox="0 0 19001 323" draw:points="0,0 19001,0 19001,323 0,323">
        <text:p/>
      </draw:polygon>
      <draw:frame text:anchor-type="page" text:anchor-page-number="6" draw:z-index="4826" draw:name="Shape2400" draw:style-name="gr1" draw:text-style-name="P2" svg:width="0.163in" svg:height="0.113in" svg:x="2.3799in" svg:y="4.8772in">
        <draw:text-box>
          <text:p><text:span text:style-name="T4"><text:s/>0.2</text:span></text:p>
        </draw:text-box>
      </draw:frame>
      <draw:frame text:anchor-type="page" text:anchor-page-number="5" draw:z-index="4825" draw:name="Shape1738" draw:style-name="gr1" draw:text-style-name="P2" svg:width="0.0433in" svg:height="0.1925in" svg:x="6.7098in" svg:y="9.7398in">
        <draw:text-box>
          <text:p><text:span text:style-name="T2"><text:s/></text:span></text:p>
        </draw:text-box>
      </draw:frame>
      <draw:polygon text:anchor-type="page" text:anchor-page-number="5" draw:z-index="4824" draw:name="Shape1710" draw:style-name="gr3" draw:text-style-name="P4" svg:width="1.1717in" svg:height="0.0098in" svg:x="6.6732in" svg:y="9.7248in" svg:viewBox="0 0 2977 26" draw:points="0,0 2977,0 2977,26 0,26">
        <text:p/>
      </draw:polygon>
      <draw:frame text:anchor-type="page" text:anchor-page-number="6" draw:z-index="4823" draw:name="Shape2391" draw:style-name="gr1" draw:text-style-name="P2" svg:width="0.0433in" svg:height="0.1925in" svg:x="1.7965in" svg:y="4.8161in">
        <draw:text-box>
          <text:p><text:span text:style-name="T2"><text:s/></text:span></text:p>
        </draw:text-box>
      </draw:frame>
      <draw:polygon text:anchor-type="page" text:anchor-page-number="6" draw:z-index="4822" draw:name="Shape2399" draw:style-name="gr2" draw:text-style-name="P3" svg:width="1.0831in" svg:height="0.1118in" svg:x="2.3799in" svg:y="4.8748in" svg:viewBox="0 0 2752 285" draw:points="0,0 2752,0 2752,285 0,285">
        <text:p/>
      </draw:polygon>
      <draw:polygon text:anchor-type="page" text:anchor-page-number="5" draw:z-index="4821" draw:name="Shape1709" draw:style-name="gr3" draw:text-style-name="P4" svg:width="0.0102in" svg:height="0.0098in" svg:x="6.663in" svg:y="9.7248in" svg:viewBox="0 0 27 26" draw:points="0,0 27,0 27,26 0,26">
        <text:p/>
      </draw:polygon>
      <draw:polygon text:anchor-type="page" text:anchor-page-number="6" draw:z-index="4820" draw:name="Shape2398" draw:style-name="gr2" draw:text-style-name="P3" svg:width="1.1815in" svg:height="0.1917in" svg:x="2.3315in" svg:y="4.8748in" svg:viewBox="0 0 3002 488" draw:points="0,0 3002,0 3002,488 0,488">
        <text:p/>
      </draw:polygon>
      <draw:polygon text:anchor-type="page" text:anchor-page-number="5" draw:z-index="4819" draw:name="Shape1705" draw:style-name="gr3" draw:text-style-name="P4" svg:width="0.7783in" svg:height="0.0098in" svg:x="5.8846in" svg:y="9.7248in" svg:viewBox="0 0 1978 26" draw:points="0,0 1978,0 1978,26 0,26">
        <text:p/>
      </draw:polygon>
      <draw:polygon text:anchor-type="page" text:anchor-page-number="5" draw:z-index="4818" draw:name="Shape1704" draw:style-name="gr3" draw:text-style-name="P4" svg:width="0.0098in" svg:height="0.0098in" svg:x="5.8748in" svg:y="9.7248in" svg:viewBox="0 0 26 26" draw:points="0,0 26,0 26,26 0,26">
        <text:p/>
      </draw:polygon>
      <draw:frame text:anchor-type="page" text:anchor-page-number="6" draw:z-index="4817" draw:name="Shape2397" draw:style-name="gr1" draw:text-style-name="P2" svg:width="0.2051in" svg:height="0.113in" svg:x="1.5917in" svg:y="4.8772in">
        <draw:text-box>
          <text:p><text:span text:style-name="T4">DEU</text:span></text:p>
        </draw:text-box>
      </draw:frame>
      <draw:polygon text:anchor-type="page" text:anchor-page-number="5" draw:z-index="4816" draw:name="Shape1703" draw:style-name="gr3" draw:text-style-name="P4" svg:width="0.5799in" svg:height="0.0098in" svg:x="5.2949in" svg:y="9.7248in" svg:viewBox="0 0 1474 26" draw:points="0,0 1474,0 1474,26 0,26">
        <text:p/>
      </draw:polygon>
      <draw:frame text:anchor-type="page" text:anchor-page-number="6" draw:z-index="4815" draw:name="Shape2390" draw:style-name="gr1" draw:text-style-name="P2" svg:width="0.0433in" svg:height="0.1925in" svg:x="0.6634in" svg:y="4.8161in">
        <draw:text-box>
          <text:p><text:span text:style-name="T2"><text:s/></text:span></text:p>
        </draw:text-box>
      </draw:frame>
      <draw:polygon text:anchor-type="page" text:anchor-page-number="5" draw:z-index="4814" draw:name="Shape1702" draw:style-name="gr3" draw:text-style-name="P4" svg:width="0.0102in" svg:height="0.0098in" svg:x="5.2846in" svg:y="9.7248in" svg:viewBox="0 0 27 26" draw:points="0,0 27,0 27,26 0,26">
        <text:p/>
      </draw:polygon>
      <draw:polygon text:anchor-type="page" text:anchor-page-number="6" draw:z-index="4813" draw:name="Shape2396" draw:style-name="gr2" draw:text-style-name="P3" svg:width="0.6917in" svg:height="0.1118in" svg:x="1.5913in" svg:y="4.8748in" svg:viewBox="0 0 1758 285" draw:points="0,0 1758,0 1758,285 0,285">
        <text:p/>
      </draw:polygon>
      <draw:polygon text:anchor-type="page" text:anchor-page-number="5" draw:z-index="4812" draw:name="Shape1701" draw:style-name="gr3" draw:text-style-name="P4" svg:width="1.1717in" svg:height="0.0098in" svg:x="4.113in" svg:y="9.7248in" svg:viewBox="0 0 2977 26" draw:points="0,0 2977,0 2977,26 0,26">
        <text:p/>
      </draw:polygon>
      <draw:polygon text:anchor-type="page" text:anchor-page-number="6" draw:z-index="4811" draw:name="Shape2395" draw:style-name="gr2" draw:text-style-name="P3" svg:width="0.7882in" svg:height="0.1917in" svg:x="1.5433in" svg:y="4.8748in" svg:viewBox="0 0 2003 488" draw:points="0,0 2003,0 2003,488 0,488">
        <text:p/>
      </draw:polygon>
      <draw:frame text:anchor-type="page" text:anchor-page-number="6" draw:z-index="4810" draw:name="Shape2394" draw:style-name="gr1" draw:text-style-name="P2" svg:width="0.2106in" svg:height="0.113in" svg:x="0.4547in" svg:y="4.8772in">
        <draw:text-box>
          <text:p><text:span text:style-name="T4">MAK</text:span></text:p>
        </draw:text-box>
      </draw:frame>
      <draw:polygon text:anchor-type="page" text:anchor-page-number="5" draw:z-index="4809" draw:name="Shape1700" draw:style-name="gr3" draw:text-style-name="P4" svg:width="0.0098in" svg:height="0.0098in" svg:x="4.1031in" svg:y="9.7248in" svg:viewBox="0 0 26 26" draw:points="0,0 26,0 26,26 0,26">
        <text:p/>
      </draw:polygon>
      <draw:frame text:anchor-type="page" text:anchor-page-number="6" draw:z-index="4808" draw:name="Shape2389" draw:style-name="gr1" draw:text-style-name="P2" svg:width="0.0433in" svg:height="0.1925in" svg:x="0.411in" svg:y="4.8161in">
        <draw:text-box>
          <text:p><text:span text:style-name="T2"><text:s/></text:span></text:p>
        </draw:text-box>
      </draw:frame>
      <draw:polygon text:anchor-type="page" text:anchor-page-number="5" draw:z-index="4807" draw:name="Shape1699" draw:style-name="gr3" draw:text-style-name="P4" svg:width="0.5799in" svg:height="0.0098in" svg:x="3.5232in" svg:y="9.7248in" svg:viewBox="0 0 1474 26" draw:points="0,0 1474,0 1474,26 0,26">
        <text:p/>
      </draw:polygon>
      <draw:polygon text:anchor-type="page" text:anchor-page-number="5" draw:z-index="4806" draw:name="Shape1698" draw:style-name="gr3" draw:text-style-name="P4" svg:width="0.0102in" svg:height="0.0098in" svg:x="3.513in" svg:y="9.7248in" svg:viewBox="0 0 27 26" draw:points="0,0 27,0 27,26 0,26">
        <text:p/>
      </draw:polygon>
      <draw:frame text:anchor-type="page" text:anchor-page-number="6" draw:z-index="4805" draw:name="Shape2388" draw:style-name="gr1" draw:text-style-name="P2" svg:width="0.0433in" svg:height="0.1925in" svg:x="6.7098in" svg:y="4.6764in">
        <draw:text-box>
          <text:p><text:span text:style-name="T2"><text:s/></text:span></text:p>
        </draw:text-box>
      </draw:frame>
      <draw:polygon text:anchor-type="page" text:anchor-page-number="6" draw:z-index="4804" draw:name="Shape2393" draw:style-name="gr2" draw:text-style-name="P3" svg:width="1.0835in" svg:height="0.1118in" svg:x="0.4114in" svg:y="4.8748in" svg:viewBox="0 0 2753 285" draw:points="0,0 2753,0 2753,285 0,285">
        <text:p/>
      </draw:polygon>
      <draw:polygon text:anchor-type="page" text:anchor-page-number="5" draw:z-index="4803" draw:name="Shape1697" draw:style-name="gr3" draw:text-style-name="P4" svg:width="1.1717in" svg:height="0.0098in" svg:x="2.3413in" svg:y="9.7248in" svg:viewBox="0 0 2977 26" draw:points="0,0 2977,0 2977,26 0,26">
        <text:p/>
      </draw:polygon>
      <draw:polygon text:anchor-type="page" text:anchor-page-number="6" draw:z-index="4802" draw:name="Shape2392" draw:style-name="gr2" draw:text-style-name="P3" svg:width="1.1803in" svg:height="0.1917in" svg:x="0.363in" svg:y="4.8748in" svg:viewBox="0 0 2999 488" draw:points="0,0 2999,0 2999,488 0,488">
        <text:p/>
      </draw:polygon>
      <draw:polygon text:anchor-type="page" text:anchor-page-number="5" draw:z-index="4801" draw:name="Shape1696" draw:style-name="gr3" draw:text-style-name="P4" svg:width="0.0098in" svg:height="0.0098in" svg:x="2.3315in" svg:y="9.7248in" svg:viewBox="0 0 26 26" draw:points="0,0 26,0 26,26 0,26">
        <text:p/>
      </draw:polygon>
      <draw:polygon text:anchor-type="page" text:anchor-page-number="6" draw:z-index="4800" draw:name="Shape2346" draw:style-name="gr3" draw:text-style-name="P4" svg:width="1.1717in" svg:height="0.0102in" svg:x="6.6732in" svg:y="4.6614in" svg:viewBox="0 0 2977 27" draw:points="0,0 2977,0 2977,27 0,27">
        <text:p/>
      </draw:polygon>
      <draw:polygon text:anchor-type="page" text:anchor-page-number="5" draw:z-index="4799" draw:name="Shape1695" draw:style-name="gr3" draw:text-style-name="P4" svg:width="0.7768in" svg:height="0.0098in" svg:x="1.5547in" svg:y="9.7248in" svg:viewBox="0 0 1974 26" draw:points="0,0 1974,0 1974,26 0,26">
        <text:p/>
      </draw:polygon>
      <draw:polygon text:anchor-type="page" text:anchor-page-number="6" draw:z-index="4798" draw:name="Shape2345" draw:style-name="gr3" draw:text-style-name="P4" svg:width="0.0102in" svg:height="0.0102in" svg:x="6.663in" svg:y="4.6614in" svg:viewBox="0 0 27 27" draw:points="0,0 27,0 27,27 0,27">
        <text:p/>
      </draw:polygon>
      <draw:polygon text:anchor-type="page" text:anchor-page-number="5" draw:z-index="4797" draw:name="Shape1694" draw:style-name="gr3" draw:text-style-name="P4" svg:width="0.0098in" svg:height="0.0098in" svg:x="1.5449in" svg:y="9.7248in" svg:viewBox="0 0 26 26" draw:points="0,0 26,0 26,26 0,26">
        <text:p/>
      </draw:polygon>
      <draw:polygon text:anchor-type="page" text:anchor-page-number="5" draw:z-index="4796" draw:name="Shape1693" draw:style-name="gr3" draw:text-style-name="P4" svg:width="1.1819in" svg:height="0.0098in" svg:x="0.363in" svg:y="9.7248in" svg:viewBox="0 0 3003 26" draw:points="0,0 3003,0 3003,26 0,26">
        <text:p/>
      </draw:polygon>
      <draw:polygon text:anchor-type="page" text:anchor-page-number="6" draw:z-index="4795" draw:name="Shape2340" draw:style-name="gr3" draw:text-style-name="P4" svg:width="0.7783in" svg:height="0.0102in" svg:x="5.8846in" svg:y="4.6614in" svg:viewBox="0 0 1978 27" draw:points="0,0 1978,0 1978,27 0,27">
        <text:p/>
      </draw:polygon>
      <draw:polygon text:anchor-type="page" text:anchor-page-number="6" draw:z-index="4794" draw:name="Shape2339" draw:style-name="gr3" draw:text-style-name="P4" svg:width="0.0098in" svg:height="0.0102in" svg:x="5.8748in" svg:y="4.6614in" svg:viewBox="0 0 26 27" draw:points="0,0 26,0 26,27 0,27">
        <text:p/>
      </draw:polygon>
      <draw:frame text:anchor-type="page" text:anchor-page-number="5" draw:z-index="4793" draw:name="Shape1692" draw:style-name="gr1" draw:text-style-name="P2" svg:width="0.0433in" svg:height="0.1925in" svg:x="6.2846in" svg:y="9.678in">
        <draw:text-box>
          <text:p><text:span text:style-name="T2"><text:s/></text:span></text:p>
        </draw:text-box>
      </draw:frame>
      <draw:polygon text:anchor-type="page" text:anchor-page-number="6" draw:z-index="4792" draw:name="Shape2338" draw:style-name="gr3" draw:text-style-name="P4" svg:width="0.5799in" svg:height="0.0102in" svg:x="5.2949in" svg:y="4.6614in" svg:viewBox="0 0 1474 27" draw:points="0,0 1474,0 1474,27 0,27">
        <text:p/>
      </draw:polygon>
      <draw:polygon text:anchor-type="page" text:anchor-page-number="5" draw:z-index="4791" draw:name="Shape1737" draw:style-name="gr2" draw:text-style-name="P3" svg:width="1.085in" svg:height="0.1913in" svg:x="6.7098in" svg:y="9.7366in" svg:viewBox="0 0 2757 487" draw:points="0,0 2757,0 2757,487 0,487">
        <text:p/>
      </draw:polygon>
      <draw:polygon text:anchor-type="page" text:anchor-page-number="5" draw:z-index="4790" draw:name="Shape1736" draw:style-name="gr2" draw:text-style-name="P3" svg:width="1.1819in" svg:height="0.1913in" svg:x="6.6614in" svg:y="9.7366in" svg:viewBox="0 0 3003 487" draw:points="0,0 3003,0 3003,487 0,487">
        <text:p/>
      </draw:polygon>
      <draw:polygon text:anchor-type="page" text:anchor-page-number="6" draw:z-index="4789" draw:name="Shape2337" draw:style-name="gr3" draw:text-style-name="P4" svg:width="0.0102in" svg:height="0.0102in" svg:x="5.2846in" svg:y="4.6614in" svg:viewBox="0 0 27 27" draw:points="0,0 27,0 27,27 0,27">
        <text:p/>
      </draw:polygon>
      <draw:polygon text:anchor-type="page" text:anchor-page-number="6" draw:z-index="4788" draw:name="Shape2336" draw:style-name="gr3" draw:text-style-name="P4" svg:width="1.1717in" svg:height="0.0102in" svg:x="4.113in" svg:y="4.6614in" svg:viewBox="0 0 2977 27" draw:points="0,0 2977,0 2977,27 0,27">
        <text:p/>
      </draw:polygon>
      <draw:frame text:anchor-type="page" text:anchor-page-number="5" draw:z-index="4787" draw:name="Shape1723" draw:style-name="gr1" draw:text-style-name="P2" svg:width="0.3614in" svg:height="0.113in" svg:x="5.9228in" svg:y="9.739in">
        <draw:text-box>
          <text:p><text:span text:style-name="T4">RESPIR</text:span></text:p>
        </draw:text-box>
      </draw:frame>
      <draw:polygon text:anchor-type="page" text:anchor-page-number="6" draw:z-index="4786" draw:name="Shape2335" draw:style-name="gr3" draw:text-style-name="P4" svg:width="0.0098in" svg:height="0.0102in" svg:x="4.1031in" svg:y="4.6614in" svg:viewBox="0 0 26 27" draw:points="0,0 26,0 26,27 0,27">
        <text:p/>
      </draw:polygon>
      <draw:frame text:anchor-type="page" text:anchor-page-number="5" draw:z-index="4785" draw:name="Shape1733" draw:style-name="gr1" draw:text-style-name="P2" svg:width="0.0433in" svg:height="0.1925in" svg:x="5.3335in" svg:y="9.7398in">
        <draw:text-box>
          <text:p><text:span text:style-name="T2"><text:s/></text:span></text:p>
        </draw:text-box>
      </draw:frame>
      <draw:polygon text:anchor-type="page" text:anchor-page-number="5" draw:z-index="4784" draw:name="Shape1735" draw:style-name="gr2" draw:text-style-name="P3" svg:width="0.6898in" svg:height="0.1114in" svg:x="5.9232in" svg:y="9.7366in" svg:viewBox="0 0 1753 284" draw:points="0,0 1753,0 1753,284 0,284">
        <text:p/>
      </draw:polygon>
      <draw:polygon text:anchor-type="page" text:anchor-page-number="6" draw:z-index="4783" draw:name="Shape2334" draw:style-name="gr3" draw:text-style-name="P4" svg:width="0.5799in" svg:height="0.0102in" svg:x="3.5232in" svg:y="4.6614in" svg:viewBox="0 0 1474 27" draw:points="0,0 1474,0 1474,27 0,27">
        <text:p/>
      </draw:polygon>
      <draw:polygon text:anchor-type="page" text:anchor-page-number="6" draw:z-index="4782" draw:name="Shape2333" draw:style-name="gr3" draw:text-style-name="P4" svg:width="0.0102in" svg:height="0.0102in" svg:x="3.513in" svg:y="4.6614in" svg:viewBox="0 0 27 27" draw:points="0,0 27,0 27,27 0,27">
        <text:p/>
      </draw:polygon>
      <draw:polygon text:anchor-type="page" text:anchor-page-number="5" draw:z-index="4781" draw:name="Shape1734" draw:style-name="gr2" draw:text-style-name="P3" svg:width="0.7866in" svg:height="0.1913in" svg:x="5.8748in" svg:y="9.7366in" svg:viewBox="0 0 1999 487" draw:points="0,0 1999,0 1999,487 0,487">
        <text:p/>
      </draw:polygon>
      <draw:frame text:anchor-type="page" text:anchor-page-number="5" draw:z-index="4780" draw:name="Shape1730" draw:style-name="gr1" draw:text-style-name="P2" svg:width="0.0433in" svg:height="0.1925in" svg:x="4.1516in" svg:y="9.7398in">
        <draw:text-box>
          <text:p><text:span text:style-name="T2"><text:s/></text:span></text:p>
        </draw:text-box>
      </draw:frame>
      <draw:polygon text:anchor-type="page" text:anchor-page-number="6" draw:z-index="4779" draw:name="Shape2332" draw:style-name="gr3" draw:text-style-name="P4" svg:width="1.1717in" svg:height="0.0102in" svg:x="2.3413in" svg:y="4.6614in" svg:viewBox="0 0 2977 27" draw:points="0,0 2977,0 2977,27 0,27">
        <text:p/>
      </draw:polygon>
      <draw:polygon text:anchor-type="page" text:anchor-page-number="6" draw:z-index="4778" draw:name="Shape2331" draw:style-name="gr3" draw:text-style-name="P4" svg:width="0.0098in" svg:height="0.0102in" svg:x="2.3315in" svg:y="4.6614in" svg:viewBox="0 0 26 27" draw:points="0,0 26,0 26,27 0,27">
        <text:p/>
      </draw:polygon>
      <draw:polygon text:anchor-type="page" text:anchor-page-number="5" draw:z-index="4777" draw:name="Shape1732" draw:style-name="gr2" draw:text-style-name="P3" svg:width="0.4917in" svg:height="0.1913in" svg:x="5.3331in" svg:y="9.7366in" svg:viewBox="0 0 1250 487" draw:points="0,0 1250,0 1250,487 0,487">
        <text:p/>
      </draw:polygon>
      <draw:polygon text:anchor-type="page" text:anchor-page-number="5" draw:z-index="4776" draw:name="Shape1731" draw:style-name="gr2" draw:text-style-name="P3" svg:width="0.5917in" svg:height="0.1913in" svg:x="5.2831in" svg:y="9.7366in" svg:viewBox="0 0 1504 487" draw:points="0,0 1504,0 1504,487 0,487">
        <text:p/>
      </draw:polygon>
      <draw:polygon text:anchor-type="page" text:anchor-page-number="6" draw:z-index="4775" draw:name="Shape2330" draw:style-name="gr3" draw:text-style-name="P4" svg:width="0.7768in" svg:height="0.0102in" svg:x="1.5547in" svg:y="4.6614in" svg:viewBox="0 0 1974 27" draw:points="0,0 1974,0 1974,27 0,27">
        <text:p/>
      </draw:polygon>
      <draw:polygon text:anchor-type="page" text:anchor-page-number="6" draw:z-index="4774" draw:name="Shape2329" draw:style-name="gr3" draw:text-style-name="P4" svg:width="0.0098in" svg:height="0.0102in" svg:x="1.5449in" svg:y="4.6614in" svg:viewBox="0 0 26 27" draw:points="0,0 26,0 26,27 0,27">
        <text:p/>
      </draw:polygon>
      <draw:frame text:anchor-type="page" text:anchor-page-number="5" draw:z-index="4773" draw:name="Shape1727" draw:style-name="gr1" draw:text-style-name="P2" svg:width="0.0433in" svg:height="0.1925in" svg:x="3.561in" svg:y="9.7398in">
        <draw:text-box>
          <text:p><text:span text:style-name="T2"><text:s/></text:span></text:p>
        </draw:text-box>
      </draw:frame>
      <draw:polygon text:anchor-type="page" text:anchor-page-number="6" draw:z-index="4772" draw:name="Shape2328" draw:style-name="gr3" draw:text-style-name="P4" svg:width="1.1819in" svg:height="0.0102in" svg:x="0.363in" svg:y="4.6614in" svg:viewBox="0 0 3003 27" draw:points="0,0 3003,0 3003,27 0,27">
        <text:p/>
      </draw:polygon>
      <draw:polygon text:anchor-type="page" text:anchor-page-number="5" draw:z-index="4771" draw:name="Shape1729" draw:style-name="gr2" draw:text-style-name="P3" svg:width="1.0831in" svg:height="0.1913in" svg:x="4.1516in" svg:y="9.7366in" svg:viewBox="0 0 2752 487" draw:points="0,0 2752,0 2752,487 0,487">
        <text:p/>
      </draw:polygon>
      <draw:polygon text:anchor-type="page" text:anchor-page-number="5" draw:z-index="4770" draw:name="Shape1728" draw:style-name="gr2" draw:text-style-name="P3" svg:width="1.1799in" svg:height="0.1913in" svg:x="4.1031in" svg:y="9.7366in" svg:viewBox="0 0 2998 487" draw:points="0,0 2998,0 2998,487 0,487">
        <text:p/>
      </draw:polygon>
      <draw:frame text:anchor-type="page" text:anchor-page-number="6" draw:z-index="4769" draw:name="Shape2369" draw:style-name="gr1" draw:text-style-name="P2" svg:width="0.0433in" svg:height="0.1925in" svg:x="5.9228in" svg:y="4.6764in">
        <draw:text-box>
          <text:p><text:span text:style-name="T2"><text:s/></text:span></text:p>
        </draw:text-box>
      </draw:frame>
      <draw:frame text:anchor-type="page" text:anchor-page-number="5" draw:z-index="4768" draw:name="Shape1679" draw:style-name="gr1" draw:text-style-name="P2" svg:width="0.0433in" svg:height="0.1925in" svg:x="2.5154in" svg:y="9.678in">
        <draw:text-box>
          <text:p><text:span text:style-name="T2"><text:s/></text:span></text:p>
        </draw:text-box>
      </draw:frame>
      <draw:polygon text:anchor-type="page" text:anchor-page-number="6" draw:z-index="4767" draw:name="Shape2387" draw:style-name="gr4" draw:text-style-name="P5" svg:width="1.085in" svg:height="0.1917in" svg:x="6.7098in" svg:y="4.6732in" svg:viewBox="0 0 2757 488" draw:points="0,0 2757,0 2757,488 0,488">
        <text:p/>
      </draw:polygon>
      <draw:polygon text:anchor-type="page" text:anchor-page-number="5" draw:z-index="4766" draw:name="Shape1726" draw:style-name="gr2" draw:text-style-name="P3" svg:width="0.4933in" svg:height="0.1913in" svg:x="3.5614in" svg:y="9.7366in" svg:viewBox="0 0 1254 487" draw:points="0,0 1254,0 1254,487 0,487">
        <text:p/>
      </draw:polygon>
      <draw:polygon text:anchor-type="page" text:anchor-page-number="6" draw:z-index="4765" draw:name="Shape2384" draw:style-name="gr4" draw:text-style-name="P5" svg:width="1.1819in" svg:height="0.1917in" svg:x="6.6614in" svg:y="4.6732in" svg:viewBox="0 0 3003 488" draw:points="0,0 3003,0 3003,488 0,488">
        <text:p/>
      </draw:polygon>
      <draw:frame text:anchor-type="page" text:anchor-page-number="6" draw:z-index="4764" draw:name="Shape2327" draw:style-name="gr1" draw:text-style-name="P2" svg:width="0.0433in" svg:height="0.1925in" svg:x="5.5217in" svg:y="4.6146in">
        <draw:text-box>
          <text:p><text:span text:style-name="T2"><text:s/></text:span></text:p>
        </draw:text-box>
      </draw:frame>
      <draw:polygon text:anchor-type="page" text:anchor-page-number="5" draw:z-index="4763" draw:name="Shape1725" draw:style-name="gr2" draw:text-style-name="P3" svg:width="0.5902in" svg:height="0.1913in" svg:x="3.513in" svg:y="9.7366in" svg:viewBox="0 0 1500 487" draw:points="0,0 1500,0 1500,487 0,487">
        <text:p/>
      </draw:polygon>
      <draw:frame text:anchor-type="page" text:anchor-page-number="5" draw:z-index="4762" draw:name="Shape1722" draw:style-name="gr1" draw:text-style-name="P2" svg:width="0.1358in" svg:height="0.113in" svg:x="2.3799in" svg:y="9.739in">
        <draw:text-box>
          <text:p><text:span text:style-name="T4"><text:s text:c="3"/>2</text:span></text:p>
        </draw:text-box>
      </draw:frame>
      <draw:polygon text:anchor-type="page" text:anchor-page-number="6" draw:z-index="4761" draw:name="Shape2368" draw:style-name="gr4" draw:text-style-name="P5" svg:width="0.6898in" svg:height="0.1917in" svg:x="5.9232in" svg:y="4.6732in" svg:viewBox="0 0 1753 488" draw:points="0,0 1753,0 1753,488 0,488">
        <text:p/>
      </draw:polygon>
      <draw:polygon text:anchor-type="page" text:anchor-page-number="6" draw:z-index="4760" draw:name="Shape2367" draw:style-name="gr4" draw:text-style-name="P5" svg:width="0.7866in" svg:height="0.1917in" svg:x="5.8748in" svg:y="4.6732in" svg:viewBox="0 0 1999 488" draw:points="0,0 1999,0 1999,488 0,488">
        <text:p/>
      </draw:polygon>
      <draw:frame text:anchor-type="page" text:anchor-page-number="5" draw:z-index="4759" draw:name="Shape1724" draw:style-name="gr1" draw:text-style-name="P2" svg:width="0.0433in" svg:height="0.1925in" svg:x="1.5917in" svg:y="9.7398in">
        <draw:text-box>
          <text:p><text:span text:style-name="T2"><text:s/></text:span></text:p>
        </draw:text-box>
      </draw:frame>
      <draw:frame text:anchor-type="page" text:anchor-page-number="6" draw:z-index="4758" draw:name="Shape2366" draw:style-name="gr1" draw:text-style-name="P2" svg:width="0.1894in" svg:height="0.113in" svg:x="5.3335in" svg:y="4.6756in">
        <draw:text-box>
          <text:p><text:span text:style-name="T4">ppm</text:span></text:p>
        </draw:text-box>
      </draw:frame>
      <draw:polygon text:anchor-type="page" text:anchor-page-number="5" draw:z-index="4757" draw:name="Shape1721" draw:style-name="gr2" draw:text-style-name="P3" svg:width="1.0831in" svg:height="0.1114in" svg:x="2.3799in" svg:y="9.7366in" svg:viewBox="0 0 2752 284" draw:points="0,0 2752,0 2752,284 0,284">
        <text:p/>
      </draw:polygon>
      <draw:frame text:anchor-type="page" text:anchor-page-number="6" draw:z-index="4756" draw:name="Shape2326" draw:style-name="gr1" draw:text-style-name="P2" svg:width="0.0433in" svg:height="0.1925in" svg:x="4.448in" svg:y="4.6146in">
        <draw:text-box>
          <text:p><text:span text:style-name="T2"><text:s/></text:span></text:p>
        </draw:text-box>
      </draw:frame>
      <draw:polygon text:anchor-type="page" text:anchor-page-number="5" draw:z-index="4755" draw:name="Shape1720" draw:style-name="gr2" draw:text-style-name="P3" svg:width="1.1815in" svg:height="0.1913in" svg:x="2.3315in" svg:y="9.7366in" svg:viewBox="0 0 3002 487" draw:points="0,0 3002,0 3002,487 0,487">
        <text:p/>
      </draw:polygon>
      <draw:frame text:anchor-type="page" text:anchor-page-number="5" draw:z-index="4754" draw:name="Shape1714" draw:style-name="gr1" draw:text-style-name="P2" svg:width="0.0433in" svg:height="0.1925in" svg:x="0.9717in" svg:y="9.678in">
        <draw:text-box>
          <text:p><text:span text:style-name="T2"><text:s/></text:span></text:p>
        </draw:text-box>
      </draw:frame>
      <draw:polygon text:anchor-type="page" text:anchor-page-number="6" draw:z-index="4753" draw:name="Shape2365" draw:style-name="gr4" draw:text-style-name="P5" svg:width="0.4917in" svg:height="0.1114in" svg:x="5.3331in" svg:y="4.6732in" svg:viewBox="0 0 1250 284" draw:points="0,0 1250,0 1250,284 0,284">
        <text:p/>
      </draw:polygon>
      <draw:polygon text:anchor-type="page" text:anchor-page-number="6" draw:z-index="4752" draw:name="Shape2364" draw:style-name="gr4" draw:text-style-name="P5" svg:width="0.5917in" svg:height="0.1917in" svg:x="5.2831in" svg:y="4.6732in" svg:viewBox="0 0 1504 488" draw:points="0,0 1504,0 1504,488 0,488">
        <text:p/>
      </draw:polygon>
      <draw:polygon text:anchor-type="page" text:anchor-page-number="5" draw:z-index="4751" draw:name="Shape1719" draw:style-name="gr2" draw:text-style-name="P3" svg:width="0.6917in" svg:height="0.1913in" svg:x="1.5913in" svg:y="9.7366in" svg:viewBox="0 0 1758 487" draw:points="0,0 1758,0 1758,487 0,487">
        <text:p/>
      </draw:polygon>
      <draw:polygon text:anchor-type="page" text:anchor-page-number="5" draw:z-index="4750" draw:name="Shape1718" draw:style-name="gr2" draw:text-style-name="P3" svg:width="0.7882in" svg:height="0.1913in" svg:x="1.5433in" svg:y="9.7366in" svg:viewBox="0 0 2003 487" draw:points="0,0 2003,0 2003,487 0,487">
        <text:p/>
      </draw:polygon>
      <draw:frame text:anchor-type="page" text:anchor-page-number="6" draw:z-index="4749" draw:name="Shape2362" draw:style-name="gr1" draw:text-style-name="P2" svg:width="0.2969in" svg:height="0.113in" svg:x="4.1516in" svg:y="4.6756in">
        <draw:text-box>
          <text:p><text:span text:style-name="T4">mg/m3</text:span></text:p>
        </draw:text-box>
      </draw:frame>
      <draw:frame text:anchor-type="page" text:anchor-page-number="5" draw:z-index="4748" draw:name="Shape1717" draw:style-name="gr1" draw:text-style-name="P2" svg:width="0.5039in" svg:height="0.113in" svg:x="0.4535in" svg:y="9.739in">
        <draw:text-box>
          <text:p><text:span text:style-name="T4">TLV-ACGIH</text:span></text:p>
        </draw:text-box>
      </draw:frame>
      <draw:frame text:anchor-type="page" text:anchor-page-number="6" draw:z-index="4747" draw:name="Shape2325" draw:style-name="gr1" draw:text-style-name="P2" svg:width="0.0433in" svg:height="0.1925in" svg:x="3.75in" svg:y="4.6146in">
        <draw:text-box>
          <text:p><text:span text:style-name="T2"><text:s/></text:span></text:p>
        </draw:text-box>
      </draw:frame>
      <draw:frame text:anchor-type="page" text:anchor-page-number="5" draw:z-index="4746" draw:name="Shape1713" draw:style-name="gr1" draw:text-style-name="P2" svg:width="0.0433in" svg:height="0.1925in" svg:x="0.411in" svg:y="9.678in">
        <draw:text-box>
          <text:p><text:span text:style-name="T2"><text:s/></text:span></text:p>
        </draw:text-box>
      </draw:frame>
      <draw:polygon text:anchor-type="page" text:anchor-page-number="6" draw:z-index="4745" draw:name="Shape2361" draw:style-name="gr4" draw:text-style-name="P5" svg:width="1.0831in" svg:height="0.1114in" svg:x="4.1516in" svg:y="4.6732in" svg:viewBox="0 0 2752 284" draw:points="0,0 2752,0 2752,284 0,284">
        <text:p/>
      </draw:polygon>
      <draw:polygon text:anchor-type="page" text:anchor-page-number="6" draw:z-index="4744" draw:name="Shape2360" draw:style-name="gr4" draw:text-style-name="P5" svg:width="1.1799in" svg:height="0.1917in" svg:x="4.1031in" svg:y="4.6732in" svg:viewBox="0 0 2998 488" draw:points="0,0 2998,0 2998,488 0,488">
        <text:p/>
      </draw:polygon>
      <draw:frame text:anchor-type="page" text:anchor-page-number="5" draw:z-index="4743" draw:name="Shape1712" draw:style-name="gr1" draw:text-style-name="P2" svg:width="0.0433in" svg:height="0.1925in" svg:x="6.7098in" svg:y="9.5362in">
        <draw:text-box>
          <text:p><text:span text:style-name="T2"><text:s/></text:span></text:p>
        </draw:text-box>
      </draw:frame>
      <draw:polygon text:anchor-type="page" text:anchor-page-number="5" draw:z-index="4742" draw:name="Shape1716" draw:style-name="gr2" draw:text-style-name="P3" svg:width="1.0835in" svg:height="0.1114in" svg:x="0.4114in" svg:y="9.7366in" svg:viewBox="0 0 2753 284" draw:points="0,0 2753,0 2753,284 0,284">
        <text:p/>
      </draw:polygon>
      <draw:frame text:anchor-type="page" text:anchor-page-number="6" draw:z-index="4741" draw:name="Shape2359" draw:style-name="gr1" draw:text-style-name="P2" svg:width="0.1894in" svg:height="0.113in" svg:x="3.561in" svg:y="4.6756in">
        <draw:text-box>
          <text:p><text:span text:style-name="T4">ppm</text:span></text:p>
        </draw:text-box>
      </draw:frame>
      <draw:frame text:anchor-type="page" text:anchor-page-number="14" draw:z-index="4740" draw:name="Shape4900" draw:style-name="gr1" draw:text-style-name="P2" svg:width="4.4843in" svg:height="0.1295in" svg:x="1.9866in" svg:y="10.0902in">
        <draw:text-box>
          <text:p><text:span text:style-name="T1">Trasferimento di una sostanza o di un preparato in piccoli contenitori (linea di riempimento </text:span></text:p>
        </draw:text-box>
      </draw:frame>
      <draw:polygon text:anchor-type="page" text:anchor-page-number="5" draw:z-index="4739" draw:name="Shape1715" draw:style-name="gr2" draw:text-style-name="P3" svg:width="1.1803in" svg:height="0.1913in" svg:x="0.363in" svg:y="9.7366in" svg:viewBox="0 0 2999 487" draw:points="0,0 2999,0 2999,487 0,487">
        <text:p/>
      </draw:polygon>
      <draw:frame text:anchor-type="page" text:anchor-page-number="6" draw:z-index="4738" draw:name="Shape2324" draw:style-name="gr1" draw:text-style-name="P2" svg:width="0.0433in" svg:height="0.1925in" svg:x="2.6764in" svg:y="4.6146in">
        <draw:text-box>
          <text:p><text:span text:style-name="T2"><text:s/></text:span></text:p>
        </draw:text-box>
      </draw:frame>
      <draw:polygon text:anchor-type="page" text:anchor-page-number="5" draw:z-index="4737" draw:name="Shape1708" draw:style-name="gr3" draw:text-style-name="P4" svg:width="1.1717in" svg:height="0.0098in" svg:x="6.6732in" svg:y="9.5232in" svg:viewBox="0 0 2977 26" draw:points="0,0 2977,0 2977,26 0,26">
        <text:p/>
      </draw:polygon>
      <draw:frame text:anchor-type="page" text:anchor-page-number="14" draw:z-index="4736" draw:name="Shape4883" draw:style-name="gr1" draw:text-style-name="P2" svg:width="0.0433in" svg:height="0.1925in" svg:x="1.2516in" svg:y="10.0299in">
        <draw:text-box>
          <text:p><text:span text:style-name="T2"><text:s/></text:span></text:p>
        </draw:text-box>
      </draw:frame>
      <draw:polygon text:anchor-type="page" text:anchor-page-number="6" draw:z-index="4735" draw:name="Shape2358" draw:style-name="gr4" draw:text-style-name="P5" svg:width="0.4933in" svg:height="0.1114in" svg:x="3.5614in" svg:y="4.6732in" svg:viewBox="0 0 1254 284" draw:points="0,0 1254,0 1254,284 0,284">
        <text:p/>
      </draw:polygon>
      <draw:polygon text:anchor-type="page" text:anchor-page-number="5" draw:z-index="4734" draw:name="Shape1707" draw:style-name="gr3" draw:text-style-name="P4" svg:width="0.0102in" svg:height="0.0098in" svg:x="6.663in" svg:y="9.5232in" svg:viewBox="0 0 27 26" draw:points="0,0 27,0 27,26 0,26">
        <text:p/>
      </draw:polygon>
      <draw:polygon text:anchor-type="page" text:anchor-page-number="14" draw:z-index="4733" draw:name="Shape4899" draw:style-name="gr2" draw:text-style-name="P3" svg:width="4.6264in" svg:height="0.1268in" svg:x="1.9866in" svg:y="10.0898in" svg:viewBox="0 0 11752 323" draw:points="0,0 11752,0 11752,323 0,323">
        <text:p/>
      </draw:polygon>
      <draw:polygon text:anchor-type="page" text:anchor-page-number="6" draw:z-index="4732" draw:name="Shape2357" draw:style-name="gr4" draw:text-style-name="P5" svg:width="0.5902in" svg:height="0.1917in" svg:x="3.513in" svg:y="4.6732in" svg:viewBox="0 0 1500 488" draw:points="0,0 1500,0 1500,488 0,488">
        <text:p/>
      </draw:polygon>
      <draw:polygon text:anchor-type="page" text:anchor-page-number="5" draw:z-index="4731" draw:name="Shape1662" draw:style-name="gr3" draw:text-style-name="P4" svg:width="0.7783in" svg:height="0.0098in" svg:x="5.8846in" svg:y="9.5232in" svg:viewBox="0 0 1978 26" draw:points="0,0 1978,0 1978,26 0,26">
        <text:p/>
      </draw:polygon>
      <draw:polygon text:anchor-type="page" text:anchor-page-number="14" draw:z-index="4730" draw:name="Shape4898" draw:style-name="gr2" draw:text-style-name="P3" svg:width="4.7232in" svg:height="0.1268in" svg:x="1.9382in" svg:y="10.0898in" svg:viewBox="0 0 11998 323" draw:points="0,0 11998,0 11998,323 0,323">
        <text:p/>
      </draw:polygon>
      <draw:frame text:anchor-type="page" text:anchor-page-number="6" draw:z-index="4729" draw:name="Shape2354" draw:style-name="gr1" draw:text-style-name="P2" svg:width="0.2969in" svg:height="0.113in" svg:x="2.3799in" svg:y="4.6756in">
        <draw:text-box>
          <text:p><text:span text:style-name="T4">mg/m3</text:span></text:p>
        </draw:text-box>
      </draw:frame>
      <draw:frame text:anchor-type="page" text:anchor-page-number="6" draw:z-index="4728" draw:name="Shape2355" draw:style-name="gr1" draw:text-style-name="P2" svg:width="0.0433in" svg:height="0.1925in" svg:x="1.5917in" svg:y="4.6764in">
        <draw:text-box>
          <text:p><text:span text:style-name="T2"><text:s/></text:span></text:p>
        </draw:text-box>
      </draw:frame>
      <draw:frame text:anchor-type="page" text:anchor-page-number="14" draw:z-index="4727" draw:name="Shape4897" draw:style-name="gr1" draw:text-style-name="P2" svg:width="0.0551in" svg:height="0.113in" svg:x="1.198in" svg:y="10.0902in">
        <draw:text-box>
          <text:p><text:span text:style-name="T5">9</text:span></text:p>
        </draw:text-box>
      </draw:frame>
      <draw:polygon text:anchor-type="page" text:anchor-page-number="5" draw:z-index="4726" draw:name="Shape1661" draw:style-name="gr3" draw:text-style-name="P4" svg:width="0.0098in" svg:height="0.0098in" svg:x="5.8748in" svg:y="9.5232in" svg:viewBox="0 0 26 26" draw:points="0,0 26,0 26,26 0,26">
        <text:p/>
      </draw:polygon>
      <draw:polygon text:anchor-type="page" text:anchor-page-number="5" draw:z-index="4725" draw:name="Shape1660" draw:style-name="gr3" draw:text-style-name="P4" svg:width="0.5799in" svg:height="0.0098in" svg:x="5.2949in" svg:y="9.5232in" svg:viewBox="0 0 1474 26" draw:points="0,0 1474,0 1474,26 0,26">
        <text:p/>
      </draw:polygon>
      <draw:polygon text:anchor-type="page" text:anchor-page-number="6" draw:z-index="4724" draw:name="Shape2353" draw:style-name="gr4" draw:text-style-name="P5" svg:width="1.0831in" svg:height="0.1114in" svg:x="2.3799in" svg:y="4.6732in" svg:viewBox="0 0 2752 284" draw:points="0,0 2752,0 2752,284 0,284">
        <text:p/>
      </draw:polygon>
      <draw:frame text:anchor-type="page" text:anchor-page-number="14" draw:z-index="4723" draw:name="Shape4889" draw:style-name="gr1" draw:text-style-name="P2" svg:width="0.0433in" svg:height="0.1925in" svg:x="0.7346in" svg:y="10.0299in">
        <draw:text-box>
          <text:p><text:span text:style-name="T2"><text:s/></text:span></text:p>
        </draw:text-box>
      </draw:frame>
      <draw:polygon text:anchor-type="page" text:anchor-page-number="5" draw:z-index="4722" draw:name="Shape1659" draw:style-name="gr3" draw:text-style-name="P4" svg:width="0.0102in" svg:height="0.0098in" svg:x="5.2846in" svg:y="9.5232in" svg:viewBox="0 0 27 26" draw:points="0,0 27,0 27,26 0,26">
        <text:p/>
      </draw:polygon>
      <draw:polygon text:anchor-type="page" text:anchor-page-number="6" draw:z-index="4721" draw:name="Shape2352" draw:style-name="gr4" draw:text-style-name="P5" svg:width="1.1815in" svg:height="0.1917in" svg:x="2.3315in" svg:y="4.6732in" svg:viewBox="0 0 3002 488" draw:points="0,0 3002,0 3002,488 0,488">
        <text:p/>
      </draw:polygon>
      <draw:polygon text:anchor-type="page" text:anchor-page-number="14" draw:z-index="4720" draw:name="Shape4896" draw:style-name="gr2" draw:text-style-name="P3" svg:width="0.6902in" svg:height="0.1118in" svg:x="1.198in" svg:y="10.0898in" svg:viewBox="0 0 1754 285" draw:points="0,0 1754,0 1754,285 0,285">
        <text:p/>
      </draw:polygon>
      <draw:polygon text:anchor-type="page" text:anchor-page-number="5" draw:z-index="4719" draw:name="Shape1658" draw:style-name="gr3" draw:text-style-name="P4" svg:width="1.1717in" svg:height="0.0098in" svg:x="4.113in" svg:y="9.5232in" svg:viewBox="0 0 2977 26" draw:points="0,0 2977,0 2977,26 0,26">
        <text:p/>
      </draw:polygon>
      <draw:polygon text:anchor-type="page" text:anchor-page-number="14" draw:z-index="4718" draw:name="Shape4895" draw:style-name="gr2" draw:text-style-name="P3" svg:width="0.7886in" svg:height="0.1268in" svg:x="1.15in" svg:y="10.0898in" svg:viewBox="0 0 2004 323" draw:points="0,0 2004,0 2004,323 0,323">
        <text:p/>
      </draw:polygon>
      <draw:frame text:anchor-type="page" text:anchor-page-number="6" draw:z-index="4717" draw:name="Shape2349" draw:style-name="gr1" draw:text-style-name="P2" svg:width="0.085in" svg:height="0.1925in" svg:x="0.411in" svg:y="4.6764in">
        <draw:text-box>
          <text:p><text:span text:style-name="T2"><text:s text:c="2"/></text:span></text:p>
        </draw:text-box>
      </draw:frame>
      <draw:polygon text:anchor-type="page" text:anchor-page-number="5" draw:z-index="4716" draw:name="Shape1657" draw:style-name="gr3" draw:text-style-name="P4" svg:width="0.0098in" svg:height="0.0098in" svg:x="4.1031in" svg:y="9.5232in" svg:viewBox="0 0 26 26" draw:points="0,0 26,0 26,26 0,26">
        <text:p/>
      </draw:polygon>
      <draw:frame text:anchor-type="page" text:anchor-page-number="14" draw:z-index="4715" draw:name="Shape4894" draw:style-name="gr1" draw:text-style-name="P2" svg:width="0.2807in" svg:height="0.113in" svg:x="0.4535in" svg:y="10.0902in">
        <draw:text-box>
          <text:p><text:span text:style-name="T5">PROC</text:span></text:p>
        </draw:text-box>
      </draw:frame>
      <draw:polygon text:anchor-type="page" text:anchor-page-number="6" draw:z-index="4714" draw:name="Shape2351" draw:style-name="gr4" draw:text-style-name="P5" svg:width="0.6917in" svg:height="0.1917in" svg:x="1.5913in" svg:y="4.6732in" svg:viewBox="0 0 1758 488" draw:points="0,0 1758,0 1758,488 0,488">
        <text:p/>
      </draw:polygon>
      <draw:polygon text:anchor-type="page" text:anchor-page-number="6" draw:z-index="4713" draw:name="Shape2350" draw:style-name="gr4" draw:text-style-name="P5" svg:width="0.7882in" svg:height="0.1917in" svg:x="1.5433in" svg:y="4.6732in" svg:viewBox="0 0 2003 488" draw:points="0,0 2003,0 2003,488 0,488">
        <text:p/>
      </draw:polygon>
      <draw:polygon text:anchor-type="page" text:anchor-page-number="5" draw:z-index="4712" draw:name="Shape1656" draw:style-name="gr3" draw:text-style-name="P4" svg:width="0.5799in" svg:height="0.0098in" svg:x="3.5232in" svg:y="9.5232in" svg:viewBox="0 0 1474 26" draw:points="0,0 1474,0 1474,26 0,26">
        <text:p/>
      </draw:polygon>
      <draw:frame text:anchor-type="page" text:anchor-page-number="14" draw:z-index="4711" draw:name="Shape4888" draw:style-name="gr1" draw:text-style-name="P2" svg:width="0.0433in" svg:height="0.1925in" svg:x="0.411in" svg:y="10.0299in">
        <draw:text-box>
          <text:p><text:span text:style-name="T2"><text:s/></text:span></text:p>
        </draw:text-box>
      </draw:frame>
      <draw:frame text:anchor-type="page" text:anchor-page-number="14" draw:z-index="4710" draw:name="Shape4887" draw:style-name="gr1" draw:text-style-name="P2" svg:width="0.0433in" svg:height="0.1925in" svg:x="2.4063in" svg:y="9.9161in">
        <draw:text-box>
          <text:p><text:span text:style-name="T2"><text:s/></text:span></text:p>
        </draw:text-box>
      </draw:frame>
      <draw:polygon text:anchor-type="page" text:anchor-page-number="5" draw:z-index="4709" draw:name="Shape1655" draw:style-name="gr3" draw:text-style-name="P4" svg:width="0.0102in" svg:height="0.0098in" svg:x="3.513in" svg:y="9.5232in" svg:viewBox="0 0 27 26" draw:points="0,0 27,0 27,26 0,26">
        <text:p/>
      </draw:polygon>
      <draw:frame text:anchor-type="page" text:anchor-page-number="6" draw:z-index="4708" draw:name="Shape2322" draw:style-name="gr1" draw:text-style-name="P2" svg:width="0.0433in" svg:height="0.1925in" svg:x="6.7098in" svg:y="4.4417in">
        <draw:text-box>
          <text:p><text:span text:style-name="T2"><text:s/></text:span></text:p>
        </draw:text-box>
      </draw:frame>
      <draw:polygon text:anchor-type="page" text:anchor-page-number="6" draw:z-index="4707" draw:name="Shape2348" draw:style-name="gr4" draw:text-style-name="P5" svg:width="1.0835in" svg:height="0.1917in" svg:x="0.4114in" svg:y="4.6732in" svg:viewBox="0 0 2753 488" draw:points="0,0 2753,0 2753,488 0,488">
        <text:p/>
      </draw:polygon>
      <draw:polygon text:anchor-type="page" text:anchor-page-number="14" draw:z-index="4706" draw:name="Shape4893" draw:style-name="gr2" draw:text-style-name="P3" svg:width="0.6902in" svg:height="0.1118in" svg:x="0.4114in" svg:y="10.0898in" svg:viewBox="0 0 1754 285" draw:points="0,0 1754,0 1754,285 0,285">
        <text:p/>
      </draw:polygon>
      <draw:polygon text:anchor-type="page" text:anchor-page-number="5" draw:z-index="4705" draw:name="Shape1654" draw:style-name="gr3" draw:text-style-name="P4" svg:width="1.1717in" svg:height="0.0098in" svg:x="2.3413in" svg:y="9.5232in" svg:viewBox="0 0 2977 26" draw:points="0,0 2977,0 2977,26 0,26">
        <text:p/>
      </draw:polygon>
      <draw:polygon text:anchor-type="page" text:anchor-page-number="14" draw:z-index="4704" draw:name="Shape4892" draw:style-name="gr2" draw:text-style-name="P3" svg:width="0.7866in" svg:height="0.1268in" svg:x="0.363in" svg:y="10.0898in" svg:viewBox="0 0 1999 323" draw:points="0,0 1999,0 1999,323 0,323">
        <text:p/>
      </draw:polygon>
      <draw:polygon text:anchor-type="page" text:anchor-page-number="5" draw:z-index="4703" draw:name="Shape1653" draw:style-name="gr3" draw:text-style-name="P4" svg:width="0.0098in" svg:height="0.0098in" svg:x="2.3315in" svg:y="9.5232in" svg:viewBox="0 0 26 26" draw:points="0,0 26,0 26,26 0,26">
        <text:p/>
      </draw:polygon>
      <draw:polygon text:anchor-type="page" text:anchor-page-number="6" draw:z-index="4702" draw:name="Shape2347" draw:style-name="gr4" draw:text-style-name="P5" svg:width="1.1803in" svg:height="0.1917in" svg:x="0.363in" svg:y="4.6732in" svg:viewBox="0 0 2999 488" draw:points="0,0 2999,0 2999,488 0,488">
        <text:p/>
      </draw:polygon>
      <draw:polygon text:anchor-type="page" text:anchor-page-number="6" draw:z-index="4701" draw:name="Shape2297" draw:style-name="gr3" draw:text-style-name="P4" svg:width="1.1717in" svg:height="0.0102in" svg:x="6.6732in" svg:y="4.428in" svg:viewBox="0 0 2977 27" draw:points="0,0 2977,0 2977,27 0,27">
        <text:p/>
      </draw:polygon>
      <draw:frame text:anchor-type="page" text:anchor-page-number="14" draw:z-index="4700" draw:name="Shape4891" draw:style-name="gr1" draw:text-style-name="P2" svg:width="0.4248in" svg:height="0.1295in" svg:x="1.9866in" svg:y="9.9638in">
        <draw:text-box>
          <text:p><text:span text:style-name="T1">dedicate</text:span></text:p>
        </draw:text-box>
      </draw:frame>
      <draw:polygon text:anchor-type="page" text:anchor-page-number="5" draw:z-index="4699" draw:name="Shape1652" draw:style-name="gr3" draw:text-style-name="P4" svg:width="0.7768in" svg:height="0.0098in" svg:x="1.5547in" svg:y="9.5232in" svg:viewBox="0 0 1974 26" draw:points="0,0 1974,0 1974,26 0,26">
        <text:p/>
      </draw:polygon>
      <draw:polygon text:anchor-type="page" text:anchor-page-number="6" draw:z-index="4698" draw:name="Shape2296" draw:style-name="gr3" draw:text-style-name="P4" svg:width="0.0102in" svg:height="0.0102in" svg:x="6.663in" svg:y="4.428in" svg:viewBox="0 0 27 27" draw:points="0,0 27,0 27,27 0,27">
        <text:p/>
      </draw:polygon>
      <draw:polygon text:anchor-type="page" text:anchor-page-number="5" draw:z-index="4697" draw:name="Shape1651" draw:style-name="gr3" draw:text-style-name="P4" svg:width="0.0098in" svg:height="0.0098in" svg:x="1.5449in" svg:y="9.5232in" svg:viewBox="0 0 26 26" draw:points="0,0 26,0 26,26 0,26">
        <text:p/>
      </draw:polygon>
      <draw:frame text:anchor-type="page" text:anchor-page-number="14" draw:z-index="4696" draw:name="Shape4886" draw:style-name="gr1" draw:text-style-name="P2" svg:width="4.5713in" svg:height="0.1295in" svg:x="1.9866in" svg:y="9.8354in">
        <draw:text-box>
          <text:p><text:span text:style-name="T1">Trasferimento di una sostanza o di una miscela (riempimento/svuotamento) presso strutture </text:span></text:p>
        </draw:text-box>
      </draw:frame>
      <draw:polygon text:anchor-type="page" text:anchor-page-number="6" draw:z-index="4695" draw:name="Shape2295" draw:style-name="gr3" draw:text-style-name="P4" svg:width="0.7783in" svg:height="0.0102in" svg:x="5.8846in" svg:y="4.428in" svg:viewBox="0 0 1978 27" draw:points="0,0 1978,0 1978,27 0,27">
        <text:p/>
      </draw:polygon>
      <draw:polygon text:anchor-type="page" text:anchor-page-number="5" draw:z-index="4694" draw:name="Shape1650" draw:style-name="gr3" draw:text-style-name="P4" svg:width="1.1819in" svg:height="0.0098in" svg:x="0.363in" svg:y="9.5232in" svg:viewBox="0 0 3003 26" draw:points="0,0 3003,0 3003,26 0,26">
        <text:p/>
      </draw:polygon>
      <draw:polygon text:anchor-type="page" text:anchor-page-number="14" draw:z-index="4693" draw:name="Shape4890" draw:style-name="gr2" draw:text-style-name="P3" svg:width="4.6264in" svg:height="0.1283in" svg:x="1.9866in" svg:y="9.9614in" svg:viewBox="0 0 11752 327" draw:points="0,0 11752,0 11752,327 0,327">
        <text:p/>
      </draw:polygon>
      <draw:frame text:anchor-type="page" text:anchor-page-number="14" draw:z-index="4692" draw:name="Shape4868" draw:style-name="gr1" draw:text-style-name="P2" svg:width="0.0433in" svg:height="0.1925in" svg:x="1.311in" svg:y="9.7728in">
        <draw:text-box>
          <text:p><text:span text:style-name="T2"><text:s/></text:span></text:p>
        </draw:text-box>
      </draw:frame>
      <draw:polygon text:anchor-type="page" text:anchor-page-number="6" draw:z-index="4691" draw:name="Shape2294" draw:style-name="gr3" draw:text-style-name="P4" svg:width="0.0098in" svg:height="0.0102in" svg:x="5.8748in" svg:y="4.428in" svg:viewBox="0 0 26 27" draw:points="0,0 26,0 26,27 0,27">
        <text:p/>
      </draw:polygon>
      <draw:frame text:anchor-type="page" text:anchor-page-number="5" draw:z-index="4690" draw:name="Shape1649" draw:style-name="gr1" draw:text-style-name="P2" svg:width="0.0433in" svg:height="0.1925in" svg:x="6.2846in" svg:y="9.4752in">
        <draw:text-box>
          <text:p><text:span text:style-name="T2"><text:s/></text:span></text:p>
        </draw:text-box>
      </draw:frame>
      <draw:polygon text:anchor-type="page" text:anchor-page-number="14" draw:z-index="4689" draw:name="Shape4885" draw:style-name="gr2" draw:text-style-name="P3" svg:width="4.6264in" svg:height="0.1283in" svg:x="1.9866in" svg:y="9.8331in" svg:viewBox="0 0 11752 327" draw:points="0,0 11752,0 11752,327 0,327">
        <text:p/>
      </draw:polygon>
      <draw:polygon text:anchor-type="page" text:anchor-page-number="5" draw:z-index="4688" draw:name="Shape1711" draw:style-name="gr2" draw:text-style-name="P3" svg:width="1.085in" svg:height="0.1917in" svg:x="6.7098in" svg:y="9.5331in" svg:viewBox="0 0 2757 488" draw:points="0,0 2757,0 2757,488 0,488">
        <text:p/>
      </draw:polygon>
      <draw:polygon text:anchor-type="page" text:anchor-page-number="6" draw:z-index="4687" draw:name="Shape2293" draw:style-name="gr3" draw:text-style-name="P4" svg:width="0.5799in" svg:height="0.0102in" svg:x="5.2949in" svg:y="4.428in" svg:viewBox="0 0 1474 27" draw:points="0,0 1474,0 1474,27 0,27">
        <text:p/>
      </draw:polygon>
      <draw:polygon text:anchor-type="page" text:anchor-page-number="5" draw:z-index="4686" draw:name="Shape1706" draw:style-name="gr2" draw:text-style-name="P3" svg:width="1.1819in" svg:height="0.1917in" svg:x="6.6614in" svg:y="9.5331in" svg:viewBox="0 0 3003 488" draw:points="0,0 3003,0 3003,488 0,488">
        <text:p/>
      </draw:polygon>
      <draw:polygon text:anchor-type="page" text:anchor-page-number="6" draw:z-index="4685" draw:name="Shape2292" draw:style-name="gr3" draw:text-style-name="P4" svg:width="0.0102in" svg:height="0.0102in" svg:x="5.2846in" svg:y="4.428in" svg:viewBox="0 0 27 27" draw:points="0,0 27,0 27,27 0,27">
        <text:p/>
      </draw:polygon>
      <draw:polygon text:anchor-type="page" text:anchor-page-number="14" draw:z-index="4684" draw:name="Shape4884" draw:style-name="gr2" draw:text-style-name="P3" svg:width="4.7232in" svg:height="0.2567in" svg:x="1.9382in" svg:y="9.8331in" svg:viewBox="0 0 11998 653" draw:points="0,0 11998,0 11998,653 0,653">
        <text:p/>
      </draw:polygon>
      <draw:frame text:anchor-type="page" text:anchor-page-number="5" draw:z-index="4683" draw:name="Shape1690" draw:style-name="gr1" draw:text-style-name="P2" svg:width="0.3614in" svg:height="0.113in" svg:x="5.9228in" svg:y="9.5362in">
        <draw:text-box>
          <text:p><text:span text:style-name="T4">RESPIR</text:span></text:p>
        </draw:text-box>
      </draw:frame>
      <draw:polygon text:anchor-type="page" text:anchor-page-number="6" draw:z-index="4682" draw:name="Shape2308" draw:style-name="gr3" draw:text-style-name="P4" svg:width="1.1717in" svg:height="0.0102in" svg:x="4.113in" svg:y="4.428in" svg:viewBox="0 0 2977 27" draw:points="0,0 2977,0 2977,27 0,27">
        <text:p/>
      </draw:polygon>
      <draw:frame text:anchor-type="page" text:anchor-page-number="14" draw:z-index="4681" draw:name="Shape4882" draw:style-name="gr1" draw:text-style-name="P2" svg:width="0.1142in" svg:height="0.113in" svg:x="1.198in" svg:y="9.8339in">
        <draw:text-box>
          <text:p><text:span text:style-name="T5">8b</text:span></text:p>
        </draw:text-box>
      </draw:frame>
      <draw:frame text:anchor-type="page" text:anchor-page-number="14" draw:z-index="4680" draw:name="Shape4874" draw:style-name="gr1" draw:text-style-name="P2" svg:width="0.0433in" svg:height="0.1925in" svg:x="0.7346in" svg:y="9.7728in">
        <draw:text-box>
          <text:p><text:span text:style-name="T2"><text:s/></text:span></text:p>
        </draw:text-box>
      </draw:frame>
      <draw:frame text:anchor-type="page" text:anchor-page-number="5" draw:z-index="4679" draw:name="Shape1691" draw:style-name="gr1" draw:text-style-name="P2" svg:width="0.0433in" svg:height="0.1925in" svg:x="5.3335in" svg:y="9.5362in">
        <draw:text-box>
          <text:p><text:span text:style-name="T2"><text:s/></text:span></text:p>
        </draw:text-box>
      </draw:frame>
      <draw:polygon text:anchor-type="page" text:anchor-page-number="6" draw:z-index="4678" draw:name="Shape2307" draw:style-name="gr3" draw:text-style-name="P4" svg:width="0.0098in" svg:height="0.0102in" svg:x="4.1031in" svg:y="4.428in" svg:viewBox="0 0 26 27" draw:points="0,0 26,0 26,27 0,27">
        <text:p/>
      </draw:polygon>
      <draw:polygon text:anchor-type="page" text:anchor-page-number="14" draw:z-index="4677" draw:name="Shape4881" draw:style-name="gr2" draw:text-style-name="P3" svg:width="0.6902in" svg:height="0.1118in" svg:x="1.198in" svg:y="9.8331in" svg:viewBox="0 0 1754 285" draw:points="0,0 1754,0 1754,285 0,285">
        <text:p/>
      </draw:polygon>
      <draw:polygon text:anchor-type="page" text:anchor-page-number="6" draw:z-index="4676" draw:name="Shape2306" draw:style-name="gr3" draw:text-style-name="P4" svg:width="0.5799in" svg:height="0.0102in" svg:x="3.5232in" svg:y="4.428in" svg:viewBox="0 0 1474 27" draw:points="0,0 1474,0 1474,27 0,27">
        <text:p/>
      </draw:polygon>
      <draw:polygon text:anchor-type="page" text:anchor-page-number="5" draw:z-index="4675" draw:name="Shape1689" draw:style-name="gr2" draw:text-style-name="P3" svg:width="0.6898in" svg:height="0.1118in" svg:x="5.9232in" svg:y="9.5331in" svg:viewBox="0 0 1753 285" draw:points="0,0 1753,0 1753,285 0,285">
        <text:p/>
      </draw:polygon>
      <draw:polygon text:anchor-type="page" text:anchor-page-number="6" draw:z-index="4674" draw:name="Shape2305" draw:style-name="gr3" draw:text-style-name="P4" svg:width="0.0102in" svg:height="0.0102in" svg:x="3.513in" svg:y="4.428in" svg:viewBox="0 0 27 27" draw:points="0,0 27,0 27,27 0,27">
        <text:p/>
      </draw:polygon>
      <draw:polygon text:anchor-type="page" text:anchor-page-number="14" draw:z-index="4673" draw:name="Shape4880" draw:style-name="gr2" draw:text-style-name="P3" svg:width="0.7886in" svg:height="0.2567in" svg:x="1.15in" svg:y="9.8331in" svg:viewBox="0 0 2004 653" draw:points="0,0 2004,0 2004,653 0,653">
        <text:p/>
      </draw:polygon>
      <draw:polygon text:anchor-type="page" text:anchor-page-number="5" draw:z-index="4672" draw:name="Shape1688" draw:style-name="gr2" draw:text-style-name="P3" svg:width="0.7866in" svg:height="0.1917in" svg:x="5.8748in" svg:y="9.5331in" svg:viewBox="0 0 1999 488" draw:points="0,0 1999,0 1999,488 0,488">
        <text:p/>
      </draw:polygon>
      <draw:polygon text:anchor-type="page" text:anchor-page-number="6" draw:z-index="4671" draw:name="Shape2303" draw:style-name="gr3" draw:text-style-name="P4" svg:width="1.1717in" svg:height="0.0102in" svg:x="2.3413in" svg:y="4.428in" svg:viewBox="0 0 2977 27" draw:points="0,0 2977,0 2977,27 0,27">
        <text:p/>
      </draw:polygon>
      <draw:frame text:anchor-type="page" text:anchor-page-number="14" draw:z-index="4670" draw:name="Shape4879" draw:style-name="gr1" draw:text-style-name="P2" svg:width="0.2807in" svg:height="0.113in" svg:x="0.4535in" svg:y="9.8339in">
        <draw:text-box>
          <text:p><text:span text:style-name="T5">PROC</text:span></text:p>
        </draw:text-box>
      </draw:frame>
      <draw:frame text:anchor-type="page" text:anchor-page-number="5" draw:z-index="4669" draw:name="Shape1685" draw:style-name="gr1" draw:text-style-name="P2" svg:width="0.0433in" svg:height="0.1925in" svg:x="4.1516in" svg:y="9.5362in">
        <draw:text-box>
          <text:p><text:span text:style-name="T2"><text:s/></text:span></text:p>
        </draw:text-box>
      </draw:frame>
      <draw:polygon text:anchor-type="page" text:anchor-page-number="6" draw:z-index="4668" draw:name="Shape2291" draw:style-name="gr3" draw:text-style-name="P4" svg:width="0.0098in" svg:height="0.0102in" svg:x="2.3315in" svg:y="4.428in" svg:viewBox="0 0 26 27" draw:points="0,0 26,0 26,27 0,27">
        <text:p/>
      </draw:polygon>
      <draw:polygon text:anchor-type="page" text:anchor-page-number="5" draw:z-index="4667" draw:name="Shape1687" draw:style-name="gr2" draw:text-style-name="P3" svg:width="0.4917in" svg:height="0.1917in" svg:x="5.3331in" svg:y="9.5331in" svg:viewBox="0 0 1250 488" draw:points="0,0 1250,0 1250,488 0,488">
        <text:p/>
      </draw:polygon>
      <draw:frame text:anchor-type="page" text:anchor-page-number="14" draw:z-index="4666" draw:name="Shape4873" draw:style-name="gr1" draw:text-style-name="P2" svg:width="0.0433in" svg:height="0.1925in" svg:x="0.411in" svg:y="9.7728in">
        <draw:text-box>
          <text:p><text:span text:style-name="T2"><text:s/></text:span></text:p>
        </draw:text-box>
      </draw:frame>
      <draw:polygon text:anchor-type="page" text:anchor-page-number="6" draw:z-index="4665" draw:name="Shape2290" draw:style-name="gr3" draw:text-style-name="P4" svg:width="0.7768in" svg:height="0.0102in" svg:x="1.5547in" svg:y="4.428in" svg:viewBox="0 0 1974 27" draw:points="0,0 1974,0 1974,27 0,27">
        <text:p/>
      </draw:polygon>
      <draw:polygon text:anchor-type="page" text:anchor-page-number="5" draw:z-index="4664" draw:name="Shape1686" draw:style-name="gr2" draw:text-style-name="P3" svg:width="0.5917in" svg:height="0.1917in" svg:x="5.2831in" svg:y="9.5331in" svg:viewBox="0 0 1504 488" draw:points="0,0 1504,0 1504,488 0,488">
        <text:p/>
      </draw:polygon>
      <draw:frame text:anchor-type="page" text:anchor-page-number="14" draw:z-index="4663" draw:name="Shape4872" draw:style-name="gr1" draw:text-style-name="P2" svg:width="0.0433in" svg:height="0.1925in" svg:x="2.6228in" svg:y="9.6598in">
        <draw:text-box>
          <text:p><text:span text:style-name="T2"><text:s/></text:span></text:p>
        </draw:text-box>
      </draw:frame>
      <draw:polygon text:anchor-type="page" text:anchor-page-number="6" draw:z-index="4662" draw:name="Shape2289" draw:style-name="gr3" draw:text-style-name="P4" svg:width="0.0098in" svg:height="0.0102in" svg:x="1.5449in" svg:y="4.428in" svg:viewBox="0 0 26 27" draw:points="0,0 26,0 26,27 0,27">
        <text:p/>
      </draw:polygon>
      <draw:polygon text:anchor-type="page" text:anchor-page-number="14" draw:z-index="4661" draw:name="Shape4875" draw:style-name="gr2" draw:text-style-name="P3" svg:width="0.6902in" svg:height="0.1118in" svg:x="0.4114in" svg:y="9.8331in" svg:viewBox="0 0 1754 285" draw:points="0,0 1754,0 1754,285 0,285">
        <text:p/>
      </draw:polygon>
      <draw:frame text:anchor-type="page" text:anchor-page-number="5" draw:z-index="4660" draw:name="Shape1682" draw:style-name="gr1" draw:text-style-name="P2" svg:width="0.0433in" svg:height="0.1925in" svg:x="3.561in" svg:y="9.5362in">
        <draw:text-box>
          <text:p><text:span text:style-name="T2"><text:s/></text:span></text:p>
        </draw:text-box>
      </draw:frame>
      <draw:polygon text:anchor-type="page" text:anchor-page-number="6" draw:z-index="4659" draw:name="Shape2286" draw:style-name="gr3" draw:text-style-name="P4" svg:width="1.1819in" svg:height="0.0102in" svg:x="0.363in" svg:y="4.428in" svg:viewBox="0 0 3003 27" draw:points="0,0 3003,0 3003,27 0,27">
        <text:p/>
      </draw:polygon>
      <draw:polygon text:anchor-type="page" text:anchor-page-number="5" draw:z-index="4658" draw:name="Shape1684" draw:style-name="gr2" draw:text-style-name="P3" svg:width="1.0831in" svg:height="0.1917in" svg:x="4.1516in" svg:y="9.5331in" svg:viewBox="0 0 2752 488" draw:points="0,0 2752,0 2752,488 0,488">
        <text:p/>
      </draw:polygon>
      <draw:polygon text:anchor-type="page" text:anchor-page-number="14" draw:z-index="4657" draw:name="Shape4878" draw:style-name="gr2" draw:text-style-name="P3" svg:width="0.7866in" svg:height="0.2567in" svg:x="0.363in" svg:y="9.8331in" svg:viewBox="0 0 1999 653" draw:points="0,0 1999,0 1999,653 0,653">
        <text:p/>
      </draw:polygon>
      <draw:polygon text:anchor-type="page" text:anchor-page-number="5" draw:z-index="4656" draw:name="Shape1683" draw:style-name="gr2" draw:text-style-name="P3" svg:width="1.1799in" svg:height="0.1917in" svg:x="4.1031in" svg:y="9.5331in" svg:viewBox="0 0 2998 488" draw:points="0,0 2998,0 2998,488 0,488">
        <text:p/>
      </draw:polygon>
      <draw:frame text:anchor-type="page" text:anchor-page-number="6" draw:z-index="4655" draw:name="Shape2323" draw:style-name="gr1" draw:text-style-name="P2" svg:width="0.0433in" svg:height="0.1925in" svg:x="6.4846in" svg:y="4.4917in">
        <draw:text-box>
          <text:p><text:span text:style-name="T2"><text:s/></text:span></text:p>
        </draw:text-box>
      </draw:frame>
      <draw:frame text:anchor-type="page" text:anchor-page-number="14" draw:z-index="4654" draw:name="Shape4877" draw:style-name="gr1" draw:text-style-name="P2" svg:width="0.6421in" svg:height="0.1295in" svg:x="1.9866in" svg:y="9.7071in">
        <draw:text-box>
          <text:p><text:span text:style-name="T1">non dedicate</text:span></text:p>
        </draw:text-box>
      </draw:frame>
      <draw:frame text:anchor-type="page" text:anchor-page-number="14" draw:z-index="4653" draw:name="Shape4871" draw:style-name="gr1" draw:text-style-name="P2" svg:width="4.6087in" svg:height="0.1295in" svg:x="1.9866in" svg:y="9.5807in">
        <draw:text-box>
          <text:p><text:span text:style-name="T1">Trasferimento di una sostanza o di un preparato (riempimento/svuotamento) presso strutture </text:span></text:p>
        </draw:text-box>
      </draw:frame>
      <draw:polygon text:anchor-type="page" text:anchor-page-number="6" draw:z-index="4652" draw:name="Shape2344" draw:style-name="gr4" draw:text-style-name="P5" svg:width="1.085in" svg:height="0.1917in" svg:x="6.7098in" svg:y="4.4382in" svg:viewBox="0 0 2757 488" draw:points="0,0 2757,0 2757,488 0,488">
        <text:p/>
      </draw:polygon>
      <draw:frame text:anchor-type="page" text:anchor-page-number="5" draw:z-index="4651" draw:name="Shape1669" draw:style-name="gr1" draw:text-style-name="P2" svg:width="0.0433in" svg:height="0.1925in" svg:x="2.5154in" svg:y="9.4752in">
        <draw:text-box>
          <text:p><text:span text:style-name="T2"><text:s/></text:span></text:p>
        </draw:text-box>
      </draw:frame>
      <draw:polygon text:anchor-type="page" text:anchor-page-number="5" draw:z-index="4650" draw:name="Shape1681" draw:style-name="gr2" draw:text-style-name="P3" svg:width="0.4933in" svg:height="0.1917in" svg:x="3.5614in" svg:y="9.5331in" svg:viewBox="0 0 1254 488" draw:points="0,0 1254,0 1254,488 0,488">
        <text:p/>
      </draw:polygon>
      <draw:polygon text:anchor-type="page" text:anchor-page-number="6" draw:z-index="4649" draw:name="Shape2343" draw:style-name="gr4" draw:text-style-name="P5" svg:width="1.1819in" svg:height="0.2232in" svg:x="6.6614in" svg:y="4.4382in" svg:viewBox="0 0 3003 568" draw:points="0,0 3003,0 3003,568 0,568">
        <text:p/>
      </draw:polygon>
      <draw:polygon text:anchor-type="page" text:anchor-page-number="14" draw:z-index="4648" draw:name="Shape4876" draw:style-name="gr2" draw:text-style-name="P3" svg:width="4.6264in" svg:height="0.1268in" svg:x="1.9866in" svg:y="9.7063in" svg:viewBox="0 0 11752 323" draw:points="0,0 11752,0 11752,323 0,323">
        <text:p/>
      </draw:polygon>
      <draw:frame text:anchor-type="page" text:anchor-page-number="14" draw:z-index="4647" draw:name="Shape4855" draw:style-name="gr1" draw:text-style-name="P2" svg:width="0.0433in" svg:height="0.1925in" svg:x="1.3063in" svg:y="9.5181in">
        <draw:text-box>
          <text:p><text:span text:style-name="T2"><text:s/></text:span></text:p>
        </draw:text-box>
      </draw:frame>
      <draw:frame text:anchor-type="page" text:anchor-page-number="6" draw:z-index="4646" draw:name="Shape2342" draw:style-name="gr1" draw:text-style-name="P2" svg:width="0.5594in" svg:height="0.113in" svg:x="5.9228in" svg:y="4.552in">
        <draw:text-box>
          <text:p><text:span text:style-name="T4">Osservazioni</text:span></text:p>
        </draw:text-box>
      </draw:frame>
      <draw:polygon text:anchor-type="page" text:anchor-page-number="5" draw:z-index="4645" draw:name="Shape1680" draw:style-name="gr2" draw:text-style-name="P3" svg:width="0.5902in" svg:height="0.1917in" svg:x="3.513in" svg:y="9.5331in" svg:viewBox="0 0 1500 488" draw:points="0,0 1500,0 1500,488 0,488">
        <text:p/>
      </draw:polygon>
      <draw:frame text:anchor-type="page" text:anchor-page-number="6" draw:z-index="4644" draw:name="Shape2314" draw:style-name="gr1" draw:text-style-name="P2" svg:width="0.2858in" svg:height="0.113in" svg:x="5.9228in" svg:y="4.4402in">
        <draw:text-box>
          <text:p><text:span text:style-name="T4">Note / </text:span></text:p>
        </draw:text-box>
      </draw:frame>
      <draw:polygon text:anchor-type="page" text:anchor-page-number="14" draw:z-index="4643" draw:name="Shape4870" draw:style-name="gr2" draw:text-style-name="P3" svg:width="4.6264in" svg:height="0.128in" svg:x="1.9866in" svg:y="9.5783in" svg:viewBox="0 0 11752 326" draw:points="0,0 11752,0 11752,326 0,326">
        <text:p/>
      </draw:polygon>
      <draw:frame text:anchor-type="page" text:anchor-page-number="5" draw:z-index="4642" draw:name="Shape1678" draw:style-name="gr1" draw:text-style-name="P2" svg:width="0.1358in" svg:height="0.113in" svg:x="2.3799in" svg:y="9.5362in">
        <draw:text-box>
          <text:p><text:span text:style-name="T4"><text:s text:c="3"/>1</text:span></text:p>
        </draw:text-box>
      </draw:frame>
      <draw:frame text:anchor-type="page" text:anchor-page-number="5" draw:z-index="4641" draw:name="Shape1668" draw:style-name="gr1" draw:text-style-name="P2" svg:width="0.0433in" svg:height="0.1925in" svg:x="1.8016in" svg:y="9.4752in">
        <draw:text-box>
          <text:p><text:span text:style-name="T2"><text:s/></text:span></text:p>
        </draw:text-box>
      </draw:frame>
      <draw:polygon text:anchor-type="page" text:anchor-page-number="14" draw:z-index="4640" draw:name="Shape4869" draw:style-name="gr2" draw:text-style-name="P3" svg:width="4.7232in" svg:height="0.2551in" svg:x="1.9382in" svg:y="9.578in" svg:viewBox="0 0 11998 649" draw:points="0,0 11998,0 11998,649 0,649">
        <text:p/>
      </draw:polygon>
      <draw:polygon text:anchor-type="page" text:anchor-page-number="6" draw:z-index="4639" draw:name="Shape2341" draw:style-name="gr4" draw:text-style-name="P5" svg:width="0.6898in" svg:height="0.1118in" svg:x="5.9232in" svg:y="4.55in" svg:viewBox="0 0 1753 285" draw:points="0,0 1753,0 1753,285 0,285">
        <text:p/>
      </draw:polygon>
      <draw:frame text:anchor-type="page" text:anchor-page-number="6" draw:z-index="4638" draw:name="Shape2319" draw:style-name="gr1" draw:text-style-name="P2" svg:width="0.0433in" svg:height="0.1925in" svg:x="5.3335in" svg:y="4.4417in">
        <draw:text-box>
          <text:p><text:span text:style-name="T2"><text:s/></text:span></text:p>
        </draw:text-box>
      </draw:frame>
      <draw:frame text:anchor-type="page" text:anchor-page-number="14" draw:z-index="4637" draw:name="Shape4867" draw:style-name="gr1" draw:text-style-name="P2" svg:width="0.1094in" svg:height="0.113in" svg:x="1.198in" svg:y="9.5791in">
        <draw:text-box>
          <text:p><text:span text:style-name="T5">8a</text:span></text:p>
        </draw:text-box>
      </draw:frame>
      <draw:polygon text:anchor-type="page" text:anchor-page-number="5" draw:z-index="4636" draw:name="Shape1677" draw:style-name="gr2" draw:text-style-name="P3" svg:width="1.0831in" svg:height="0.1118in" svg:x="2.3799in" svg:y="9.5331in" svg:viewBox="0 0 2752 285" draw:points="0,0 2752,0 2752,285 0,285">
        <text:p/>
      </draw:polygon>
      <draw:polygon text:anchor-type="page" text:anchor-page-number="6" draw:z-index="4635" draw:name="Shape2321" draw:style-name="gr4" draw:text-style-name="P5" svg:width="0.6898in" svg:height="0.1114in" svg:x="5.9232in" svg:y="4.4382in" svg:viewBox="0 0 1753 284" draw:points="0,0 1753,0 1753,284 0,284">
        <text:p/>
      </draw:polygon>
      <draw:polygon text:anchor-type="page" text:anchor-page-number="5" draw:z-index="4634" draw:name="Shape1676" draw:style-name="gr2" draw:text-style-name="P3" svg:width="1.1815in" svg:height="0.1917in" svg:x="2.3315in" svg:y="9.5331in" svg:viewBox="0 0 3002 488" draw:points="0,0 3002,0 3002,488 0,488">
        <text:p/>
      </draw:polygon>
      <draw:frame text:anchor-type="page" text:anchor-page-number="14" draw:z-index="4633" draw:name="Shape4854" draw:style-name="gr1" draw:text-style-name="P2" svg:width="0.0433in" svg:height="0.1925in" svg:x="0.7346in" svg:y="9.5181in">
        <draw:text-box>
          <text:p><text:span text:style-name="T2"><text:s/></text:span></text:p>
        </draw:text-box>
      </draw:frame>
      <draw:frame text:anchor-type="page" text:anchor-page-number="5" draw:z-index="4632" draw:name="Shape1675" draw:style-name="gr1" draw:text-style-name="P2" svg:width="0.2106in" svg:height="0.113in" svg:x="1.5917in" svg:y="9.5362in">
        <draw:text-box>
          <text:p><text:span text:style-name="T4">GBR</text:span></text:p>
        </draw:text-box>
      </draw:frame>
      <draw:polygon text:anchor-type="page" text:anchor-page-number="6" draw:z-index="4631" draw:name="Shape2320" draw:style-name="gr4" draw:text-style-name="P5" svg:width="0.7866in" svg:height="0.2232in" svg:x="5.8748in" svg:y="4.4382in" svg:viewBox="0 0 1999 568" draw:points="0,0 1999,0 1999,568 0,568">
        <text:p/>
      </draw:polygon>
      <draw:polygon text:anchor-type="page" text:anchor-page-number="14" draw:z-index="4630" draw:name="Shape4866" draw:style-name="gr2" draw:text-style-name="P3" svg:width="0.6902in" svg:height="0.1118in" svg:x="1.198in" svg:y="9.578in" svg:viewBox="0 0 1754 285" draw:points="0,0 1754,0 1754,285 0,285">
        <text:p/>
      </draw:polygon>
      <draw:frame text:anchor-type="page" text:anchor-page-number="5" draw:z-index="4629" draw:name="Shape1667" draw:style-name="gr1" draw:text-style-name="P2" svg:width="0.0433in" svg:height="0.1925in" svg:x="0.6634in" svg:y="9.4752in">
        <draw:text-box>
          <text:p><text:span text:style-name="T2"><text:s/></text:span></text:p>
        </draw:text-box>
      </draw:frame>
      <draw:frame text:anchor-type="page" text:anchor-page-number="6" draw:z-index="4628" draw:name="Shape2285" draw:style-name="gr1" draw:text-style-name="P2" svg:width="0.0433in" svg:height="0.1925in" svg:x="4.6866in" svg:y="4.3799in">
        <draw:text-box>
          <text:p><text:span text:style-name="T2"><text:s/></text:span></text:p>
        </draw:text-box>
      </draw:frame>
      <draw:polygon text:anchor-type="page" text:anchor-page-number="14" draw:z-index="4627" draw:name="Shape4865" draw:style-name="gr2" draw:text-style-name="P3" svg:width="0.7886in" svg:height="0.2551in" svg:x="1.15in" svg:y="9.578in" svg:viewBox="0 0 2004 649" draw:points="0,0 2004,0 2004,649 0,649">
        <text:p/>
      </draw:polygon>
      <draw:frame text:anchor-type="page" text:anchor-page-number="14" draw:z-index="4626" draw:name="Shape4864" draw:style-name="gr1" draw:text-style-name="P2" svg:width="0.2807in" svg:height="0.113in" svg:x="0.4535in" svg:y="9.5791in">
        <draw:text-box>
          <text:p><text:span text:style-name="T5">PROC</text:span></text:p>
        </draw:text-box>
      </draw:frame>
      <draw:polygon text:anchor-type="page" text:anchor-page-number="5" draw:z-index="4625" draw:name="Shape1674" draw:style-name="gr2" draw:text-style-name="P3" svg:width="0.6917in" svg:height="0.1118in" svg:x="1.5913in" svg:y="9.5331in" svg:viewBox="0 0 1758 285" draw:points="0,0 1758,0 1758,285 0,285">
        <text:p/>
      </draw:polygon>
      <draw:polygon text:anchor-type="page" text:anchor-page-number="6" draw:z-index="4624" draw:name="Shape2318" draw:style-name="gr4" draw:text-style-name="P5" svg:width="0.4917in" svg:height="0.1917in" svg:x="5.3331in" svg:y="4.4382in" svg:viewBox="0 0 1250 488" draw:points="0,0 1250,0 1250,488 0,488">
        <text:p/>
      </draw:polygon>
      <draw:polygon text:anchor-type="page" text:anchor-page-number="6" draw:z-index="4623" draw:name="Shape2317" draw:style-name="gr4" draw:text-style-name="P5" svg:width="0.5917in" svg:height="0.2232in" svg:x="5.2831in" svg:y="4.4382in" svg:viewBox="0 0 1504 568" draw:points="0,0 1504,0 1504,568 0,568">
        <text:p/>
      </draw:polygon>
      <draw:polygon text:anchor-type="page" text:anchor-page-number="5" draw:z-index="4622" draw:name="Shape1673" draw:style-name="gr2" draw:text-style-name="P3" svg:width="0.7882in" svg:height="0.1917in" svg:x="1.5433in" svg:y="9.5331in" svg:viewBox="0 0 2003 488" draw:points="0,0 2003,0 2003,488 0,488">
        <text:p/>
      </draw:polygon>
      <draw:frame text:anchor-type="page" text:anchor-page-number="14" draw:z-index="4621" draw:name="Shape4853" draw:style-name="gr1" draw:text-style-name="P2" svg:width="0.0433in" svg:height="0.1925in" svg:x="0.411in" svg:y="9.5181in">
        <draw:text-box>
          <text:p><text:span text:style-name="T2"><text:s/></text:span></text:p>
        </draw:text-box>
      </draw:frame>
      <draw:frame text:anchor-type="page" text:anchor-page-number="5" draw:z-index="4620" draw:name="Shape1672" draw:style-name="gr1" draw:text-style-name="P2" svg:width="0.2106in" svg:height="0.113in" svg:x="0.4516in" svg:y="9.5362in">
        <draw:text-box>
          <text:p><text:span text:style-name="T4">WEL</text:span></text:p>
        </draw:text-box>
      </draw:frame>
      <draw:frame text:anchor-type="page" text:anchor-page-number="14" draw:z-index="4619" draw:name="Shape4843" draw:style-name="gr1" draw:text-style-name="P2" svg:width="0.0433in" svg:height="0.1925in" svg:x="3.5929in" svg:y="9.4047in">
        <draw:text-box>
          <text:p><text:span text:style-name="T2"><text:s/></text:span></text:p>
        </draw:text-box>
      </draw:frame>
      <draw:frame text:anchor-type="page" text:anchor-page-number="6" draw:z-index="4618" draw:name="Shape2313" draw:style-name="gr1" draw:text-style-name="P2" svg:width="0.5331in" svg:height="0.113in" svg:x="4.1516in" svg:y="4.4402in">
        <draw:text-box>
          <text:p><text:span text:style-name="T4">STEL/15min</text:span></text:p>
        </draw:text-box>
      </draw:frame>
      <draw:frame text:anchor-type="page" text:anchor-page-number="6" draw:z-index="4617" draw:name="Shape2315" draw:style-name="gr1" draw:text-style-name="P2" svg:width="0.0433in" svg:height="0.1925in" svg:x="3.561in" svg:y="4.4417in">
        <draw:text-box>
          <text:p><text:span text:style-name="T2"><text:s/></text:span></text:p>
        </draw:text-box>
      </draw:frame>
      <draw:polygon text:anchor-type="page" text:anchor-page-number="14" draw:z-index="4616" draw:name="Shape4857" draw:style-name="gr2" draw:text-style-name="P3" svg:width="0.6902in" svg:height="0.1118in" svg:x="0.4114in" svg:y="9.578in" svg:viewBox="0 0 1754 285" draw:points="0,0 1754,0 1754,285 0,285">
        <text:p/>
      </draw:polygon>
      <draw:frame text:anchor-type="page" text:anchor-page-number="5" draw:z-index="4615" draw:name="Shape1666" draw:style-name="gr1" draw:text-style-name="P2" svg:width="0.0433in" svg:height="0.1925in" svg:x="0.411in" svg:y="9.4752in">
        <draw:text-box>
          <text:p><text:span text:style-name="T2"><text:s/></text:span></text:p>
        </draw:text-box>
      </draw:frame>
      <draw:polygon text:anchor-type="page" text:anchor-page-number="6" draw:z-index="4614" draw:name="Shape2316" draw:style-name="gr4" draw:text-style-name="P5" svg:width="1.0831in" svg:height="0.1114in" svg:x="4.1516in" svg:y="4.4382in" svg:viewBox="0 0 2752 284" draw:points="0,0 2752,0 2752,284 0,284">
        <text:p/>
      </draw:polygon>
      <draw:polygon text:anchor-type="page" text:anchor-page-number="14" draw:z-index="4613" draw:name="Shape4856" draw:style-name="gr2" draw:text-style-name="P3" svg:width="0.7866in" svg:height="0.2551in" svg:x="0.363in" svg:y="9.578in" svg:viewBox="0 0 1999 649" draw:points="0,0 1999,0 1999,649 0,649">
        <text:p/>
      </draw:polygon>
      <draw:frame text:anchor-type="page" text:anchor-page-number="5" draw:z-index="4612" draw:name="Shape1665" draw:style-name="gr1" draw:text-style-name="P2" svg:width="0.0433in" svg:height="0.1925in" svg:x="6.7098in" svg:y="9.3346in">
        <draw:text-box>
          <text:p><text:span text:style-name="T2"><text:s/></text:span></text:p>
        </draw:text-box>
      </draw:frame>
      <draw:polygon text:anchor-type="page" text:anchor-page-number="5" draw:z-index="4611" draw:name="Shape1671" draw:style-name="gr2" draw:text-style-name="P3" svg:width="1.0835in" svg:height="0.1118in" svg:x="0.4114in" svg:y="9.5331in" svg:viewBox="0 0 2753 285" draw:points="0,0 2753,0 2753,285 0,285">
        <text:p/>
      </draw:polygon>
      <draw:polygon text:anchor-type="page" text:anchor-page-number="6" draw:z-index="4610" draw:name="Shape2312" draw:style-name="gr4" draw:text-style-name="P5" svg:width="1.1799in" svg:height="0.2232in" svg:x="4.1031in" svg:y="4.4382in" svg:viewBox="0 0 2998 568" draw:points="0,0 2998,0 2998,568 0,568">
        <text:p/>
      </draw:polygon>
      <draw:frame text:anchor-type="page" text:anchor-page-number="14" draw:z-index="4609" draw:name="Shape4863" draw:style-name="gr1" draw:text-style-name="P2" svg:width="1.6177in" svg:height="0.1295in" svg:x="1.9866in" svg:y="9.452in">
        <draw:text-box>
          <text:p><text:span text:style-name="T1">Applicazioni a spruzzo industriali</text:span></text:p>
        </draw:text-box>
      </draw:frame>
      <draw:frame text:anchor-type="page" text:anchor-page-number="14" draw:z-index="4608" draw:name="Shape4842" draw:style-name="gr1" draw:text-style-name="P2" svg:width="0.0433in" svg:height="0.1925in" svg:x="1.2516in" svg:y="9.3898in">
        <draw:text-box>
          <text:p><text:span text:style-name="T2"><text:s/></text:span></text:p>
        </draw:text-box>
      </draw:frame>
      <draw:frame text:anchor-type="page" text:anchor-page-number="6" draw:z-index="4607" draw:name="Shape2284" draw:style-name="gr1" draw:text-style-name="P2" svg:width="0.0433in" svg:height="0.1925in" svg:x="2.7311in" svg:y="4.3799in">
        <draw:text-box>
          <text:p><text:span text:style-name="T2"><text:s/></text:span></text:p>
        </draw:text-box>
      </draw:frame>
      <draw:polygon text:anchor-type="page" text:anchor-page-number="5" draw:z-index="4606" draw:name="Shape1670" draw:style-name="gr2" draw:text-style-name="P3" svg:width="1.1803in" svg:height="0.1917in" svg:x="0.363in" svg:y="9.5331in" svg:viewBox="0 0 2999 488" draw:points="0,0 2999,0 2999,488 0,488">
        <text:p/>
      </draw:polygon>
      <draw:polygon text:anchor-type="page" text:anchor-page-number="6" draw:z-index="4605" draw:name="Shape2311" draw:style-name="gr4" draw:text-style-name="P5" svg:width="0.4933in" svg:height="0.1917in" svg:x="3.5614in" svg:y="4.4382in" svg:viewBox="0 0 1254 488" draw:points="0,0 1254,0 1254,488 0,488">
        <text:p/>
      </draw:polygon>
      <draw:polygon text:anchor-type="page" text:anchor-page-number="14" draw:z-index="4604" draw:name="Shape4862" draw:style-name="gr2" draw:text-style-name="P3" svg:width="4.6264in" svg:height="0.1283in" svg:x="1.9866in" svg:y="9.45in" svg:viewBox="0 0 11752 327" draw:points="0,0 11752,0 11752,327 0,327">
        <text:p/>
      </draw:polygon>
      <draw:polygon text:anchor-type="page" text:anchor-page-number="5" draw:z-index="4603" draw:name="Shape1632" draw:style-name="gr3" draw:text-style-name="P4" svg:width="1.1717in" svg:height="0.0098in" svg:x="6.6732in" svg:y="9.3217in" svg:viewBox="0 0 2977 26" draw:points="0,0 2977,0 2977,26 0,26">
        <text:p/>
      </draw:polygon>
      <draw:polygon text:anchor-type="page" text:anchor-page-number="6" draw:z-index="4602" draw:name="Shape2310" draw:style-name="gr4" draw:text-style-name="P5" svg:width="0.5902in" svg:height="0.2232in" svg:x="3.513in" svg:y="4.4382in" svg:viewBox="0 0 1500 568" draw:points="0,0 1500,0 1500,568 0,568">
        <text:p/>
      </draw:polygon>
      <draw:polygon text:anchor-type="page" text:anchor-page-number="14" draw:z-index="4601" draw:name="Shape4861" draw:style-name="gr2" draw:text-style-name="P3" svg:width="4.7232in" svg:height="0.1283in" svg:x="1.9382in" svg:y="9.45in" svg:viewBox="0 0 11998 327" draw:points="0,0 11998,0 11998,327 0,327">
        <text:p/>
      </draw:polygon>
      <draw:polygon text:anchor-type="page" text:anchor-page-number="5" draw:z-index="4600" draw:name="Shape1631" draw:style-name="gr3" draw:text-style-name="P4" svg:width="0.0102in" svg:height="0.0098in" svg:x="6.663in" svg:y="9.3217in" svg:viewBox="0 0 27 26" draw:points="0,0 27,0 27,26 0,26">
        <text:p/>
      </draw:polygon>
      <draw:polygon text:anchor-type="page" text:anchor-page-number="5" draw:z-index="4599" draw:name="Shape1630" draw:style-name="gr3" draw:text-style-name="P4" svg:width="0.7783in" svg:height="0.0098in" svg:x="5.8846in" svg:y="9.3217in" svg:viewBox="0 0 1978 26" draw:points="0,0 1978,0 1978,26 0,26">
        <text:p/>
      </draw:polygon>
      <draw:frame text:anchor-type="page" text:anchor-page-number="14" draw:z-index="4598" draw:name="Shape4860" draw:style-name="gr1" draw:text-style-name="P2" svg:width="0.0551in" svg:height="0.113in" svg:x="1.198in" svg:y="9.4508in">
        <draw:text-box>
          <text:p><text:span text:style-name="T5">7</text:span></text:p>
        </draw:text-box>
      </draw:frame>
      <draw:frame text:anchor-type="page" text:anchor-page-number="6" draw:z-index="4597" draw:name="Shape2309" draw:style-name="gr1" draw:text-style-name="P2" svg:width="0.3469in" svg:height="0.113in" svg:x="2.3799in" svg:y="4.4402in">
        <draw:text-box>
          <text:p><text:span text:style-name="T4">TWA/8h</text:span></text:p>
        </draw:text-box>
      </draw:frame>
      <draw:polygon text:anchor-type="page" text:anchor-page-number="5" draw:z-index="4596" draw:name="Shape1629" draw:style-name="gr3" draw:text-style-name="P4" svg:width="0.0098in" svg:height="0.0098in" svg:x="5.8748in" svg:y="9.3217in" svg:viewBox="0 0 26 26" draw:points="0,0 26,0 26,26 0,26">
        <text:p/>
      </draw:polygon>
      <draw:frame text:anchor-type="page" text:anchor-page-number="6" draw:z-index="4595" draw:name="Shape2283" draw:style-name="gr1" draw:text-style-name="P2" svg:width="0.0433in" svg:height="0.1925in" svg:x="1.8181in" svg:y="4.3799in">
        <draw:text-box>
          <text:p><text:span text:style-name="T2"><text:s/></text:span></text:p>
        </draw:text-box>
      </draw:frame>
      <draw:frame text:anchor-type="page" text:anchor-page-number="14" draw:z-index="4594" draw:name="Shape4841" draw:style-name="gr1" draw:text-style-name="P2" svg:width="0.0433in" svg:height="0.1925in" svg:x="0.7346in" svg:y="9.3898in">
        <draw:text-box>
          <text:p><text:span text:style-name="T2"><text:s/></text:span></text:p>
        </draw:text-box>
      </draw:frame>
      <draw:polygon text:anchor-type="page" text:anchor-page-number="6" draw:z-index="4593" draw:name="Shape2304" draw:style-name="gr4" draw:text-style-name="P5" svg:width="1.0831in" svg:height="0.1114in" svg:x="2.3799in" svg:y="4.4382in" svg:viewBox="0 0 2752 284" draw:points="0,0 2752,0 2752,284 0,284">
        <text:p/>
      </draw:polygon>
      <draw:polygon text:anchor-type="page" text:anchor-page-number="14" draw:z-index="4592" draw:name="Shape4859" draw:style-name="gr2" draw:text-style-name="P3" svg:width="0.6902in" svg:height="0.1118in" svg:x="1.198in" svg:y="9.45in" svg:viewBox="0 0 1754 285" draw:points="0,0 1754,0 1754,285 0,285">
        <text:p/>
      </draw:polygon>
      <draw:polygon text:anchor-type="page" text:anchor-page-number="5" draw:z-index="4591" draw:name="Shape1628" draw:style-name="gr3" draw:text-style-name="P4" svg:width="0.5799in" svg:height="0.0098in" svg:x="5.2949in" svg:y="9.3217in" svg:viewBox="0 0 1474 26" draw:points="0,0 1474,0 1474,26 0,26">
        <text:p/>
      </draw:polygon>
      <draw:polygon text:anchor-type="page" text:anchor-page-number="14" draw:z-index="4590" draw:name="Shape4858" draw:style-name="gr2" draw:text-style-name="P3" svg:width="0.7886in" svg:height="0.1283in" svg:x="1.15in" svg:y="9.45in" svg:viewBox="0 0 2004 327" draw:points="0,0 2004,0 2004,327 0,327">
        <text:p/>
      </draw:polygon>
      <draw:polygon text:anchor-type="page" text:anchor-page-number="5" draw:z-index="4589" draw:name="Shape1627" draw:style-name="gr3" draw:text-style-name="P4" svg:width="0.0102in" svg:height="0.0098in" svg:x="5.2846in" svg:y="9.3217in" svg:viewBox="0 0 27 26" draw:points="0,0 27,0 27,26 0,26">
        <text:p/>
      </draw:polygon>
      <draw:polygon text:anchor-type="page" text:anchor-page-number="6" draw:z-index="4588" draw:name="Shape2302" draw:style-name="gr4" draw:text-style-name="P5" svg:width="1.1815in" svg:height="0.2232in" svg:x="2.3315in" svg:y="4.4382in" svg:viewBox="0 0 3002 568" draw:points="0,0 3002,0 3002,568 0,568">
        <text:p/>
      </draw:polygon>
      <draw:frame text:anchor-type="page" text:anchor-page-number="14" draw:z-index="4587" draw:name="Shape4852" draw:style-name="gr1" draw:text-style-name="P2" svg:width="0.2807in" svg:height="0.113in" svg:x="0.4535in" svg:y="9.4508in">
        <draw:text-box>
          <text:p><text:span text:style-name="T5">PROC</text:span></text:p>
        </draw:text-box>
      </draw:frame>
      <draw:polygon text:anchor-type="page" text:anchor-page-number="5" draw:z-index="4586" draw:name="Shape1626" draw:style-name="gr3" draw:text-style-name="P4" svg:width="1.1717in" svg:height="0.0098in" svg:x="4.113in" svg:y="9.3217in" svg:viewBox="0 0 2977 26" draw:points="0,0 2977,0 2977,26 0,26">
        <text:p/>
      </draw:polygon>
      <draw:frame text:anchor-type="page" text:anchor-page-number="6" draw:z-index="4585" draw:name="Shape2301" draw:style-name="gr1" draw:text-style-name="P2" svg:width="0.2276in" svg:height="0.113in" svg:x="1.5917in" svg:y="4.4402in">
        <draw:text-box>
          <text:p><text:span text:style-name="T4">Stato</text:span></text:p>
        </draw:text-box>
      </draw:frame>
      <draw:polygon text:anchor-type="page" text:anchor-page-number="5" draw:z-index="4584" draw:name="Shape1625" draw:style-name="gr3" draw:text-style-name="P4" svg:width="0.0098in" svg:height="0.0098in" svg:x="4.1031in" svg:y="9.3217in" svg:viewBox="0 0 26 26" draw:points="0,0 26,0 26,26 0,26">
        <text:p/>
      </draw:polygon>
      <draw:frame text:anchor-type="page" text:anchor-page-number="14" draw:z-index="4583" draw:name="Shape4840" draw:style-name="gr1" draw:text-style-name="P2" svg:width="0.0433in" svg:height="0.1925in" svg:x="0.411in" svg:y="9.3898in">
        <draw:text-box>
          <text:p><text:span text:style-name="T2"><text:s/></text:span></text:p>
        </draw:text-box>
      </draw:frame>
      <draw:frame text:anchor-type="page" text:anchor-page-number="6" draw:z-index="4582" draw:name="Shape2282" draw:style-name="gr1" draw:text-style-name="P2" svg:width="0.0433in" svg:height="0.1925in" svg:x="0.6417in" svg:y="4.3799in">
        <draw:text-box>
          <text:p><text:span text:style-name="T2"><text:s/></text:span></text:p>
        </draw:text-box>
      </draw:frame>
      <draw:polygon text:anchor-type="page" text:anchor-page-number="6" draw:z-index="4581" draw:name="Shape2300" draw:style-name="gr4" draw:text-style-name="P5" svg:width="0.6917in" svg:height="0.1114in" svg:x="1.5913in" svg:y="4.4382in" svg:viewBox="0 0 1758 284" draw:points="0,0 1758,0 1758,284 0,284">
        <text:p/>
      </draw:polygon>
      <draw:frame text:anchor-type="page" text:anchor-page-number="14" draw:z-index="4580" draw:name="Shape4836" draw:style-name="gr1" draw:text-style-name="P2" svg:width="0.0433in" svg:height="0.1925in" svg:x="4.3335in" svg:y="9.2764in">
        <draw:text-box>
          <text:p><text:span text:style-name="T2"><text:s/></text:span></text:p>
        </draw:text-box>
      </draw:frame>
      <draw:polygon text:anchor-type="page" text:anchor-page-number="5" draw:z-index="4579" draw:name="Shape1624" draw:style-name="gr3" draw:text-style-name="P4" svg:width="0.5799in" svg:height="0.0098in" svg:x="3.5232in" svg:y="9.3217in" svg:viewBox="0 0 1474 26" draw:points="0,0 1474,0 1474,26 0,26">
        <text:p/>
      </draw:polygon>
      <draw:polygon text:anchor-type="page" text:anchor-page-number="5" draw:z-index="4578" draw:name="Shape1623" draw:style-name="gr3" draw:text-style-name="P4" svg:width="0.0102in" svg:height="0.0098in" svg:x="3.513in" svg:y="9.3217in" svg:viewBox="0 0 27 26" draw:points="0,0 27,0 27,26 0,26">
        <text:p/>
      </draw:polygon>
      <draw:polygon text:anchor-type="page" text:anchor-page-number="6" draw:z-index="4577" draw:name="Shape2299" draw:style-name="gr4" draw:text-style-name="P5" svg:width="0.7882in" svg:height="0.2232in" svg:x="1.5433in" svg:y="4.4382in" svg:viewBox="0 0 2003 568" draw:points="0,0 2003,0 2003,568 0,568">
        <text:p/>
      </draw:polygon>
      <draw:polygon text:anchor-type="page" text:anchor-page-number="14" draw:z-index="4576" draw:name="Shape4844" draw:style-name="gr2" draw:text-style-name="P3" svg:width="0.6902in" svg:height="0.1118in" svg:x="0.4114in" svg:y="9.45in" svg:viewBox="0 0 1754 285" draw:points="0,0 1754,0 1754,285 0,285">
        <text:p/>
      </draw:polygon>
      <draw:frame text:anchor-type="page" text:anchor-page-number="6" draw:z-index="4575" draw:name="Shape2298" draw:style-name="gr1" draw:text-style-name="P2" svg:width="0.1858in" svg:height="0.113in" svg:x="0.4535in" svg:y="4.4402in">
        <draw:text-box>
          <text:p><text:span text:style-name="T4">Tipo</text:span></text:p>
        </draw:text-box>
      </draw:frame>
      <draw:polygon text:anchor-type="page" text:anchor-page-number="14" draw:z-index="4574" draw:name="Shape4851" draw:style-name="gr2" draw:text-style-name="P3" svg:width="0.7866in" svg:height="0.1283in" svg:x="0.363in" svg:y="9.45in" svg:viewBox="0 0 1999 327" draw:points="0,0 1999,0 1999,327 0,327">
        <text:p/>
      </draw:polygon>
      <draw:polygon text:anchor-type="page" text:anchor-page-number="5" draw:z-index="4573" draw:name="Shape1622" draw:style-name="gr3" draw:text-style-name="P4" svg:width="1.1717in" svg:height="0.0098in" svg:x="2.3413in" svg:y="9.3217in" svg:viewBox="0 0 2977 26" draw:points="0,0 2977,0 2977,26 0,26">
        <text:p/>
      </draw:polygon>
      <draw:frame text:anchor-type="page" text:anchor-page-number="6" draw:z-index="4572" draw:name="Shape2281" draw:style-name="gr1" draw:text-style-name="P2" svg:width="0.0433in" svg:height="0.1925in" svg:x="0.411in" svg:y="4.3799in">
        <draw:text-box>
          <text:p><text:span text:style-name="T2"><text:s/></text:span></text:p>
        </draw:text-box>
      </draw:frame>
      <draw:polygon text:anchor-type="page" text:anchor-page-number="5" draw:z-index="4571" draw:name="Shape1621" draw:style-name="gr3" draw:text-style-name="P4" svg:width="0.0098in" svg:height="0.0098in" svg:x="2.3315in" svg:y="9.3217in" svg:viewBox="0 0 26 26" draw:points="0,0 26,0 26,26 0,26">
        <text:p/>
      </draw:polygon>
      <draw:frame text:anchor-type="page" text:anchor-page-number="14" draw:z-index="4570" draw:name="Shape4850" draw:style-name="gr1" draw:text-style-name="P2" svg:width="2.363in" svg:height="0.1295in" svg:x="1.9866in" svg:y="9.3236in">
        <draw:text-box>
          <text:p><text:span text:style-name="T1">Miscelazione o mescolamento in processi a lotti</text:span></text:p>
        </draw:text-box>
      </draw:frame>
      <draw:frame text:anchor-type="page" text:anchor-page-number="6" draw:z-index="4569" draw:name="Shape2277" draw:style-name="gr1" draw:text-style-name="P2" svg:width="0.0433in" svg:height="0.1925in" svg:x="1.5953in" svg:y="4.2535in">
        <draw:text-box>
          <text:p><text:span text:style-name="T2"><text:s/></text:span></text:p>
        </draw:text-box>
      </draw:frame>
      <draw:frame text:anchor-type="page" text:anchor-page-number="14" draw:z-index="4568" draw:name="Shape4832" draw:style-name="gr1" draw:text-style-name="P2" svg:width="0.0433in" svg:height="0.1925in" svg:x="1.2516in" svg:y="9.2634in">
        <draw:text-box>
          <text:p><text:span text:style-name="T2"><text:s/></text:span></text:p>
        </draw:text-box>
      </draw:frame>
      <draw:polygon text:anchor-type="page" text:anchor-page-number="5" draw:z-index="4567" draw:name="Shape1619" draw:style-name="gr3" draw:text-style-name="P4" svg:width="0.7768in" svg:height="0.0098in" svg:x="1.5547in" svg:y="9.3217in" svg:viewBox="0 0 1974 26" draw:points="0,0 1974,0 1974,26 0,26">
        <text:p/>
      </draw:polygon>
      <draw:polygon text:anchor-type="page" text:anchor-page-number="6" draw:z-index="4566" draw:name="Shape2288" draw:style-name="gr4" draw:text-style-name="P5" svg:width="1.0835in" svg:height="0.1114in" svg:x="0.4114in" svg:y="4.4382in" svg:viewBox="0 0 2753 284" draw:points="0,0 2753,0 2753,284 0,284">
        <text:p/>
      </draw:polygon>
      <draw:polygon text:anchor-type="page" text:anchor-page-number="14" draw:z-index="4565" draw:name="Shape4849" draw:style-name="gr2" draw:text-style-name="P3" svg:width="4.6264in" svg:height="0.1264in" svg:x="1.9866in" svg:y="9.3232in" svg:viewBox="0 0 11752 322" draw:points="0,0 11752,0 11752,322 0,322">
        <text:p/>
      </draw:polygon>
      <draw:polygon text:anchor-type="page" text:anchor-page-number="5" draw:z-index="4564" draw:name="Shape1618" draw:style-name="gr3" draw:text-style-name="P4" svg:width="0.0098in" svg:height="0.0098in" svg:x="1.5449in" svg:y="9.3217in" svg:viewBox="0 0 26 26" draw:points="0,0 26,0 26,26 0,26">
        <text:p/>
      </draw:polygon>
      <draw:polygon text:anchor-type="page" text:anchor-page-number="5" draw:z-index="4563" draw:name="Shape1597" draw:style-name="gr3" draw:text-style-name="P4" svg:width="1.1819in" svg:height="0.0098in" svg:x="0.363in" svg:y="9.3217in" svg:viewBox="0 0 3003 26" draw:points="0,0 3003,0 3003,26 0,26">
        <text:p/>
      </draw:polygon>
      <draw:polygon text:anchor-type="page" text:anchor-page-number="6" draw:z-index="4562" draw:name="Shape2287" draw:style-name="gr4" draw:text-style-name="P5" svg:width="1.1803in" svg:height="0.2232in" svg:x="0.363in" svg:y="4.4382in" svg:viewBox="0 0 2999 568" draw:points="0,0 2999,0 2999,568 0,568">
        <text:p/>
      </draw:polygon>
      <draw:polygon text:anchor-type="page" text:anchor-page-number="14" draw:z-index="4561" draw:name="Shape4848" draw:style-name="gr2" draw:text-style-name="P3" svg:width="4.7232in" svg:height="0.1264in" svg:x="1.9382in" svg:y="9.3232in" svg:viewBox="0 0 11998 322" draw:points="0,0 11998,0 11998,322 0,322">
        <text:p/>
      </draw:polygon>
      <draw:frame text:anchor-type="page" text:anchor-page-number="14" draw:z-index="4560" draw:name="Shape4847" draw:style-name="gr1" draw:text-style-name="P2" svg:width="0.0551in" svg:height="0.113in" svg:x="1.198in" svg:y="9.3244in">
        <draw:text-box>
          <text:p><text:span text:style-name="T5">5</text:span></text:p>
        </draw:text-box>
      </draw:frame>
      <draw:frame text:anchor-type="page" text:anchor-page-number="5" draw:z-index="4559" draw:name="Shape1648" draw:style-name="gr1" draw:text-style-name="P2" svg:width="0.0433in" svg:height="0.1925in" svg:x="5.9228in" svg:y="9.3346in">
        <draw:text-box>
          <text:p><text:span text:style-name="T2"><text:s/></text:span></text:p>
        </draw:text-box>
      </draw:frame>
      <draw:frame text:anchor-type="page" text:anchor-page-number="6" draw:z-index="4558" draw:name="Shape2280" draw:style-name="gr1" draw:text-style-name="P2" svg:width="1.1449in" svg:height="0.1295in" svg:x="0.4535in" svg:y="4.3008in">
        <draw:text-box>
          <text:p><text:span text:style-name="T3">Valore limite di soglia</text:span></text:p>
        </draw:text-box>
      </draw:frame>
      <draw:polygon text:anchor-type="page" text:anchor-page-number="5" draw:z-index="4557" draw:name="Shape1664" draw:style-name="gr2" draw:text-style-name="P3" svg:width="1.085in" svg:height="0.1917in" svg:x="6.7098in" svg:y="9.3315in" svg:viewBox="0 0 2757 488" draw:points="0,0 2757,0 2757,488 0,488">
        <text:p/>
      </draw:polygon>
      <draw:frame text:anchor-type="page" text:anchor-page-number="14" draw:z-index="4556" draw:name="Shape4828" draw:style-name="gr1" draw:text-style-name="P2" svg:width="0.0433in" svg:height="0.1925in" svg:x="0.7346in" svg:y="9.2634in">
        <draw:text-box>
          <text:p><text:span text:style-name="T2"><text:s/></text:span></text:p>
        </draw:text-box>
      </draw:frame>
      <draw:frame text:anchor-type="page" text:anchor-page-number="6" draw:z-index="4555" draw:name="Shape2276" draw:style-name="gr1" draw:text-style-name="P2" svg:width="0.0433in" svg:height="0.1925in" svg:x="0.411in" svg:y="4.2535in">
        <draw:text-box>
          <text:p><text:span text:style-name="T2"><text:s/></text:span></text:p>
        </draw:text-box>
      </draw:frame>
      <draw:polygon text:anchor-type="page" text:anchor-page-number="14" draw:z-index="4554" draw:name="Shape4846" draw:style-name="gr2" draw:text-style-name="P3" svg:width="0.6902in" svg:height="0.1114in" svg:x="1.198in" svg:y="9.3232in" svg:viewBox="0 0 1754 284" draw:points="0,0 1754,0 1754,284 0,284">
        <text:p/>
      </draw:polygon>
      <draw:polygon text:anchor-type="page" text:anchor-page-number="5" draw:z-index="4553" draw:name="Shape1663" draw:style-name="gr2" draw:text-style-name="P3" svg:width="1.1819in" svg:height="0.1917in" svg:x="6.6614in" svg:y="9.3315in" svg:viewBox="0 0 3003 488" draw:points="0,0 3003,0 3003,488 0,488">
        <text:p/>
      </draw:polygon>
      <draw:frame text:anchor-type="page" text:anchor-page-number="6" draw:z-index="4552" draw:name="Shape2272" draw:style-name="gr1" draw:text-style-name="P2" svg:width="0.0433in" svg:height="0.1925in" svg:x="5.9799in" svg:y="4.1252in">
        <draw:text-box>
          <text:p><text:span text:style-name="T2"><text:s/></text:span></text:p>
        </draw:text-box>
      </draw:frame>
      <draw:polygon text:anchor-type="page" text:anchor-page-number="6" draw:z-index="4551" draw:name="Shape2279" draw:style-name="gr4" draw:text-style-name="P5" svg:width="7.3835in" svg:height="0.1283in" svg:x="0.4114in" svg:y="4.3in" svg:viewBox="0 0 18755 327" draw:points="0,0 18755,0 18755,327 0,327">
        <text:p/>
      </draw:polygon>
      <draw:polygon text:anchor-type="page" text:anchor-page-number="14" draw:z-index="4550" draw:name="Shape4845" draw:style-name="gr2" draw:text-style-name="P3" svg:width="0.7886in" svg:height="0.1264in" svg:x="1.15in" svg:y="9.3232in" svg:viewBox="0 0 2004 322" draw:points="0,0 2004,0 2004,322 0,322">
        <text:p/>
      </draw:polygon>
      <draw:frame text:anchor-type="page" text:anchor-page-number="5" draw:z-index="4549" draw:name="Shape1645" draw:style-name="gr1" draw:text-style-name="P2" svg:width="0.0433in" svg:height="0.1925in" svg:x="5.3335in" svg:y="9.3346in">
        <draw:text-box>
          <text:p><text:span text:style-name="T2"><text:s/></text:span></text:p>
        </draw:text-box>
      </draw:frame>
      <draw:polygon text:anchor-type="page" text:anchor-page-number="6" draw:z-index="4548" draw:name="Shape2278" draw:style-name="gr4" draw:text-style-name="P5" svg:width="7.4803in" svg:height="0.1283in" svg:x="0.363in" svg:y="4.3in" svg:viewBox="0 0 19001 327" draw:points="0,0 19001,0 19001,327 0,327">
        <text:p/>
      </draw:polygon>
      <draw:frame text:anchor-type="page" text:anchor-page-number="14" draw:z-index="4547" draw:name="Shape4839" draw:style-name="gr1" draw:text-style-name="P2" svg:width="0.2807in" svg:height="0.113in" svg:x="0.4535in" svg:y="9.3244in">
        <draw:text-box>
          <text:p><text:span text:style-name="T5">PROC</text:span></text:p>
        </draw:text-box>
      </draw:frame>
      <draw:polygon text:anchor-type="page" text:anchor-page-number="5" draw:z-index="4546" draw:name="Shape1647" draw:style-name="gr2" draw:text-style-name="P3" svg:width="0.6898in" svg:height="0.1917in" svg:x="5.9232in" svg:y="9.3315in" svg:viewBox="0 0 1753 488" draw:points="0,0 1753,0 1753,488 0,488">
        <text:p/>
      </draw:polygon>
      <draw:polygon text:anchor-type="page" text:anchor-page-number="5" draw:z-index="4545" draw:name="Shape1646" draw:style-name="gr2" draw:text-style-name="P3" svg:width="0.7866in" svg:height="0.1917in" svg:x="5.8748in" svg:y="9.3315in" svg:viewBox="0 0 1999 488" draw:points="0,0 1999,0 1999,488 0,488">
        <text:p/>
      </draw:polygon>
      <draw:frame text:anchor-type="page" text:anchor-page-number="14" draw:z-index="4544" draw:name="Shape4827" draw:style-name="gr1" draw:text-style-name="P2" svg:width="0.0433in" svg:height="0.1925in" svg:x="0.411in" svg:y="9.2634in">
        <draw:text-box>
          <text:p><text:span text:style-name="T2"><text:s/></text:span></text:p>
        </draw:text-box>
      </draw:frame>
      <draw:frame text:anchor-type="page" text:anchor-page-number="6" draw:z-index="4543" draw:name="Shape2273" draw:style-name="gr1" draw:text-style-name="P2" svg:width="5.5567in" svg:height="0.1295in" svg:x="0.4535in" svg:y="4.172in">
        <draw:text-box>
          <text:p><text:span text:style-name="T3">MASSA DI REAZIONE DI 5-CLORO-2- METIL-2H-ISOTIAZOL-3-ONE E 2-METIL-2H-ISOTIAZOL-3-ONE (3:1)</text:span></text:p>
        </draw:text-box>
      </draw:frame>
      <draw:frame text:anchor-type="page" text:anchor-page-number="14" draw:z-index="4542" draw:name="Shape4823" draw:style-name="gr1" draw:text-style-name="P2" svg:width="0.0433in" svg:height="0.1925in" svg:x="4.2717in" svg:y="9.1492in">
        <draw:text-box>
          <text:p><text:span text:style-name="T2"><text:s/></text:span></text:p>
        </draw:text-box>
      </draw:frame>
      <draw:frame text:anchor-type="page" text:anchor-page-number="6" draw:z-index="4541" draw:name="Shape2271" draw:style-name="gr1" draw:text-style-name="P2" svg:width="0.0433in" svg:height="0.1925in" svg:x="0.411in" svg:y="4.1252in">
        <draw:text-box>
          <text:p><text:span text:style-name="T2"><text:s/></text:span></text:p>
        </draw:text-box>
      </draw:frame>
      <draw:frame text:anchor-type="page" text:anchor-page-number="5" draw:z-index="4540" draw:name="Shape1642" draw:style-name="gr1" draw:text-style-name="P2" svg:width="0.0433in" svg:height="0.1925in" svg:x="4.1516in" svg:y="9.3346in">
        <draw:text-box>
          <text:p><text:span text:style-name="T2"><text:s/></text:span></text:p>
        </draw:text-box>
      </draw:frame>
      <draw:polygon text:anchor-type="page" text:anchor-page-number="14" draw:z-index="4539" draw:name="Shape4838" draw:style-name="gr2" draw:text-style-name="P3" svg:width="0.6902in" svg:height="0.1114in" svg:x="0.4114in" svg:y="9.3232in" svg:viewBox="0 0 1754 284" draw:points="0,0 1754,0 1754,284 0,284">
        <text:p/>
      </draw:polygon>
      <draw:polygon text:anchor-type="page" text:anchor-page-number="5" draw:z-index="4538" draw:name="Shape1644" draw:style-name="gr2" draw:text-style-name="P3" svg:width="0.4917in" svg:height="0.1917in" svg:x="5.3331in" svg:y="9.3315in" svg:viewBox="0 0 1250 488" draw:points="0,0 1250,0 1250,488 0,488">
        <text:p/>
      </draw:polygon>
      <draw:frame text:anchor-type="page" text:anchor-page-number="6" draw:z-index="4537" draw:name="Shape2270" draw:style-name="gr1" draw:text-style-name="P2" svg:width="0.0433in" svg:height="0.1925in" svg:x="0.3634in" svg:y="3.9846in">
        <draw:text-box>
          <text:p><text:span text:style-name="T2"><text:s/></text:span></text:p>
        </draw:text-box>
      </draw:frame>
      <draw:polygon text:anchor-type="page" text:anchor-page-number="6" draw:z-index="4536" draw:name="Shape2275" draw:style-name="gr5" draw:text-style-name="P6" svg:width="7.3835in" svg:height="0.1264in" svg:x="0.4114in" svg:y="4.1732in" svg:viewBox="0 0 18755 322" draw:points="0,0 18755,0 18755,322 0,322">
        <text:p/>
      </draw:polygon>
      <draw:polygon text:anchor-type="page" text:anchor-page-number="5" draw:z-index="4535" draw:name="Shape1643" draw:style-name="gr2" draw:text-style-name="P3" svg:width="0.5917in" svg:height="0.1917in" svg:x="5.2831in" svg:y="9.3315in" svg:viewBox="0 0 1504 488" draw:points="0,0 1504,0 1504,488 0,488">
        <text:p/>
      </draw:polygon>
      <draw:polygon text:anchor-type="page" text:anchor-page-number="14" draw:z-index="4534" draw:name="Shape4837" draw:style-name="gr2" draw:text-style-name="P3" svg:width="0.7866in" svg:height="0.1264in" svg:x="0.363in" svg:y="9.3232in" svg:viewBox="0 0 1999 322" draw:points="0,0 1999,0 1999,322 0,322">
        <text:p/>
      </draw:polygon>
      <draw:polygon text:anchor-type="page" text:anchor-page-number="6" draw:z-index="4533" draw:name="Shape2274" draw:style-name="gr5" draw:text-style-name="P6" svg:width="7.4803in" svg:height="0.1264in" svg:x="0.363in" svg:y="4.1732in" svg:viewBox="0 0 19001 322" draw:points="0,0 19001,0 19001,322 0,322">
        <text:p/>
      </draw:polygon>
      <draw:frame text:anchor-type="page" text:anchor-page-number="14" draw:z-index="4532" draw:name="Shape4835" draw:style-name="gr1" draw:text-style-name="P2" svg:width="2.2969in" svg:height="0.1295in" svg:x="1.9866in" svg:y="9.1972in">
        <draw:text-box>
          <text:p><text:span text:style-name="T1">Trattamento di articoli per immersione e colata</text:span></text:p>
        </draw:text-box>
      </draw:frame>
      <draw:frame text:anchor-type="page" text:anchor-page-number="5" draw:z-index="4531" draw:name="Shape1639" draw:style-name="gr1" draw:text-style-name="P2" svg:width="0.0433in" svg:height="0.1925in" svg:x="3.561in" svg:y="9.3346in">
        <draw:text-box>
          <text:p><text:span text:style-name="T2"><text:s/></text:span></text:p>
        </draw:text-box>
      </draw:frame>
      <draw:frame text:anchor-type="page" text:anchor-page-number="14" draw:z-index="4530" draw:name="Shape4822" draw:style-name="gr1" draw:text-style-name="P2" svg:width="0.0433in" svg:height="0.1925in" svg:x="1.3063in" svg:y="9.1346in">
        <draw:text-box>
          <text:p><text:span text:style-name="T2"><text:s/></text:span></text:p>
        </draw:text-box>
      </draw:frame>
      <draw:frame text:anchor-type="page" text:anchor-page-number="6" draw:z-index="4529" draw:name="Shape2269" draw:style-name="gr1" draw:text-style-name="P2" svg:width="0.0433in" svg:height="0.1925in" svg:x="6.7098in" svg:y="3.7929in">
        <draw:text-box>
          <text:p><text:span text:style-name="T2"><text:s/></text:span></text:p>
        </draw:text-box>
      </draw:frame>
      <draw:polygon text:anchor-type="page" text:anchor-page-number="5" draw:z-index="4528" draw:name="Shape1641" draw:style-name="gr2" draw:text-style-name="P3" svg:width="1.0831in" svg:height="0.1917in" svg:x="4.1516in" svg:y="9.3315in" svg:viewBox="0 0 2752 488" draw:points="0,0 2752,0 2752,488 0,488">
        <text:p/>
      </draw:polygon>
      <draw:polygon text:anchor-type="page" text:anchor-page-number="14" draw:z-index="4527" draw:name="Shape4834" draw:style-name="gr2" draw:text-style-name="P3" svg:width="4.6264in" svg:height="0.1283in" svg:x="1.9866in" svg:y="9.1949in" svg:viewBox="0 0 11752 327" draw:points="0,0 11752,0 11752,327 0,327">
        <text:p/>
      </draw:polygon>
      <draw:polygon text:anchor-type="page" text:anchor-page-number="5" draw:z-index="4526" draw:name="Shape1640" draw:style-name="gr2" draw:text-style-name="P3" svg:width="1.1799in" svg:height="0.1917in" svg:x="4.1031in" svg:y="9.3315in" svg:viewBox="0 0 2998 488" draw:points="0,0 2998,0 2998,488 0,488">
        <text:p/>
      </draw:polygon>
      <draw:polygon text:anchor-type="page" text:anchor-page-number="6" draw:z-index="4525" draw:name="Shape2236" draw:style-name="gr3" draw:text-style-name="P4" svg:width="1.1717in" svg:height="0.0102in" svg:x="6.6732in" svg:y="3.778in" svg:viewBox="0 0 2977 27" draw:points="0,0 2977,0 2977,27 0,27">
        <text:p/>
      </draw:polygon>
      <draw:polygon text:anchor-type="page" text:anchor-page-number="6" draw:z-index="4524" draw:name="Shape2235" draw:style-name="gr3" draw:text-style-name="P4" svg:width="0.0102in" svg:height="0.0102in" svg:x="6.663in" svg:y="3.778in" svg:viewBox="0 0 27 27" draw:points="0,0 27,0 27,27 0,27">
        <text:p/>
      </draw:polygon>
      <draw:polygon text:anchor-type="page" text:anchor-page-number="14" draw:z-index="4523" draw:name="Shape4833" draw:style-name="gr2" draw:text-style-name="P3" svg:width="4.7232in" svg:height="0.1283in" svg:x="1.9382in" svg:y="9.1949in" svg:viewBox="0 0 11998 327" draw:points="0,0 11998,0 11998,327 0,327">
        <text:p/>
      </draw:polygon>
      <draw:frame text:anchor-type="page" text:anchor-page-number="5" draw:z-index="4522" draw:name="Shape1596" draw:style-name="gr1" draw:text-style-name="P2" svg:width="0.0433in" svg:height="0.1925in" svg:x="2.5154in" svg:y="9.2728in">
        <draw:text-box>
          <text:p><text:span text:style-name="T2"><text:s/></text:span></text:p>
        </draw:text-box>
      </draw:frame>
      <draw:frame text:anchor-type="page" text:anchor-page-number="14" draw:z-index="4521" draw:name="Shape4831" draw:style-name="gr1" draw:text-style-name="P2" svg:width="0.1094in" svg:height="0.113in" svg:x="1.198in" svg:y="9.1957in">
        <draw:text-box>
          <text:p><text:span text:style-name="T5">13</text:span></text:p>
        </draw:text-box>
      </draw:frame>
      <draw:polygon text:anchor-type="page" text:anchor-page-number="5" draw:z-index="4520" draw:name="Shape1638" draw:style-name="gr2" draw:text-style-name="P3" svg:width="0.4933in" svg:height="0.1917in" svg:x="3.5614in" svg:y="9.3315in" svg:viewBox="0 0 1254 488" draw:points="0,0 1254,0 1254,488 0,488">
        <text:p/>
      </draw:polygon>
      <draw:polygon text:anchor-type="page" text:anchor-page-number="6" draw:z-index="4519" draw:name="Shape2233" draw:style-name="gr3" draw:text-style-name="P4" svg:width="0.7783in" svg:height="0.0102in" svg:x="5.8846in" svg:y="3.778in" svg:viewBox="0 0 1978 27" draw:points="0,0 1978,0 1978,27 0,27">
        <text:p/>
      </draw:polygon>
      <draw:polygon text:anchor-type="page" text:anchor-page-number="5" draw:z-index="4518" draw:name="Shape1637" draw:style-name="gr2" draw:text-style-name="P3" svg:width="0.5902in" svg:height="0.1917in" svg:x="3.513in" svg:y="9.3315in" svg:viewBox="0 0 1500 488" draw:points="0,0 1500,0 1500,488 0,488">
        <text:p/>
      </draw:polygon>
      <draw:frame text:anchor-type="page" text:anchor-page-number="14" draw:z-index="4517" draw:name="Shape4821" draw:style-name="gr1" draw:text-style-name="P2" svg:width="0.0433in" svg:height="0.1925in" svg:x="0.7346in" svg:y="9.1346in">
        <draw:text-box>
          <text:p><text:span text:style-name="T2"><text:s/></text:span></text:p>
        </draw:text-box>
      </draw:frame>
      <draw:polygon text:anchor-type="page" text:anchor-page-number="6" draw:z-index="4516" draw:name="Shape2232" draw:style-name="gr3" draw:text-style-name="P4" svg:width="0.0098in" svg:height="0.0102in" svg:x="5.8748in" svg:y="3.778in" svg:viewBox="0 0 26 27" draw:points="0,0 26,0 26,27 0,27">
        <text:p/>
      </draw:polygon>
      <draw:polygon text:anchor-type="page" text:anchor-page-number="14" draw:z-index="4515" draw:name="Shape4830" draw:style-name="gr2" draw:text-style-name="P3" svg:width="0.6902in" svg:height="0.1114in" svg:x="1.198in" svg:y="9.1949in" svg:viewBox="0 0 1754 284" draw:points="0,0 1754,0 1754,284 0,284">
        <text:p/>
      </draw:polygon>
      <draw:frame text:anchor-type="page" text:anchor-page-number="5" draw:z-index="4514" draw:name="Shape1636" draw:style-name="gr1" draw:text-style-name="P2" svg:width="0.1358in" svg:height="0.113in" svg:x="2.3799in" svg:y="9.3339in">
        <draw:text-box>
          <text:p><text:span text:style-name="T4"><text:s text:c="3"/>2</text:span></text:p>
        </draw:text-box>
      </draw:frame>
      <draw:polygon text:anchor-type="page" text:anchor-page-number="6" draw:z-index="4513" draw:name="Shape2227" draw:style-name="gr3" draw:text-style-name="P4" svg:width="0.5799in" svg:height="0.0102in" svg:x="5.2949in" svg:y="3.778in" svg:viewBox="0 0 1474 27" draw:points="0,0 1474,0 1474,27 0,27">
        <text:p/>
      </draw:polygon>
      <draw:frame text:anchor-type="page" text:anchor-page-number="5" draw:z-index="4512" draw:name="Shape1592" draw:style-name="gr1" draw:text-style-name="P2" svg:width="0.0433in" svg:height="0.1925in" svg:x="1.8083in" svg:y="9.2728in">
        <draw:text-box>
          <text:p><text:span text:style-name="T2"><text:s/></text:span></text:p>
        </draw:text-box>
      </draw:frame>
      <draw:polygon text:anchor-type="page" text:anchor-page-number="6" draw:z-index="4511" draw:name="Shape2226" draw:style-name="gr3" draw:text-style-name="P4" svg:width="0.0102in" svg:height="0.0102in" svg:x="5.2846in" svg:y="3.778in" svg:viewBox="0 0 27 27" draw:points="0,0 27,0 27,27 0,27">
        <text:p/>
      </draw:polygon>
      <draw:polygon text:anchor-type="page" text:anchor-page-number="14" draw:z-index="4510" draw:name="Shape4829" draw:style-name="gr2" draw:text-style-name="P3" svg:width="0.7886in" svg:height="0.1283in" svg:x="1.15in" svg:y="9.1949in" svg:viewBox="0 0 2004 327" draw:points="0,0 2004,0 2004,327 0,327">
        <text:p/>
      </draw:polygon>
      <draw:polygon text:anchor-type="page" text:anchor-page-number="6" draw:z-index="4509" draw:name="Shape2222" draw:style-name="gr3" draw:text-style-name="P4" svg:width="1.1717in" svg:height="0.0102in" svg:x="4.113in" svg:y="3.778in" svg:viewBox="0 0 2977 27" draw:points="0,0 2977,0 2977,27 0,27">
        <text:p/>
      </draw:polygon>
      <draw:polygon text:anchor-type="page" text:anchor-page-number="5" draw:z-index="4508" draw:name="Shape1635" draw:style-name="gr2" draw:text-style-name="P3" svg:width="1.0831in" svg:height="0.1118in" svg:x="2.3799in" svg:y="9.3315in" svg:viewBox="0 0 2752 285" draw:points="0,0 2752,0 2752,285 0,285">
        <text:p/>
      </draw:polygon>
      <draw:frame text:anchor-type="page" text:anchor-page-number="14" draw:z-index="4507" draw:name="Shape4826" draw:style-name="gr1" draw:text-style-name="P2" svg:width="0.2807in" svg:height="0.113in" svg:x="0.4535in" svg:y="9.1957in">
        <draw:text-box>
          <text:p><text:span text:style-name="T5">PROC</text:span></text:p>
        </draw:text-box>
      </draw:frame>
      <draw:polygon text:anchor-type="page" text:anchor-page-number="5" draw:z-index="4506" draw:name="Shape1634" draw:style-name="gr2" draw:text-style-name="P3" svg:width="1.1815in" svg:height="0.1917in" svg:x="2.3315in" svg:y="9.3315in" svg:viewBox="0 0 3002 488" draw:points="0,0 3002,0 3002,488 0,488">
        <text:p/>
      </draw:polygon>
      <draw:frame text:anchor-type="page" text:anchor-page-number="14" draw:z-index="4505" draw:name="Shape4820" draw:style-name="gr1" draw:text-style-name="P2" svg:width="0.0433in" svg:height="0.1925in" svg:x="0.411in" svg:y="9.1346in">
        <draw:text-box>
          <text:p><text:span text:style-name="T2"><text:s/></text:span></text:p>
        </draw:text-box>
      </draw:frame>
      <draw:polygon text:anchor-type="page" text:anchor-page-number="6" draw:z-index="4504" draw:name="Shape2221" draw:style-name="gr3" draw:text-style-name="P4" svg:width="0.0098in" svg:height="0.0102in" svg:x="4.1031in" svg:y="3.778in" svg:viewBox="0 0 26 27" draw:points="0,0 26,0 26,27 0,27">
        <text:p/>
      </draw:polygon>
      <draw:polygon text:anchor-type="page" text:anchor-page-number="6" draw:z-index="4503" draw:name="Shape2216" draw:style-name="gr3" draw:text-style-name="P4" svg:width="0.5799in" svg:height="0.0102in" svg:x="3.5232in" svg:y="3.778in" svg:viewBox="0 0 1474 27" draw:points="0,0 1474,0 1474,27 0,27">
        <text:p/>
      </draw:polygon>
      <draw:frame text:anchor-type="page" text:anchor-page-number="14" draw:z-index="4502" draw:name="Shape4807" draw:style-name="gr1" draw:text-style-name="P2" svg:width="0.0433in" svg:height="0.1925in" svg:x="3.8098in" svg:y="9.0217in">
        <draw:text-box>
          <text:p><text:span text:style-name="T2"><text:s/></text:span></text:p>
        </draw:text-box>
      </draw:frame>
      <draw:frame text:anchor-type="page" text:anchor-page-number="5" draw:z-index="4501" draw:name="Shape1633" draw:style-name="gr1" draw:text-style-name="P2" svg:width="0.2161in" svg:height="0.113in" svg:x="1.5917in" svg:y="9.3339in">
        <draw:text-box>
          <text:p><text:span text:style-name="T4">ROU</text:span></text:p>
        </draw:text-box>
      </draw:frame>
      <draw:frame text:anchor-type="page" text:anchor-page-number="5" draw:z-index="4500" draw:name="Shape1588" draw:style-name="gr1" draw:text-style-name="P2" svg:width="0.0433in" svg:height="0.1925in" svg:x="0.6311in" svg:y="9.2728in">
        <draw:text-box>
          <text:p><text:span text:style-name="T2"><text:s/></text:span></text:p>
        </draw:text-box>
      </draw:frame>
      <draw:polygon text:anchor-type="page" text:anchor-page-number="6" draw:z-index="4499" draw:name="Shape2215" draw:style-name="gr3" draw:text-style-name="P4" svg:width="0.0102in" svg:height="0.0102in" svg:x="3.513in" svg:y="3.778in" svg:viewBox="0 0 27 27" draw:points="0,0 27,0 27,27 0,27">
        <text:p/>
      </draw:polygon>
      <draw:polygon text:anchor-type="page" text:anchor-page-number="14" draw:z-index="4498" draw:name="Shape4825" draw:style-name="gr2" draw:text-style-name="P3" svg:width="0.6902in" svg:height="0.1114in" svg:x="0.4114in" svg:y="9.1949in" svg:viewBox="0 0 1754 284" draw:points="0,0 1754,0 1754,284 0,284">
        <text:p/>
      </draw:polygon>
      <draw:polygon text:anchor-type="page" text:anchor-page-number="6" draw:z-index="4497" draw:name="Shape2213" draw:style-name="gr3" draw:text-style-name="P4" svg:width="1.1717in" svg:height="0.0102in" svg:x="2.3413in" svg:y="3.778in" svg:viewBox="0 0 2977 27" draw:points="0,0 2977,0 2977,27 0,27">
        <text:p/>
      </draw:polygon>
      <draw:polygon text:anchor-type="page" text:anchor-page-number="5" draw:z-index="4496" draw:name="Shape1620" draw:style-name="gr2" draw:text-style-name="P3" svg:width="0.6917in" svg:height="0.1118in" svg:x="1.5913in" svg:y="9.3315in" svg:viewBox="0 0 1758 285" draw:points="0,0 1758,0 1758,285 0,285">
        <text:p/>
      </draw:polygon>
      <draw:polygon text:anchor-type="page" text:anchor-page-number="14" draw:z-index="4495" draw:name="Shape4824" draw:style-name="gr2" draw:text-style-name="P3" svg:width="0.7866in" svg:height="0.1283in" svg:x="0.363in" svg:y="9.1949in" svg:viewBox="0 0 1999 327" draw:points="0,0 1999,0 1999,327 0,327">
        <text:p/>
      </draw:polygon>
      <draw:polygon text:anchor-type="page" text:anchor-page-number="6" draw:z-index="4494" draw:name="Shape2212" draw:style-name="gr3" draw:text-style-name="P4" svg:width="0.0098in" svg:height="0.0102in" svg:x="2.3315in" svg:y="3.778in" svg:viewBox="0 0 26 27" draw:points="0,0 26,0 26,27 0,27">
        <text:p/>
      </draw:polygon>
      <draw:frame text:anchor-type="page" text:anchor-page-number="14" draw:z-index="4493" draw:name="Shape4819" draw:style-name="gr1" draw:text-style-name="P2" svg:width="1.835in" svg:height="0.1295in" svg:x="1.9866in" svg:y="9.0689in">
        <draw:text-box>
          <text:p><text:span text:style-name="T1">Applicazioni a spruzzo non industriali</text:span></text:p>
        </draw:text-box>
      </draw:frame>
      <draw:polygon text:anchor-type="page" text:anchor-page-number="5" draw:z-index="4492" draw:name="Shape1617" draw:style-name="gr2" draw:text-style-name="P3" svg:width="0.7882in" svg:height="0.1917in" svg:x="1.5433in" svg:y="9.3315in" svg:viewBox="0 0 2003 488" draw:points="0,0 2003,0 2003,488 0,488">
        <text:p/>
      </draw:polygon>
      <draw:frame text:anchor-type="page" text:anchor-page-number="5" draw:z-index="4491" draw:name="Shape1616" draw:style-name="gr1" draw:text-style-name="P2" svg:width="0.1717in" svg:height="0.113in" svg:x="0.4535in" svg:y="9.3339in">
        <draw:text-box>
          <text:p><text:span text:style-name="T4">TLV</text:span></text:p>
        </draw:text-box>
      </draw:frame>
      <draw:frame text:anchor-type="page" text:anchor-page-number="14" draw:z-index="4490" draw:name="Shape4806" draw:style-name="gr1" draw:text-style-name="P2" svg:width="0.0433in" svg:height="0.1925in" svg:x="1.3063in" svg:y="9.0063in">
        <draw:text-box>
          <text:p><text:span text:style-name="T2"><text:s/></text:span></text:p>
        </draw:text-box>
      </draw:frame>
      <draw:polygon text:anchor-type="page" text:anchor-page-number="6" draw:z-index="4489" draw:name="Shape2245" draw:style-name="gr3" draw:text-style-name="P4" svg:width="0.7768in" svg:height="0.0102in" svg:x="1.5547in" svg:y="3.778in" svg:viewBox="0 0 1974 27" draw:points="0,0 1974,0 1974,27 0,27">
        <text:p/>
      </draw:polygon>
      <draw:polygon text:anchor-type="page" text:anchor-page-number="14" draw:z-index="4488" draw:name="Shape4818" draw:style-name="gr2" draw:text-style-name="P3" svg:width="4.6264in" svg:height="0.1283in" svg:x="1.9866in" svg:y="9.0665in" svg:viewBox="0 0 11752 327" draw:points="0,0 11752,0 11752,327 0,327">
        <text:p/>
      </draw:polygon>
      <draw:frame text:anchor-type="page" text:anchor-page-number="5" draw:z-index="4487" draw:name="Shape1613" draw:style-name="gr1" draw:text-style-name="P2" svg:width="0.0433in" svg:height="0.1925in" svg:x="0.411in" svg:y="9.2728in">
        <draw:text-box>
          <text:p><text:span text:style-name="T2"><text:s/></text:span></text:p>
        </draw:text-box>
      </draw:frame>
      <draw:polygon text:anchor-type="page" text:anchor-page-number="6" draw:z-index="4486" draw:name="Shape2244" draw:style-name="gr3" draw:text-style-name="P4" svg:width="0.0098in" svg:height="0.0102in" svg:x="1.5449in" svg:y="3.778in" svg:viewBox="0 0 26 27" draw:points="0,0 26,0 26,27 0,27">
        <text:p/>
      </draw:polygon>
      <draw:polygon text:anchor-type="page" text:anchor-page-number="14" draw:z-index="4485" draw:name="Shape4817" draw:style-name="gr2" draw:text-style-name="P3" svg:width="4.7232in" svg:height="0.1283in" svg:x="1.9382in" svg:y="9.0665in" svg:viewBox="0 0 11998 327" draw:points="0,0 11998,0 11998,327 0,327">
        <text:p/>
      </draw:polygon>
      <draw:frame text:anchor-type="page" text:anchor-page-number="5" draw:z-index="4484" draw:name="Shape1612" draw:style-name="gr1" draw:text-style-name="P2" svg:width="0.0433in" svg:height="0.1925in" svg:x="6.7098in" svg:y="9.1335in">
        <draw:text-box>
          <text:p><text:span text:style-name="T2"><text:s/></text:span></text:p>
        </draw:text-box>
      </draw:frame>
      <draw:polygon text:anchor-type="page" text:anchor-page-number="6" draw:z-index="4483" draw:name="Shape2243" draw:style-name="gr3" draw:text-style-name="P4" svg:width="1.1819in" svg:height="0.0102in" svg:x="0.363in" svg:y="3.778in" svg:viewBox="0 0 3003 27" draw:points="0,0 3003,0 3003,27 0,27">
        <text:p/>
      </draw:polygon>
      <draw:frame text:anchor-type="page" text:anchor-page-number="14" draw:z-index="4482" draw:name="Shape4816" draw:style-name="gr1" draw:text-style-name="P2" svg:width="0.1039in" svg:height="0.113in" svg:x="1.198in" svg:y="9.0673in">
        <draw:text-box>
          <text:p><text:span text:style-name="T5">11</text:span></text:p>
        </draw:text-box>
      </draw:frame>
      <draw:frame text:anchor-type="page" text:anchor-page-number="6" draw:z-index="4481" draw:name="Shape2242" draw:style-name="gr1" draw:text-style-name="P2" svg:width="0.0433in" svg:height="0.1925in" svg:x="6.2846in" svg:y="3.7311in">
        <draw:text-box>
          <text:p><text:span text:style-name="T2"><text:s/></text:span></text:p>
        </draw:text-box>
      </draw:frame>
      <draw:polygon text:anchor-type="page" text:anchor-page-number="5" draw:z-index="4480" draw:name="Shape1615" draw:style-name="gr2" draw:text-style-name="P3" svg:width="1.0835in" svg:height="0.1118in" svg:x="0.4114in" svg:y="9.3315in" svg:viewBox="0 0 2753 285" draw:points="0,0 2753,0 2753,285 0,285">
        <text:p/>
      </draw:polygon>
      <draw:polygon text:anchor-type="page" text:anchor-page-number="6" draw:z-index="4479" draw:name="Shape2268" draw:style-name="gr2" draw:text-style-name="P3" svg:width="1.085in" svg:height="0.1917in" svg:x="6.7098in" svg:y="3.7898in" svg:viewBox="0 0 2757 488" draw:points="0,0 2757,0 2757,488 0,488">
        <text:p/>
      </draw:polygon>
      <draw:frame text:anchor-type="page" text:anchor-page-number="14" draw:z-index="4478" draw:name="Shape4802" draw:style-name="gr1" draw:text-style-name="P2" svg:width="0.0433in" svg:height="0.1925in" svg:x="0.7346in" svg:y="9.0063in">
        <draw:text-box>
          <text:p><text:span text:style-name="T2"><text:s/></text:span></text:p>
        </draw:text-box>
      </draw:frame>
      <draw:polygon text:anchor-type="page" text:anchor-page-number="5" draw:z-index="4477" draw:name="Shape1614" draw:style-name="gr2" draw:text-style-name="P3" svg:width="1.1803in" svg:height="0.1917in" svg:x="0.363in" svg:y="9.3315in" svg:viewBox="0 0 2999 488" draw:points="0,0 2999,0 2999,488 0,488">
        <text:p/>
      </draw:polygon>
      <draw:polygon text:anchor-type="page" text:anchor-page-number="5" draw:z-index="4476" draw:name="Shape1586" draw:style-name="gr3" draw:text-style-name="P4" svg:width="1.1717in" svg:height="0.0102in" svg:x="6.6732in" svg:y="9.1197in" svg:viewBox="0 0 2977 27" draw:points="0,0 2977,0 2977,27 0,27">
        <text:p/>
      </draw:polygon>
      <draw:polygon text:anchor-type="page" text:anchor-page-number="14" draw:z-index="4475" draw:name="Shape4815" draw:style-name="gr2" draw:text-style-name="P3" svg:width="0.6902in" svg:height="0.1114in" svg:x="1.198in" svg:y="9.0665in" svg:viewBox="0 0 1754 284" draw:points="0,0 1754,0 1754,284 0,284">
        <text:p/>
      </draw:polygon>
      <draw:polygon text:anchor-type="page" text:anchor-page-number="6" draw:z-index="4474" draw:name="Shape2267" draw:style-name="gr2" draw:text-style-name="P3" svg:width="1.1819in" svg:height="0.1917in" svg:x="6.6614in" svg:y="3.7898in" svg:viewBox="0 0 3003 488" draw:points="0,0 3003,0 3003,488 0,488">
        <text:p/>
      </draw:polygon>
      <draw:polygon text:anchor-type="page" text:anchor-page-number="14" draw:z-index="4473" draw:name="Shape4814" draw:style-name="gr2" draw:text-style-name="P3" svg:width="0.7886in" svg:height="0.1283in" svg:x="1.15in" svg:y="9.0665in" svg:viewBox="0 0 2004 327" draw:points="0,0 2004,0 2004,327 0,327">
        <text:p/>
      </draw:polygon>
      <draw:polygon text:anchor-type="page" text:anchor-page-number="5" draw:z-index="4472" draw:name="Shape1585" draw:style-name="gr3" draw:text-style-name="P4" svg:width="0.0102in" svg:height="0.0102in" svg:x="6.663in" svg:y="9.1197in" svg:viewBox="0 0 27 27" draw:points="0,0 27,0 27,27 0,27">
        <text:p/>
      </draw:polygon>
      <draw:frame text:anchor-type="page" text:anchor-page-number="6" draw:z-index="4471" draw:name="Shape2252" draw:style-name="gr1" draw:text-style-name="P2" svg:width="0.3614in" svg:height="0.113in" svg:x="5.9228in" svg:y="3.7925in">
        <draw:text-box>
          <text:p><text:span text:style-name="T4">RESPIR</text:span></text:p>
        </draw:text-box>
      </draw:frame>
      <draw:frame text:anchor-type="page" text:anchor-page-number="14" draw:z-index="4470" draw:name="Shape4813" draw:style-name="gr1" draw:text-style-name="P2" svg:width="0.2807in" svg:height="0.113in" svg:x="0.4535in" svg:y="9.0673in">
        <draw:text-box>
          <text:p><text:span text:style-name="T5">PROC</text:span></text:p>
        </draw:text-box>
      </draw:frame>
      <draw:frame text:anchor-type="page" text:anchor-page-number="6" draw:z-index="4469" draw:name="Shape2264" draw:style-name="gr1" draw:text-style-name="P2" svg:width="0.0433in" svg:height="0.1925in" svg:x="5.3335in" svg:y="3.7929in">
        <draw:text-box>
          <text:p><text:span text:style-name="T2"><text:s/></text:span></text:p>
        </draw:text-box>
      </draw:frame>
      <draw:polygon text:anchor-type="page" text:anchor-page-number="5" draw:z-index="4468" draw:name="Shape1584" draw:style-name="gr3" draw:text-style-name="P4" svg:width="0.7783in" svg:height="0.0102in" svg:x="5.8846in" svg:y="9.1197in" svg:viewBox="0 0 1978 27" draw:points="0,0 1978,0 1978,27 0,27">
        <text:p/>
      </draw:polygon>
      <draw:frame text:anchor-type="page" text:anchor-page-number="14" draw:z-index="4467" draw:name="Shape4801" draw:style-name="gr1" draw:text-style-name="P2" svg:width="0.0433in" svg:height="0.1925in" svg:x="0.411in" svg:y="9.0063in">
        <draw:text-box>
          <text:p><text:span text:style-name="T2"><text:s/></text:span></text:p>
        </draw:text-box>
      </draw:frame>
      <draw:polygon text:anchor-type="page" text:anchor-page-number="6" draw:z-index="4466" draw:name="Shape2266" draw:style-name="gr2" draw:text-style-name="P3" svg:width="0.6898in" svg:height="0.1118in" svg:x="5.9232in" svg:y="3.7898in" svg:viewBox="0 0 1753 285" draw:points="0,0 1753,0 1753,285 0,285">
        <text:p/>
      </draw:polygon>
      <draw:polygon text:anchor-type="page" text:anchor-page-number="5" draw:z-index="4465" draw:name="Shape1583" draw:style-name="gr3" draw:text-style-name="P4" svg:width="0.0098in" svg:height="0.0102in" svg:x="5.8748in" svg:y="9.1197in" svg:viewBox="0 0 26 27" draw:points="0,0 26,0 26,27 0,27">
        <text:p/>
      </draw:polygon>
      <draw:polygon text:anchor-type="page" text:anchor-page-number="5" draw:z-index="4464" draw:name="Shape1582" draw:style-name="gr3" draw:text-style-name="P4" svg:width="0.5799in" svg:height="0.0102in" svg:x="5.2949in" svg:y="9.1197in" svg:viewBox="0 0 1474 27" draw:points="0,0 1474,0 1474,27 0,27">
        <text:p/>
      </draw:polygon>
      <draw:polygon text:anchor-type="page" text:anchor-page-number="6" draw:z-index="4463" draw:name="Shape2265" draw:style-name="gr2" draw:text-style-name="P3" svg:width="0.7866in" svg:height="0.1917in" svg:x="5.8748in" svg:y="3.7898in" svg:viewBox="0 0 1999 488" draw:points="0,0 1999,0 1999,488 0,488">
        <text:p/>
      </draw:polygon>
      <draw:frame text:anchor-type="page" text:anchor-page-number="14" draw:z-index="4462" draw:name="Shape4794" draw:style-name="gr1" draw:text-style-name="P2" svg:width="0.0433in" svg:height="0.1925in" svg:x="3.5681in" svg:y="8.8929in">
        <draw:text-box>
          <text:p><text:span text:style-name="T2"><text:s/></text:span></text:p>
        </draw:text-box>
      </draw:frame>
      <draw:polygon text:anchor-type="page" text:anchor-page-number="5" draw:z-index="4461" draw:name="Shape1581" draw:style-name="gr3" draw:text-style-name="P4" svg:width="0.0102in" svg:height="0.0102in" svg:x="5.2846in" svg:y="9.1197in" svg:viewBox="0 0 27 27" draw:points="0,0 27,0 27,27 0,27">
        <text:p/>
      </draw:polygon>
      <draw:polygon text:anchor-type="page" text:anchor-page-number="14" draw:z-index="4460" draw:name="Shape4809" draw:style-name="gr2" draw:text-style-name="P3" svg:width="0.6902in" svg:height="0.1114in" svg:x="0.4114in" svg:y="9.0665in" svg:viewBox="0 0 1754 284" draw:points="0,0 1754,0 1754,284 0,284">
        <text:p/>
      </draw:polygon>
      <draw:frame text:anchor-type="page" text:anchor-page-number="6" draw:z-index="4459" draw:name="Shape2261" draw:style-name="gr1" draw:text-style-name="P2" svg:width="0.0433in" svg:height="0.1925in" svg:x="4.1516in" svg:y="3.7929in">
        <draw:text-box>
          <text:p><text:span text:style-name="T2"><text:s/></text:span></text:p>
        </draw:text-box>
      </draw:frame>
      <draw:polygon text:anchor-type="page" text:anchor-page-number="14" draw:z-index="4458" draw:name="Shape4808" draw:style-name="gr2" draw:text-style-name="P3" svg:width="0.7866in" svg:height="0.1283in" svg:x="0.363in" svg:y="9.0665in" svg:viewBox="0 0 1999 327" draw:points="0,0 1999,0 1999,327 0,327">
        <text:p/>
      </draw:polygon>
      <draw:polygon text:anchor-type="page" text:anchor-page-number="5" draw:z-index="4457" draw:name="Shape1580" draw:style-name="gr3" draw:text-style-name="P4" svg:width="1.1717in" svg:height="0.0102in" svg:x="4.113in" svg:y="9.1197in" svg:viewBox="0 0 2977 27" draw:points="0,0 2977,0 2977,27 0,27">
        <text:p/>
      </draw:polygon>
      <draw:polygon text:anchor-type="page" text:anchor-page-number="6" draw:z-index="4456" draw:name="Shape2263" draw:style-name="gr2" draw:text-style-name="P3" svg:width="0.4917in" svg:height="0.1917in" svg:x="5.3331in" svg:y="3.7898in" svg:viewBox="0 0 1250 488" draw:points="0,0 1250,0 1250,488 0,488">
        <text:p/>
      </draw:polygon>
      <draw:polygon text:anchor-type="page" text:anchor-page-number="5" draw:z-index="4455" draw:name="Shape1579" draw:style-name="gr3" draw:text-style-name="P4" svg:width="0.0098in" svg:height="0.0102in" svg:x="4.1031in" svg:y="9.1197in" svg:viewBox="0 0 26 27" draw:points="0,0 26,0 26,27 0,27">
        <text:p/>
      </draw:polygon>
      <draw:frame text:anchor-type="page" text:anchor-page-number="14" draw:z-index="4454" draw:name="Shape4812" draw:style-name="gr1" draw:text-style-name="P2" svg:width="1.5925in" svg:height="0.1295in" svg:x="1.9866in" svg:y="8.9402in">
        <draw:text-box>
          <text:p><text:span text:style-name="T1">Applicazione con rulli o pennelli </text:span></text:p>
        </draw:text-box>
      </draw:frame>
      <draw:polygon text:anchor-type="page" text:anchor-page-number="6" draw:z-index="4453" draw:name="Shape2262" draw:style-name="gr2" draw:text-style-name="P3" svg:width="0.5917in" svg:height="0.1917in" svg:x="5.2831in" svg:y="3.7898in" svg:viewBox="0 0 1504 488" draw:points="0,0 1504,0 1504,488 0,488">
        <text:p/>
      </draw:polygon>
      <draw:frame text:anchor-type="page" text:anchor-page-number="6" draw:z-index="4452" draw:name="Shape2258" draw:style-name="gr1" draw:text-style-name="P2" svg:width="0.0433in" svg:height="0.1925in" svg:x="3.561in" svg:y="3.7929in">
        <draw:text-box>
          <text:p><text:span text:style-name="T2"><text:s/></text:span></text:p>
        </draw:text-box>
      </draw:frame>
      <draw:polygon text:anchor-type="page" text:anchor-page-number="5" draw:z-index="4451" draw:name="Shape1578" draw:style-name="gr3" draw:text-style-name="P4" svg:width="0.5799in" svg:height="0.0102in" svg:x="3.5232in" svg:y="9.1197in" svg:viewBox="0 0 1474 27" draw:points="0,0 1474,0 1474,27 0,27">
        <text:p/>
      </draw:polygon>
      <draw:frame text:anchor-type="page" text:anchor-page-number="14" draw:z-index="4450" draw:name="Shape4793" draw:style-name="gr1" draw:text-style-name="P2" svg:width="0.0433in" svg:height="0.1925in" svg:x="1.3063in" svg:y="8.8799in">
        <draw:text-box>
          <text:p><text:span text:style-name="T2"><text:s/></text:span></text:p>
        </draw:text-box>
      </draw:frame>
      <draw:polygon text:anchor-type="page" text:anchor-page-number="5" draw:z-index="4449" draw:name="Shape1577" draw:style-name="gr3" draw:text-style-name="P4" svg:width="0.0102in" svg:height="0.0102in" svg:x="3.513in" svg:y="9.1197in" svg:viewBox="0 0 27 27" draw:points="0,0 27,0 27,27 0,27">
        <text:p/>
      </draw:polygon>
      <draw:polygon text:anchor-type="page" text:anchor-page-number="6" draw:z-index="4448" draw:name="Shape2260" draw:style-name="gr2" draw:text-style-name="P3" svg:width="1.0831in" svg:height="0.1917in" svg:x="4.1516in" svg:y="3.7898in" svg:viewBox="0 0 2752 488" draw:points="0,0 2752,0 2752,488 0,488">
        <text:p/>
      </draw:polygon>
      <draw:polygon text:anchor-type="page" text:anchor-page-number="14" draw:z-index="4447" draw:name="Shape4811" draw:style-name="gr2" draw:text-style-name="P3" svg:width="4.6264in" svg:height="0.1268in" svg:x="1.9866in" svg:y="8.9398in" svg:viewBox="0 0 11752 323" draw:points="0,0 11752,0 11752,323 0,323">
        <text:p/>
      </draw:polygon>
      <draw:polygon text:anchor-type="page" text:anchor-page-number="6" draw:z-index="4446" draw:name="Shape2259" draw:style-name="gr2" draw:text-style-name="P3" svg:width="1.1799in" svg:height="0.1917in" svg:x="4.1031in" svg:y="3.7898in" svg:viewBox="0 0 2998 488" draw:points="0,0 2998,0 2998,488 0,488">
        <text:p/>
      </draw:polygon>
      <draw:polygon text:anchor-type="page" text:anchor-page-number="14" draw:z-index="4445" draw:name="Shape4810" draw:style-name="gr2" draw:text-style-name="P3" svg:width="4.7232in" svg:height="0.1268in" svg:x="1.9382in" svg:y="8.9398in" svg:viewBox="0 0 11998 323" draw:points="0,0 11998,0 11998,323 0,323">
        <text:p/>
      </draw:polygon>
      <draw:polygon text:anchor-type="page" text:anchor-page-number="5" draw:z-index="4444" draw:name="Shape1576" draw:style-name="gr3" draw:text-style-name="P4" svg:width="1.1717in" svg:height="0.0102in" svg:x="2.3413in" svg:y="9.1197in" svg:viewBox="0 0 2977 27" draw:points="0,0 2977,0 2977,27 0,27">
        <text:p/>
      </draw:polygon>
      <draw:frame text:anchor-type="page" text:anchor-page-number="14" draw:z-index="4443" draw:name="Shape4805" draw:style-name="gr1" draw:text-style-name="P2" svg:width="0.1094in" svg:height="0.113in" svg:x="1.198in" svg:y="8.9402in">
        <draw:text-box>
          <text:p><text:span text:style-name="T5">10</text:span></text:p>
        </draw:text-box>
      </draw:frame>
      <draw:frame text:anchor-type="page" text:anchor-page-number="6" draw:z-index="4442" draw:name="Shape2241" draw:style-name="gr1" draw:text-style-name="P2" svg:width="0.0433in" svg:height="0.1925in" svg:x="2.5417in" svg:y="3.7311in">
        <draw:text-box>
          <text:p><text:span text:style-name="T2"><text:s/></text:span></text:p>
        </draw:text-box>
      </draw:frame>
      <draw:polygon text:anchor-type="page" text:anchor-page-number="5" draw:z-index="4441" draw:name="Shape1575" draw:style-name="gr3" draw:text-style-name="P4" svg:width="0.0098in" svg:height="0.0102in" svg:x="2.3315in" svg:y="9.1197in" svg:viewBox="0 0 26 27" draw:points="0,0 26,0 26,27 0,27">
        <text:p/>
      </draw:polygon>
      <draw:frame text:anchor-type="page" text:anchor-page-number="14" draw:z-index="4440" draw:name="Shape4789" draw:style-name="gr1" draw:text-style-name="P2" svg:width="0.0433in" svg:height="0.1925in" svg:x="0.7346in" svg:y="8.8799in">
        <draw:text-box>
          <text:p><text:span text:style-name="T2"><text:s/></text:span></text:p>
        </draw:text-box>
      </draw:frame>
      <draw:polygon text:anchor-type="page" text:anchor-page-number="5" draw:z-index="4439" draw:name="Shape1574" draw:style-name="gr3" draw:text-style-name="P4" svg:width="0.7768in" svg:height="0.0102in" svg:x="1.5547in" svg:y="9.1197in" svg:viewBox="0 0 1974 27" draw:points="0,0 1974,0 1974,27 0,27">
        <text:p/>
      </draw:polygon>
      <draw:polygon text:anchor-type="page" text:anchor-page-number="6" draw:z-index="4438" draw:name="Shape2257" draw:style-name="gr2" draw:text-style-name="P3" svg:width="0.4933in" svg:height="0.1917in" svg:x="3.5614in" svg:y="3.7898in" svg:viewBox="0 0 1254 488" draw:points="0,0 1254,0 1254,488 0,488">
        <text:p/>
      </draw:polygon>
      <draw:polygon text:anchor-type="page" text:anchor-page-number="6" draw:z-index="4437" draw:name="Shape2256" draw:style-name="gr2" draw:text-style-name="P3" svg:width="0.5902in" svg:height="0.1917in" svg:x="3.513in" svg:y="3.7898in" svg:viewBox="0 0 1500 488" draw:points="0,0 1500,0 1500,488 0,488">
        <text:p/>
      </draw:polygon>
      <draw:polygon text:anchor-type="page" text:anchor-page-number="5" draw:z-index="4436" draw:name="Shape1573" draw:style-name="gr3" draw:text-style-name="P4" svg:width="0.0098in" svg:height="0.0102in" svg:x="1.5449in" svg:y="9.1197in" svg:viewBox="0 0 26 27" draw:points="0,0 26,0 26,27 0,27">
        <text:p/>
      </draw:polygon>
      <draw:polygon text:anchor-type="page" text:anchor-page-number="14" draw:z-index="4435" draw:name="Shape4804" draw:style-name="gr2" draw:text-style-name="P3" svg:width="0.6902in" svg:height="0.1118in" svg:x="1.198in" svg:y="8.9398in" svg:viewBox="0 0 1754 285" draw:points="0,0 1754,0 1754,285 0,285">
        <text:p/>
      </draw:polygon>
      <draw:frame text:anchor-type="page" text:anchor-page-number="6" draw:z-index="4434" draw:name="Shape2251" draw:style-name="gr1" draw:text-style-name="P2" svg:width="0.163in" svg:height="0.113in" svg:x="2.3799in" svg:y="3.7925in">
        <draw:text-box>
          <text:p><text:span text:style-name="T4"><text:s/>0.2</text:span></text:p>
        </draw:text-box>
      </draw:frame>
      <draw:polygon text:anchor-type="page" text:anchor-page-number="14" draw:z-index="4433" draw:name="Shape4803" draw:style-name="gr2" draw:text-style-name="P3" svg:width="0.7886in" svg:height="0.1268in" svg:x="1.15in" svg:y="8.9398in" svg:viewBox="0 0 2004 323" draw:points="0,0 2004,0 2004,323 0,323">
        <text:p/>
      </draw:polygon>
      <draw:polygon text:anchor-type="page" text:anchor-page-number="5" draw:z-index="4432" draw:name="Shape1570" draw:style-name="gr3" draw:text-style-name="P4" svg:width="1.1819in" svg:height="0.0102in" svg:x="0.363in" svg:y="9.1197in" svg:viewBox="0 0 3003 27" draw:points="0,0 3003,0 3003,27 0,27">
        <text:p/>
      </draw:polygon>
      <draw:frame text:anchor-type="page" text:anchor-page-number="5" draw:z-index="4431" draw:name="Shape1569" draw:style-name="gr1" draw:text-style-name="P2" svg:width="0.0433in" svg:height="0.1925in" svg:x="6.2846in" svg:y="9.0717in">
        <draw:text-box>
          <text:p><text:span text:style-name="T2"><text:s/></text:span></text:p>
        </draw:text-box>
      </draw:frame>
      <draw:frame text:anchor-type="page" text:anchor-page-number="14" draw:z-index="4430" draw:name="Shape4800" draw:style-name="gr1" draw:text-style-name="P2" svg:width="0.2807in" svg:height="0.113in" svg:x="0.4535in" svg:y="8.9402in">
        <draw:text-box>
          <text:p><text:span text:style-name="T5">PROC</text:span></text:p>
        </draw:text-box>
      </draw:frame>
      <draw:frame text:anchor-type="page" text:anchor-page-number="6" draw:z-index="4429" draw:name="Shape2253" draw:style-name="gr1" draw:text-style-name="P2" svg:width="0.0433in" svg:height="0.1925in" svg:x="1.5917in" svg:y="3.7929in">
        <draw:text-box>
          <text:p><text:span text:style-name="T2"><text:s/></text:span></text:p>
        </draw:text-box>
      </draw:frame>
      <draw:polygon text:anchor-type="page" text:anchor-page-number="6" draw:z-index="4428" draw:name="Shape2255" draw:style-name="gr2" draw:text-style-name="P3" svg:width="1.0831in" svg:height="0.1118in" svg:x="2.3799in" svg:y="3.7898in" svg:viewBox="0 0 2752 285" draw:points="0,0 2752,0 2752,285 0,285">
        <text:p/>
      </draw:polygon>
      <draw:frame text:anchor-type="page" text:anchor-page-number="14" draw:z-index="4427" draw:name="Shape4788" draw:style-name="gr1" draw:text-style-name="P2" svg:width="0.0433in" svg:height="0.1925in" svg:x="0.411in" svg:y="8.8799in">
        <draw:text-box>
          <text:p><text:span text:style-name="T2"><text:s/></text:span></text:p>
        </draw:text-box>
      </draw:frame>
      <draw:polygon text:anchor-type="page" text:anchor-page-number="5" draw:z-index="4426" draw:name="Shape1611" draw:style-name="gr2" draw:text-style-name="P3" svg:width="1.085in" svg:height="0.1917in" svg:x="6.7098in" svg:y="9.1299in" svg:viewBox="0 0 2757 488" draw:points="0,0 2757,0 2757,488 0,488">
        <text:p/>
      </draw:polygon>
      <draw:frame text:anchor-type="page" text:anchor-page-number="14" draw:z-index="4425" draw:name="Shape4784" draw:style-name="gr1" draw:text-style-name="P2" svg:width="0.0433in" svg:height="0.1925in" svg:x="4.4563in" svg:y="8.7661in">
        <draw:text-box>
          <text:p><text:span text:style-name="T2"><text:s/></text:span></text:p>
        </draw:text-box>
      </draw:frame>
      <draw:polygon text:anchor-type="page" text:anchor-page-number="6" draw:z-index="4424" draw:name="Shape2254" draw:style-name="gr2" draw:text-style-name="P3" svg:width="1.1815in" svg:height="0.1917in" svg:x="2.3315in" svg:y="3.7898in" svg:viewBox="0 0 3002 488" draw:points="0,0 3002,0 3002,488 0,488">
        <text:p/>
      </draw:polygon>
      <draw:polygon text:anchor-type="page" text:anchor-page-number="5" draw:z-index="4423" draw:name="Shape1610" draw:style-name="gr2" draw:text-style-name="P3" svg:width="1.1819in" svg:height="0.1917in" svg:x="6.6614in" svg:y="9.1299in" svg:viewBox="0 0 3003 488" draw:points="0,0 3003,0 3003,488 0,488">
        <text:p/>
      </draw:polygon>
      <draw:polygon text:anchor-type="page" text:anchor-page-number="14" draw:z-index="4422" draw:name="Shape4795" draw:style-name="gr2" draw:text-style-name="P3" svg:width="0.6902in" svg:height="0.1118in" svg:x="0.4114in" svg:y="8.9398in" svg:viewBox="0 0 1754 285" draw:points="0,0 1754,0 1754,285 0,285">
        <text:p/>
      </draw:polygon>
      <draw:frame text:anchor-type="page" text:anchor-page-number="6" draw:z-index="4421" draw:name="Shape2240" draw:style-name="gr1" draw:text-style-name="P2" svg:width="0.0433in" svg:height="0.1925in" svg:x="0.9717in" svg:y="3.7311in">
        <draw:text-box>
          <text:p><text:span text:style-name="T2"><text:s/></text:span></text:p>
        </draw:text-box>
      </draw:frame>
      <draw:frame text:anchor-type="page" text:anchor-page-number="5" draw:z-index="4420" draw:name="Shape1601" draw:style-name="gr1" draw:text-style-name="P2" svg:width="0.3614in" svg:height="0.113in" svg:x="5.9228in" svg:y="9.1319in">
        <draw:text-box>
          <text:p><text:span text:style-name="T4">RESPIR</text:span></text:p>
        </draw:text-box>
      </draw:frame>
      <draw:polygon text:anchor-type="page" text:anchor-page-number="6" draw:z-index="4419" draw:name="Shape2250" draw:style-name="gr2" draw:text-style-name="P3" svg:width="0.6917in" svg:height="0.1917in" svg:x="1.5913in" svg:y="3.7898in" svg:viewBox="0 0 1758 488" draw:points="0,0 1758,0 1758,488 0,488">
        <text:p/>
      </draw:polygon>
      <draw:frame text:anchor-type="page" text:anchor-page-number="5" draw:z-index="4418" draw:name="Shape1607" draw:style-name="gr1" draw:text-style-name="P2" svg:width="0.0433in" svg:height="0.1925in" svg:x="5.3335in" svg:y="9.1335in">
        <draw:text-box>
          <text:p><text:span text:style-name="T2"><text:s/></text:span></text:p>
        </draw:text-box>
      </draw:frame>
      <draw:polygon text:anchor-type="page" text:anchor-page-number="14" draw:z-index="4417" draw:name="Shape4799" draw:style-name="gr2" draw:text-style-name="P3" svg:width="0.7866in" svg:height="0.1268in" svg:x="0.363in" svg:y="8.9398in" svg:viewBox="0 0 1999 323" draw:points="0,0 1999,0 1999,323 0,323">
        <text:p/>
      </draw:polygon>
      <draw:polygon text:anchor-type="page" text:anchor-page-number="6" draw:z-index="4416" draw:name="Shape2249" draw:style-name="gr2" draw:text-style-name="P3" svg:width="0.7882in" svg:height="0.1917in" svg:x="1.5433in" svg:y="3.7898in" svg:viewBox="0 0 2003 488" draw:points="0,0 2003,0 2003,488 0,488">
        <text:p/>
      </draw:polygon>
      <draw:polygon text:anchor-type="page" text:anchor-page-number="5" draw:z-index="4415" draw:name="Shape1609" draw:style-name="gr2" draw:text-style-name="P3" svg:width="0.6898in" svg:height="0.1114in" svg:x="5.9232in" svg:y="9.1299in" svg:viewBox="0 0 1753 284" draw:points="0,0 1753,0 1753,284 0,284">
        <text:p/>
      </draw:polygon>
      <draw:frame text:anchor-type="page" text:anchor-page-number="14" draw:z-index="4414" draw:name="Shape4798" draw:style-name="gr1" draw:text-style-name="P2" svg:width="2.4878in" svg:height="0.1295in" svg:x="1.9866in" svg:y="8.8138in">
        <draw:text-box>
          <text:p><text:span text:style-name="T1">Rivestimenti e vernici, diluenti, soluzioni decapanti</text:span></text:p>
        </draw:text-box>
      </draw:frame>
      <draw:frame text:anchor-type="page" text:anchor-page-number="6" draw:z-index="4413" draw:name="Shape2248" draw:style-name="gr1" draw:text-style-name="P2" svg:width="0.5039in" svg:height="0.113in" svg:x="0.4535in" svg:y="3.7925in">
        <draw:text-box>
          <text:p><text:span text:style-name="T4">TLV-ACGIH</text:span></text:p>
        </draw:text-box>
      </draw:frame>
      <draw:frame text:anchor-type="page" text:anchor-page-number="14" draw:z-index="4412" draw:name="Shape4779" draw:style-name="gr1" draw:text-style-name="P2" svg:width="0.0433in" svg:height="0.1925in" svg:x="1.3063in" svg:y="8.7516in">
        <draw:text-box>
          <text:p><text:span text:style-name="T2"><text:s/></text:span></text:p>
        </draw:text-box>
      </draw:frame>
      <draw:polygon text:anchor-type="page" text:anchor-page-number="5" draw:z-index="4411" draw:name="Shape1608" draw:style-name="gr2" draw:text-style-name="P3" svg:width="0.7866in" svg:height="0.1917in" svg:x="5.8748in" svg:y="9.1299in" svg:viewBox="0 0 1999 488" draw:points="0,0 1999,0 1999,488 0,488">
        <text:p/>
      </draw:polygon>
      <draw:polygon text:anchor-type="page" text:anchor-page-number="14" draw:z-index="4410" draw:name="Shape4797" draw:style-name="gr2" draw:text-style-name="P3" svg:width="4.6264in" svg:height="0.1283in" svg:x="1.9866in" svg:y="8.8114in" svg:viewBox="0 0 11752 327" draw:points="0,0 11752,0 11752,327 0,327">
        <text:p/>
      </draw:polygon>
      <draw:frame text:anchor-type="page" text:anchor-page-number="5" draw:z-index="4409" draw:name="Shape1604" draw:style-name="gr1" draw:text-style-name="P2" svg:width="0.0433in" svg:height="0.1925in" svg:x="4.1516in" svg:y="9.1335in">
        <draw:text-box>
          <text:p><text:span text:style-name="T2"><text:s/></text:span></text:p>
        </draw:text-box>
      </draw:frame>
      <draw:frame text:anchor-type="page" text:anchor-page-number="6" draw:z-index="4408" draw:name="Shape2239" draw:style-name="gr1" draw:text-style-name="P2" svg:width="0.0433in" svg:height="0.1925in" svg:x="0.411in" svg:y="3.7311in">
        <draw:text-box>
          <text:p><text:span text:style-name="T2"><text:s/></text:span></text:p>
        </draw:text-box>
      </draw:frame>
      <draw:polygon text:anchor-type="page" text:anchor-page-number="14" draw:z-index="4407" draw:name="Shape4796" draw:style-name="gr2" draw:text-style-name="P3" svg:width="4.7232in" svg:height="0.1283in" svg:x="1.9382in" svg:y="8.8114in" svg:viewBox="0 0 11998 327" draw:points="0,0 11998,0 11998,327 0,327">
        <text:p/>
      </draw:polygon>
      <draw:frame text:anchor-type="page" text:anchor-page-number="6" draw:z-index="4406" draw:name="Shape2238" draw:style-name="gr1" draw:text-style-name="P2" svg:width="0.0433in" svg:height="0.1925in" svg:x="6.7098in" svg:y="3.5898in">
        <draw:text-box>
          <text:p><text:span text:style-name="T2"><text:s/></text:span></text:p>
        </draw:text-box>
      </draw:frame>
      <draw:polygon text:anchor-type="page" text:anchor-page-number="5" draw:z-index="4405" draw:name="Shape1606" draw:style-name="gr2" draw:text-style-name="P3" svg:width="0.4917in" svg:height="0.1917in" svg:x="5.3331in" svg:y="9.1299in" svg:viewBox="0 0 1250 488" draw:points="0,0 1250,0 1250,488 0,488">
        <text:p/>
      </draw:polygon>
      <draw:polygon text:anchor-type="page" text:anchor-page-number="6" draw:z-index="4404" draw:name="Shape2247" draw:style-name="gr2" draw:text-style-name="P3" svg:width="1.0835in" svg:height="0.1118in" svg:x="0.4114in" svg:y="3.7898in" svg:viewBox="0 0 2753 285" draw:points="0,0 2753,0 2753,285 0,285">
        <text:p/>
      </draw:polygon>
      <draw:polygon text:anchor-type="page" text:anchor-page-number="5" draw:z-index="4403" draw:name="Shape1605" draw:style-name="gr2" draw:text-style-name="P3" svg:width="0.5917in" svg:height="0.1917in" svg:x="5.2831in" svg:y="9.1299in" svg:viewBox="0 0 1504 488" draw:points="0,0 1504,0 1504,488 0,488">
        <text:p/>
      </draw:polygon>
      <draw:frame text:anchor-type="page" text:anchor-page-number="14" draw:z-index="4402" draw:name="Shape4792" draw:style-name="gr1" draw:text-style-name="P2" svg:width="0.1094in" svg:height="0.113in" svg:x="1.198in" svg:y="8.8126in">
        <draw:text-box>
          <text:p><text:span text:style-name="T5">9a</text:span></text:p>
        </draw:text-box>
      </draw:frame>
      <draw:frame text:anchor-type="page" text:anchor-page-number="5" draw:z-index="4401" draw:name="Shape1602" draw:style-name="gr1" draw:text-style-name="P2" svg:width="0.0433in" svg:height="0.1925in" svg:x="3.561in" svg:y="9.1335in">
        <draw:text-box>
          <text:p><text:span text:style-name="T2"><text:s/></text:span></text:p>
        </draw:text-box>
      </draw:frame>
      <draw:frame text:anchor-type="page" text:anchor-page-number="14" draw:z-index="4400" draw:name="Shape4775" draw:style-name="gr1" draw:text-style-name="P2" svg:width="0.0433in" svg:height="0.1925in" svg:x="0.5882in" svg:y="8.7516in">
        <draw:text-box>
          <text:p><text:span text:style-name="T2"><text:s/></text:span></text:p>
        </draw:text-box>
      </draw:frame>
      <draw:polygon text:anchor-type="page" text:anchor-page-number="6" draw:z-index="4399" draw:name="Shape2246" draw:style-name="gr2" draw:text-style-name="P3" svg:width="1.1803in" svg:height="0.1917in" svg:x="0.363in" svg:y="3.7898in" svg:viewBox="0 0 2999 488" draw:points="0,0 2999,0 2999,488 0,488">
        <text:p/>
      </draw:polygon>
      <draw:polygon text:anchor-type="page" text:anchor-page-number="5" draw:z-index="4398" draw:name="Shape1603" draw:style-name="gr2" draw:text-style-name="P3" svg:width="1.0831in" svg:height="0.1917in" svg:x="4.1516in" svg:y="9.1299in" svg:viewBox="0 0 2752 488" draw:points="0,0 2752,0 2752,488 0,488">
        <text:p/>
      </draw:polygon>
      <draw:polygon text:anchor-type="page" text:anchor-page-number="14" draw:z-index="4397" draw:name="Shape4791" draw:style-name="gr2" draw:text-style-name="P3" svg:width="0.6902in" svg:height="0.1118in" svg:x="1.198in" svg:y="8.8114in" svg:viewBox="0 0 1754 285" draw:points="0,0 1754,0 1754,285 0,285">
        <text:p/>
      </draw:polygon>
      <draw:polygon text:anchor-type="page" text:anchor-page-number="6" draw:z-index="4396" draw:name="Shape2198" draw:style-name="gr3" draw:text-style-name="P4" svg:width="1.1717in" svg:height="0.0102in" svg:x="6.6732in" svg:y="3.5764in" svg:viewBox="0 0 2977 27" draw:points="0,0 2977,0 2977,27 0,27">
        <text:p/>
      </draw:polygon>
      <draw:polygon text:anchor-type="page" text:anchor-page-number="5" draw:z-index="4395" draw:name="Shape1600" draw:style-name="gr2" draw:text-style-name="P3" svg:width="1.1799in" svg:height="0.1917in" svg:x="4.1031in" svg:y="9.1299in" svg:viewBox="0 0 2998 488" draw:points="0,0 2998,0 2998,488 0,488">
        <text:p/>
      </draw:polygon>
      <draw:polygon text:anchor-type="page" text:anchor-page-number="6" draw:z-index="4394" draw:name="Shape2197" draw:style-name="gr3" draw:text-style-name="P4" svg:width="0.0102in" svg:height="0.0102in" svg:x="6.663in" svg:y="3.5764in" svg:viewBox="0 0 27 27" draw:points="0,0 27,0 27,27 0,27">
        <text:p/>
      </draw:polygon>
      <draw:polygon text:anchor-type="page" text:anchor-page-number="14" draw:z-index="4393" draw:name="Shape4790" draw:style-name="gr2" draw:text-style-name="P3" svg:width="0.7886in" svg:height="0.1283in" svg:x="1.15in" svg:y="8.8114in" svg:viewBox="0 0 2004 327" draw:points="0,0 2004,0 2004,327 0,327">
        <text:p/>
      </draw:polygon>
      <draw:polygon text:anchor-type="page" text:anchor-page-number="6" draw:z-index="4392" draw:name="Shape2195" draw:style-name="gr3" draw:text-style-name="P4" svg:width="0.7783in" svg:height="0.0102in" svg:x="5.8846in" svg:y="3.5764in" svg:viewBox="0 0 1978 27" draw:points="0,0 1978,0 1978,27 0,27">
        <text:p/>
      </draw:polygon>
      <draw:frame text:anchor-type="page" text:anchor-page-number="14" draw:z-index="4391" draw:name="Shape4787" draw:style-name="gr1" draw:text-style-name="P2" svg:width="0.1358in" svg:height="0.113in" svg:x="0.4535in" svg:y="8.8126in">
        <draw:text-box>
          <text:p><text:span text:style-name="T5">PC</text:span></text:p>
        </draw:text-box>
      </draw:frame>
      <draw:frame text:anchor-type="page" text:anchor-page-number="5" draw:z-index="4390" draw:name="Shape1568" draw:style-name="gr1" draw:text-style-name="P2" svg:width="0.0433in" svg:height="0.1925in" svg:x="2.5154in" svg:y="9.0717in">
        <draw:text-box>
          <text:p><text:span text:style-name="T2"><text:s/></text:span></text:p>
        </draw:text-box>
      </draw:frame>
      <draw:polygon text:anchor-type="page" text:anchor-page-number="5" draw:z-index="4389" draw:name="Shape1599" draw:style-name="gr2" draw:text-style-name="P3" svg:width="0.4933in" svg:height="0.1917in" svg:x="3.5614in" svg:y="9.1299in" svg:viewBox="0 0 1254 488" draw:points="0,0 1254,0 1254,488 0,488">
        <text:p/>
      </draw:polygon>
      <draw:polygon text:anchor-type="page" text:anchor-page-number="6" draw:z-index="4388" draw:name="Shape2194" draw:style-name="gr3" draw:text-style-name="P4" svg:width="0.0098in" svg:height="0.0102in" svg:x="5.8748in" svg:y="3.5764in" svg:viewBox="0 0 26 27" draw:points="0,0 26,0 26,27 0,27">
        <text:p/>
      </draw:polygon>
      <draw:frame text:anchor-type="page" text:anchor-page-number="14" draw:z-index="4387" draw:name="Shape4783" draw:style-name="gr1" draw:text-style-name="P2" svg:width="0.0433in" svg:height="0.1925in" svg:x="0.411in" svg:y="8.7516in">
        <draw:text-box>
          <text:p><text:span text:style-name="T2"><text:s/></text:span></text:p>
        </draw:text-box>
      </draw:frame>
      <draw:polygon text:anchor-type="page" text:anchor-page-number="6" draw:z-index="4386" draw:name="Shape2193" draw:style-name="gr3" draw:text-style-name="P4" svg:width="0.5799in" svg:height="0.0102in" svg:x="5.2949in" svg:y="3.5764in" svg:viewBox="0 0 1474 27" draw:points="0,0 1474,0 1474,27 0,27">
        <text:p/>
      </draw:polygon>
      <draw:frame text:anchor-type="page" text:anchor-page-number="14" draw:z-index="4385" draw:name="Shape4769" draw:style-name="gr1" draw:text-style-name="P2" svg:width="0.0433in" svg:height="0.1925in" svg:x="4.5563in" svg:y="8.6374in">
        <draw:text-box>
          <text:p><text:span text:style-name="T2"><text:s/></text:span></text:p>
        </draw:text-box>
      </draw:frame>
      <draw:polygon text:anchor-type="page" text:anchor-page-number="5" draw:z-index="4384" draw:name="Shape1598" draw:style-name="gr2" draw:text-style-name="P3" svg:width="0.5902in" svg:height="0.1917in" svg:x="3.513in" svg:y="9.1299in" svg:viewBox="0 0 1500 488" draw:points="0,0 1500,0 1500,488 0,488">
        <text:p/>
      </draw:polygon>
      <draw:polygon text:anchor-type="page" text:anchor-page-number="6" draw:z-index="4383" draw:name="Shape2192" draw:style-name="gr3" draw:text-style-name="P4" svg:width="0.0102in" svg:height="0.0102in" svg:x="5.2846in" svg:y="3.5764in" svg:viewBox="0 0 27 27" draw:points="0,0 27,0 27,27 0,27">
        <text:p/>
      </draw:polygon>
      <draw:polygon text:anchor-type="page" text:anchor-page-number="14" draw:z-index="4382" draw:name="Shape4786" draw:style-name="gr2" draw:text-style-name="P3" svg:width="0.6902in" svg:height="0.1118in" svg:x="0.4114in" svg:y="8.8114in" svg:viewBox="0 0 1754 285" draw:points="0,0 1754,0 1754,285 0,285">
        <text:p/>
      </draw:polygon>
      <draw:frame text:anchor-type="page" text:anchor-page-number="5" draw:z-index="4381" draw:name="Shape1595" draw:style-name="gr1" draw:text-style-name="P2" svg:width="0.1358in" svg:height="0.113in" svg:x="2.3799in" svg:y="9.1319in">
        <draw:text-box>
          <text:p><text:span text:style-name="T4"><text:s text:c="3"/>1</text:span></text:p>
        </draw:text-box>
      </draw:frame>
      <draw:polygon text:anchor-type="page" text:anchor-page-number="14" draw:z-index="4380" draw:name="Shape4785" draw:style-name="gr2" draw:text-style-name="P3" svg:width="0.7866in" svg:height="0.1283in" svg:x="0.363in" svg:y="8.8114in" svg:viewBox="0 0 1999 327" draw:points="0,0 1999,0 1999,327 0,327">
        <text:p/>
      </draw:polygon>
      <draw:polygon text:anchor-type="page" text:anchor-page-number="6" draw:z-index="4379" draw:name="Shape2191" draw:style-name="gr3" draw:text-style-name="P4" svg:width="1.1717in" svg:height="0.0102in" svg:x="4.113in" svg:y="3.5764in" svg:viewBox="0 0 2977 27" draw:points="0,0 2977,0 2977,27 0,27">
        <text:p/>
      </draw:polygon>
      <draw:frame text:anchor-type="page" text:anchor-page-number="5" draw:z-index="4378" draw:name="Shape1567" draw:style-name="gr1" draw:text-style-name="P2" svg:width="0.0433in" svg:height="0.1925in" svg:x="1.7866in" svg:y="9.0717in">
        <draw:text-box>
          <text:p><text:span text:style-name="T2"><text:s/></text:span></text:p>
        </draw:text-box>
      </draw:frame>
      <draw:polygon text:anchor-type="page" text:anchor-page-number="6" draw:z-index="4377" draw:name="Shape2190" draw:style-name="gr3" draw:text-style-name="P4" svg:width="0.0098in" svg:height="0.0102in" svg:x="4.1031in" svg:y="3.5764in" svg:viewBox="0 0 26 27" draw:points="0,0 26,0 26,27 0,27">
        <text:p/>
      </draw:polygon>
      <draw:polygon text:anchor-type="page" text:anchor-page-number="5" draw:z-index="4376" draw:name="Shape1594" draw:style-name="gr2" draw:text-style-name="P3" svg:width="1.0831in" svg:height="0.1114in" svg:x="2.3799in" svg:y="9.1299in" svg:viewBox="0 0 2752 284" draw:points="0,0 2752,0 2752,284 0,284">
        <text:p/>
      </draw:polygon>
      <draw:frame text:anchor-type="page" text:anchor-page-number="14" draw:z-index="4375" draw:name="Shape4782" draw:style-name="gr1" draw:text-style-name="P2" svg:width="2.587in" svg:height="0.1295in" svg:x="1.9866in" svg:y="8.6854in">
        <draw:text-box>
          <text:p><text:span text:style-name="T1">Uso generalizzato da parte di operatori professionali</text:span></text:p>
        </draw:text-box>
      </draw:frame>
      <draw:polygon text:anchor-type="page" text:anchor-page-number="6" draw:z-index="4374" draw:name="Shape2189" draw:style-name="gr3" draw:text-style-name="P4" svg:width="0.5799in" svg:height="0.0102in" svg:x="3.5232in" svg:y="3.5764in" svg:viewBox="0 0 1474 27" draw:points="0,0 1474,0 1474,27 0,27">
        <text:p/>
      </draw:polygon>
      <draw:frame text:anchor-type="page" text:anchor-page-number="14" draw:z-index="4373" draw:name="Shape4768" draw:style-name="gr1" draw:text-style-name="P2" svg:width="0.0433in" svg:height="0.1925in" svg:x="1.3547in" svg:y="8.6228in">
        <draw:text-box>
          <text:p><text:span text:style-name="T2"><text:s/></text:span></text:p>
        </draw:text-box>
      </draw:frame>
      <draw:polygon text:anchor-type="page" text:anchor-page-number="5" draw:z-index="4372" draw:name="Shape1593" draw:style-name="gr2" draw:text-style-name="P3" svg:width="1.1815in" svg:height="0.1917in" svg:x="2.3315in" svg:y="9.1299in" svg:viewBox="0 0 3002 488" draw:points="0,0 3002,0 3002,488 0,488">
        <text:p/>
      </draw:polygon>
      <draw:polygon text:anchor-type="page" text:anchor-page-number="14" draw:z-index="4371" draw:name="Shape4781" draw:style-name="gr2" draw:text-style-name="P3" svg:width="4.6264in" svg:height="0.1283in" svg:x="1.9866in" svg:y="8.6831in" svg:viewBox="0 0 11752 327" draw:points="0,0 11752,0 11752,327 0,327">
        <text:p/>
      </draw:polygon>
      <draw:polygon text:anchor-type="page" text:anchor-page-number="6" draw:z-index="4370" draw:name="Shape2188" draw:style-name="gr3" draw:text-style-name="P4" svg:width="0.0102in" svg:height="0.0102in" svg:x="3.513in" svg:y="3.5764in" svg:viewBox="0 0 27 27" draw:points="0,0 27,0 27,27 0,27">
        <text:p/>
      </draw:polygon>
      <draw:frame text:anchor-type="page" text:anchor-page-number="5" draw:z-index="4369" draw:name="Shape1591" draw:style-name="gr1" draw:text-style-name="P2" svg:width="0.1949in" svg:height="0.113in" svg:x="1.5917in" svg:y="9.1319in">
        <draw:text-box>
          <text:p><text:span text:style-name="T4">POL</text:span></text:p>
        </draw:text-box>
      </draw:frame>
      <draw:polygon text:anchor-type="page" text:anchor-page-number="14" draw:z-index="4368" draw:name="Shape4780" draw:style-name="gr2" draw:text-style-name="P3" svg:width="4.7232in" svg:height="0.1283in" svg:x="1.9382in" svg:y="8.6831in" svg:viewBox="0 0 11998 327" draw:points="0,0 11998,0 11998,327 0,327">
        <text:p/>
      </draw:polygon>
      <draw:polygon text:anchor-type="page" text:anchor-page-number="6" draw:z-index="4367" draw:name="Shape2187" draw:style-name="gr3" draw:text-style-name="P4" svg:width="1.1717in" svg:height="0.0102in" svg:x="2.3413in" svg:y="3.5764in" svg:viewBox="0 0 2977 27" draw:points="0,0 2977,0 2977,27 0,27">
        <text:p/>
      </draw:polygon>
      <draw:frame text:anchor-type="page" text:anchor-page-number="5" draw:z-index="4366" draw:name="Shape1566" draw:style-name="gr1" draw:text-style-name="P2" svg:width="0.0433in" svg:height="0.1925in" svg:x="1.0154in" svg:y="9.0717in">
        <draw:text-box>
          <text:p><text:span text:style-name="T2"><text:s/></text:span></text:p>
        </draw:text-box>
      </draw:frame>
      <draw:frame text:anchor-type="page" text:anchor-page-number="14" draw:z-index="4365" draw:name="Shape4778" draw:style-name="gr1" draw:text-style-name="P2" svg:width="0.1571in" svg:height="0.113in" svg:x="1.198in" svg:y="8.6839in">
        <draw:text-box>
          <text:p><text:span text:style-name="T5">PW</text:span></text:p>
        </draw:text-box>
      </draw:frame>
      <draw:polygon text:anchor-type="page" text:anchor-page-number="6" draw:z-index="4364" draw:name="Shape2186" draw:style-name="gr3" draw:text-style-name="P4" svg:width="0.0098in" svg:height="0.0102in" svg:x="2.3315in" svg:y="3.5764in" svg:viewBox="0 0 26 27" draw:points="0,0 26,0 26,27 0,27">
        <text:p/>
      </draw:polygon>
      <draw:polygon text:anchor-type="page" text:anchor-page-number="5" draw:z-index="4363" draw:name="Shape1590" draw:style-name="gr2" draw:text-style-name="P3" svg:width="0.6917in" svg:height="0.1114in" svg:x="1.5913in" svg:y="9.1299in" svg:viewBox="0 0 1758 284" draw:points="0,0 1758,0 1758,284 0,284">
        <text:p/>
      </draw:polygon>
      <draw:polygon text:anchor-type="page" text:anchor-page-number="6" draw:z-index="4362" draw:name="Shape2185" draw:style-name="gr3" draw:text-style-name="P4" svg:width="0.7768in" svg:height="0.0102in" svg:x="1.5547in" svg:y="3.5764in" svg:viewBox="0 0 1974 27" draw:points="0,0 1974,0 1974,27 0,27">
        <text:p/>
      </draw:polygon>
      <draw:frame text:anchor-type="page" text:anchor-page-number="14" draw:z-index="4361" draw:name="Shape4764" draw:style-name="gr1" draw:text-style-name="P2" svg:width="0.0433in" svg:height="0.1925in" svg:x="0.648in" svg:y="8.6228in">
        <draw:text-box>
          <text:p><text:span text:style-name="T2"><text:s/></text:span></text:p>
        </draw:text-box>
      </draw:frame>
      <draw:polygon text:anchor-type="page" text:anchor-page-number="5" draw:z-index="4360" draw:name="Shape1589" draw:style-name="gr2" draw:text-style-name="P3" svg:width="0.7882in" svg:height="0.1917in" svg:x="1.5433in" svg:y="9.1299in" svg:viewBox="0 0 2003 488" draw:points="0,0 2003,0 2003,488 0,488">
        <text:p/>
      </draw:polygon>
      <draw:frame text:anchor-type="page" text:anchor-page-number="5" draw:z-index="4359" draw:name="Shape1587" draw:style-name="gr1" draw:text-style-name="P2" svg:width="0.5594in" svg:height="0.113in" svg:x="0.4535in" svg:y="9.1319in">
        <draw:text-box>
          <text:p><text:span text:style-name="T4">NDS/NDSCh</text:span></text:p>
        </draw:text-box>
      </draw:frame>
      <draw:polygon text:anchor-type="page" text:anchor-page-number="14" draw:z-index="4358" draw:name="Shape4777" draw:style-name="gr2" draw:text-style-name="P3" svg:width="0.6902in" svg:height="0.1118in" svg:x="1.198in" svg:y="8.6831in" svg:viewBox="0 0 1754 285" draw:points="0,0 1754,0 1754,285 0,285">
        <text:p/>
      </draw:polygon>
      <draw:polygon text:anchor-type="page" text:anchor-page-number="6" draw:z-index="4357" draw:name="Shape2184" draw:style-name="gr3" draw:text-style-name="P4" svg:width="0.0098in" svg:height="0.0102in" svg:x="1.5449in" svg:y="3.5764in" svg:viewBox="0 0 26 27" draw:points="0,0 26,0 26,27 0,27">
        <text:p/>
      </draw:polygon>
      <draw:frame text:anchor-type="page" text:anchor-page-number="5" draw:z-index="4356" draw:name="Shape1565" draw:style-name="gr1" draw:text-style-name="P2" svg:width="0.0433in" svg:height="0.1925in" svg:x="0.411in" svg:y="9.0717in">
        <draw:text-box>
          <text:p><text:span text:style-name="T2"><text:s/></text:span></text:p>
        </draw:text-box>
      </draw:frame>
      <draw:polygon text:anchor-type="page" text:anchor-page-number="14" draw:z-index="4355" draw:name="Shape4776" draw:style-name="gr2" draw:text-style-name="P3" svg:width="0.7886in" svg:height="0.1283in" svg:x="1.15in" svg:y="8.6831in" svg:viewBox="0 0 2004 327" draw:points="0,0 2004,0 2004,327 0,327">
        <text:p/>
      </draw:polygon>
      <draw:polygon text:anchor-type="page" text:anchor-page-number="6" draw:z-index="4354" draw:name="Shape2183" draw:style-name="gr3" draw:text-style-name="P4" svg:width="1.1819in" svg:height="0.0102in" svg:x="0.363in" svg:y="3.5764in" svg:viewBox="0 0 3003 27" draw:points="0,0 3003,0 3003,27 0,27">
        <text:p/>
      </draw:polygon>
      <draw:frame text:anchor-type="page" text:anchor-page-number="6" draw:z-index="4353" draw:name="Shape2182" draw:style-name="gr1" draw:text-style-name="P2" svg:width="0.0433in" svg:height="0.1925in" svg:x="6.2846in" svg:y="3.528in">
        <draw:text-box>
          <text:p><text:span text:style-name="T2"><text:s/></text:span></text:p>
        </draw:text-box>
      </draw:frame>
      <draw:frame text:anchor-type="page" text:anchor-page-number="14" draw:z-index="4352" draw:name="Shape4774" draw:style-name="gr1" draw:text-style-name="P2" svg:width="0.1949in" svg:height="0.113in" svg:x="0.4535in" svg:y="8.6839in">
        <draw:text-box>
          <text:p><text:span text:style-name="T5">LCS</text:span></text:p>
        </draw:text-box>
      </draw:frame>
      <draw:frame text:anchor-type="page" text:anchor-page-number="5" draw:z-index="4351" draw:name="Shape1564" draw:style-name="gr1" draw:text-style-name="P2" svg:width="0.0433in" svg:height="0.1925in" svg:x="6.7098in" svg:y="8.9311in">
        <draw:text-box>
          <text:p><text:span text:style-name="T2"><text:s/></text:span></text:p>
        </draw:text-box>
      </draw:frame>
      <draw:polygon text:anchor-type="page" text:anchor-page-number="6" draw:z-index="4350" draw:name="Shape2237" draw:style-name="gr2" draw:text-style-name="P3" svg:width="1.085in" svg:height="0.1913in" svg:x="6.7098in" svg:y="3.5866in" svg:viewBox="0 0 2757 487" draw:points="0,0 2757,0 2757,487 0,487">
        <text:p/>
      </draw:polygon>
      <draw:polygon text:anchor-type="page" text:anchor-page-number="5" draw:z-index="4349" draw:name="Shape1572" draw:style-name="gr2" draw:text-style-name="P3" svg:width="1.0835in" svg:height="0.1114in" svg:x="0.4114in" svg:y="9.1299in" svg:viewBox="0 0 2753 284" draw:points="0,0 2753,0 2753,284 0,284">
        <text:p/>
      </draw:polygon>
      <draw:frame text:anchor-type="page" text:anchor-page-number="14" draw:z-index="4348" draw:name="Shape4763" draw:style-name="gr1" draw:text-style-name="P2" svg:width="0.0433in" svg:height="0.1925in" svg:x="0.411in" svg:y="8.6228in">
        <draw:text-box>
          <text:p><text:span text:style-name="T2"><text:s/></text:span></text:p>
        </draw:text-box>
      </draw:frame>
      <draw:frame text:anchor-type="page" text:anchor-page-number="14" draw:z-index="4347" draw:name="Shape4758" draw:style-name="gr1" draw:text-style-name="P2" svg:width="0.0433in" svg:height="0.1925in" svg:x="2.6846in" svg:y="8.5098in">
        <draw:text-box>
          <text:p><text:span text:style-name="T2"><text:s/></text:span></text:p>
        </draw:text-box>
      </draw:frame>
      <draw:polygon text:anchor-type="page" text:anchor-page-number="6" draw:z-index="4346" draw:name="Shape2234" draw:style-name="gr2" draw:text-style-name="P3" svg:width="1.1819in" svg:height="0.1913in" svg:x="6.6614in" svg:y="3.5866in" svg:viewBox="0 0 3003 487" draw:points="0,0 3003,0 3003,487 0,487">
        <text:p/>
      </draw:polygon>
      <draw:polygon text:anchor-type="page" text:anchor-page-number="5" draw:z-index="4345" draw:name="Shape1571" draw:style-name="gr2" draw:text-style-name="P3" svg:width="1.1803in" svg:height="0.1917in" svg:x="0.363in" svg:y="9.1299in" svg:viewBox="0 0 2999 488" draw:points="0,0 2999,0 2999,488 0,488">
        <text:p/>
      </draw:polygon>
      <draw:polygon text:anchor-type="page" text:anchor-page-number="5" draw:z-index="4344" draw:name="Shape1533" draw:style-name="gr3" draw:text-style-name="P4" svg:width="1.1717in" svg:height="0.0098in" svg:x="6.6732in" svg:y="8.9165in" svg:viewBox="0 0 2977 26" draw:points="0,0 2977,0 2977,26 0,26">
        <text:p/>
      </draw:polygon>
      <draw:frame text:anchor-type="page" text:anchor-page-number="6" draw:z-index="4343" draw:name="Shape2218" draw:style-name="gr1" draw:text-style-name="P2" svg:width="0.3614in" svg:height="0.113in" svg:x="5.9228in" svg:y="3.589in">
        <draw:text-box>
          <text:p><text:span text:style-name="T4">RESPIR</text:span></text:p>
        </draw:text-box>
      </draw:frame>
      <draw:polygon text:anchor-type="page" text:anchor-page-number="14" draw:z-index="4342" draw:name="Shape4771" draw:style-name="gr2" draw:text-style-name="P3" svg:width="0.6902in" svg:height="0.1118in" svg:x="0.4114in" svg:y="8.6831in" svg:viewBox="0 0 1754 285" draw:points="0,0 1754,0 1754,285 0,285">
        <text:p/>
      </draw:polygon>
      <draw:frame text:anchor-type="page" text:anchor-page-number="6" draw:z-index="4341" draw:name="Shape2229" draw:style-name="gr1" draw:text-style-name="P2" svg:width="0.0433in" svg:height="0.1925in" svg:x="5.3335in" svg:y="3.5898in">
        <draw:text-box>
          <text:p><text:span text:style-name="T2"><text:s/></text:span></text:p>
        </draw:text-box>
      </draw:frame>
      <draw:polygon text:anchor-type="page" text:anchor-page-number="5" draw:z-index="4340" draw:name="Shape1532" draw:style-name="gr3" draw:text-style-name="P4" svg:width="0.0102in" svg:height="0.0098in" svg:x="6.663in" svg:y="8.9165in" svg:viewBox="0 0 27 26" draw:points="0,0 27,0 27,26 0,26">
        <text:p/>
      </draw:polygon>
      <draw:polygon text:anchor-type="page" text:anchor-page-number="14" draw:z-index="4339" draw:name="Shape4770" draw:style-name="gr2" draw:text-style-name="P3" svg:width="0.7866in" svg:height="0.1283in" svg:x="0.363in" svg:y="8.6831in" svg:viewBox="0 0 1999 327" draw:points="0,0 1999,0 1999,327 0,327">
        <text:p/>
      </draw:polygon>
      <draw:frame text:anchor-type="page" text:anchor-page-number="14" draw:z-index="4338" draw:name="Shape4761" draw:style-name="gr1" draw:text-style-name="P2" svg:width="0.7039in" svg:height="0.1295in" svg:x="1.9866in" svg:y="8.5571in">
        <draw:text-box>
          <text:p><text:span text:style-name="T1">Fabbricazione</text:span></text:p>
        </draw:text-box>
      </draw:frame>
      <draw:polygon text:anchor-type="page" text:anchor-page-number="6" draw:z-index="4337" draw:name="Shape2231" draw:style-name="gr2" draw:text-style-name="P3" svg:width="0.6898in" svg:height="0.1114in" svg:x="5.9232in" svg:y="3.5866in" svg:viewBox="0 0 1753 284" draw:points="0,0 1753,0 1753,284 0,284">
        <text:p/>
      </draw:polygon>
      <draw:polygon text:anchor-type="page" text:anchor-page-number="5" draw:z-index="4336" draw:name="Shape1530" draw:style-name="gr3" draw:text-style-name="P4" svg:width="0.7783in" svg:height="0.0098in" svg:x="5.8846in" svg:y="8.9165in" svg:viewBox="0 0 1978 26" draw:points="0,0 1978,0 1978,26 0,26">
        <text:p/>
      </draw:polygon>
      <draw:frame text:anchor-type="page" text:anchor-page-number="14" draw:z-index="4335" draw:name="Shape4754" draw:style-name="gr1" draw:text-style-name="P2" svg:width="0.0433in" svg:height="0.1925in" svg:x="1.2799in" svg:y="8.4965in">
        <draw:text-box>
          <text:p><text:span text:style-name="T2"><text:s/></text:span></text:p>
        </draw:text-box>
      </draw:frame>
      <draw:polygon text:anchor-type="page" text:anchor-page-number="5" draw:z-index="4334" draw:name="Shape1529" draw:style-name="gr3" draw:text-style-name="P4" svg:width="0.0098in" svg:height="0.0098in" svg:x="5.8748in" svg:y="8.9165in" svg:viewBox="0 0 26 26" draw:points="0,0 26,0 26,26 0,26">
        <text:p/>
      </draw:polygon>
      <draw:polygon text:anchor-type="page" text:anchor-page-number="6" draw:z-index="4333" draw:name="Shape2230" draw:style-name="gr2" draw:text-style-name="P3" svg:width="0.7866in" svg:height="0.1913in" svg:x="5.8748in" svg:y="3.5866in" svg:viewBox="0 0 1999 487" draw:points="0,0 1999,0 1999,487 0,487">
        <text:p/>
      </draw:polygon>
      <draw:polygon text:anchor-type="page" text:anchor-page-number="14" draw:z-index="4332" draw:name="Shape4773" draw:style-name="gr2" draw:text-style-name="P3" svg:width="4.6264in" svg:height="0.1268in" svg:x="1.9866in" svg:y="8.5563in" svg:viewBox="0 0 11752 323" draw:points="0,0 11752,0 11752,323 0,323">
        <text:p/>
      </draw:polygon>
      <draw:frame text:anchor-type="page" text:anchor-page-number="6" draw:z-index="4331" draw:name="Shape2224" draw:style-name="gr1" draw:text-style-name="P2" svg:width="0.0433in" svg:height="0.1925in" svg:x="4.1516in" svg:y="3.5898in">
        <draw:text-box>
          <text:p><text:span text:style-name="T2"><text:s/></text:span></text:p>
        </draw:text-box>
      </draw:frame>
      <draw:polygon text:anchor-type="page" text:anchor-page-number="5" draw:z-index="4330" draw:name="Shape1524" draw:style-name="gr3" draw:text-style-name="P4" svg:width="0.5799in" svg:height="0.0098in" svg:x="5.2949in" svg:y="8.9165in" svg:viewBox="0 0 1474 26" draw:points="0,0 1474,0 1474,26 0,26">
        <text:p/>
      </draw:polygon>
      <draw:polygon text:anchor-type="page" text:anchor-page-number="14" draw:z-index="4329" draw:name="Shape4772" draw:style-name="gr2" draw:text-style-name="P3" svg:width="4.7232in" svg:height="0.1268in" svg:x="1.9382in" svg:y="8.5563in" svg:viewBox="0 0 11998 323" draw:points="0,0 11998,0 11998,323 0,323">
        <text:p/>
      </draw:polygon>
      <draw:polygon text:anchor-type="page" text:anchor-page-number="6" draw:z-index="4328" draw:name="Shape2228" draw:style-name="gr2" draw:text-style-name="P3" svg:width="0.4917in" svg:height="0.1913in" svg:x="5.3331in" svg:y="3.5866in" svg:viewBox="0 0 1250 487" draw:points="0,0 1250,0 1250,487 0,487">
        <text:p/>
      </draw:polygon>
      <draw:polygon text:anchor-type="page" text:anchor-page-number="5" draw:z-index="4327" draw:name="Shape1523" draw:style-name="gr3" draw:text-style-name="P4" svg:width="0.0102in" svg:height="0.0098in" svg:x="5.2846in" svg:y="8.9165in" svg:viewBox="0 0 27 26" draw:points="0,0 27,0 27,26 0,26">
        <text:p/>
      </draw:polygon>
      <draw:polygon text:anchor-type="page" text:anchor-page-number="6" draw:z-index="4326" draw:name="Shape2225" draw:style-name="gr2" draw:text-style-name="P3" svg:width="0.5917in" svg:height="0.1913in" svg:x="5.2831in" svg:y="3.5866in" svg:viewBox="0 0 1504 487" draw:points="0,0 1504,0 1504,487 0,487">
        <text:p/>
      </draw:polygon>
      <draw:frame text:anchor-type="page" text:anchor-page-number="14" draw:z-index="4325" draw:name="Shape4767" draw:style-name="gr1" draw:text-style-name="P2" svg:width="0.0823in" svg:height="0.113in" svg:x="1.198in" svg:y="8.5575in">
        <draw:text-box>
          <text:p><text:span text:style-name="T5">M</text:span></text:p>
        </draw:text-box>
      </draw:frame>
      <draw:polygon text:anchor-type="page" text:anchor-page-number="5" draw:z-index="4324" draw:name="Shape1519" draw:style-name="gr3" draw:text-style-name="P4" svg:width="1.1717in" svg:height="0.0098in" svg:x="4.113in" svg:y="8.9165in" svg:viewBox="0 0 2977 26" draw:points="0,0 2977,0 2977,26 0,26">
        <text:p/>
      </draw:polygon>
      <draw:frame text:anchor-type="page" text:anchor-page-number="14" draw:z-index="4323" draw:name="Shape4745" draw:style-name="gr1" draw:text-style-name="P2" svg:width="0.0433in" svg:height="0.1925in" svg:x="0.648in" svg:y="8.4965in">
        <draw:text-box>
          <text:p><text:span text:style-name="T2"><text:s/></text:span></text:p>
        </draw:text-box>
      </draw:frame>
      <draw:frame text:anchor-type="page" text:anchor-page-number="6" draw:z-index="4322" draw:name="Shape2219" draw:style-name="gr1" draw:text-style-name="P2" svg:width="0.0433in" svg:height="0.1925in" svg:x="3.561in" svg:y="3.5898in">
        <draw:text-box>
          <text:p><text:span text:style-name="T2"><text:s/></text:span></text:p>
        </draw:text-box>
      </draw:frame>
      <draw:polygon text:anchor-type="page" text:anchor-page-number="5" draw:z-index="4321" draw:name="Shape1518" draw:style-name="gr3" draw:text-style-name="P4" svg:width="0.0098in" svg:height="0.0098in" svg:x="4.1031in" svg:y="8.9165in" svg:viewBox="0 0 26 26" draw:points="0,0 26,0 26,26 0,26">
        <text:p/>
      </draw:polygon>
      <draw:polygon text:anchor-type="page" text:anchor-page-number="5" draw:z-index="4320" draw:name="Shape1513" draw:style-name="gr3" draw:text-style-name="P4" svg:width="0.5799in" svg:height="0.0098in" svg:x="3.5232in" svg:y="8.9165in" svg:viewBox="0 0 1474 26" draw:points="0,0 1474,0 1474,26 0,26">
        <text:p/>
      </draw:polygon>
      <draw:polygon text:anchor-type="page" text:anchor-page-number="6" draw:z-index="4319" draw:name="Shape2223" draw:style-name="gr2" draw:text-style-name="P3" svg:width="1.0831in" svg:height="0.1913in" svg:x="4.1516in" svg:y="3.5866in" svg:viewBox="0 0 2752 487" draw:points="0,0 2752,0 2752,487 0,487">
        <text:p/>
      </draw:polygon>
      <draw:polygon text:anchor-type="page" text:anchor-page-number="14" draw:z-index="4318" draw:name="Shape4766" draw:style-name="gr2" draw:text-style-name="P3" svg:width="0.6902in" svg:height="0.1118in" svg:x="1.198in" svg:y="8.5563in" svg:viewBox="0 0 1754 285" draw:points="0,0 1754,0 1754,285 0,285">
        <text:p/>
      </draw:polygon>
      <draw:polygon text:anchor-type="page" text:anchor-page-number="5" draw:z-index="4317" draw:name="Shape1512" draw:style-name="gr3" draw:text-style-name="P4" svg:width="0.0102in" svg:height="0.0098in" svg:x="3.513in" svg:y="8.9165in" svg:viewBox="0 0 27 26" draw:points="0,0 27,0 27,26 0,26">
        <text:p/>
      </draw:polygon>
      <draw:polygon text:anchor-type="page" text:anchor-page-number="14" draw:z-index="4316" draw:name="Shape4765" draw:style-name="gr2" draw:text-style-name="P3" svg:width="0.7886in" svg:height="0.1268in" svg:x="1.15in" svg:y="8.5563in" svg:viewBox="0 0 2004 323" draw:points="0,0 2004,0 2004,323 0,323">
        <text:p/>
      </draw:polygon>
      <draw:polygon text:anchor-type="page" text:anchor-page-number="6" draw:z-index="4315" draw:name="Shape2220" draw:style-name="gr2" draw:text-style-name="P3" svg:width="1.1799in" svg:height="0.1913in" svg:x="4.1031in" svg:y="3.5866in" svg:viewBox="0 0 2998 487" draw:points="0,0 2998,0 2998,487 0,487">
        <text:p/>
      </draw:polygon>
      <draw:polygon text:anchor-type="page" text:anchor-page-number="5" draw:z-index="4314" draw:name="Shape1510" draw:style-name="gr3" draw:text-style-name="P4" svg:width="1.1717in" svg:height="0.0098in" svg:x="2.3413in" svg:y="8.9165in" svg:viewBox="0 0 2977 26" draw:points="0,0 2977,0 2977,26 0,26">
        <text:p/>
      </draw:polygon>
      <draw:frame text:anchor-type="page" text:anchor-page-number="6" draw:z-index="4313" draw:name="Shape2169" draw:style-name="gr1" draw:text-style-name="P2" svg:width="0.0433in" svg:height="0.1925in" svg:x="2.5154in" svg:y="3.528in">
        <draw:text-box>
          <text:p><text:span text:style-name="T2"><text:s/></text:span></text:p>
        </draw:text-box>
      </draw:frame>
      <draw:frame text:anchor-type="page" text:anchor-page-number="14" draw:z-index="4312" draw:name="Shape4762" draw:style-name="gr1" draw:text-style-name="P2" svg:width="0.1949in" svg:height="0.113in" svg:x="0.4535in" svg:y="8.5575in">
        <draw:text-box>
          <text:p><text:span text:style-name="T5">LCS</text:span></text:p>
        </draw:text-box>
      </draw:frame>
      <draw:polygon text:anchor-type="page" text:anchor-page-number="5" draw:z-index="4311" draw:name="Shape1509" draw:style-name="gr3" draw:text-style-name="P4" svg:width="0.0098in" svg:height="0.0098in" svg:x="2.3315in" svg:y="8.9165in" svg:viewBox="0 0 26 26" draw:points="0,0 26,0 26,26 0,26">
        <text:p/>
      </draw:polygon>
      <draw:polygon text:anchor-type="page" text:anchor-page-number="6" draw:z-index="4310" draw:name="Shape2217" draw:style-name="gr2" draw:text-style-name="P3" svg:width="0.4933in" svg:height="0.1913in" svg:x="3.5614in" svg:y="3.5866in" svg:viewBox="0 0 1254 487" draw:points="0,0 1254,0 1254,487 0,487">
        <text:p/>
      </draw:polygon>
      <draw:frame text:anchor-type="page" text:anchor-page-number="14" draw:z-index="4309" draw:name="Shape4744" draw:style-name="gr1" draw:text-style-name="P2" svg:width="0.0433in" svg:height="0.1925in" svg:x="0.411in" svg:y="8.4965in">
        <draw:text-box>
          <text:p><text:span text:style-name="T2"><text:s/></text:span></text:p>
        </draw:text-box>
      </draw:frame>
      <draw:polygon text:anchor-type="page" text:anchor-page-number="5" draw:z-index="4308" draw:name="Shape1494" draw:style-name="gr3" draw:text-style-name="P4" svg:width="0.7768in" svg:height="0.0098in" svg:x="1.5547in" svg:y="8.9165in" svg:viewBox="0 0 1974 26" draw:points="0,0 1974,0 1974,26 0,26">
        <text:p/>
      </draw:polygon>
      <draw:polygon text:anchor-type="page" text:anchor-page-number="6" draw:z-index="4307" draw:name="Shape2214" draw:style-name="gr2" draw:text-style-name="P3" svg:width="0.5902in" svg:height="0.1913in" svg:x="3.513in" svg:y="3.5866in" svg:viewBox="0 0 1500 487" draw:points="0,0 1500,0 1500,487 0,487">
        <text:p/>
      </draw:polygon>
      <draw:frame text:anchor-type="page" text:anchor-page-number="14" draw:z-index="4306" draw:name="Shape4742" draw:style-name="gr1" draw:text-style-name="P2" svg:width="0.0433in" svg:height="0.1925in" svg:x="3.2154in" svg:y="8.3835in">
        <draw:text-box>
          <text:p><text:span text:style-name="T2"><text:s/></text:span></text:p>
        </draw:text-box>
      </draw:frame>
      <draw:polygon text:anchor-type="page" text:anchor-page-number="14" draw:z-index="4305" draw:name="Shape4760" draw:style-name="gr2" draw:text-style-name="P3" svg:width="0.6902in" svg:height="0.1118in" svg:x="0.4114in" svg:y="8.5563in" svg:viewBox="0 0 1754 285" draw:points="0,0 1754,0 1754,285 0,285">
        <text:p/>
      </draw:polygon>
      <draw:polygon text:anchor-type="page" text:anchor-page-number="5" draw:z-index="4304" draw:name="Shape1493" draw:style-name="gr3" draw:text-style-name="P4" svg:width="0.0098in" svg:height="0.0098in" svg:x="1.5449in" svg:y="8.9165in" svg:viewBox="0 0 26 26" draw:points="0,0 26,0 26,26 0,26">
        <text:p/>
      </draw:polygon>
      <draw:frame text:anchor-type="page" text:anchor-page-number="6" draw:z-index="4303" draw:name="Shape2211" draw:style-name="gr1" draw:text-style-name="P2" svg:width="0.1358in" svg:height="0.113in" svg:x="2.3799in" svg:y="3.589in">
        <draw:text-box>
          <text:p><text:span text:style-name="T4"><text:s text:c="3"/>4</text:span></text:p>
        </draw:text-box>
      </draw:frame>
      <draw:polygon text:anchor-type="page" text:anchor-page-number="14" draw:z-index="4302" draw:name="Shape4759" draw:style-name="gr2" draw:text-style-name="P3" svg:width="0.7866in" svg:height="0.1268in" svg:x="0.363in" svg:y="8.5563in" svg:viewBox="0 0 1999 323" draw:points="0,0 1999,0 1999,323 0,323">
        <text:p/>
      </draw:polygon>
      <draw:frame text:anchor-type="page" text:anchor-page-number="6" draw:z-index="4301" draw:name="Shape2165" draw:style-name="gr1" draw:text-style-name="P2" svg:width="0.0433in" svg:height="0.1925in" svg:x="1.8016in" svg:y="3.528in">
        <draw:text-box>
          <text:p><text:span text:style-name="T2"><text:s/></text:span></text:p>
        </draw:text-box>
      </draw:frame>
      <draw:polygon text:anchor-type="page" text:anchor-page-number="5" draw:z-index="4300" draw:name="Shape1489" draw:style-name="gr3" draw:text-style-name="P4" svg:width="1.1819in" svg:height="0.0098in" svg:x="0.363in" svg:y="8.9165in" svg:viewBox="0 0 3003 26" draw:points="0,0 3003,0 3003,26 0,26">
        <text:p/>
      </draw:polygon>
      <draw:frame text:anchor-type="page" text:anchor-page-number="5" draw:z-index="4299" draw:name="Shape1540" draw:style-name="gr1" draw:text-style-name="P2" svg:width="0.0433in" svg:height="0.1925in" svg:x="6.2693in" svg:y="8.8693in">
        <draw:text-box>
          <text:p><text:span text:style-name="T2"><text:s/></text:span></text:p>
        </draw:text-box>
      </draw:frame>
      <draw:polygon text:anchor-type="page" text:anchor-page-number="6" draw:z-index="4298" draw:name="Shape2210" draw:style-name="gr2" draw:text-style-name="P3" svg:width="1.0831in" svg:height="0.1114in" svg:x="2.3799in" svg:y="3.5866in" svg:viewBox="0 0 2752 284" draw:points="0,0 2752,0 2752,284 0,284">
        <text:p/>
      </draw:polygon>
      <draw:frame text:anchor-type="page" text:anchor-page-number="14" draw:z-index="4297" draw:name="Shape4757" draw:style-name="gr1" draw:text-style-name="P2" svg:width="1.2386in" svg:height="0.1295in" svg:x="1.9866in" svg:y="8.4307in">
        <draw:text-box>
          <text:p><text:span text:style-name="T1">Uso presso siti industriali</text:span></text:p>
        </draw:text-box>
      </draw:frame>
      <draw:polygon text:anchor-type="page" text:anchor-page-number="6" draw:z-index="4296" draw:name="Shape2209" draw:style-name="gr2" draw:text-style-name="P3" svg:width="1.1815in" svg:height="0.1913in" svg:x="2.3315in" svg:y="3.5866in" svg:viewBox="0 0 3002 487" draw:points="0,0 3002,0 3002,487 0,487">
        <text:p/>
      </draw:polygon>
      <draw:polygon text:anchor-type="page" text:anchor-page-number="5" draw:z-index="4295" draw:name="Shape1563" draw:style-name="gr2" draw:text-style-name="P3" svg:width="1.085in" svg:height="0.1917in" svg:x="6.7098in" svg:y="8.928in" svg:viewBox="0 0 2757 488" draw:points="0,0 2757,0 2757,488 0,488">
        <text:p/>
      </draw:polygon>
      <draw:frame text:anchor-type="page" text:anchor-page-number="14" draw:z-index="4294" draw:name="Shape4741" draw:style-name="gr1" draw:text-style-name="P2" svg:width="0.0433in" svg:height="0.1925in" svg:x="1.2898in" svg:y="8.3681in">
        <draw:text-box>
          <text:p><text:span text:style-name="T2"><text:s/></text:span></text:p>
        </draw:text-box>
      </draw:frame>
      <draw:polygon text:anchor-type="page" text:anchor-page-number="5" draw:z-index="4293" draw:name="Shape1562" draw:style-name="gr2" draw:text-style-name="P3" svg:width="1.1819in" svg:height="0.1917in" svg:x="6.6614in" svg:y="8.928in" svg:viewBox="0 0 3003 488" draw:points="0,0 3003,0 3003,488 0,488">
        <text:p/>
      </draw:polygon>
      <draw:frame text:anchor-type="page" text:anchor-page-number="6" draw:z-index="4292" draw:name="Shape2208" draw:style-name="gr1" draw:text-style-name="P2" svg:width="0.2106in" svg:height="0.113in" svg:x="1.5917in" svg:y="3.589in">
        <draw:text-box>
          <text:p><text:span text:style-name="T4">GBR</text:span></text:p>
        </draw:text-box>
      </draw:frame>
      <draw:polygon text:anchor-type="page" text:anchor-page-number="14" draw:z-index="4291" draw:name="Shape4756" draw:style-name="gr2" draw:text-style-name="P3" svg:width="4.6264in" svg:height="0.128in" svg:x="1.9866in" svg:y="8.4283in" svg:viewBox="0 0 11752 326" draw:points="0,0 11752,0 11752,326 0,326">
        <text:p/>
      </draw:polygon>
      <draw:frame text:anchor-type="page" text:anchor-page-number="5" draw:z-index="4290" draw:name="Shape1552" draw:style-name="gr1" draw:text-style-name="P2" svg:width="0.3449in" svg:height="0.113in" svg:x="5.9228in" svg:y="8.9307in">
        <draw:text-box>
          <text:p><text:span text:style-name="T4">INALAB</text:span></text:p>
        </draw:text-box>
      </draw:frame>
      <draw:polygon text:anchor-type="page" text:anchor-page-number="14" draw:z-index="4289" draw:name="Shape4755" draw:style-name="gr2" draw:text-style-name="P3" svg:width="4.7232in" svg:height="0.1283in" svg:x="1.9382in" svg:y="8.428in" svg:viewBox="0 0 11998 327" draw:points="0,0 11998,0 11998,327 0,327">
        <text:p/>
      </draw:polygon>
      <draw:frame text:anchor-type="page" text:anchor-page-number="6" draw:z-index="4288" draw:name="Shape2202" draw:style-name="gr1" draw:text-style-name="P2" svg:width="0.0433in" svg:height="0.1925in" svg:x="0.6634in" svg:y="3.528in">
        <draw:text-box>
          <text:p><text:span text:style-name="T2"><text:s/></text:span></text:p>
        </draw:text-box>
      </draw:frame>
      <draw:polygon text:anchor-type="page" text:anchor-page-number="6" draw:z-index="4287" draw:name="Shape2207" draw:style-name="gr2" draw:text-style-name="P3" svg:width="0.6917in" svg:height="0.1114in" svg:x="1.5913in" svg:y="3.5866in" svg:viewBox="0 0 1758 284" draw:points="0,0 1758,0 1758,284 0,284">
        <text:p/>
      </draw:polygon>
      <draw:frame text:anchor-type="page" text:anchor-page-number="5" draw:z-index="4286" draw:name="Shape1559" draw:style-name="gr1" draw:text-style-name="P2" svg:width="0.0433in" svg:height="0.1925in" svg:x="5.3335in" svg:y="8.9311in">
        <draw:text-box>
          <text:p><text:span text:style-name="T2"><text:s/></text:span></text:p>
        </draw:text-box>
      </draw:frame>
      <draw:frame text:anchor-type="page" text:anchor-page-number="14" draw:z-index="4285" draw:name="Shape4753" draw:style-name="gr1" draw:text-style-name="P2" svg:width="0.0925in" svg:height="0.113in" svg:x="1.198in" svg:y="8.4291in">
        <draw:text-box>
          <text:p><text:span text:style-name="T5">IS</text:span></text:p>
        </draw:text-box>
      </draw:frame>
      <draw:frame text:anchor-type="page" text:anchor-page-number="14" draw:z-index="4284" draw:name="Shape4737" draw:style-name="gr1" draw:text-style-name="P2" svg:width="0.0433in" svg:height="0.1925in" svg:x="0.648in" svg:y="8.3681in">
        <draw:text-box>
          <text:p><text:span text:style-name="T2"><text:s/></text:span></text:p>
        </draw:text-box>
      </draw:frame>
      <draw:polygon text:anchor-type="page" text:anchor-page-number="5" draw:z-index="4283" draw:name="Shape1561" draw:style-name="gr2" draw:text-style-name="P3" svg:width="0.6898in" svg:height="0.1118in" svg:x="5.9232in" svg:y="8.928in" svg:viewBox="0 0 1753 285" draw:points="0,0 1753,0 1753,285 0,285">
        <text:p/>
      </draw:polygon>
      <draw:polygon text:anchor-type="page" text:anchor-page-number="6" draw:z-index="4282" draw:name="Shape2206" draw:style-name="gr2" draw:text-style-name="P3" svg:width="0.7882in" svg:height="0.1913in" svg:x="1.5433in" svg:y="3.5866in" svg:viewBox="0 0 2003 487" draw:points="0,0 2003,0 2003,487 0,487">
        <text:p/>
      </draw:polygon>
      <draw:polygon text:anchor-type="page" text:anchor-page-number="5" draw:z-index="4281" draw:name="Shape1560" draw:style-name="gr2" draw:text-style-name="P3" svg:width="0.7866in" svg:height="0.1917in" svg:x="5.8748in" svg:y="8.928in" svg:viewBox="0 0 1999 488" draw:points="0,0 1999,0 1999,488 0,488">
        <text:p/>
      </draw:polygon>
      <draw:polygon text:anchor-type="page" text:anchor-page-number="14" draw:z-index="4280" draw:name="Shape4747" draw:style-name="gr2" draw:text-style-name="P3" svg:width="0.6902in" svg:height="0.1118in" svg:x="1.198in" svg:y="8.428in" svg:viewBox="0 0 1754 285" draw:points="0,0 1754,0 1754,285 0,285">
        <text:p/>
      </draw:polygon>
      <draw:frame text:anchor-type="page" text:anchor-page-number="6" draw:z-index="4279" draw:name="Shape2205" draw:style-name="gr1" draw:text-style-name="P2" svg:width="0.2106in" svg:height="0.113in" svg:x="0.4516in" svg:y="3.589in">
        <draw:text-box>
          <text:p><text:span text:style-name="T4">WEL</text:span></text:p>
        </draw:text-box>
      </draw:frame>
      <draw:frame text:anchor-type="page" text:anchor-page-number="6" draw:z-index="4278" draw:name="Shape2201" draw:style-name="gr1" draw:text-style-name="P2" svg:width="0.0433in" svg:height="0.1925in" svg:x="0.411in" svg:y="3.528in">
        <draw:text-box>
          <text:p><text:span text:style-name="T2"><text:s/></text:span></text:p>
        </draw:text-box>
      </draw:frame>
      <draw:frame text:anchor-type="page" text:anchor-page-number="5" draw:z-index="4277" draw:name="Shape1556" draw:style-name="gr1" draw:text-style-name="P2" svg:width="0.0433in" svg:height="0.1925in" svg:x="4.1516in" svg:y="8.9311in">
        <draw:text-box>
          <text:p><text:span text:style-name="T2"><text:s/></text:span></text:p>
        </draw:text-box>
      </draw:frame>
      <draw:polygon text:anchor-type="page" text:anchor-page-number="14" draw:z-index="4276" draw:name="Shape4746" draw:style-name="gr2" draw:text-style-name="P3" svg:width="0.7886in" svg:height="0.1283in" svg:x="1.15in" svg:y="8.428in" svg:viewBox="0 0 2004 327" draw:points="0,0 2004,0 2004,327 0,327">
        <text:p/>
      </draw:polygon>
      <draw:frame text:anchor-type="page" text:anchor-page-number="6" draw:z-index="4275" draw:name="Shape2200" draw:style-name="gr1" draw:text-style-name="P2" svg:width="0.0433in" svg:height="0.1925in" svg:x="6.7098in" svg:y="3.3874in">
        <draw:text-box>
          <text:p><text:span text:style-name="T2"><text:s/></text:span></text:p>
        </draw:text-box>
      </draw:frame>
      <draw:polygon text:anchor-type="page" text:anchor-page-number="5" draw:z-index="4274" draw:name="Shape1558" draw:style-name="gr2" draw:text-style-name="P3" svg:width="0.4917in" svg:height="0.1917in" svg:x="5.3331in" svg:y="8.928in" svg:viewBox="0 0 1250 488" draw:points="0,0 1250,0 1250,488 0,488">
        <text:p/>
      </draw:polygon>
      <draw:frame text:anchor-type="page" text:anchor-page-number="14" draw:z-index="4273" draw:name="Shape4752" draw:style-name="gr1" draw:text-style-name="P2" svg:width="0.1949in" svg:height="0.113in" svg:x="0.4535in" svg:y="8.4291in">
        <draw:text-box>
          <text:p><text:span text:style-name="T5">LCS</text:span></text:p>
        </draw:text-box>
      </draw:frame>
      <draw:polygon text:anchor-type="page" text:anchor-page-number="5" draw:z-index="4272" draw:name="Shape1557" draw:style-name="gr2" draw:text-style-name="P3" svg:width="0.5917in" svg:height="0.1917in" svg:x="5.2831in" svg:y="8.928in" svg:viewBox="0 0 1504 488" draw:points="0,0 1504,0 1504,488 0,488">
        <text:p/>
      </draw:polygon>
      <draw:frame text:anchor-type="page" text:anchor-page-number="14" draw:z-index="4271" draw:name="Shape4736" draw:style-name="gr1" draw:text-style-name="P2" svg:width="0.0433in" svg:height="0.1925in" svg:x="0.411in" svg:y="8.3681in">
        <draw:text-box>
          <text:p><text:span text:style-name="T2"><text:s/></text:span></text:p>
        </draw:text-box>
      </draw:frame>
      <draw:polygon text:anchor-type="page" text:anchor-page-number="6" draw:z-index="4270" draw:name="Shape2204" draw:style-name="gr2" draw:text-style-name="P3" svg:width="1.0835in" svg:height="0.1114in" svg:x="0.4114in" svg:y="3.5866in" svg:viewBox="0 0 2753 284" draw:points="0,0 2753,0 2753,284 0,284">
        <text:p/>
      </draw:polygon>
      <draw:frame text:anchor-type="page" text:anchor-page-number="14" draw:z-index="4269" draw:name="Shape4730" draw:style-name="gr1" draw:text-style-name="P2" svg:width="0.0433in" svg:height="0.1925in" svg:x="3.4453in" svg:y="8.2547in">
        <draw:text-box>
          <text:p><text:span text:style-name="T2"><text:s/></text:span></text:p>
        </draw:text-box>
      </draw:frame>
      <draw:frame text:anchor-type="page" text:anchor-page-number="5" draw:z-index="4268" draw:name="Shape1553" draw:style-name="gr1" draw:text-style-name="P2" svg:width="0.0433in" svg:height="0.1925in" svg:x="3.561in" svg:y="8.9311in">
        <draw:text-box>
          <text:p><text:span text:style-name="T2"><text:s/></text:span></text:p>
        </draw:text-box>
      </draw:frame>
      <draw:polygon text:anchor-type="page" text:anchor-page-number="6" draw:z-index="4267" draw:name="Shape2203" draw:style-name="gr2" draw:text-style-name="P3" svg:width="1.1803in" svg:height="0.1913in" svg:x="0.363in" svg:y="3.5866in" svg:viewBox="0 0 2999 487" draw:points="0,0 2999,0 2999,487 0,487">
        <text:p/>
      </draw:polygon>
      <draw:polygon text:anchor-type="page" text:anchor-page-number="14" draw:z-index="4266" draw:name="Shape4743" draw:style-name="gr2" draw:text-style-name="P3" svg:width="0.6902in" svg:height="0.1118in" svg:x="0.4114in" svg:y="8.428in" svg:viewBox="0 0 1754 285" draw:points="0,0 1754,0 1754,285 0,285">
        <text:p/>
      </draw:polygon>
      <draw:polygon text:anchor-type="page" text:anchor-page-number="6" draw:z-index="4265" draw:name="Shape2160" draw:style-name="gr3" draw:text-style-name="P4" svg:width="1.1717in" svg:height="0.0098in" svg:x="6.6732in" svg:y="3.3748in" svg:viewBox="0 0 2977 26" draw:points="0,0 2977,0 2977,26 0,26">
        <text:p/>
      </draw:polygon>
      <draw:polygon text:anchor-type="page" text:anchor-page-number="5" draw:z-index="4264" draw:name="Shape1555" draw:style-name="gr2" draw:text-style-name="P3" svg:width="1.0831in" svg:height="0.1917in" svg:x="4.1516in" svg:y="8.928in" svg:viewBox="0 0 2752 488" draw:points="0,0 2752,0 2752,488 0,488">
        <text:p/>
      </draw:polygon>
      <draw:polygon text:anchor-type="page" text:anchor-page-number="6" draw:z-index="4263" draw:name="Shape2159" draw:style-name="gr3" draw:text-style-name="P4" svg:width="0.0102in" svg:height="0.0098in" svg:x="6.663in" svg:y="3.3748in" svg:viewBox="0 0 27 26" draw:points="0,0 27,0 27,26 0,26">
        <text:p/>
      </draw:polygon>
      <draw:polygon text:anchor-type="page" text:anchor-page-number="14" draw:z-index="4262" draw:name="Shape4751" draw:style-name="gr2" draw:text-style-name="P3" svg:width="0.7866in" svg:height="0.1283in" svg:x="0.363in" svg:y="8.428in" svg:viewBox="0 0 1999 327" draw:points="0,0 1999,0 1999,327 0,327">
        <text:p/>
      </draw:polygon>
      <draw:polygon text:anchor-type="page" text:anchor-page-number="5" draw:z-index="4261" draw:name="Shape1554" draw:style-name="gr2" draw:text-style-name="P3" svg:width="1.1799in" svg:height="0.1917in" svg:x="4.1031in" svg:y="8.928in" svg:viewBox="0 0 2998 488" draw:points="0,0 2998,0 2998,488 0,488">
        <text:p/>
      </draw:polygon>
      <draw:frame text:anchor-type="page" text:anchor-page-number="5" draw:z-index="4260" draw:name="Shape1539" draw:style-name="gr1" draw:text-style-name="P2" svg:width="0.0433in" svg:height="0.1925in" svg:x="2.5154in" svg:y="8.8693in">
        <draw:text-box>
          <text:p><text:span text:style-name="T2"><text:s/></text:span></text:p>
        </draw:text-box>
      </draw:frame>
      <draw:frame text:anchor-type="page" text:anchor-page-number="14" draw:z-index="4259" draw:name="Shape4750" draw:style-name="gr1" draw:text-style-name="P2" svg:width="1.4685in" svg:height="0.1295in" svg:x="1.9866in" svg:y="8.302in">
        <draw:text-box>
          <text:p><text:span text:style-name="T1">Formulazione o reimballaggio</text:span></text:p>
        </draw:text-box>
      </draw:frame>
      <draw:polygon text:anchor-type="page" text:anchor-page-number="6" draw:z-index="4258" draw:name="Shape2158" draw:style-name="gr3" draw:text-style-name="P4" svg:width="0.7783in" svg:height="0.0098in" svg:x="5.8846in" svg:y="3.3748in" svg:viewBox="0 0 1978 26" draw:points="0,0 1978,0 1978,26 0,26">
        <text:p/>
      </draw:polygon>
      <draw:polygon text:anchor-type="page" text:anchor-page-number="6" draw:z-index="4257" draw:name="Shape2157" draw:style-name="gr3" draw:text-style-name="P4" svg:width="0.0098in" svg:height="0.0098in" svg:x="5.8748in" svg:y="3.3748in" svg:viewBox="0 0 26 26" draw:points="0,0 26,0 26,26 0,26">
        <text:p/>
      </draw:polygon>
      <draw:frame text:anchor-type="page" text:anchor-page-number="14" draw:z-index="4256" draw:name="Shape4729" draw:style-name="gr1" draw:text-style-name="P2" svg:width="0.0433in" svg:height="0.1925in" svg:x="1.2583in" svg:y="8.2398in">
        <draw:text-box>
          <text:p><text:span text:style-name="T2"><text:s/></text:span></text:p>
        </draw:text-box>
      </draw:frame>
      <draw:polygon text:anchor-type="page" text:anchor-page-number="5" draw:z-index="4255" draw:name="Shape1551" draw:style-name="gr2" draw:text-style-name="P3" svg:width="0.4933in" svg:height="0.1917in" svg:x="3.5614in" svg:y="8.928in" svg:viewBox="0 0 1254 488" draw:points="0,0 1254,0 1254,488 0,488">
        <text:p/>
      </draw:polygon>
      <draw:polygon text:anchor-type="page" text:anchor-page-number="14" draw:z-index="4254" draw:name="Shape4749" draw:style-name="gr2" draw:text-style-name="P3" svg:width="4.6264in" svg:height="0.1283in" svg:x="1.9866in" svg:y="8.3in" svg:viewBox="0 0 11752 327" draw:points="0,0 11752,0 11752,327 0,327">
        <text:p/>
      </draw:polygon>
      <draw:polygon text:anchor-type="page" text:anchor-page-number="5" draw:z-index="4253" draw:name="Shape1550" draw:style-name="gr2" draw:text-style-name="P3" svg:width="0.5902in" svg:height="0.1917in" svg:x="3.513in" svg:y="8.928in" svg:viewBox="0 0 1500 488" draw:points="0,0 1500,0 1500,488 0,488">
        <text:p/>
      </draw:polygon>
      <draw:polygon text:anchor-type="page" text:anchor-page-number="6" draw:z-index="4252" draw:name="Shape2156" draw:style-name="gr3" draw:text-style-name="P4" svg:width="0.5799in" svg:height="0.0098in" svg:x="5.2949in" svg:y="3.3748in" svg:viewBox="0 0 1474 26" draw:points="0,0 1474,0 1474,26 0,26">
        <text:p/>
      </draw:polygon>
      <draw:polygon text:anchor-type="page" text:anchor-page-number="6" draw:z-index="4251" draw:name="Shape2155" draw:style-name="gr3" draw:text-style-name="P4" svg:width="0.0102in" svg:height="0.0098in" svg:x="5.2846in" svg:y="3.3748in" svg:viewBox="0 0 27 26" draw:points="0,0 27,0 27,26 0,26">
        <text:p/>
      </draw:polygon>
      <draw:frame text:anchor-type="page" text:anchor-page-number="5" draw:z-index="4250" draw:name="Shape1549" draw:style-name="gr1" draw:text-style-name="P2" svg:width="0.1358in" svg:height="0.113in" svg:x="2.3799in" svg:y="8.9307in">
        <draw:text-box>
          <text:p><text:span text:style-name="T4"><text:s text:c="3"/>4</text:span></text:p>
        </draw:text-box>
      </draw:frame>
      <draw:polygon text:anchor-type="page" text:anchor-page-number="14" draw:z-index="4249" draw:name="Shape4748" draw:style-name="gr2" draw:text-style-name="P3" svg:width="4.7232in" svg:height="0.1283in" svg:x="1.9382in" svg:y="8.3in" svg:viewBox="0 0 11998 327" draw:points="0,0 11998,0 11998,327 0,327">
        <text:p/>
      </draw:polygon>
      <draw:frame text:anchor-type="page" text:anchor-page-number="5" draw:z-index="4248" draw:name="Shape1538" draw:style-name="gr1" draw:text-style-name="P2" svg:width="0.0433in" svg:height="0.1925in" svg:x="1.7866in" svg:y="8.8693in">
        <draw:text-box>
          <text:p><text:span text:style-name="T2"><text:s/></text:span></text:p>
        </draw:text-box>
      </draw:frame>
      <draw:polygon text:anchor-type="page" text:anchor-page-number="6" draw:z-index="4247" draw:name="Shape2154" draw:style-name="gr3" draw:text-style-name="P4" svg:width="1.1717in" svg:height="0.0098in" svg:x="4.113in" svg:y="3.3748in" svg:viewBox="0 0 2977 26" draw:points="0,0 2977,0 2977,26 0,26">
        <text:p/>
      </draw:polygon>
      <draw:frame text:anchor-type="page" text:anchor-page-number="14" draw:z-index="4246" draw:name="Shape4740" draw:style-name="gr1" draw:text-style-name="P2" svg:width="0.0606in" svg:height="0.113in" svg:x="1.198in" svg:y="8.3008in">
        <draw:text-box>
          <text:p><text:span text:style-name="T5">F</text:span></text:p>
        </draw:text-box>
      </draw:frame>
      <draw:polygon text:anchor-type="page" text:anchor-page-number="5" draw:z-index="4245" draw:name="Shape1548" draw:style-name="gr2" draw:text-style-name="P3" svg:width="1.0831in" svg:height="0.1118in" svg:x="2.3799in" svg:y="8.928in" svg:viewBox="0 0 2752 285" draw:points="0,0 2752,0 2752,285 0,285">
        <text:p/>
      </draw:polygon>
      <draw:polygon text:anchor-type="page" text:anchor-page-number="6" draw:z-index="4244" draw:name="Shape2153" draw:style-name="gr3" draw:text-style-name="P4" svg:width="0.0098in" svg:height="0.0098in" svg:x="4.1031in" svg:y="3.3748in" svg:viewBox="0 0 26 26" draw:points="0,0 26,0 26,26 0,26">
        <text:p/>
      </draw:polygon>
      <draw:frame text:anchor-type="page" text:anchor-page-number="14" draw:z-index="4243" draw:name="Shape4728" draw:style-name="gr1" draw:text-style-name="P2" svg:width="0.0433in" svg:height="0.1925in" svg:x="0.648in" svg:y="8.2398in">
        <draw:text-box>
          <text:p><text:span text:style-name="T2"><text:s/></text:span></text:p>
        </draw:text-box>
      </draw:frame>
      <draw:polygon text:anchor-type="page" text:anchor-page-number="14" draw:z-index="4242" draw:name="Shape4739" draw:style-name="gr2" draw:text-style-name="P3" svg:width="0.6902in" svg:height="0.1134in" svg:x="1.198in" svg:y="8.3in" svg:viewBox="0 0 1754 289" draw:points="0,0 1754,0 1754,289 0,289">
        <text:p/>
      </draw:polygon>
      <draw:polygon text:anchor-type="page" text:anchor-page-number="5" draw:z-index="4241" draw:name="Shape1547" draw:style-name="gr2" draw:text-style-name="P3" svg:width="1.1815in" svg:height="0.1917in" svg:x="2.3315in" svg:y="8.928in" svg:viewBox="0 0 3002 488" draw:points="0,0 3002,0 3002,488 0,488">
        <text:p/>
      </draw:polygon>
      <draw:polygon text:anchor-type="page" text:anchor-page-number="6" draw:z-index="4240" draw:name="Shape2152" draw:style-name="gr3" draw:text-style-name="P4" svg:width="0.5799in" svg:height="0.0098in" svg:x="3.5232in" svg:y="3.3748in" svg:viewBox="0 0 1474 26" draw:points="0,0 1474,0 1474,26 0,26">
        <text:p/>
      </draw:polygon>
      <draw:polygon text:anchor-type="page" text:anchor-page-number="14" draw:z-index="4239" draw:name="Shape4738" draw:style-name="gr2" draw:text-style-name="P3" svg:width="0.7886in" svg:height="0.1283in" svg:x="1.15in" svg:y="8.3in" svg:viewBox="0 0 2004 327" draw:points="0,0 2004,0 2004,327 0,327">
        <text:p/>
      </draw:polygon>
      <draw:frame text:anchor-type="page" text:anchor-page-number="5" draw:z-index="4238" draw:name="Shape1546" draw:style-name="gr1" draw:text-style-name="P2" svg:width="0.1949in" svg:height="0.113in" svg:x="1.5917in" svg:y="8.9307in">
        <draw:text-box>
          <text:p><text:span text:style-name="T4">POL</text:span></text:p>
        </draw:text-box>
      </draw:frame>
      <draw:polygon text:anchor-type="page" text:anchor-page-number="6" draw:z-index="4237" draw:name="Shape2151" draw:style-name="gr3" draw:text-style-name="P4" svg:width="0.0102in" svg:height="0.0098in" svg:x="3.513in" svg:y="3.3748in" svg:viewBox="0 0 27 26" draw:points="0,0 27,0 27,26 0,26">
        <text:p/>
      </draw:polygon>
      <draw:frame text:anchor-type="page" text:anchor-page-number="5" draw:z-index="4236" draw:name="Shape1537" draw:style-name="gr1" draw:text-style-name="P2" svg:width="0.0433in" svg:height="0.1925in" svg:x="1.0154in" svg:y="8.8693in">
        <draw:text-box>
          <text:p><text:span text:style-name="T2"><text:s/></text:span></text:p>
        </draw:text-box>
      </draw:frame>
      <draw:frame text:anchor-type="page" text:anchor-page-number="14" draw:z-index="4235" draw:name="Shape4735" draw:style-name="gr1" draw:text-style-name="P2" svg:width="0.1949in" svg:height="0.113in" svg:x="0.4535in" svg:y="8.3008in">
        <draw:text-box>
          <text:p><text:span text:style-name="T5">LCS</text:span></text:p>
        </draw:text-box>
      </draw:frame>
      <draw:polygon text:anchor-type="page" text:anchor-page-number="6" draw:z-index="4234" draw:name="Shape2150" draw:style-name="gr3" draw:text-style-name="P4" svg:width="1.1717in" svg:height="0.0098in" svg:x="2.3413in" svg:y="3.3748in" svg:viewBox="0 0 2977 26" draw:points="0,0 2977,0 2977,26 0,26">
        <text:p/>
      </draw:polygon>
      <draw:polygon text:anchor-type="page" text:anchor-page-number="5" draw:z-index="4233" draw:name="Shape1545" draw:style-name="gr2" draw:text-style-name="P3" svg:width="0.6917in" svg:height="0.1118in" svg:x="1.5913in" svg:y="8.928in" svg:viewBox="0 0 1758 285" draw:points="0,0 1758,0 1758,285 0,285">
        <text:p/>
      </draw:polygon>
      <draw:frame text:anchor-type="page" text:anchor-page-number="14" draw:z-index="4232" draw:name="Shape4727" draw:style-name="gr1" draw:text-style-name="P2" svg:width="0.0433in" svg:height="0.1925in" svg:x="0.411in" svg:y="8.2398in">
        <draw:text-box>
          <text:p><text:span text:style-name="T2"><text:s/></text:span></text:p>
        </draw:text-box>
      </draw:frame>
      <draw:polygon text:anchor-type="page" text:anchor-page-number="6" draw:z-index="4231" draw:name="Shape2149" draw:style-name="gr3" draw:text-style-name="P4" svg:width="0.0098in" svg:height="0.0098in" svg:x="2.3315in" svg:y="3.3748in" svg:viewBox="0 0 26 26" draw:points="0,0 26,0 26,26 0,26">
        <text:p/>
      </draw:polygon>
      <draw:polygon text:anchor-type="page" text:anchor-page-number="5" draw:z-index="4230" draw:name="Shape1544" draw:style-name="gr2" draw:text-style-name="P3" svg:width="0.7882in" svg:height="0.1917in" svg:x="1.5433in" svg:y="8.928in" svg:viewBox="0 0 2003 488" draw:points="0,0 2003,0 2003,488 0,488">
        <text:p/>
      </draw:polygon>
      <draw:polygon text:anchor-type="page" text:anchor-page-number="6" draw:z-index="4229" draw:name="Shape2148" draw:style-name="gr3" draw:text-style-name="P4" svg:width="0.7768in" svg:height="0.0098in" svg:x="1.5547in" svg:y="3.3748in" svg:viewBox="0 0 1974 26" draw:points="0,0 1974,0 1974,26 0,26">
        <text:p/>
      </draw:polygon>
      <draw:frame text:anchor-type="page" text:anchor-page-number="14" draw:z-index="4228" draw:name="Shape4719" draw:style-name="gr1" draw:text-style-name="P2" svg:width="0.0433in" svg:height="0.1925in" svg:x="2.7835in" svg:y="8.1264in">
        <draw:text-box>
          <text:p><text:span text:style-name="T2"><text:s/></text:span></text:p>
        </draw:text-box>
      </draw:frame>
      <draw:polygon text:anchor-type="page" text:anchor-page-number="14" draw:z-index="4227" draw:name="Shape4732" draw:style-name="gr2" draw:text-style-name="P3" svg:width="0.6902in" svg:height="0.1134in" svg:x="0.4114in" svg:y="8.3in" svg:viewBox="0 0 1754 289" draw:points="0,0 1754,0 1754,289 0,289">
        <text:p/>
      </draw:polygon>
      <draw:polygon text:anchor-type="page" text:anchor-page-number="6" draw:z-index="4226" draw:name="Shape2147" draw:style-name="gr3" draw:text-style-name="P4" svg:width="0.0098in" svg:height="0.0098in" svg:x="1.5449in" svg:y="3.3748in" svg:viewBox="0 0 26 26" draw:points="0,0 26,0 26,26 0,26">
        <text:p/>
      </draw:polygon>
      <draw:frame text:anchor-type="page" text:anchor-page-number="5" draw:z-index="4225" draw:name="Shape1543" draw:style-name="gr1" draw:text-style-name="P2" svg:width="0.5594in" svg:height="0.113in" svg:x="0.4535in" svg:y="8.9307in">
        <draw:text-box>
          <text:p><text:span text:style-name="T4">NDS/NDSCh</text:span></text:p>
        </draw:text-box>
      </draw:frame>
      <draw:polygon text:anchor-type="page" text:anchor-page-number="14" draw:z-index="4224" draw:name="Shape4731" draw:style-name="gr2" draw:text-style-name="P3" svg:width="0.7866in" svg:height="0.1283in" svg:x="0.363in" svg:y="8.3in" svg:viewBox="0 0 1999 327" draw:points="0,0 1999,0 1999,327 0,327">
        <text:p/>
      </draw:polygon>
      <draw:polygon text:anchor-type="page" text:anchor-page-number="6" draw:z-index="4223" draw:name="Shape2144" draw:style-name="gr3" draw:text-style-name="P4" svg:width="1.1819in" svg:height="0.0098in" svg:x="0.363in" svg:y="3.3748in" svg:viewBox="0 0 3003 26" draw:points="0,0 3003,0 3003,26 0,26">
        <text:p/>
      </draw:polygon>
      <draw:frame text:anchor-type="page" text:anchor-page-number="5" draw:z-index="4222" draw:name="Shape1536" draw:style-name="gr1" draw:text-style-name="P2" svg:width="0.0433in" svg:height="0.1925in" svg:x="0.411in" svg:y="8.8693in">
        <draw:text-box>
          <text:p><text:span text:style-name="T2"><text:s/></text:span></text:p>
        </draw:text-box>
      </draw:frame>
      <draw:frame text:anchor-type="page" text:anchor-page-number="6" draw:z-index="4221" draw:name="Shape2143" draw:style-name="gr1" draw:text-style-name="P2" svg:width="0.0433in" svg:height="0.1925in" svg:x="6.2693in" svg:y="3.3264in">
        <draw:text-box>
          <text:p><text:span text:style-name="T2"><text:s/></text:span></text:p>
        </draw:text-box>
      </draw:frame>
      <draw:frame text:anchor-type="page" text:anchor-page-number="14" draw:z-index="4220" draw:name="Shape4722" draw:style-name="gr1" draw:text-style-name="P2" svg:width="0.8031in" svg:height="0.1295in" svg:x="1.9866in" svg:y="8.1736in">
        <draw:text-box>
          <text:p><text:span text:style-name="T1">Uso al consumo</text:span></text:p>
        </draw:text-box>
      </draw:frame>
      <draw:frame text:anchor-type="page" text:anchor-page-number="5" draw:z-index="4219" draw:name="Shape1535" draw:style-name="gr1" draw:text-style-name="P2" svg:width="0.0433in" svg:height="0.1925in" svg:x="6.7098in" svg:y="8.728in">
        <draw:text-box>
          <text:p><text:span text:style-name="T2"><text:s/></text:span></text:p>
        </draw:text-box>
      </draw:frame>
      <draw:polygon text:anchor-type="page" text:anchor-page-number="6" draw:z-index="4218" draw:name="Shape2199" draw:style-name="gr2" draw:text-style-name="P3" svg:width="1.085in" svg:height="0.1917in" svg:x="6.7098in" svg:y="3.3846in" svg:viewBox="0 0 2757 488" draw:points="0,0 2757,0 2757,488 0,488">
        <text:p/>
      </draw:polygon>
      <draw:polygon text:anchor-type="page" text:anchor-page-number="5" draw:z-index="4217" draw:name="Shape1542" draw:style-name="gr2" draw:text-style-name="P3" svg:width="1.0835in" svg:height="0.1118in" svg:x="0.4114in" svg:y="8.928in" svg:viewBox="0 0 2753 285" draw:points="0,0 2753,0 2753,285 0,285">
        <text:p/>
      </draw:polygon>
      <draw:frame text:anchor-type="page" text:anchor-page-number="14" draw:z-index="4216" draw:name="Shape4711" draw:style-name="gr1" draw:text-style-name="P2" svg:width="0.0433in" svg:height="0.1925in" svg:x="1.2681in" svg:y="8.1134in">
        <draw:text-box>
          <text:p><text:span text:style-name="T2"><text:s/></text:span></text:p>
        </draw:text-box>
      </draw:frame>
      <draw:polygon text:anchor-type="page" text:anchor-page-number="14" draw:z-index="4215" draw:name="Shape4734" draw:style-name="gr2" draw:text-style-name="P3" svg:width="4.6264in" svg:height="0.1264in" svg:x="1.9866in" svg:y="8.1732in" svg:viewBox="0 0 11752 322" draw:points="0,0 11752,0 11752,322 0,322">
        <text:p/>
      </draw:polygon>
      <draw:polygon text:anchor-type="page" text:anchor-page-number="6" draw:z-index="4214" draw:name="Shape2196" draw:style-name="gr2" draw:text-style-name="P3" svg:width="1.1819in" svg:height="0.1917in" svg:x="6.6614in" svg:y="3.3846in" svg:viewBox="0 0 3003 488" draw:points="0,0 3003,0 3003,488 0,488">
        <text:p/>
      </draw:polygon>
      <draw:polygon text:anchor-type="page" text:anchor-page-number="5" draw:z-index="4213" draw:name="Shape1541" draw:style-name="gr2" draw:text-style-name="P3" svg:width="1.1803in" svg:height="0.1917in" svg:x="0.363in" svg:y="8.928in" svg:viewBox="0 0 2999 488" draw:points="0,0 2999,0 2999,488 0,488">
        <text:p/>
      </draw:polygon>
      <draw:polygon text:anchor-type="page" text:anchor-page-number="14" draw:z-index="4212" draw:name="Shape4733" draw:style-name="gr2" draw:text-style-name="P3" svg:width="4.7232in" svg:height="0.1264in" svg:x="1.9382in" svg:y="8.1732in" svg:viewBox="0 0 11998 322" draw:points="0,0 11998,0 11998,322 0,322">
        <text:p/>
      </draw:polygon>
      <draw:polygon text:anchor-type="page" text:anchor-page-number="5" draw:z-index="4211" draw:name="Shape1507" draw:style-name="gr3" draw:text-style-name="P4" svg:width="1.1717in" svg:height="0.0098in" svg:x="6.6732in" svg:y="8.715in" svg:viewBox="0 0 2977 26" draw:points="0,0 2977,0 2977,26 0,26">
        <text:p/>
      </draw:polygon>
      <draw:frame text:anchor-type="page" text:anchor-page-number="6" draw:z-index="4210" draw:name="Shape2172" draw:style-name="gr1" draw:text-style-name="P2" svg:width="0.3449in" svg:height="0.113in" svg:x="5.9228in" svg:y="3.3874in">
        <draw:text-box>
          <text:p><text:span text:style-name="T4">INALAB</text:span></text:p>
        </draw:text-box>
      </draw:frame>
      <draw:frame text:anchor-type="page" text:anchor-page-number="14" draw:z-index="4209" draw:name="Shape4726" draw:style-name="gr1" draw:text-style-name="P2" svg:width="0.0713in" svg:height="0.113in" svg:x="1.198in" svg:y="8.1744in">
        <draw:text-box>
          <text:p><text:span text:style-name="T5">C</text:span></text:p>
        </draw:text-box>
      </draw:frame>
      <draw:polygon text:anchor-type="page" text:anchor-page-number="5" draw:z-index="4208" draw:name="Shape1506" draw:style-name="gr3" draw:text-style-name="P4" svg:width="0.0102in" svg:height="0.0098in" svg:x="6.663in" svg:y="8.715in" svg:viewBox="0 0 27 26" draw:points="0,0 27,0 27,26 0,26">
        <text:p/>
      </draw:polygon>
      <draw:frame text:anchor-type="page" text:anchor-page-number="6" draw:z-index="4207" draw:name="Shape2179" draw:style-name="gr1" draw:text-style-name="P2" svg:width="0.0433in" svg:height="0.1925in" svg:x="5.3335in" svg:y="3.3874in">
        <draw:text-box>
          <text:p><text:span text:style-name="T2"><text:s/></text:span></text:p>
        </draw:text-box>
      </draw:frame>
      <draw:polygon text:anchor-type="page" text:anchor-page-number="5" draw:z-index="4206" draw:name="Shape1505" draw:style-name="gr3" draw:text-style-name="P4" svg:width="0.7783in" svg:height="0.0098in" svg:x="5.8846in" svg:y="8.715in" svg:viewBox="0 0 1978 26" draw:points="0,0 1978,0 1978,26 0,26">
        <text:p/>
      </draw:polygon>
      <draw:frame text:anchor-type="page" text:anchor-page-number="14" draw:z-index="4205" draw:name="Shape4708" draw:style-name="gr1" draw:text-style-name="P2" svg:width="0.0433in" svg:height="0.1925in" svg:x="0.648in" svg:y="8.1134in">
        <draw:text-box>
          <text:p><text:span text:style-name="T2"><text:s/></text:span></text:p>
        </draw:text-box>
      </draw:frame>
      <draw:polygon text:anchor-type="page" text:anchor-page-number="6" draw:z-index="4204" draw:name="Shape2181" draw:style-name="gr2" draw:text-style-name="P3" svg:width="0.6898in" svg:height="0.1118in" svg:x="5.9232in" svg:y="3.3846in" svg:viewBox="0 0 1753 285" draw:points="0,0 1753,0 1753,285 0,285">
        <text:p/>
      </draw:polygon>
      <draw:polygon text:anchor-type="page" text:anchor-page-number="14" draw:z-index="4203" draw:name="Shape4725" draw:style-name="gr2" draw:text-style-name="P3" svg:width="0.6902in" svg:height="0.1114in" svg:x="1.198in" svg:y="8.1732in" svg:viewBox="0 0 1754 284" draw:points="0,0 1754,0 1754,284 0,284">
        <text:p/>
      </draw:polygon>
      <draw:polygon text:anchor-type="page" text:anchor-page-number="5" draw:z-index="4202" draw:name="Shape1504" draw:style-name="gr3" draw:text-style-name="P4" svg:width="0.0098in" svg:height="0.0098in" svg:x="5.8748in" svg:y="8.715in" svg:viewBox="0 0 26 26" draw:points="0,0 26,0 26,26 0,26">
        <text:p/>
      </draw:polygon>
      <draw:polygon text:anchor-type="page" text:anchor-page-number="6" draw:z-index="4201" draw:name="Shape2180" draw:style-name="gr2" draw:text-style-name="P3" svg:width="0.7866in" svg:height="0.1917in" svg:x="5.8748in" svg:y="3.3846in" svg:viewBox="0 0 1999 488" draw:points="0,0 1999,0 1999,488 0,488">
        <text:p/>
      </draw:polygon>
      <draw:polygon text:anchor-type="page" text:anchor-page-number="5" draw:z-index="4200" draw:name="Shape1503" draw:style-name="gr3" draw:text-style-name="P4" svg:width="0.5799in" svg:height="0.0098in" svg:x="5.2949in" svg:y="8.715in" svg:viewBox="0 0 1474 26" draw:points="0,0 1474,0 1474,26 0,26">
        <text:p/>
      </draw:polygon>
      <draw:frame text:anchor-type="page" text:anchor-page-number="6" draw:z-index="4199" draw:name="Shape2176" draw:style-name="gr1" draw:text-style-name="P2" svg:width="0.0433in" svg:height="0.1925in" svg:x="4.1516in" svg:y="3.3874in">
        <draw:text-box>
          <text:p><text:span text:style-name="T2"><text:s/></text:span></text:p>
        </draw:text-box>
      </draw:frame>
      <draw:polygon text:anchor-type="page" text:anchor-page-number="14" draw:z-index="4198" draw:name="Shape4724" draw:style-name="gr2" draw:text-style-name="P3" svg:width="0.7886in" svg:height="0.1264in" svg:x="1.15in" svg:y="8.1732in" svg:viewBox="0 0 2004 322" draw:points="0,0 2004,0 2004,322 0,322">
        <text:p/>
      </draw:polygon>
      <draw:polygon text:anchor-type="page" text:anchor-page-number="6" draw:z-index="4197" draw:name="Shape2178" draw:style-name="gr2" draw:text-style-name="P3" svg:width="0.4917in" svg:height="0.1917in" svg:x="5.3331in" svg:y="3.3846in" svg:viewBox="0 0 1250 488" draw:points="0,0 1250,0 1250,488 0,488">
        <text:p/>
      </draw:polygon>
      <draw:polygon text:anchor-type="page" text:anchor-page-number="5" draw:z-index="4196" draw:name="Shape1502" draw:style-name="gr3" draw:text-style-name="P4" svg:width="0.0102in" svg:height="0.0098in" svg:x="5.2846in" svg:y="8.715in" svg:viewBox="0 0 27 26" draw:points="0,0 27,0 27,26 0,26">
        <text:p/>
      </draw:polygon>
      <draw:frame text:anchor-type="page" text:anchor-page-number="14" draw:z-index="4195" draw:name="Shape4723" draw:style-name="gr1" draw:text-style-name="P2" svg:width="0.1949in" svg:height="0.113in" svg:x="0.4535in" svg:y="8.1744in">
        <draw:text-box>
          <text:p><text:span text:style-name="T5">LCS</text:span></text:p>
        </draw:text-box>
      </draw:frame>
      <draw:polygon text:anchor-type="page" text:anchor-page-number="6" draw:z-index="4194" draw:name="Shape2177" draw:style-name="gr2" draw:text-style-name="P3" svg:width="0.5917in" svg:height="0.1917in" svg:x="5.2831in" svg:y="3.3846in" svg:viewBox="0 0 1504 488" draw:points="0,0 1504,0 1504,488 0,488">
        <text:p/>
      </draw:polygon>
      <draw:frame text:anchor-type="page" text:anchor-page-number="14" draw:z-index="4193" draw:name="Shape4718" draw:style-name="gr1" draw:text-style-name="P2" svg:width="0.0433in" svg:height="0.1925in" svg:x="0.411in" svg:y="8.1134in">
        <draw:text-box>
          <text:p><text:span text:style-name="T2"><text:s/></text:span></text:p>
        </draw:text-box>
      </draw:frame>
      <draw:polygon text:anchor-type="page" text:anchor-page-number="5" draw:z-index="4192" draw:name="Shape1501" draw:style-name="gr3" draw:text-style-name="P4" svg:width="1.1717in" svg:height="0.0098in" svg:x="4.113in" svg:y="8.715in" svg:viewBox="0 0 2977 26" draw:points="0,0 2977,0 2977,26 0,26">
        <text:p/>
      </draw:polygon>
      <draw:frame text:anchor-type="page" text:anchor-page-number="6" draw:z-index="4191" draw:name="Shape2173" draw:style-name="gr1" draw:text-style-name="P2" svg:width="0.0433in" svg:height="0.1925in" svg:x="3.561in" svg:y="3.3874in">
        <draw:text-box>
          <text:p><text:span text:style-name="T2"><text:s/></text:span></text:p>
        </draw:text-box>
      </draw:frame>
      <draw:frame text:anchor-type="page" text:anchor-page-number="14" draw:z-index="4190" draw:name="Shape4715" draw:style-name="gr1" draw:text-style-name="P2" svg:width="0.0433in" svg:height="0.1925in" svg:x="3.8811in" svg:y="7.9992in">
        <draw:text-box>
          <text:p><text:span text:style-name="T2"><text:s/></text:span></text:p>
        </draw:text-box>
      </draw:frame>
      <draw:polygon text:anchor-type="page" text:anchor-page-number="5" draw:z-index="4189" draw:name="Shape1500" draw:style-name="gr3" draw:text-style-name="P4" svg:width="0.0098in" svg:height="0.0098in" svg:x="4.1031in" svg:y="8.715in" svg:viewBox="0 0 26 26" draw:points="0,0 26,0 26,26 0,26">
        <text:p/>
      </draw:polygon>
      <draw:polygon text:anchor-type="page" text:anchor-page-number="14" draw:z-index="4188" draw:name="Shape4721" draw:style-name="gr2" draw:text-style-name="P3" svg:width="0.6902in" svg:height="0.1114in" svg:x="0.4114in" svg:y="8.1732in" svg:viewBox="0 0 1754 284" draw:points="0,0 1754,0 1754,284 0,284">
        <text:p/>
      </draw:polygon>
      <draw:polygon text:anchor-type="page" text:anchor-page-number="5" draw:z-index="4187" draw:name="Shape1499" draw:style-name="gr3" draw:text-style-name="P4" svg:width="0.5799in" svg:height="0.0098in" svg:x="3.5232in" svg:y="8.715in" svg:viewBox="0 0 1474 26" draw:points="0,0 1474,0 1474,26 0,26">
        <text:p/>
      </draw:polygon>
      <draw:polygon text:anchor-type="page" text:anchor-page-number="6" draw:z-index="4186" draw:name="Shape2175" draw:style-name="gr2" draw:text-style-name="P3" svg:width="1.0831in" svg:height="0.1917in" svg:x="4.1516in" svg:y="3.3846in" svg:viewBox="0 0 2752 488" draw:points="0,0 2752,0 2752,488 0,488">
        <text:p/>
      </draw:polygon>
      <draw:polygon text:anchor-type="page" text:anchor-page-number="14" draw:z-index="4185" draw:name="Shape4720" draw:style-name="gr2" draw:text-style-name="P3" svg:width="0.7866in" svg:height="0.1264in" svg:x="0.363in" svg:y="8.1732in" svg:viewBox="0 0 1999 322" draw:points="0,0 1999,0 1999,322 0,322">
        <text:p/>
      </draw:polygon>
      <draw:polygon text:anchor-type="page" text:anchor-page-number="6" draw:z-index="4184" draw:name="Shape2174" draw:style-name="gr2" draw:text-style-name="P3" svg:width="1.1799in" svg:height="0.1917in" svg:x="4.1031in" svg:y="3.3846in" svg:viewBox="0 0 2998 488" draw:points="0,0 2998,0 2998,488 0,488">
        <text:p/>
      </draw:polygon>
      <draw:polygon text:anchor-type="page" text:anchor-page-number="5" draw:z-index="4183" draw:name="Shape1498" draw:style-name="gr3" draw:text-style-name="P4" svg:width="0.0102in" svg:height="0.0098in" svg:x="3.513in" svg:y="8.715in" svg:viewBox="0 0 27 26" draw:points="0,0 27,0 27,26 0,26">
        <text:p/>
      </draw:polygon>
      <draw:frame text:anchor-type="page" text:anchor-page-number="6" draw:z-index="4182" draw:name="Shape2142" draw:style-name="gr1" draw:text-style-name="P2" svg:width="0.0433in" svg:height="0.1925in" svg:x="2.5417in" svg:y="3.3264in">
        <draw:text-box>
          <text:p><text:span text:style-name="T2"><text:s/></text:span></text:p>
        </draw:text-box>
      </draw:frame>
      <draw:polygon text:anchor-type="page" text:anchor-page-number="5" draw:z-index="4181" draw:name="Shape1496" draw:style-name="gr3" draw:text-style-name="P4" svg:width="1.1717in" svg:height="0.0098in" svg:x="2.3413in" svg:y="8.715in" svg:viewBox="0 0 2977 26" draw:points="0,0 2977,0 2977,26 0,26">
        <text:p/>
      </draw:polygon>
      <draw:frame text:anchor-type="page" text:anchor-page-number="14" draw:z-index="4180" draw:name="Shape4717" draw:style-name="gr1" draw:text-style-name="P2" svg:width="1.9094in" svg:height="0.1295in" svg:x="1.9866in" svg:y="8.0472in">
        <draw:text-box>
          <text:p><text:span text:style-name="T1">superficie di un articolo, uso in esterni)</text:span></text:p>
        </draw:text-box>
      </draw:frame>
      <draw:frame text:anchor-type="page" text:anchor-page-number="14" draw:z-index="4179" draw:name="Shape4714" draw:style-name="gr1" draw:text-style-name="P2" svg:width="4.5512in" svg:height="0.1295in" svg:x="1.9866in" svg:y="7.9189in">
        <draw:text-box>
          <text:p><text:span text:style-name="T1">Uso generalizzato di coadiuvanti tecnologici non reattivi (senza inclusione all`interno o sulla </text:span></text:p>
        </draw:text-box>
      </draw:frame>
      <draw:polygon text:anchor-type="page" text:anchor-page-number="5" draw:z-index="4178" draw:name="Shape1480" draw:style-name="gr3" draw:text-style-name="P4" svg:width="0.0098in" svg:height="0.0098in" svg:x="2.3315in" svg:y="8.715in" svg:viewBox="0 0 26 26" draw:points="0,0 26,0 26,26 0,26">
        <text:p/>
      </draw:polygon>
      <draw:polygon text:anchor-type="page" text:anchor-page-number="6" draw:z-index="4177" draw:name="Shape2171" draw:style-name="gr2" draw:text-style-name="P3" svg:width="0.4933in" svg:height="0.1917in" svg:x="3.5614in" svg:y="3.3846in" svg:viewBox="0 0 1254 488" draw:points="0,0 1254,0 1254,488 0,488">
        <text:p/>
      </draw:polygon>
      <draw:polygon text:anchor-type="page" text:anchor-page-number="5" draw:z-index="4176" draw:name="Shape1479" draw:style-name="gr3" draw:text-style-name="P4" svg:width="0.7768in" svg:height="0.0098in" svg:x="1.5547in" svg:y="8.715in" svg:viewBox="0 0 1974 26" draw:points="0,0 1974,0 1974,26 0,26">
        <text:p/>
      </draw:polygon>
      <draw:polygon text:anchor-type="page" text:anchor-page-number="14" draw:z-index="4175" draw:name="Shape4716" draw:style-name="gr2" draw:text-style-name="P3" svg:width="4.6264in" svg:height="0.1283in" svg:x="1.9866in" svg:y="8.0449in" svg:viewBox="0 0 11752 327" draw:points="0,0 11752,0 11752,327 0,327">
        <text:p/>
      </draw:polygon>
      <draw:polygon text:anchor-type="page" text:anchor-page-number="6" draw:z-index="4174" draw:name="Shape2170" draw:style-name="gr2" draw:text-style-name="P3" svg:width="0.5902in" svg:height="0.1917in" svg:x="3.513in" svg:y="3.3846in" svg:viewBox="0 0 1500 488" draw:points="0,0 1500,0 1500,488 0,488">
        <text:p/>
      </draw:polygon>
      <draw:polygon text:anchor-type="page" text:anchor-page-number="5" draw:z-index="4173" draw:name="Shape1478" draw:style-name="gr3" draw:text-style-name="P4" svg:width="0.0098in" svg:height="0.0098in" svg:x="1.5449in" svg:y="8.715in" svg:viewBox="0 0 26 26" draw:points="0,0 26,0 26,26 0,26">
        <text:p/>
      </draw:polygon>
      <draw:frame text:anchor-type="page" text:anchor-page-number="6" draw:z-index="4172" draw:name="Shape2168" draw:style-name="gr1" draw:text-style-name="P2" svg:width="0.163in" svg:height="0.113in" svg:x="2.3799in" svg:y="3.3874in">
        <draw:text-box>
          <text:p><text:span text:style-name="T4"><text:s text:c="2"/>10</text:span></text:p>
        </draw:text-box>
      </draw:frame>
      <draw:frame text:anchor-type="page" text:anchor-page-number="14" draw:z-index="4171" draw:name="Shape4698" draw:style-name="gr1" draw:text-style-name="P2" svg:width="0.0433in" svg:height="0.1925in" svg:x="1.311in" svg:y="7.8563in">
        <draw:text-box>
          <text:p><text:span text:style-name="T2"><text:s/></text:span></text:p>
        </draw:text-box>
      </draw:frame>
      <draw:frame text:anchor-type="page" text:anchor-page-number="6" draw:z-index="4170" draw:name="Shape2141" draw:style-name="gr1" draw:text-style-name="P2" svg:width="0.0433in" svg:height="0.1925in" svg:x="1.8016in" svg:y="3.3264in">
        <draw:text-box>
          <text:p><text:span text:style-name="T2"><text:s/></text:span></text:p>
        </draw:text-box>
      </draw:frame>
      <draw:polygon text:anchor-type="page" text:anchor-page-number="5" draw:z-index="4169" draw:name="Shape1477" draw:style-name="gr3" draw:text-style-name="P4" svg:width="1.1819in" svg:height="0.0098in" svg:x="0.363in" svg:y="8.715in" svg:viewBox="0 0 3003 26" draw:points="0,0 3003,0 3003,26 0,26">
        <text:p/>
      </draw:polygon>
      <draw:polygon text:anchor-type="page" text:anchor-page-number="14" draw:z-index="4168" draw:name="Shape4713" draw:style-name="gr2" draw:text-style-name="P3" svg:width="4.6264in" svg:height="0.1283in" svg:x="1.9866in" svg:y="7.9165in" svg:viewBox="0 0 11752 327" draw:points="0,0 11752,0 11752,327 0,327">
        <text:p/>
      </draw:polygon>
      <draw:polygon text:anchor-type="page" text:anchor-page-number="14" draw:z-index="4167" draw:name="Shape4712" draw:style-name="gr2" draw:text-style-name="P3" svg:width="4.7232in" svg:height="0.2567in" svg:x="1.9382in" svg:y="7.9165in" svg:viewBox="0 0 11998 653" draw:points="0,0 11998,0 11998,653 0,653">
        <text:p/>
      </draw:polygon>
      <draw:polygon text:anchor-type="page" text:anchor-page-number="6" draw:z-index="4166" draw:name="Shape2167" draw:style-name="gr2" draw:text-style-name="P3" svg:width="1.0831in" svg:height="0.1118in" svg:x="2.3799in" svg:y="3.3846in" svg:viewBox="0 0 2752 285" draw:points="0,0 2752,0 2752,285 0,285">
        <text:p/>
      </draw:polygon>
      <draw:frame text:anchor-type="page" text:anchor-page-number="5" draw:z-index="4165" draw:name="Shape1476" draw:style-name="gr1" draw:text-style-name="P2" svg:width="0.0433in" svg:height="0.1925in" svg:x="6.2846in" svg:y="8.6661in">
        <draw:text-box>
          <text:p><text:span text:style-name="T2"><text:s/></text:span></text:p>
        </draw:text-box>
      </draw:frame>
      <draw:frame text:anchor-type="page" text:anchor-page-number="14" draw:z-index="4164" draw:name="Shape4710" draw:style-name="gr1" draw:text-style-name="P2" svg:width="0.1142in" svg:height="0.113in" svg:x="1.198in" svg:y="7.9173in">
        <draw:text-box>
          <text:p><text:span text:style-name="T5">8d</text:span></text:p>
        </draw:text-box>
      </draw:frame>
      <draw:polygon text:anchor-type="page" text:anchor-page-number="5" draw:z-index="4163" draw:name="Shape1534" draw:style-name="gr2" draw:text-style-name="P3" svg:width="1.085in" svg:height="0.1917in" svg:x="6.7098in" svg:y="8.7248in" svg:viewBox="0 0 2757 488" draw:points="0,0 2757,0 2757,488 0,488">
        <text:p/>
      </draw:polygon>
      <draw:polygon text:anchor-type="page" text:anchor-page-number="6" draw:z-index="4162" draw:name="Shape2166" draw:style-name="gr2" draw:text-style-name="P3" svg:width="1.1815in" svg:height="0.1917in" svg:x="2.3315in" svg:y="3.3846in" svg:viewBox="0 0 3002 488" draw:points="0,0 3002,0 3002,488 0,488">
        <text:p/>
      </draw:polygon>
      <draw:frame text:anchor-type="page" text:anchor-page-number="14" draw:z-index="4161" draw:name="Shape4697" draw:style-name="gr1" draw:text-style-name="P2" svg:width="0.0433in" svg:height="0.1925in" svg:x="0.6583in" svg:y="7.8563in">
        <draw:text-box>
          <text:p><text:span text:style-name="T2"><text:s/></text:span></text:p>
        </draw:text-box>
      </draw:frame>
      <draw:frame text:anchor-type="page" text:anchor-page-number="6" draw:z-index="4160" draw:name="Shape2164" draw:style-name="gr1" draw:text-style-name="P2" svg:width="0.2106in" svg:height="0.113in" svg:x="1.5917in" svg:y="3.3874in">
        <draw:text-box>
          <text:p><text:span text:style-name="T4">GBR</text:span></text:p>
        </draw:text-box>
      </draw:frame>
      <draw:polygon text:anchor-type="page" text:anchor-page-number="5" draw:z-index="4159" draw:name="Shape1531" draw:style-name="gr2" draw:text-style-name="P3" svg:width="1.1819in" svg:height="0.1917in" svg:x="6.6614in" svg:y="8.7248in" svg:viewBox="0 0 3003 488" draw:points="0,0 3003,0 3003,488 0,488">
        <text:p/>
      </draw:polygon>
      <draw:frame text:anchor-type="page" text:anchor-page-number="6" draw:z-index="4158" draw:name="Shape2140" draw:style-name="gr1" draw:text-style-name="P2" svg:width="0.0433in" svg:height="0.1925in" svg:x="0.6634in" svg:y="3.3264in">
        <draw:text-box>
          <text:p><text:span text:style-name="T2"><text:s/></text:span></text:p>
        </draw:text-box>
      </draw:frame>
      <draw:polygon text:anchor-type="page" text:anchor-page-number="14" draw:z-index="4157" draw:name="Shape4704" draw:style-name="gr2" draw:text-style-name="P3" svg:width="0.6902in" svg:height="0.1134in" svg:x="1.198in" svg:y="7.9165in" svg:viewBox="0 0 1754 289" draw:points="0,0 1754,0 1754,289 0,289">
        <text:p/>
      </draw:polygon>
      <draw:frame text:anchor-type="page" text:anchor-page-number="5" draw:z-index="4156" draw:name="Shape1515" draw:style-name="gr1" draw:text-style-name="P2" svg:width="0.3614in" svg:height="0.113in" svg:x="5.9228in" svg:y="8.7272in">
        <draw:text-box>
          <text:p><text:span text:style-name="T4">RESPIR</text:span></text:p>
        </draw:text-box>
      </draw:frame>
      <draw:frame text:anchor-type="page" text:anchor-page-number="5" draw:z-index="4155" draw:name="Shape1526" draw:style-name="gr1" draw:text-style-name="P2" svg:width="0.0433in" svg:height="0.1925in" svg:x="5.3335in" svg:y="8.728in">
        <draw:text-box>
          <text:p><text:span text:style-name="T2"><text:s/></text:span></text:p>
        </draw:text-box>
      </draw:frame>
      <draw:polygon text:anchor-type="page" text:anchor-page-number="6" draw:z-index="4154" draw:name="Shape2163" draw:style-name="gr2" draw:text-style-name="P3" svg:width="0.6917in" svg:height="0.1118in" svg:x="1.5913in" svg:y="3.3846in" svg:viewBox="0 0 1758 285" draw:points="0,0 1758,0 1758,285 0,285">
        <text:p/>
      </draw:polygon>
      <draw:polygon text:anchor-type="page" text:anchor-page-number="14" draw:z-index="4153" draw:name="Shape4709" draw:style-name="gr2" draw:text-style-name="P3" svg:width="0.7886in" svg:height="0.2567in" svg:x="1.15in" svg:y="7.9165in" svg:viewBox="0 0 2004 653" draw:points="0,0 2004,0 2004,653 0,653">
        <text:p/>
      </draw:polygon>
      <draw:polygon text:anchor-type="page" text:anchor-page-number="6" draw:z-index="4152" draw:name="Shape2162" draw:style-name="gr2" draw:text-style-name="P3" svg:width="0.7882in" svg:height="0.1917in" svg:x="1.5433in" svg:y="3.3846in" svg:viewBox="0 0 2003 488" draw:points="0,0 2003,0 2003,488 0,488">
        <text:p/>
      </draw:polygon>
      <draw:polygon text:anchor-type="page" text:anchor-page-number="5" draw:z-index="4151" draw:name="Shape1528" draw:style-name="gr2" draw:text-style-name="P3" svg:width="0.6898in" svg:height="0.1118in" svg:x="5.9232in" svg:y="8.7248in" svg:viewBox="0 0 1753 285" draw:points="0,0 1753,0 1753,285 0,285">
        <text:p/>
      </draw:polygon>
      <draw:frame text:anchor-type="page" text:anchor-page-number="14" draw:z-index="4150" draw:name="Shape4707" draw:style-name="gr1" draw:text-style-name="P2" svg:width="0.2051in" svg:height="0.113in" svg:x="0.4535in" svg:y="7.9173in">
        <draw:text-box>
          <text:p><text:span text:style-name="T5">ERC</text:span></text:p>
        </draw:text-box>
      </draw:frame>
      <draw:frame text:anchor-type="page" text:anchor-page-number="14" draw:z-index="4149" draw:name="Shape4696" draw:style-name="gr1" draw:text-style-name="P2" svg:width="0.0433in" svg:height="0.1925in" svg:x="0.411in" svg:y="7.8563in">
        <draw:text-box>
          <text:p><text:span text:style-name="T2"><text:s/></text:span></text:p>
        </draw:text-box>
      </draw:frame>
      <draw:frame text:anchor-type="page" text:anchor-page-number="6" draw:z-index="4148" draw:name="Shape2161" draw:style-name="gr1" draw:text-style-name="P2" svg:width="0.2106in" svg:height="0.113in" svg:x="0.4516in" svg:y="3.3874in">
        <draw:text-box>
          <text:p><text:span text:style-name="T4">WEL</text:span></text:p>
        </draw:text-box>
      </draw:frame>
      <draw:polygon text:anchor-type="page" text:anchor-page-number="5" draw:z-index="4147" draw:name="Shape1527" draw:style-name="gr2" draw:text-style-name="P3" svg:width="0.7866in" svg:height="0.1917in" svg:x="5.8748in" svg:y="8.7248in" svg:viewBox="0 0 1999 488" draw:points="0,0 1999,0 1999,488 0,488">
        <text:p/>
      </draw:polygon>
      <draw:frame text:anchor-type="page" text:anchor-page-number="6" draw:z-index="4146" draw:name="Shape2139" draw:style-name="gr1" draw:text-style-name="P2" svg:width="0.0433in" svg:height="0.1925in" svg:x="0.411in" svg:y="3.3264in">
        <draw:text-box>
          <text:p><text:span text:style-name="T2"><text:s/></text:span></text:p>
        </draw:text-box>
      </draw:frame>
      <draw:frame text:anchor-type="page" text:anchor-page-number="5" draw:z-index="4145" draw:name="Shape1521" draw:style-name="gr1" draw:text-style-name="P2" svg:width="0.0433in" svg:height="0.1925in" svg:x="4.1516in" svg:y="8.728in">
        <draw:text-box>
          <text:p><text:span text:style-name="T2"><text:s/></text:span></text:p>
        </draw:text-box>
      </draw:frame>
      <draw:frame text:anchor-type="page" text:anchor-page-number="14" draw:z-index="4144" draw:name="Shape4691" draw:style-name="gr1" draw:text-style-name="P2" svg:width="0.0433in" svg:height="0.1925in" svg:x="5.4193in" svg:y="7.7429in">
        <draw:text-box>
          <text:p><text:span text:style-name="T2"><text:s/></text:span></text:p>
        </draw:text-box>
      </draw:frame>
      <draw:polygon text:anchor-type="page" text:anchor-page-number="14" draw:z-index="4143" draw:name="Shape4700" draw:style-name="gr2" draw:text-style-name="P3" svg:width="0.6902in" svg:height="0.1134in" svg:x="0.4114in" svg:y="7.9165in" svg:viewBox="0 0 1754 289" draw:points="0,0 1754,0 1754,289 0,289">
        <text:p/>
      </draw:polygon>
      <draw:frame text:anchor-type="page" text:anchor-page-number="6" draw:z-index="4142" draw:name="Shape2138" draw:style-name="gr1" draw:text-style-name="P2" svg:width="0.0433in" svg:height="0.1925in" svg:x="6.7098in" svg:y="3.1862in">
        <draw:text-box>
          <text:p><text:span text:style-name="T2"><text:s/></text:span></text:p>
        </draw:text-box>
      </draw:frame>
      <draw:polygon text:anchor-type="page" text:anchor-page-number="5" draw:z-index="4141" draw:name="Shape1525" draw:style-name="gr2" draw:text-style-name="P3" svg:width="0.4917in" svg:height="0.1917in" svg:x="5.3331in" svg:y="8.7248in" svg:viewBox="0 0 1250 488" draw:points="0,0 1250,0 1250,488 0,488">
        <text:p/>
      </draw:polygon>
      <draw:polygon text:anchor-type="page" text:anchor-page-number="5" draw:z-index="4140" draw:name="Shape1522" draw:style-name="gr2" draw:text-style-name="P3" svg:width="0.5917in" svg:height="0.1917in" svg:x="5.2831in" svg:y="8.7248in" svg:viewBox="0 0 1504 488" draw:points="0,0 1504,0 1504,488 0,488">
        <text:p/>
      </draw:polygon>
      <draw:polygon text:anchor-type="page" text:anchor-page-number="6" draw:z-index="4139" draw:name="Shape2146" draw:style-name="gr2" draw:text-style-name="P3" svg:width="1.0835in" svg:height="0.1118in" svg:x="0.4114in" svg:y="3.3846in" svg:viewBox="0 0 2753 285" draw:points="0,0 2753,0 2753,285 0,285">
        <text:p/>
      </draw:polygon>
      <draw:polygon text:anchor-type="page" text:anchor-page-number="14" draw:z-index="4138" draw:name="Shape4699" draw:style-name="gr2" draw:text-style-name="P3" svg:width="0.7866in" svg:height="0.2567in" svg:x="0.363in" svg:y="7.9165in" svg:viewBox="0 0 1999 653" draw:points="0,0 1999,0 1999,653 0,653">
        <text:p/>
      </draw:polygon>
      <draw:frame text:anchor-type="page" text:anchor-page-number="5" draw:z-index="4137" draw:name="Shape1516" draw:style-name="gr1" draw:text-style-name="P2" svg:width="0.0433in" svg:height="0.1925in" svg:x="3.561in" svg:y="8.728in">
        <draw:text-box>
          <text:p><text:span text:style-name="T2"><text:s/></text:span></text:p>
        </draw:text-box>
      </draw:frame>
      <draw:polygon text:anchor-type="page" text:anchor-page-number="6" draw:z-index="4136" draw:name="Shape2145" draw:style-name="gr2" draw:text-style-name="P3" svg:width="1.1803in" svg:height="0.1917in" svg:x="0.363in" svg:y="3.3846in" svg:viewBox="0 0 2999 488" draw:points="0,0 2999,0 2999,488 0,488">
        <text:p/>
      </draw:polygon>
      <draw:frame text:anchor-type="page" text:anchor-page-number="14" draw:z-index="4135" draw:name="Shape4694" draw:style-name="gr1" draw:text-style-name="P2" svg:width="3.4571in" svg:height="0.1295in" svg:x="1.9866in" svg:y="7.7902in">
        <draw:text-box>
          <text:p><text:span text:style-name="T1">Ampio uso dispersivo indoordi coadiuvanti tecnologici in sistemi aperti</text:span></text:p>
        </draw:text-box>
      </draw:frame>
      <draw:polygon text:anchor-type="page" text:anchor-page-number="6" draw:z-index="4134" draw:name="Shape2112" draw:style-name="gr3" draw:text-style-name="P4" svg:width="1.1717in" svg:height="0.0098in" svg:x="6.6732in" svg:y="3.1732in" svg:viewBox="0 0 2977 26" draw:points="0,0 2977,0 2977,26 0,26">
        <text:p/>
      </draw:polygon>
      <draw:polygon text:anchor-type="page" text:anchor-page-number="5" draw:z-index="4133" draw:name="Shape1520" draw:style-name="gr2" draw:text-style-name="P3" svg:width="1.0831in" svg:height="0.1917in" svg:x="4.1516in" svg:y="8.7248in" svg:viewBox="0 0 2752 488" draw:points="0,0 2752,0 2752,488 0,488">
        <text:p/>
      </draw:polygon>
      <draw:frame text:anchor-type="page" text:anchor-page-number="14" draw:z-index="4132" draw:name="Shape4687" draw:style-name="gr1" draw:text-style-name="P2" svg:width="0.0433in" svg:height="0.1925in" svg:x="1.3063in" svg:y="7.7299in">
        <draw:text-box>
          <text:p><text:span text:style-name="T2"><text:s/></text:span></text:p>
        </draw:text-box>
      </draw:frame>
      <draw:polygon text:anchor-type="page" text:anchor-page-number="6" draw:z-index="4131" draw:name="Shape2111" draw:style-name="gr3" draw:text-style-name="P4" svg:width="0.0102in" svg:height="0.0098in" svg:x="6.663in" svg:y="3.1732in" svg:viewBox="0 0 27 26" draw:points="0,0 27,0 27,26 0,26">
        <text:p/>
      </draw:polygon>
      <draw:polygon text:anchor-type="page" text:anchor-page-number="5" draw:z-index="4130" draw:name="Shape1517" draw:style-name="gr2" draw:text-style-name="P3" svg:width="1.1799in" svg:height="0.1917in" svg:x="4.1031in" svg:y="8.7248in" svg:viewBox="0 0 2998 488" draw:points="0,0 2998,0 2998,488 0,488">
        <text:p/>
      </draw:polygon>
      <draw:polygon text:anchor-type="page" text:anchor-page-number="14" draw:z-index="4129" draw:name="Shape4706" draw:style-name="gr2" draw:text-style-name="P3" svg:width="4.6264in" svg:height="0.1268in" svg:x="1.9866in" svg:y="7.7898in" svg:viewBox="0 0 11752 323" draw:points="0,0 11752,0 11752,323 0,323">
        <text:p/>
      </draw:polygon>
      <draw:polygon text:anchor-type="page" text:anchor-page-number="6" draw:z-index="4128" draw:name="Shape2109" draw:style-name="gr3" draw:text-style-name="P4" svg:width="0.7783in" svg:height="0.0098in" svg:x="5.8846in" svg:y="3.1732in" svg:viewBox="0 0 1978 26" draw:points="0,0 1978,0 1978,26 0,26">
        <text:p/>
      </draw:polygon>
      <draw:polygon text:anchor-type="page" text:anchor-page-number="14" draw:z-index="4127" draw:name="Shape4705" draw:style-name="gr2" draw:text-style-name="P3" svg:width="4.7232in" svg:height="0.1268in" svg:x="1.9382in" svg:y="7.7898in" svg:viewBox="0 0 11998 323" draw:points="0,0 11998,0 11998,323 0,323">
        <text:p/>
      </draw:polygon>
      <draw:frame text:anchor-type="page" text:anchor-page-number="5" draw:z-index="4126" draw:name="Shape1463" draw:style-name="gr1" draw:text-style-name="P2" svg:width="0.0433in" svg:height="0.1925in" svg:x="2.5693in" svg:y="8.6661in">
        <draw:text-box>
          <text:p><text:span text:style-name="T2"><text:s/></text:span></text:p>
        </draw:text-box>
      </draw:frame>
      <draw:frame text:anchor-type="page" text:anchor-page-number="14" draw:z-index="4125" draw:name="Shape4703" draw:style-name="gr1" draw:text-style-name="P2" svg:width="0.1094in" svg:height="0.113in" svg:x="1.198in" svg:y="7.7902in">
        <draw:text-box>
          <text:p><text:span text:style-name="T5">8a</text:span></text:p>
        </draw:text-box>
      </draw:frame>
      <draw:polygon text:anchor-type="page" text:anchor-page-number="6" draw:z-index="4124" draw:name="Shape2108" draw:style-name="gr3" draw:text-style-name="P4" svg:width="0.0098in" svg:height="0.0098in" svg:x="5.8748in" svg:y="3.1732in" svg:viewBox="0 0 26 26" draw:points="0,0 26,0 26,26 0,26">
        <text:p/>
      </draw:polygon>
      <draw:polygon text:anchor-type="page" text:anchor-page-number="5" draw:z-index="4123" draw:name="Shape1514" draw:style-name="gr2" draw:text-style-name="P3" svg:width="0.4933in" svg:height="0.1917in" svg:x="3.5614in" svg:y="8.7248in" svg:viewBox="0 0 1254 488" draw:points="0,0 1254,0 1254,488 0,488">
        <text:p/>
      </draw:polygon>
      <draw:polygon text:anchor-type="page" text:anchor-page-number="6" draw:z-index="4122" draw:name="Shape2103" draw:style-name="gr3" draw:text-style-name="P4" svg:width="0.5799in" svg:height="0.0098in" svg:x="5.2949in" svg:y="3.1732in" svg:viewBox="0 0 1474 26" draw:points="0,0 1474,0 1474,26 0,26">
        <text:p/>
      </draw:polygon>
      <draw:polygon text:anchor-type="page" text:anchor-page-number="5" draw:z-index="4121" draw:name="Shape1511" draw:style-name="gr2" draw:text-style-name="P3" svg:width="0.5902in" svg:height="0.1917in" svg:x="3.513in" svg:y="8.7248in" svg:viewBox="0 0 1500 488" draw:points="0,0 1500,0 1500,488 0,488">
        <text:p/>
      </draw:polygon>
      <draw:frame text:anchor-type="page" text:anchor-page-number="14" draw:z-index="4120" draw:name="Shape4683" draw:style-name="gr1" draw:text-style-name="P2" svg:width="0.0433in" svg:height="0.1925in" svg:x="0.6583in" svg:y="7.7299in">
        <draw:text-box>
          <text:p><text:span text:style-name="T2"><text:s/></text:span></text:p>
        </draw:text-box>
      </draw:frame>
      <draw:polygon text:anchor-type="page" text:anchor-page-number="14" draw:z-index="4119" draw:name="Shape4702" draw:style-name="gr2" draw:text-style-name="P3" svg:width="0.6902in" svg:height="0.1118in" svg:x="1.198in" svg:y="7.7898in" svg:viewBox="0 0 1754 285" draw:points="0,0 1754,0 1754,285 0,285">
        <text:p/>
      </draw:polygon>
      <draw:polygon text:anchor-type="page" text:anchor-page-number="6" draw:z-index="4118" draw:name="Shape2102" draw:style-name="gr3" draw:text-style-name="P4" svg:width="0.0102in" svg:height="0.0098in" svg:x="5.2846in" svg:y="3.1732in" svg:viewBox="0 0 27 26" draw:points="0,0 27,0 27,26 0,26">
        <text:p/>
      </draw:polygon>
      <draw:frame text:anchor-type="page" text:anchor-page-number="5" draw:z-index="4117" draw:name="Shape1508" draw:style-name="gr1" draw:text-style-name="P2" svg:width="0.1898in" svg:height="0.113in" svg:x="2.3799in" svg:y="8.7272in">
        <draw:text-box>
          <text:p><text:span text:style-name="T4">0.25</text:span></text:p>
        </draw:text-box>
      </draw:frame>
      <draw:frame text:anchor-type="page" text:anchor-page-number="5" draw:z-index="4116" draw:name="Shape1459" draw:style-name="gr1" draw:text-style-name="P2" svg:width="0.0433in" svg:height="0.1925in" svg:x="1.7866in" svg:y="8.6661in">
        <draw:text-box>
          <text:p><text:span text:style-name="T2"><text:s/></text:span></text:p>
        </draw:text-box>
      </draw:frame>
      <draw:polygon text:anchor-type="page" text:anchor-page-number="14" draw:z-index="4115" draw:name="Shape4701" draw:style-name="gr2" draw:text-style-name="P3" svg:width="0.7886in" svg:height="0.1268in" svg:x="1.15in" svg:y="7.7898in" svg:viewBox="0 0 2004 323" draw:points="0,0 2004,0 2004,323 0,323">
        <text:p/>
      </draw:polygon>
      <draw:polygon text:anchor-type="page" text:anchor-page-number="6" draw:z-index="4114" draw:name="Shape2091" draw:style-name="gr3" draw:text-style-name="P4" svg:width="1.1717in" svg:height="0.0098in" svg:x="4.113in" svg:y="3.1732in" svg:viewBox="0 0 2977 26" draw:points="0,0 2977,0 2977,26 0,26">
        <text:p/>
      </draw:polygon>
      <draw:frame text:anchor-type="page" text:anchor-page-number="14" draw:z-index="4113" draw:name="Shape4695" draw:style-name="gr1" draw:text-style-name="P2" svg:width="0.2051in" svg:height="0.113in" svg:x="0.4535in" svg:y="7.7902in">
        <draw:text-box>
          <text:p><text:span text:style-name="T5">ERC</text:span></text:p>
        </draw:text-box>
      </draw:frame>
      <draw:polygon text:anchor-type="page" text:anchor-page-number="5" draw:z-index="4112" draw:name="Shape1497" draw:style-name="gr2" draw:text-style-name="P3" svg:width="1.0831in" svg:height="0.1118in" svg:x="2.3799in" svg:y="8.7248in" svg:viewBox="0 0 2752 285" draw:points="0,0 2752,0 2752,285 0,285">
        <text:p/>
      </draw:polygon>
      <draw:polygon text:anchor-type="page" text:anchor-page-number="6" draw:z-index="4111" draw:name="Shape2090" draw:style-name="gr3" draw:text-style-name="P4" svg:width="0.0098in" svg:height="0.0098in" svg:x="4.1031in" svg:y="3.1732in" svg:viewBox="0 0 26 26" draw:points="0,0 26,0 26,26 0,26">
        <text:p/>
      </draw:polygon>
      <draw:polygon text:anchor-type="page" text:anchor-page-number="6" draw:z-index="4110" draw:name="Shape2081" draw:style-name="gr3" draw:text-style-name="P4" svg:width="0.5799in" svg:height="0.0098in" svg:x="3.5232in" svg:y="3.1732in" svg:viewBox="0 0 1474 26" draw:points="0,0 1474,0 1474,26 0,26">
        <text:p/>
      </draw:polygon>
      <draw:polygon text:anchor-type="page" text:anchor-page-number="5" draw:z-index="4109" draw:name="Shape1495" draw:style-name="gr2" draw:text-style-name="P3" svg:width="1.1815in" svg:height="0.1917in" svg:x="2.3315in" svg:y="8.7248in" svg:viewBox="0 0 3002 488" draw:points="0,0 3002,0 3002,488 0,488">
        <text:p/>
      </draw:polygon>
      <draw:frame text:anchor-type="page" text:anchor-page-number="14" draw:z-index="4108" draw:name="Shape4682" draw:style-name="gr1" draw:text-style-name="P2" svg:width="0.0433in" svg:height="0.1925in" svg:x="0.411in" svg:y="7.7299in">
        <draw:text-box>
          <text:p><text:span text:style-name="T2"><text:s/></text:span></text:p>
        </draw:text-box>
      </draw:frame>
      <draw:polygon text:anchor-type="page" text:anchor-page-number="6" draw:z-index="4107" draw:name="Shape2100" draw:style-name="gr3" draw:text-style-name="P4" svg:width="0.0102in" svg:height="0.0098in" svg:x="3.513in" svg:y="3.1732in" svg:viewBox="0 0 27 26" draw:points="0,0 27,0 27,26 0,26">
        <text:p/>
      </draw:polygon>
      <draw:frame text:anchor-type="page" text:anchor-page-number="14" draw:z-index="4106" draw:name="Shape4678" draw:style-name="gr1" draw:text-style-name="P2" svg:width="0.0433in" svg:height="0.1925in" svg:x="3.2465in" svg:y="7.6161in">
        <draw:text-box>
          <text:p><text:span text:style-name="T2"><text:s/></text:span></text:p>
        </draw:text-box>
      </draw:frame>
      <draw:frame text:anchor-type="page" text:anchor-page-number="5" draw:z-index="4105" draw:name="Shape1492" draw:style-name="gr1" draw:text-style-name="P2" svg:width="0.1949in" svg:height="0.113in" svg:x="1.5917in" svg:y="8.7272in">
        <draw:text-box>
          <text:p><text:span text:style-name="T4">NLD</text:span></text:p>
        </draw:text-box>
      </draw:frame>
      <draw:polygon text:anchor-type="page" text:anchor-page-number="14" draw:z-index="4104" draw:name="Shape4693" draw:style-name="gr2" draw:text-style-name="P3" svg:width="0.6902in" svg:height="0.1118in" svg:x="0.4114in" svg:y="7.7898in" svg:viewBox="0 0 1754 285" draw:points="0,0 1754,0 1754,285 0,285">
        <text:p/>
      </draw:polygon>
      <draw:frame text:anchor-type="page" text:anchor-page-number="5" draw:z-index="4103" draw:name="Shape1485" draw:style-name="gr1" draw:text-style-name="P2" svg:width="0.0433in" svg:height="0.1925in" svg:x="0.6634in" svg:y="8.6661in">
        <draw:text-box>
          <text:p><text:span text:style-name="T2"><text:s/></text:span></text:p>
        </draw:text-box>
      </draw:frame>
      <draw:polygon text:anchor-type="page" text:anchor-page-number="6" draw:z-index="4102" draw:name="Shape2099" draw:style-name="gr3" draw:text-style-name="P4" svg:width="1.1717in" svg:height="0.0098in" svg:x="2.3413in" svg:y="3.1732in" svg:viewBox="0 0 2977 26" draw:points="0,0 2977,0 2977,26 0,26">
        <text:p/>
      </draw:polygon>
      <draw:polygon text:anchor-type="page" text:anchor-page-number="14" draw:z-index="4101" draw:name="Shape4692" draw:style-name="gr2" draw:text-style-name="P3" svg:width="0.7866in" svg:height="0.1268in" svg:x="0.363in" svg:y="7.7898in" svg:viewBox="0 0 1999 323" draw:points="0,0 1999,0 1999,323 0,323">
        <text:p/>
      </draw:polygon>
      <draw:polygon text:anchor-type="page" text:anchor-page-number="6" draw:z-index="4100" draw:name="Shape2098" draw:style-name="gr3" draw:text-style-name="P4" svg:width="0.0098in" svg:height="0.0098in" svg:x="2.3315in" svg:y="3.1732in" svg:viewBox="0 0 26 26" draw:points="0,0 26,0 26,26 0,26">
        <text:p/>
      </draw:polygon>
      <draw:polygon text:anchor-type="page" text:anchor-page-number="5" draw:z-index="4099" draw:name="Shape1491" draw:style-name="gr2" draw:text-style-name="P3" svg:width="0.6917in" svg:height="0.1118in" svg:x="1.5913in" svg:y="8.7248in" svg:viewBox="0 0 1758 285" draw:points="0,0 1758,0 1758,285 0,285">
        <text:p/>
      </draw:polygon>
      <draw:polygon text:anchor-type="page" text:anchor-page-number="6" draw:z-index="4098" draw:name="Shape2097" draw:style-name="gr3" draw:text-style-name="P4" svg:width="0.7768in" svg:height="0.0098in" svg:x="1.5547in" svg:y="3.1732in" svg:viewBox="0 0 1974 26" draw:points="0,0 1974,0 1974,26 0,26">
        <text:p/>
      </draw:polygon>
      <draw:frame text:anchor-type="page" text:anchor-page-number="14" draw:z-index="4097" draw:name="Shape4690" draw:style-name="gr1" draw:text-style-name="P2" svg:width="1.2697in" svg:height="0.1295in" svg:x="1.9866in" svg:y="7.6638in">
        <draw:text-box>
          <text:p><text:span text:style-name="T1">Formulazione di preparati</text:span></text:p>
        </draw:text-box>
      </draw:frame>
      <draw:polygon text:anchor-type="page" text:anchor-page-number="5" draw:z-index="4096" draw:name="Shape1490" draw:style-name="gr2" draw:text-style-name="P3" svg:width="0.7882in" svg:height="0.1917in" svg:x="1.5433in" svg:y="8.7248in" svg:viewBox="0 0 2003 488" draw:points="0,0 2003,0 2003,488 0,488">
        <text:p/>
      </draw:polygon>
      <draw:polygon text:anchor-type="page" text:anchor-page-number="6" draw:z-index="4095" draw:name="Shape2096" draw:style-name="gr3" draw:text-style-name="P4" svg:width="0.0098in" svg:height="0.0098in" svg:x="1.5449in" svg:y="3.1732in" svg:viewBox="0 0 26 26" draw:points="0,0 26,0 26,26 0,26">
        <text:p/>
      </draw:polygon>
      <draw:frame text:anchor-type="page" text:anchor-page-number="14" draw:z-index="4094" draw:name="Shape4677" draw:style-name="gr1" draw:text-style-name="P2" svg:width="0.0433in" svg:height="0.1925in" svg:x="1.2516in" svg:y="7.6016in">
        <draw:text-box>
          <text:p><text:span text:style-name="T2"><text:s/></text:span></text:p>
        </draw:text-box>
      </draw:frame>
      <draw:frame text:anchor-type="page" text:anchor-page-number="5" draw:z-index="4093" draw:name="Shape1488" draw:style-name="gr1" draw:text-style-name="P2" svg:width="0.2106in" svg:height="0.113in" svg:x="0.4535in" svg:y="8.7272in">
        <draw:text-box>
          <text:p><text:span text:style-name="T4">TGG</text:span></text:p>
        </draw:text-box>
      </draw:frame>
      <draw:polygon text:anchor-type="page" text:anchor-page-number="6" draw:z-index="4092" draw:name="Shape2095" draw:style-name="gr3" draw:text-style-name="P4" svg:width="1.1819in" svg:height="0.0098in" svg:x="0.363in" svg:y="3.1732in" svg:viewBox="0 0 3003 26" draw:points="0,0 3003,0 3003,26 0,26">
        <text:p/>
      </draw:polygon>
      <draw:polygon text:anchor-type="page" text:anchor-page-number="14" draw:z-index="4091" draw:name="Shape4689" draw:style-name="gr2" draw:text-style-name="P3" svg:width="4.6264in" svg:height="0.1283in" svg:x="1.9866in" svg:y="7.6614in" svg:viewBox="0 0 11752 327" draw:points="0,0 11752,0 11752,327 0,327">
        <text:p/>
      </draw:polygon>
      <draw:frame text:anchor-type="page" text:anchor-page-number="5" draw:z-index="4090" draw:name="Shape1484" draw:style-name="gr1" draw:text-style-name="P2" svg:width="0.0433in" svg:height="0.1925in" svg:x="0.411in" svg:y="8.6661in">
        <draw:text-box>
          <text:p><text:span text:style-name="T2"><text:s/></text:span></text:p>
        </draw:text-box>
      </draw:frame>
      <draw:frame text:anchor-type="page" text:anchor-page-number="5" draw:z-index="4089" draw:name="Shape1483" draw:style-name="gr1" draw:text-style-name="P2" svg:width="0.0433in" svg:height="0.1925in" svg:x="6.7098in" svg:y="8.5264in">
        <draw:text-box>
          <text:p><text:span text:style-name="T2"><text:s/></text:span></text:p>
        </draw:text-box>
      </draw:frame>
      <draw:polygon text:anchor-type="page" text:anchor-page-number="14" draw:z-index="4088" draw:name="Shape4688" draw:style-name="gr2" draw:text-style-name="P3" svg:width="4.7232in" svg:height="0.1283in" svg:x="1.9382in" svg:y="7.6614in" svg:viewBox="0 0 11998 327" draw:points="0,0 11998,0 11998,327 0,327">
        <text:p/>
      </draw:polygon>
      <draw:frame text:anchor-type="page" text:anchor-page-number="6" draw:z-index="4087" draw:name="Shape2135" draw:style-name="gr1" draw:text-style-name="P2" svg:width="0.0433in" svg:height="0.1925in" svg:x="5.9228in" svg:y="3.1862in">
        <draw:text-box>
          <text:p><text:span text:style-name="T2"><text:s/></text:span></text:p>
        </draw:text-box>
      </draw:frame>
      <draw:frame text:anchor-type="page" text:anchor-page-number="14" draw:z-index="4086" draw:name="Shape4686" draw:style-name="gr1" draw:text-style-name="P2" svg:width="0.0551in" svg:height="0.113in" svg:x="1.198in" svg:y="7.6626in">
        <draw:text-box>
          <text:p><text:span text:style-name="T5">2</text:span></text:p>
        </draw:text-box>
      </draw:frame>
      <draw:polygon text:anchor-type="page" text:anchor-page-number="6" draw:z-index="4085" draw:name="Shape2137" draw:style-name="gr2" draw:text-style-name="P3" svg:width="1.085in" svg:height="0.1917in" svg:x="6.7098in" svg:y="3.1831in" svg:viewBox="0 0 2757 488" draw:points="0,0 2757,0 2757,488 0,488">
        <text:p/>
      </draw:polygon>
      <draw:polygon text:anchor-type="page" text:anchor-page-number="5" draw:z-index="4084" draw:name="Shape1487" draw:style-name="gr2" draw:text-style-name="P3" svg:width="1.0835in" svg:height="0.1118in" svg:x="0.4114in" svg:y="8.7248in" svg:viewBox="0 0 2753 285" draw:points="0,0 2753,0 2753,285 0,285">
        <text:p/>
      </draw:polygon>
      <draw:frame text:anchor-type="page" text:anchor-page-number="14" draw:z-index="4083" draw:name="Shape4676" draw:style-name="gr1" draw:text-style-name="P2" svg:width="0.0433in" svg:height="0.1925in" svg:x="0.6583in" svg:y="7.6016in">
        <draw:text-box>
          <text:p><text:span text:style-name="T2"><text:s/></text:span></text:p>
        </draw:text-box>
      </draw:frame>
      <draw:polygon text:anchor-type="page" text:anchor-page-number="6" draw:z-index="4082" draw:name="Shape2136" draw:style-name="gr2" draw:text-style-name="P3" svg:width="1.1819in" svg:height="0.1917in" svg:x="6.6614in" svg:y="3.1831in" svg:viewBox="0 0 3003 488" draw:points="0,0 3003,0 3003,488 0,488">
        <text:p/>
      </draw:polygon>
      <draw:frame text:anchor-type="page" text:anchor-page-number="7" draw:z-index="4081" draw:name="Shape3089" draw:style-name="gr1" draw:text-style-name="P2" svg:width="0.0433in" svg:height="0.1925in" svg:x="1.6134in" svg:y="10.0417in">
        <draw:text-box>
          <text:p><text:span text:style-name="T2"><text:s/></text:span></text:p>
        </draw:text-box>
      </draw:frame>
      <draw:polygon text:anchor-type="page" text:anchor-page-number="5" draw:z-index="4080" draw:name="Shape1486" draw:style-name="gr2" draw:text-style-name="P3" svg:width="1.1803in" svg:height="0.1917in" svg:x="0.363in" svg:y="8.7248in" svg:viewBox="0 0 2999 488" draw:points="0,0 2999,0 2999,488 0,488">
        <text:p/>
      </draw:polygon>
      <draw:polygon text:anchor-type="page" text:anchor-page-number="14" draw:z-index="4079" draw:name="Shape4685" draw:style-name="gr2" draw:text-style-name="P3" svg:width="0.6902in" svg:height="0.1118in" svg:x="1.198in" svg:y="7.6614in" svg:viewBox="0 0 1754 285" draw:points="0,0 1754,0 1754,285 0,285">
        <text:p/>
      </draw:polygon>
      <draw:frame text:anchor-type="page" text:anchor-page-number="6" draw:z-index="4078" draw:name="Shape2132" draw:style-name="gr1" draw:text-style-name="P2" svg:width="0.0433in" svg:height="0.1925in" svg:x="5.3335in" svg:y="3.1862in">
        <draw:text-box>
          <text:p><text:span text:style-name="T2"><text:s/></text:span></text:p>
        </draw:text-box>
      </draw:frame>
      <draw:frame text:anchor-type="page" text:anchor-page-number="7" draw:z-index="4077" draw:name="Shape3090" draw:style-name="gr1" draw:text-style-name="P2" svg:width="1.1657in" svg:height="0.1295in" svg:x="0.4535in" svg:y="10.089in">
        <draw:text-box>
          <text:p><text:span text:style-name="T3">9.2. Altre informazioni</text:span></text:p>
        </draw:text-box>
      </draw:frame>
      <draw:polygon text:anchor-type="page" text:anchor-page-number="5" draw:z-index="4076" draw:name="Shape1454" draw:style-name="gr3" draw:text-style-name="P4" svg:width="1.1717in" svg:height="0.0102in" svg:x="6.6732in" svg:y="8.513in" svg:viewBox="0 0 2977 27" draw:points="0,0 2977,0 2977,27 0,27">
        <text:p/>
      </draw:polygon>
      <draw:polygon text:anchor-type="page" text:anchor-page-number="14" draw:z-index="4075" draw:name="Shape4684" draw:style-name="gr2" draw:text-style-name="P3" svg:width="0.7886in" svg:height="0.1283in" svg:x="1.15in" svg:y="7.6614in" svg:viewBox="0 0 2004 327" draw:points="0,0 2004,0 2004,327 0,327">
        <text:p/>
      </draw:polygon>
      <draw:polygon text:anchor-type="page" text:anchor-page-number="6" draw:z-index="4074" draw:name="Shape2134" draw:style-name="gr2" draw:text-style-name="P3" svg:width="0.6898in" svg:height="0.1917in" svg:x="5.9232in" svg:y="3.1831in" svg:viewBox="0 0 1753 488" draw:points="0,0 1753,0 1753,488 0,488">
        <text:p/>
      </draw:polygon>
      <draw:frame text:anchor-type="page" text:anchor-page-number="7" draw:z-index="4073" draw:name="Shape3088" draw:style-name="gr1" draw:text-style-name="P2" svg:width="0.0433in" svg:height="0.1925in" svg:x="0.411in" svg:y="10.0417in">
        <draw:text-box>
          <text:p><text:span text:style-name="T2"><text:s/></text:span></text:p>
        </draw:text-box>
      </draw:frame>
      <draw:polygon text:anchor-type="page" text:anchor-page-number="5" draw:z-index="4072" draw:name="Shape1453" draw:style-name="gr3" draw:text-style-name="P4" svg:width="0.0102in" svg:height="0.0102in" svg:x="6.663in" svg:y="8.513in" svg:viewBox="0 0 27 27" draw:points="0,0 27,0 27,27 0,27">
        <text:p/>
      </draw:polygon>
      <draw:frame text:anchor-type="page" text:anchor-page-number="14" draw:z-index="4071" draw:name="Shape4681" draw:style-name="gr1" draw:text-style-name="P2" svg:width="0.2051in" svg:height="0.113in" svg:x="0.4535in" svg:y="7.6626in">
        <draw:text-box>
          <text:p><text:span text:style-name="T5">ERC</text:span></text:p>
        </draw:text-box>
      </draw:frame>
      <draw:frame text:anchor-type="page" text:anchor-page-number="7" draw:z-index="4070" draw:name="Shape3087" draw:style-name="gr1" draw:text-style-name="P2" svg:width="0.0433in" svg:height="0.1925in" svg:x="0.3634in" svg:y="9.9016in">
        <draw:text-box>
          <text:p><text:span text:style-name="T2"><text:s/></text:span></text:p>
        </draw:text-box>
      </draw:frame>
      <draw:polygon text:anchor-type="page" text:anchor-page-number="5" draw:z-index="4069" draw:name="Shape1452" draw:style-name="gr3" draw:text-style-name="P4" svg:width="0.7783in" svg:height="0.0102in" svg:x="5.8846in" svg:y="8.513in" svg:viewBox="0 0 1978 27" draw:points="0,0 1978,0 1978,27 0,27">
        <text:p/>
      </draw:polygon>
      <draw:polygon text:anchor-type="page" text:anchor-page-number="6" draw:z-index="4068" draw:name="Shape2133" draw:style-name="gr2" draw:text-style-name="P3" svg:width="0.7866in" svg:height="0.1917in" svg:x="5.8748in" svg:y="3.1831in" svg:viewBox="0 0 1999 488" draw:points="0,0 1999,0 1999,488 0,488">
        <text:p/>
      </draw:polygon>
      <draw:frame text:anchor-type="page" text:anchor-page-number="6" draw:z-index="4067" draw:name="Shape2094" draw:style-name="gr1" draw:text-style-name="P2" svg:width="0.0433in" svg:height="0.1925in" svg:x="4.3134in" svg:y="3.1252in">
        <draw:text-box>
          <text:p><text:span text:style-name="T2"><text:s/></text:span></text:p>
        </draw:text-box>
      </draw:frame>
      <draw:frame text:anchor-type="page" text:anchor-page-number="14" draw:z-index="4066" draw:name="Shape4675" draw:style-name="gr1" draw:text-style-name="P2" svg:width="0.0433in" svg:height="0.1925in" svg:x="0.411in" svg:y="7.6016in">
        <draw:text-box>
          <text:p><text:span text:style-name="T2"><text:s/></text:span></text:p>
        </draw:text-box>
      </draw:frame>
      <draw:polygon text:anchor-type="page" text:anchor-page-number="7" draw:z-index="4065" draw:name="Shape3092" draw:style-name="gr2" draw:text-style-name="P3" svg:width="7.3835in" svg:height="0.1268in" svg:x="0.4114in" svg:y="10.0898in" svg:viewBox="0 0 18755 323" draw:points="0,0 18755,0 18755,323 0,323">
        <text:p/>
      </draw:polygon>
      <draw:polygon text:anchor-type="page" text:anchor-page-number="5" draw:z-index="4064" draw:name="Shape1451" draw:style-name="gr3" draw:text-style-name="P4" svg:width="0.0098in" svg:height="0.0102in" svg:x="5.8748in" svg:y="8.513in" svg:viewBox="0 0 26 27" draw:points="0,0 26,0 26,27 0,27">
        <text:p/>
      </draw:polygon>
      <draw:frame text:anchor-type="page" text:anchor-page-number="14" draw:z-index="4063" draw:name="Shape4674" draw:style-name="gr1" draw:text-style-name="P2" svg:width="0.0433in" svg:height="0.1925in" svg:x="0.3634in" svg:y="7.4728in">
        <draw:text-box>
          <text:p><text:span text:style-name="T2"><text:s/></text:span></text:p>
        </draw:text-box>
      </draw:frame>
      <draw:polygon text:anchor-type="page" text:anchor-page-number="7" draw:z-index="4062" draw:name="Shape3091" draw:style-name="gr2" draw:text-style-name="P3" svg:width="7.4803in" svg:height="0.1268in" svg:x="0.363in" svg:y="10.0898in" svg:viewBox="0 0 19001 323" draw:points="0,0 19001,0 19001,323 0,323">
        <text:p/>
      </draw:polygon>
      <draw:polygon text:anchor-type="page" text:anchor-page-number="5" draw:z-index="4061" draw:name="Shape1450" draw:style-name="gr3" draw:text-style-name="P4" svg:width="0.5799in" svg:height="0.0102in" svg:x="5.2949in" svg:y="8.513in" svg:viewBox="0 0 1474 27" draw:points="0,0 1474,0 1474,27 0,27">
        <text:p/>
      </draw:polygon>
      <draw:polygon text:anchor-type="page" text:anchor-page-number="6" draw:z-index="4060" draw:name="Shape2131" draw:style-name="gr2" draw:text-style-name="P3" svg:width="0.4917in" svg:height="0.1917in" svg:x="5.3331in" svg:y="3.1831in" svg:viewBox="0 0 1250 488" draw:points="0,0 1250,0 1250,488 0,488">
        <text:p/>
      </draw:polygon>
      <draw:frame text:anchor-type="page" text:anchor-page-number="7" draw:z-index="4059" draw:name="Shape3086" draw:style-name="gr1" draw:text-style-name="P2" svg:width="0.0433in" svg:height="0.1925in" svg:x="4.348in" svg:y="9.7098in">
        <draw:text-box>
          <text:p><text:span text:style-name="T2"><text:s/></text:span></text:p>
        </draw:text-box>
      </draw:frame>
      <draw:polygon text:anchor-type="page" text:anchor-page-number="6" draw:z-index="4058" draw:name="Shape2130" draw:style-name="gr2" draw:text-style-name="P3" svg:width="0.5917in" svg:height="0.1917in" svg:x="5.2831in" svg:y="3.1831in" svg:viewBox="0 0 1504 488" draw:points="0,0 1504,0 1504,488 0,488">
        <text:p/>
      </draw:polygon>
      <draw:polygon text:anchor-type="page" text:anchor-page-number="5" draw:z-index="4057" draw:name="Shape1449" draw:style-name="gr3" draw:text-style-name="P4" svg:width="0.0102in" svg:height="0.0102in" svg:x="5.2846in" svg:y="8.513in" svg:viewBox="0 0 27 27" draw:points="0,0 27,0 27,27 0,27">
        <text:p/>
      </draw:polygon>
      <draw:polygon text:anchor-type="page" text:anchor-page-number="14" draw:z-index="4056" draw:name="Shape4680" draw:style-name="gr2" draw:text-style-name="P3" svg:width="0.6902in" svg:height="0.1118in" svg:x="0.4114in" svg:y="7.6614in" svg:viewBox="0 0 1754 285" draw:points="0,0 1754,0 1754,285 0,285">
        <text:p/>
      </draw:polygon>
      <draw:polygon text:anchor-type="page" text:anchor-page-number="5" draw:z-index="4055" draw:name="Shape1448" draw:style-name="gr3" draw:text-style-name="P4" svg:width="1.1717in" svg:height="0.0102in" svg:x="4.113in" svg:y="8.513in" svg:viewBox="0 0 2977 27" draw:points="0,0 2977,0 2977,27 0,27">
        <text:p/>
      </draw:polygon>
      <draw:frame text:anchor-type="page" text:anchor-page-number="7" draw:z-index="4054" draw:name="Shape3074" draw:style-name="gr1" draw:text-style-name="P2" svg:width="0.0433in" svg:height="0.1925in" svg:x="3.5154in" svg:y="9.6598in">
        <draw:text-box>
          <text:p><text:span text:style-name="T2"><text:s/></text:span></text:p>
        </draw:text-box>
      </draw:frame>
      <draw:frame text:anchor-type="page" text:anchor-page-number="6" draw:z-index="4053" draw:name="Shape2126" draw:style-name="gr1" draw:text-style-name="P2" svg:width="0.163in" svg:height="0.113in" svg:x="4.1516in" svg:y="3.1862in">
        <draw:text-box>
          <text:p><text:span text:style-name="T4"><text:s text:c="2"/>15</text:span></text:p>
        </draw:text-box>
      </draw:frame>
      <draw:polygon text:anchor-type="page" text:anchor-page-number="14" draw:z-index="4052" draw:name="Shape4679" draw:style-name="gr2" draw:text-style-name="P3" svg:width="0.7866in" svg:height="0.1283in" svg:x="0.363in" svg:y="7.6614in" svg:viewBox="0 0 1999 327" draw:points="0,0 1999,0 1999,327 0,327">
        <text:p/>
      </draw:polygon>
      <draw:polygon text:anchor-type="page" text:anchor-page-number="5" draw:z-index="4051" draw:name="Shape1447" draw:style-name="gr3" draw:text-style-name="P4" svg:width="0.0098in" svg:height="0.0102in" svg:x="4.1031in" svg:y="8.513in" svg:viewBox="0 0 26 27" draw:points="0,0 26,0 26,27 0,27">
        <text:p/>
      </draw:polygon>
      <draw:frame text:anchor-type="page" text:anchor-page-number="6" draw:z-index="4050" draw:name="Shape2127" draw:style-name="gr1" draw:text-style-name="P2" svg:width="0.0433in" svg:height="0.1925in" svg:x="3.561in" svg:y="3.1862in">
        <draw:text-box>
          <text:p><text:span text:style-name="T2"><text:s/></text:span></text:p>
        </draw:text-box>
      </draw:frame>
      <draw:frame text:anchor-type="page" text:anchor-page-number="14" draw:z-index="4049" draw:name="Shape4673" draw:style-name="gr1" draw:text-style-name="P2" svg:width="1.7232in" svg:height="0.1295in" svg:x="0.3634in" svg:y="7.3437in">
        <draw:text-box>
          <text:p><text:span text:style-name="T1">Decodifica dei descrittori degli usi: </text:span></text:p>
        </draw:text-box>
      </draw:frame>
      <draw:polygon text:anchor-type="page" text:anchor-page-number="7" draw:z-index="4048" draw:name="Shape3085" draw:style-name="gr2" draw:text-style-name="P3" svg:width="2.265in" svg:height="0.1917in" svg:x="4.348in" svg:y="9.7063in" svg:viewBox="0 0 5754 488" draw:points="0,0 5754,0 5754,488 0,488">
        <text:p/>
      </draw:polygon>
      <draw:frame text:anchor-type="page" text:anchor-page-number="14" draw:z-index="4047" draw:name="Shape4672" draw:style-name="gr1" draw:text-style-name="P2" svg:width="0.0433in" svg:height="0.1925in" svg:x="0.3634in" svg:y="7.1535in">
        <draw:text-box>
          <text:p><text:span text:style-name="T2"><text:s/></text:span></text:p>
        </draw:text-box>
      </draw:frame>
      <draw:polygon text:anchor-type="page" text:anchor-page-number="6" draw:z-index="4046" draw:name="Shape2129" draw:style-name="gr2" draw:text-style-name="P3" svg:width="1.0831in" svg:height="0.1118in" svg:x="4.1516in" svg:y="3.1831in" svg:viewBox="0 0 2752 285" draw:points="0,0 2752,0 2752,285 0,285">
        <text:p/>
      </draw:polygon>
      <draw:polygon text:anchor-type="page" text:anchor-page-number="7" draw:z-index="4045" draw:name="Shape3084" draw:style-name="gr2" draw:text-style-name="P3" svg:width="2.363in" svg:height="0.1917in" svg:x="4.3in" svg:y="9.7063in" svg:viewBox="0 0 6003 488" draw:points="0,0 6003,0 6003,488 0,488">
        <text:p/>
      </draw:polygon>
      <draw:polygon text:anchor-type="page" text:anchor-page-number="5" draw:z-index="4044" draw:name="Shape1446" draw:style-name="gr3" draw:text-style-name="P4" svg:width="0.5799in" svg:height="0.0102in" svg:x="3.5232in" svg:y="8.513in" svg:viewBox="0 0 1474 27" draw:points="0,0 1474,0 1474,27 0,27">
        <text:p/>
      </draw:polygon>
      <draw:frame text:anchor-type="page" text:anchor-page-number="14" draw:z-index="4043" draw:name="Shape4666" draw:style-name="gr1" draw:text-style-name="P2" svg:width="0.0433in" svg:height="0.1925in" svg:x="6.1193in" svg:y="6.898in">
        <draw:text-box>
          <text:p><text:span text:style-name="T2"><text:s/></text:span></text:p>
        </draw:text-box>
      </draw:frame>
      <draw:polygon text:anchor-type="page" text:anchor-page-number="6" draw:z-index="4042" draw:name="Shape2128" draw:style-name="gr2" draw:text-style-name="P3" svg:width="1.1799in" svg:height="0.1917in" svg:x="4.1031in" svg:y="3.1831in" svg:viewBox="0 0 2998 488" draw:points="0,0 2998,0 2998,488 0,488">
        <text:p/>
      </draw:polygon>
      <draw:polygon text:anchor-type="page" text:anchor-page-number="5" draw:z-index="4041" draw:name="Shape1445" draw:style-name="gr3" draw:text-style-name="P4" svg:width="0.0102in" svg:height="0.0102in" svg:x="3.513in" svg:y="8.513in" svg:viewBox="0 0 27 27" draw:points="0,0 27,0 27,27 0,27">
        <text:p/>
      </draw:polygon>
      <draw:frame text:anchor-type="page" text:anchor-page-number="7" draw:z-index="4040" draw:name="Shape3083" draw:style-name="gr1" draw:text-style-name="P2" svg:width="0.7476in" svg:height="0.1295in" svg:x="2.7728in" svg:y="9.7071in">
        <draw:text-box>
          <text:p><text:span text:style-name="T1">non applicabile</text:span></text:p>
        </draw:text-box>
      </draw:frame>
      <draw:polygon text:anchor-type="page" text:anchor-page-number="5" draw:z-index="4039" draw:name="Shape1444" draw:style-name="gr3" draw:text-style-name="P4" svg:width="1.1717in" svg:height="0.0102in" svg:x="2.3413in" svg:y="8.513in" svg:viewBox="0 0 2977 27" draw:points="0,0 2977,0 2977,27 0,27">
        <text:p/>
      </draw:polygon>
      <draw:frame text:anchor-type="page" text:anchor-page-number="7" draw:z-index="4038" draw:name="Shape3073" draw:style-name="gr1" draw:text-style-name="P2" svg:width="0.0433in" svg:height="0.1925in" svg:x="1.911in" svg:y="9.6598in">
        <draw:text-box>
          <text:p><text:span text:style-name="T2"><text:s/></text:span></text:p>
        </draw:text-box>
      </draw:frame>
      <draw:frame text:anchor-type="page" text:anchor-page-number="14" draw:z-index="4037" draw:name="Shape4667" draw:style-name="gr1" draw:text-style-name="P2" svg:width="0.0433in" svg:height="0.1925in" svg:x="4.0252in" svg:y="6.9764in">
        <draw:text-box>
          <text:p><text:span text:style-name="T2"><text:s/></text:span></text:p>
        </draw:text-box>
      </draw:frame>
      <draw:frame text:anchor-type="page" text:anchor-page-number="6" draw:z-index="4036" draw:name="Shape2088" draw:style-name="gr1" draw:text-style-name="P2" svg:width="0.0433in" svg:height="0.1925in" svg:x="2.5417in" svg:y="3.1252in">
        <draw:text-box>
          <text:p><text:span text:style-name="T2"><text:s/></text:span></text:p>
        </draw:text-box>
      </draw:frame>
      <draw:polygon text:anchor-type="page" text:anchor-page-number="14" draw:z-index="4035" draw:name="Shape4671" draw:style-name="gr2" draw:text-style-name="P3" svg:width="0.4933in" svg:height="0.1917in" svg:x="6.1197in" svg:y="6.8949in" svg:viewBox="0 0 1254 488" draw:points="0,0 1254,0 1254,488 0,488">
        <text:p/>
      </draw:polygon>
      <draw:polygon text:anchor-type="page" text:anchor-page-number="7" draw:z-index="4034" draw:name="Shape3082" draw:style-name="gr2" draw:text-style-name="P3" svg:width="1.4783in" svg:height="0.1268in" svg:x="2.7732in" svg:y="9.7063in" svg:viewBox="0 0 3756 323" draw:points="0,0 3756,0 3756,323 0,323">
        <text:p/>
      </draw:polygon>
      <draw:polygon text:anchor-type="page" text:anchor-page-number="5" draw:z-index="4033" draw:name="Shape1443" draw:style-name="gr3" draw:text-style-name="P4" svg:width="0.0098in" svg:height="0.0102in" svg:x="2.3315in" svg:y="8.513in" svg:viewBox="0 0 26 27" draw:points="0,0 26,0 26,27 0,27">
        <text:p/>
      </draw:polygon>
      <draw:polygon text:anchor-type="page" text:anchor-page-number="6" draw:z-index="4032" draw:name="Shape2125" draw:style-name="gr2" draw:text-style-name="P3" svg:width="0.4933in" svg:height="0.1917in" svg:x="3.5614in" svg:y="3.1831in" svg:viewBox="0 0 1254 488" draw:points="0,0 1254,0 1254,488 0,488">
        <text:p/>
      </draw:polygon>
      <draw:polygon text:anchor-type="page" text:anchor-page-number="7" draw:z-index="4031" draw:name="Shape3081" draw:style-name="gr2" draw:text-style-name="P3" svg:width="1.5752in" svg:height="0.1917in" svg:x="2.7248in" svg:y="9.7063in" svg:viewBox="0 0 4002 488" draw:points="0,0 4002,0 4002,488 0,488">
        <text:p/>
      </draw:polygon>
      <draw:polygon text:anchor-type="page" text:anchor-page-number="5" draw:z-index="4030" draw:name="Shape1442" draw:style-name="gr3" draw:text-style-name="P4" svg:width="0.7768in" svg:height="0.0102in" svg:x="1.5547in" svg:y="8.513in" svg:viewBox="0 0 1974 27" draw:points="0,0 1974,0 1974,27 0,27">
        <text:p/>
      </draw:polygon>
      <draw:polygon text:anchor-type="page" text:anchor-page-number="6" draw:z-index="4029" draw:name="Shape2124" draw:style-name="gr2" draw:text-style-name="P3" svg:width="0.5902in" svg:height="0.1917in" svg:x="3.513in" svg:y="3.1831in" svg:viewBox="0 0 1500 488" draw:points="0,0 1500,0 1500,488 0,488">
        <text:p/>
      </draw:polygon>
      <draw:polygon text:anchor-type="page" text:anchor-page-number="14" draw:z-index="4028" draw:name="Shape4670" draw:style-name="gr2" draw:text-style-name="P3" svg:width="0.5898in" svg:height="0.2551in" svg:x="6.0717in" svg:y="6.8949in" svg:viewBox="0 0 1499 649" draw:points="0,0 1499,0 1499,649 0,649">
        <text:p/>
      </draw:polygon>
      <draw:frame text:anchor-type="page" text:anchor-page-number="7" draw:z-index="4027" draw:name="Shape3080" draw:style-name="gr1" draw:text-style-name="P2" svg:width="1.4685in" svg:height="0.1295in" svg:x="0.4535in" svg:y="9.7071in">
        <draw:text-box>
          <text:p><text:span text:style-name="T1">Caratteristiche delle particelle</text:span></text:p>
        </draw:text-box>
      </draw:frame>
      <draw:polygon text:anchor-type="page" text:anchor-page-number="5" draw:z-index="4026" draw:name="Shape1441" draw:style-name="gr3" draw:text-style-name="P4" svg:width="0.0098in" svg:height="0.0102in" svg:x="1.5449in" svg:y="8.513in" svg:viewBox="0 0 26 27" draw:points="0,0 26,0 26,27 0,27">
        <text:p/>
      </draw:polygon>
      <draw:frame text:anchor-type="page" text:anchor-page-number="14" draw:z-index="4025" draw:name="Shape4669" draw:style-name="gr1" draw:text-style-name="P2" svg:width="2.2516in" svg:height="0.1295in" svg:x="1.7882in" svg:y="7.0236in">
        <draw:text-box>
          <text:p><text:span text:style-name="T1">pericolose. Non respirare i vapori o le nebbie.</text:span></text:p>
        </draw:text-box>
      </draw:frame>
      <draw:frame text:anchor-type="page" text:anchor-page-number="6" draw:z-index="4024" draw:name="Shape2123" draw:style-name="gr1" draw:text-style-name="P2" svg:width="0.163in" svg:height="0.113in" svg:x="2.3799in" svg:y="3.1862in">
        <draw:text-box>
          <text:p><text:span text:style-name="T4"><text:s text:c="2"/>10</text:span></text:p>
        </draw:text-box>
      </draw:frame>
      <draw:frame text:anchor-type="page" text:anchor-page-number="7" draw:z-index="4023" draw:name="Shape3072" draw:style-name="gr1" draw:text-style-name="P2" svg:width="0.0433in" svg:height="0.1925in" svg:x="0.411in" svg:y="9.6598in">
        <draw:text-box>
          <text:p><text:span text:style-name="T2"><text:s/></text:span></text:p>
        </draw:text-box>
      </draw:frame>
      <draw:polygon text:anchor-type="page" text:anchor-page-number="5" draw:z-index="4022" draw:name="Shape1438" draw:style-name="gr3" draw:text-style-name="P4" svg:width="1.1819in" svg:height="0.0102in" svg:x="0.363in" svg:y="8.513in" svg:viewBox="0 0 3003 27" draw:points="0,0 3003,0 3003,27 0,27">
        <text:p/>
      </draw:polygon>
      <draw:frame text:anchor-type="page" text:anchor-page-number="14" draw:z-index="4021" draw:name="Shape4665" draw:style-name="gr1" draw:text-style-name="P2" svg:width="3.8051in" svg:height="0.1295in" svg:x="1.7882in" svg:y="6.8972in">
        <draw:text-box>
          <text:p><text:span text:style-name="T1">Attenzione! In caso di vaporizzazione possono formarsi goccioline respirabili </text:span></text:p>
        </draw:text-box>
      </draw:frame>
      <draw:frame text:anchor-type="page" text:anchor-page-number="6" draw:z-index="4020" draw:name="Shape2087" draw:style-name="gr1" draw:text-style-name="P2" svg:width="0.0433in" svg:height="0.1925in" svg:x="1.8083in" svg:y="3.1252in">
        <draw:text-box>
          <text:p><text:span text:style-name="T2"><text:s/></text:span></text:p>
        </draw:text-box>
      </draw:frame>
      <draw:frame text:anchor-type="page" text:anchor-page-number="5" draw:z-index="4019" draw:name="Shape1437" draw:style-name="gr1" draw:text-style-name="P2" svg:width="0.0433in" svg:height="0.1925in" svg:x="6.2846in" svg:y="8.4646in">
        <draw:text-box>
          <text:p><text:span text:style-name="T2"><text:s/></text:span></text:p>
        </draw:text-box>
      </draw:frame>
      <draw:polygon text:anchor-type="page" text:anchor-page-number="14" draw:z-index="4018" draw:name="Shape4668" draw:style-name="gr2" draw:text-style-name="P3" svg:width="4.235in" svg:height="0.1268in" svg:x="1.7882in" svg:y="7.0232in" svg:viewBox="0 0 10758 323" draw:points="0,0 10758,0 10758,323 0,323">
        <text:p/>
      </draw:polygon>
      <draw:polygon text:anchor-type="page" text:anchor-page-number="6" draw:z-index="4017" draw:name="Shape2122" draw:style-name="gr2" draw:text-style-name="P3" svg:width="1.0831in" svg:height="0.1118in" svg:x="2.3799in" svg:y="3.1831in" svg:viewBox="0 0 2752 285" draw:points="0,0 2752,0 2752,285 0,285">
        <text:p/>
      </draw:polygon>
      <draw:frame text:anchor-type="page" text:anchor-page-number="7" draw:z-index="4016" draw:name="Shape3077" draw:style-name="gr1" draw:text-style-name="P2" svg:width="0.0433in" svg:height="0.1925in" svg:x="4.348in" svg:y="9.5181in">
        <draw:text-box>
          <text:p><text:span text:style-name="T2"><text:s/></text:span></text:p>
        </draw:text-box>
      </draw:frame>
      <draw:polygon text:anchor-type="page" text:anchor-page-number="5" draw:z-index="4015" draw:name="Shape1482" draw:style-name="gr2" draw:text-style-name="P3" svg:width="1.085in" svg:height="0.1917in" svg:x="6.7098in" svg:y="8.5232in" svg:viewBox="0 0 2757 488" draw:points="0,0 2757,0 2757,488 0,488">
        <text:p/>
      </draw:polygon>
      <draw:frame text:anchor-type="page" text:anchor-page-number="14" draw:z-index="4014" draw:name="Shape4654" draw:style-name="gr1" draw:text-style-name="P2" svg:width="0.0433in" svg:height="0.1925in" svg:x="0.8217in" svg:y="6.8346in">
        <draw:text-box>
          <text:p><text:span text:style-name="T2"><text:s/></text:span></text:p>
        </draw:text-box>
      </draw:frame>
      <draw:polygon text:anchor-type="page" text:anchor-page-number="7" draw:z-index="4013" draw:name="Shape3079" draw:style-name="gr2" draw:text-style-name="P3" svg:width="2.265in" svg:height="0.1268in" svg:x="0.4114in" svg:y="9.7063in" svg:viewBox="0 0 5754 323" draw:points="0,0 5754,0 5754,323 0,323">
        <text:p/>
      </draw:polygon>
      <draw:polygon text:anchor-type="page" text:anchor-page-number="6" draw:z-index="4012" draw:name="Shape2121" draw:style-name="gr2" draw:text-style-name="P3" svg:width="1.1815in" svg:height="0.1917in" svg:x="2.3315in" svg:y="3.1831in" svg:viewBox="0 0 3002 488" draw:points="0,0 3002,0 3002,488 0,488">
        <text:p/>
      </draw:polygon>
      <draw:polygon text:anchor-type="page" text:anchor-page-number="14" draw:z-index="4011" draw:name="Shape4664" draw:style-name="gr2" draw:text-style-name="P3" svg:width="4.235in" svg:height="0.1283in" svg:x="1.7882in" svg:y="6.8949in" svg:viewBox="0 0 10758 327" draw:points="0,0 10758,0 10758,327 0,327">
        <text:p/>
      </draw:polygon>
      <draw:polygon text:anchor-type="page" text:anchor-page-number="7" draw:z-index="4010" draw:name="Shape3078" draw:style-name="gr2" draw:text-style-name="P3" svg:width="2.3618in" svg:height="0.1917in" svg:x="0.363in" svg:y="9.7063in" svg:viewBox="0 0 6000 488" draw:points="0,0 6000,0 6000,488 0,488">
        <text:p/>
      </draw:polygon>
      <draw:polygon text:anchor-type="page" text:anchor-page-number="5" draw:z-index="4009" draw:name="Shape1481" draw:style-name="gr2" draw:text-style-name="P3" svg:width="1.1819in" svg:height="0.1917in" svg:x="6.6614in" svg:y="8.5232in" svg:viewBox="0 0 3003 488" draw:points="0,0 3003,0 3003,488 0,488">
        <text:p/>
      </draw:polygon>
      <draw:frame text:anchor-type="page" text:anchor-page-number="6" draw:z-index="4008" draw:name="Shape2120" draw:style-name="gr1" draw:text-style-name="P2" svg:width="0.2161in" svg:height="0.113in" svg:x="1.5917in" svg:y="3.1862in">
        <draw:text-box>
          <text:p><text:span text:style-name="T4">ROU</text:span></text:p>
        </draw:text-box>
      </draw:frame>
      <draw:frame text:anchor-type="page" text:anchor-page-number="6" draw:z-index="4007" draw:name="Shape2086" draw:style-name="gr1" draw:text-style-name="P2" svg:width="0.0433in" svg:height="0.1925in" svg:x="0.6311in" svg:y="3.1252in">
        <draw:text-box>
          <text:p><text:span text:style-name="T2"><text:s/></text:span></text:p>
        </draw:text-box>
      </draw:frame>
      <draw:frame text:anchor-type="page" text:anchor-page-number="5" draw:z-index="4006" draw:name="Shape1466" draw:style-name="gr1" draw:text-style-name="P2" svg:width="0.3614in" svg:height="0.113in" svg:x="5.9228in" svg:y="8.5256in">
        <draw:text-box>
          <text:p><text:span text:style-name="T4">RESPIR</text:span></text:p>
        </draw:text-box>
      </draw:frame>
      <draw:polygon text:anchor-type="page" text:anchor-page-number="14" draw:z-index="4005" draw:name="Shape4663" draw:style-name="gr2" draw:text-style-name="P3" svg:width="4.3319in" svg:height="0.2551in" svg:x="1.7398in" svg:y="6.8949in" svg:viewBox="0 0 11004 649" draw:points="0,0 11004,0 11004,649 0,649">
        <text:p/>
      </draw:polygon>
      <draw:frame text:anchor-type="page" text:anchor-page-number="7" draw:z-index="4004" draw:name="Shape3061" draw:style-name="gr1" draw:text-style-name="P2" svg:width="0.0433in" svg:height="0.1925in" svg:x="3.5154in" svg:y="9.4681in">
        <draw:text-box>
          <text:p><text:span text:style-name="T2"><text:s/></text:span></text:p>
        </draw:text-box>
      </draw:frame>
      <draw:frame text:anchor-type="page" text:anchor-page-number="14" draw:z-index="4003" draw:name="Shape4662" draw:style-name="gr1" draw:text-style-name="P2" svg:width="0.3614in" svg:height="0.113in" svg:x="0.4535in" svg:y="6.8957in">
        <draw:text-box>
          <text:p><text:span text:style-name="T5">EUH211</text:span></text:p>
        </draw:text-box>
      </draw:frame>
      <draw:frame text:anchor-type="page" text:anchor-page-number="5" draw:z-index="4002" draw:name="Shape1473" draw:style-name="gr1" draw:text-style-name="P2" svg:width="0.0433in" svg:height="0.1925in" svg:x="5.3335in" svg:y="8.5264in">
        <draw:text-box>
          <text:p><text:span text:style-name="T2"><text:s/></text:span></text:p>
        </draw:text-box>
      </draw:frame>
      <draw:polygon text:anchor-type="page" text:anchor-page-number="6" draw:z-index="4001" draw:name="Shape2119" draw:style-name="gr2" draw:text-style-name="P3" svg:width="0.6917in" svg:height="0.1118in" svg:x="1.5913in" svg:y="3.1831in" svg:viewBox="0 0 1758 285" draw:points="0,0 1758,0 1758,285 0,285">
        <text:p/>
      </draw:polygon>
      <draw:polygon text:anchor-type="page" text:anchor-page-number="7" draw:z-index="4000" draw:name="Shape3076" draw:style-name="gr2" draw:text-style-name="P3" svg:width="2.265in" svg:height="0.1913in" svg:x="4.348in" svg:y="9.515in" svg:viewBox="0 0 5754 487" draw:points="0,0 5754,0 5754,487 0,487">
        <text:p/>
      </draw:polygon>
      <draw:polygon text:anchor-type="page" text:anchor-page-number="6" draw:z-index="3999" draw:name="Shape2118" draw:style-name="gr2" draw:text-style-name="P3" svg:width="0.7882in" svg:height="0.1917in" svg:x="1.5433in" svg:y="3.1831in" svg:viewBox="0 0 2003 488" draw:points="0,0 2003,0 2003,488 0,488">
        <text:p/>
      </draw:polygon>
      <draw:frame text:anchor-type="page" text:anchor-page-number="14" draw:z-index="3998" draw:name="Shape4653" draw:style-name="gr1" draw:text-style-name="P2" svg:width="0.0433in" svg:height="0.1925in" svg:x="0.411in" svg:y="6.8346in">
        <draw:text-box>
          <text:p><text:span text:style-name="T2"><text:s/></text:span></text:p>
        </draw:text-box>
      </draw:frame>
      <draw:polygon text:anchor-type="page" text:anchor-page-number="7" draw:z-index="3997" draw:name="Shape3075" draw:style-name="gr2" draw:text-style-name="P3" svg:width="2.363in" svg:height="0.1913in" svg:x="4.3in" svg:y="9.515in" svg:viewBox="0 0 6003 487" draw:points="0,0 6003,0 6003,487 0,487">
        <text:p/>
      </draw:polygon>
      <draw:polygon text:anchor-type="page" text:anchor-page-number="5" draw:z-index="3996" draw:name="Shape1475" draw:style-name="gr2" draw:text-style-name="P3" svg:width="0.6898in" svg:height="0.1114in" svg:x="5.9232in" svg:y="8.5232in" svg:viewBox="0 0 1753 284" draw:points="0,0 1753,0 1753,284 0,284">
        <text:p/>
      </draw:polygon>
      <draw:frame text:anchor-type="page" text:anchor-page-number="6" draw:z-index="3995" draw:name="Shape2117" draw:style-name="gr1" draw:text-style-name="P2" svg:width="0.1717in" svg:height="0.113in" svg:x="0.4535in" svg:y="3.1862in">
        <draw:text-box>
          <text:p><text:span text:style-name="T4">TLV</text:span></text:p>
        </draw:text-box>
      </draw:frame>
      <draw:frame text:anchor-type="page" text:anchor-page-number="14" draw:z-index="3994" draw:name="Shape4652" draw:style-name="gr1" draw:text-style-name="P2" svg:width="0.0433in" svg:height="0.1925in" svg:x="6.1193in" svg:y="6.7063in">
        <draw:text-box>
          <text:p><text:span text:style-name="T2"><text:s/></text:span></text:p>
        </draw:text-box>
      </draw:frame>
      <draw:frame text:anchor-type="page" text:anchor-page-number="7" draw:z-index="3993" draw:name="Shape3071" draw:style-name="gr1" draw:text-style-name="P2" svg:width="0.7476in" svg:height="0.1295in" svg:x="2.7728in" svg:y="9.5154in">
        <draw:text-box>
          <text:p><text:span text:style-name="T1">non disponibile</text:span></text:p>
        </draw:text-box>
      </draw:frame>
      <draw:polygon text:anchor-type="page" text:anchor-page-number="5" draw:z-index="3992" draw:name="Shape1474" draw:style-name="gr2" draw:text-style-name="P3" svg:width="0.7866in" svg:height="0.1917in" svg:x="5.8748in" svg:y="8.5232in" svg:viewBox="0 0 1999 488" draw:points="0,0 1999,0 1999,488 0,488">
        <text:p/>
      </draw:polygon>
      <draw:frame text:anchor-type="page" text:anchor-page-number="7" draw:z-index="3991" draw:name="Shape3057" draw:style-name="gr1" draw:text-style-name="P2" svg:width="0.0433in" svg:height="0.1925in" svg:x="1.7063in" svg:y="9.4681in">
        <draw:text-box>
          <text:p><text:span text:style-name="T2"><text:s/></text:span></text:p>
        </draw:text-box>
      </draw:frame>
      <draw:frame text:anchor-type="page" text:anchor-page-number="5" draw:z-index="3990" draw:name="Shape1470" draw:style-name="gr1" draw:text-style-name="P2" svg:width="0.0433in" svg:height="0.1925in" svg:x="4.1516in" svg:y="8.5264in">
        <draw:text-box>
          <text:p><text:span text:style-name="T2"><text:s/></text:span></text:p>
        </draw:text-box>
      </draw:frame>
      <draw:polygon text:anchor-type="page" text:anchor-page-number="14" draw:z-index="3989" draw:name="Shape4656" draw:style-name="gr2" draw:text-style-name="P3" svg:width="1.2799in" svg:height="0.1114in" svg:x="0.4114in" svg:y="6.8949in" svg:viewBox="0 0 3252 284" draw:points="0,0 3252,0 3252,284 0,284">
        <text:p/>
      </draw:polygon>
      <draw:frame text:anchor-type="page" text:anchor-page-number="6" draw:z-index="3988" draw:name="Shape2085" draw:style-name="gr1" draw:text-style-name="P2" svg:width="0.0433in" svg:height="0.1925in" svg:x="0.411in" svg:y="3.1252in">
        <draw:text-box>
          <text:p><text:span text:style-name="T2"><text:s/></text:span></text:p>
        </draw:text-box>
      </draw:frame>
      <draw:polygon text:anchor-type="page" text:anchor-page-number="5" draw:z-index="3987" draw:name="Shape1472" draw:style-name="gr2" draw:text-style-name="P3" svg:width="0.4917in" svg:height="0.1917in" svg:x="5.3331in" svg:y="8.5232in" svg:viewBox="0 0 1250 488" draw:points="0,0 1250,0 1250,488 0,488">
        <text:p/>
      </draw:polygon>
      <draw:polygon text:anchor-type="page" text:anchor-page-number="14" draw:z-index="3986" draw:name="Shape4655" draw:style-name="gr2" draw:text-style-name="P3" svg:width="1.3768in" svg:height="0.2551in" svg:x="0.363in" svg:y="6.8949in" svg:viewBox="0 0 3498 649" draw:points="0,0 3498,0 3498,649 0,649">
        <text:p/>
      </draw:polygon>
      <draw:frame text:anchor-type="page" text:anchor-page-number="6" draw:z-index="3985" draw:name="Shape2114" draw:style-name="gr1" draw:text-style-name="P2" svg:width="0.0433in" svg:height="0.1925in" svg:x="6.7098in" svg:y="2.9846in">
        <draw:text-box>
          <text:p><text:span text:style-name="T2"><text:s/></text:span></text:p>
        </draw:text-box>
      </draw:frame>
      <draw:polygon text:anchor-type="page" text:anchor-page-number="7" draw:z-index="3984" draw:name="Shape3070" draw:style-name="gr2" draw:text-style-name="P3" svg:width="1.4783in" svg:height="0.1264in" svg:x="2.7732in" svg:y="9.515in" svg:viewBox="0 0 3756 322" draw:points="0,0 3756,0 3756,322 0,322">
        <text:p/>
      </draw:polygon>
      <draw:frame text:anchor-type="page" text:anchor-page-number="14" draw:z-index="3983" draw:name="Shape4646" draw:style-name="gr1" draw:text-style-name="P2" svg:width="0.0433in" svg:height="0.1925in" svg:x="4.1717in" svg:y="6.6575in">
        <draw:text-box>
          <text:p><text:span text:style-name="T2"><text:s/></text:span></text:p>
        </draw:text-box>
      </draw:frame>
      <draw:polygon text:anchor-type="page" text:anchor-page-number="6" draw:z-index="3982" draw:name="Shape2116" draw:style-name="gr2" draw:text-style-name="P3" svg:width="1.0835in" svg:height="0.1118in" svg:x="0.4114in" svg:y="3.1831in" svg:viewBox="0 0 2753 285" draw:points="0,0 2753,0 2753,285 0,285">
        <text:p/>
      </draw:polygon>
      <draw:polygon text:anchor-type="page" text:anchor-page-number="5" draw:z-index="3981" draw:name="Shape1471" draw:style-name="gr2" draw:text-style-name="P3" svg:width="0.5917in" svg:height="0.1917in" svg:x="5.2831in" svg:y="8.5232in" svg:viewBox="0 0 1504 488" draw:points="0,0 1504,0 1504,488 0,488">
        <text:p/>
      </draw:polygon>
      <draw:polygon text:anchor-type="page" text:anchor-page-number="7" draw:z-index="3980" draw:name="Shape3069" draw:style-name="gr2" draw:text-style-name="P3" svg:width="1.5752in" svg:height="0.1913in" svg:x="2.7248in" svg:y="9.515in" svg:viewBox="0 0 4002 487" draw:points="0,0 4002,0 4002,487 0,487">
        <text:p/>
      </draw:polygon>
      <draw:polygon text:anchor-type="page" text:anchor-page-number="14" draw:z-index="3979" draw:name="Shape4661" draw:style-name="gr2" draw:text-style-name="P3" svg:width="0.4933in" svg:height="0.1917in" svg:x="6.1197in" svg:y="6.7031in" svg:viewBox="0 0 1254 488" draw:points="0,0 1254,0 1254,488 0,488">
        <text:p/>
      </draw:polygon>
      <draw:frame text:anchor-type="page" text:anchor-page-number="7" draw:z-index="3978" draw:name="Shape3068" draw:style-name="gr1" draw:text-style-name="P2" svg:width="1.2634in" svg:height="0.1295in" svg:x="0.4535in" svg:y="9.5154in">
        <draw:text-box>
          <text:p><text:span text:style-name="T1">Densità di vapore relativa</text:span></text:p>
        </draw:text-box>
      </draw:frame>
      <draw:polygon text:anchor-type="page" text:anchor-page-number="6" draw:z-index="3977" draw:name="Shape2115" draw:style-name="gr2" draw:text-style-name="P3" svg:width="1.1803in" svg:height="0.1917in" svg:x="0.363in" svg:y="3.1831in" svg:viewBox="0 0 2999 488" draw:points="0,0 2999,0 2999,488 0,488">
        <text:p/>
      </draw:polygon>
      <draw:frame text:anchor-type="page" text:anchor-page-number="5" draw:z-index="3976" draw:name="Shape1467" draw:style-name="gr1" draw:text-style-name="P2" svg:width="0.0433in" svg:height="0.1925in" svg:x="3.561in" svg:y="8.5264in">
        <draw:text-box>
          <text:p><text:span text:style-name="T2"><text:s/></text:span></text:p>
        </draw:text-box>
      </draw:frame>
      <draw:polygon text:anchor-type="page" text:anchor-page-number="6" draw:z-index="3975" draw:name="Shape2065" draw:style-name="gr3" draw:text-style-name="P4" svg:width="1.1717in" svg:height="0.0102in" svg:x="6.6732in" svg:y="2.9697in" svg:viewBox="0 0 2977 27" draw:points="0,0 2977,0 2977,27 0,27">
        <text:p/>
      </draw:polygon>
      <draw:polygon text:anchor-type="page" text:anchor-page-number="14" draw:z-index="3974" draw:name="Shape4660" draw:style-name="gr2" draw:text-style-name="P3" svg:width="0.5898in" svg:height="0.1917in" svg:x="6.0717in" svg:y="6.7031in" svg:viewBox="0 0 1499 488" draw:points="0,0 1499,0 1499,488 0,488">
        <text:p/>
      </draw:polygon>
      <draw:polygon text:anchor-type="page" text:anchor-page-number="5" draw:z-index="3973" draw:name="Shape1469" draw:style-name="gr2" draw:text-style-name="P3" svg:width="1.0831in" svg:height="0.1917in" svg:x="4.1516in" svg:y="8.5232in" svg:viewBox="0 0 2752 488" draw:points="0,0 2752,0 2752,488 0,488">
        <text:p/>
      </draw:polygon>
      <draw:frame text:anchor-type="page" text:anchor-page-number="7" draw:z-index="3972" draw:name="Shape3065" draw:style-name="gr1" draw:text-style-name="P2" svg:width="0.0433in" svg:height="0.1925in" svg:x="0.411in" svg:y="9.4681in">
        <draw:text-box>
          <text:p><text:span text:style-name="T2"><text:s/></text:span></text:p>
        </draw:text-box>
      </draw:frame>
      <draw:polygon text:anchor-type="page" text:anchor-page-number="5" draw:z-index="3971" draw:name="Shape1468" draw:style-name="gr2" draw:text-style-name="P3" svg:width="1.1799in" svg:height="0.1917in" svg:x="4.1031in" svg:y="8.5232in" svg:viewBox="0 0 2998 488" draw:points="0,0 2998,0 2998,488 0,488">
        <text:p/>
      </draw:polygon>
      <draw:frame text:anchor-type="page" text:anchor-page-number="7" draw:z-index="3970" draw:name="Shape3053" draw:style-name="gr1" draw:text-style-name="P2" svg:width="0.0433in" svg:height="0.1925in" svg:x="5.311in" svg:y="9.3417in">
        <draw:text-box>
          <text:p><text:span text:style-name="T2"><text:s/></text:span></text:p>
        </draw:text-box>
      </draw:frame>
      <draw:frame text:anchor-type="page" text:anchor-page-number="14" draw:z-index="3969" draw:name="Shape4659" draw:style-name="gr1" draw:text-style-name="P2" svg:width="2.4004in" svg:height="0.1295in" svg:x="1.7882in" svg:y="6.7055in">
        <draw:text-box>
          <text:p><text:span text:style-name="T1">Scheda dati di sicurezza disponibile su richiesta.</text:span></text:p>
        </draw:text-box>
      </draw:frame>
      <draw:polygon text:anchor-type="page" text:anchor-page-number="6" draw:z-index="3968" draw:name="Shape2064" draw:style-name="gr3" draw:text-style-name="P4" svg:width="0.0102in" svg:height="0.0102in" svg:x="6.663in" svg:y="2.9697in" svg:viewBox="0 0 27 27" draw:points="0,0 27,0 27,27 0,27">
        <text:p/>
      </draw:polygon>
      <draw:polygon text:anchor-type="page" text:anchor-page-number="6" draw:z-index="3967" draw:name="Shape2062" draw:style-name="gr3" draw:text-style-name="P4" svg:width="0.7783in" svg:height="0.0102in" svg:x="5.8846in" svg:y="2.9697in" svg:viewBox="0 0 1978 27" draw:points="0,0 1978,0 1978,27 0,27">
        <text:p/>
      </draw:polygon>
      <draw:polygon text:anchor-type="page" text:anchor-page-number="7" draw:z-index="3966" draw:name="Shape3067" draw:style-name="gr2" draw:text-style-name="P3" svg:width="2.265in" svg:height="0.1264in" svg:x="0.4114in" svg:y="9.515in" svg:viewBox="0 0 5754 322" draw:points="0,0 5754,0 5754,322 0,322">
        <text:p/>
      </draw:polygon>
      <draw:frame text:anchor-type="page" text:anchor-page-number="5" draw:z-index="3965" draw:name="Shape1436" draw:style-name="gr1" draw:text-style-name="P2" svg:width="0.0433in" svg:height="0.1925in" svg:x="2.5154in" svg:y="8.4646in">
        <draw:text-box>
          <text:p><text:span text:style-name="T2"><text:s/></text:span></text:p>
        </draw:text-box>
      </draw:frame>
      <draw:frame text:anchor-type="page" text:anchor-page-number="14" draw:z-index="3964" draw:name="Shape4645" draw:style-name="gr1" draw:text-style-name="P2" svg:width="0.0433in" svg:height="0.1925in" svg:x="0.8217in" svg:y="6.6429in">
        <draw:text-box>
          <text:p><text:span text:style-name="T2"><text:s/></text:span></text:p>
        </draw:text-box>
      </draw:frame>
      <draw:polygon text:anchor-type="page" text:anchor-page-number="6" draw:z-index="3963" draw:name="Shape2061" draw:style-name="gr3" draw:text-style-name="P4" svg:width="0.0098in" svg:height="0.0102in" svg:x="5.8748in" svg:y="2.9697in" svg:viewBox="0 0 26 27" draw:points="0,0 26,0 26,27 0,27">
        <text:p/>
      </draw:polygon>
      <draw:polygon text:anchor-type="page" text:anchor-page-number="7" draw:z-index="3962" draw:name="Shape3066" draw:style-name="gr2" draw:text-style-name="P3" svg:width="2.3618in" svg:height="0.1913in" svg:x="0.363in" svg:y="9.515in" svg:viewBox="0 0 6000 487" draw:points="0,0 6000,0 6000,487 0,487">
        <text:p/>
      </draw:polygon>
      <draw:polygon text:anchor-type="page" text:anchor-page-number="5" draw:z-index="3961" draw:name="Shape1465" draw:style-name="gr2" draw:text-style-name="P3" svg:width="0.4933in" svg:height="0.1917in" svg:x="3.5614in" svg:y="8.5232in" svg:viewBox="0 0 1254 488" draw:points="0,0 1254,0 1254,488 0,488">
        <text:p/>
      </draw:polygon>
      <draw:polygon text:anchor-type="page" text:anchor-page-number="14" draw:z-index="3960" draw:name="Shape4658" draw:style-name="gr2" draw:text-style-name="P3" svg:width="4.235in" svg:height="0.1283in" svg:x="1.7882in" svg:y="6.7031in" svg:viewBox="0 0 10758 327" draw:points="0,0 10758,0 10758,327 0,327">
        <text:p/>
      </draw:polygon>
      <draw:polygon text:anchor-type="page" text:anchor-page-number="6" draw:z-index="3959" draw:name="Shape2060" draw:style-name="gr3" draw:text-style-name="P4" svg:width="0.5799in" svg:height="0.0102in" svg:x="5.2949in" svg:y="2.9697in" svg:viewBox="0 0 1474 27" draw:points="0,0 1474,0 1474,27 0,27">
        <text:p/>
      </draw:polygon>
      <draw:polygon text:anchor-type="page" text:anchor-page-number="14" draw:z-index="3958" draw:name="Shape4657" draw:style-name="gr2" draw:text-style-name="P3" svg:width="4.3319in" svg:height="0.1917in" svg:x="1.7398in" svg:y="6.7031in" svg:viewBox="0 0 11004 488" draw:points="0,0 11004,0 11004,488 0,488">
        <text:p/>
      </draw:polygon>
      <draw:polygon text:anchor-type="page" text:anchor-page-number="5" draw:z-index="3957" draw:name="Shape1464" draw:style-name="gr2" draw:text-style-name="P3" svg:width="0.5902in" svg:height="0.1917in" svg:x="3.513in" svg:y="8.5232in" svg:viewBox="0 0 1500 488" draw:points="0,0 1500,0 1500,488 0,488">
        <text:p/>
      </draw:polygon>
      <draw:frame text:anchor-type="page" text:anchor-page-number="7" draw:z-index="3956" draw:name="Shape3064" draw:style-name="gr1" draw:text-style-name="P2" svg:width="0.9713in" svg:height="0.1295in" svg:x="4.348in" svg:y="9.389in">
        <draw:text-box>
          <text:p><text:span text:style-name="T1">Metodo:Picnometro</text:span></text:p>
        </draw:text-box>
      </draw:frame>
      <draw:frame text:anchor-type="page" text:anchor-page-number="5" draw:z-index="3955" draw:name="Shape1462" draw:style-name="gr1" draw:text-style-name="P2" svg:width="0.1358in" svg:height="0.113in" svg:x="2.3799in" svg:y="8.5256in">
        <draw:text-box>
          <text:p><text:span text:style-name="T4"><text:s text:c="3"/>2</text:span></text:p>
        </draw:text-box>
      </draw:frame>
      <draw:frame text:anchor-type="page" text:anchor-page-number="7" draw:z-index="3954" draw:name="Shape3048" draw:style-name="gr1" draw:text-style-name="P2" svg:width="0.0433in" svg:height="0.1925in" svg:x="3.3228in" svg:y="9.3417in">
        <draw:text-box>
          <text:p><text:span text:style-name="T2"><text:s/></text:span></text:p>
        </draw:text-box>
      </draw:frame>
      <draw:polygon text:anchor-type="page" text:anchor-page-number="6" draw:z-index="3953" draw:name="Shape2059" draw:style-name="gr3" draw:text-style-name="P4" svg:width="0.0102in" svg:height="0.0102in" svg:x="5.2846in" svg:y="2.9697in" svg:viewBox="0 0 27 27" draw:points="0,0 27,0 27,27 0,27">
        <text:p/>
      </draw:polygon>
      <draw:frame text:anchor-type="page" text:anchor-page-number="14" draw:z-index="3952" draw:name="Shape4651" draw:style-name="gr1" draw:text-style-name="P2" svg:width="0.3661in" svg:height="0.113in" svg:x="0.4535in" svg:y="6.7043in">
        <draw:text-box>
          <text:p><text:span text:style-name="T5">EUH210</text:span></text:p>
        </draw:text-box>
      </draw:frame>
      <draw:frame text:anchor-type="page" text:anchor-page-number="14" draw:z-index="3951" draw:name="Shape4644" draw:style-name="gr1" draw:text-style-name="P2" svg:width="0.0433in" svg:height="0.1925in" svg:x="0.411in" svg:y="6.6429in">
        <draw:text-box>
          <text:p><text:span text:style-name="T2"><text:s/></text:span></text:p>
        </draw:text-box>
      </draw:frame>
      <draw:polygon text:anchor-type="page" text:anchor-page-number="6" draw:z-index="3950" draw:name="Shape2058" draw:style-name="gr3" draw:text-style-name="P4" svg:width="1.1717in" svg:height="0.0102in" svg:x="4.113in" svg:y="2.9697in" svg:viewBox="0 0 2977 27" draw:points="0,0 2977,0 2977,27 0,27">
        <text:p/>
      </draw:polygon>
      <draw:polygon text:anchor-type="page" text:anchor-page-number="7" draw:z-index="3949" draw:name="Shape3063" draw:style-name="gr2" draw:text-style-name="P3" svg:width="2.265in" svg:height="0.1283in" svg:x="4.348in" svg:y="9.3866in" svg:viewBox="0 0 5754 327" draw:points="0,0 5754,0 5754,327 0,327">
        <text:p/>
      </draw:polygon>
      <draw:frame text:anchor-type="page" text:anchor-page-number="5" draw:z-index="3948" draw:name="Shape1435" draw:style-name="gr1" draw:text-style-name="P2" svg:width="0.0433in" svg:height="0.1925in" svg:x="1.7866in" svg:y="8.4646in">
        <draw:text-box>
          <text:p><text:span text:style-name="T2"><text:s/></text:span></text:p>
        </draw:text-box>
      </draw:frame>
      <draw:frame text:anchor-type="page" text:anchor-page-number="14" draw:z-index="3947" draw:name="Shape4643" draw:style-name="gr1" draw:text-style-name="P2" svg:width="0.0433in" svg:height="0.1925in" svg:x="6.1193in" svg:y="6.5146in">
        <draw:text-box>
          <text:p><text:span text:style-name="T2"><text:s/></text:span></text:p>
        </draw:text-box>
      </draw:frame>
      <draw:polygon text:anchor-type="page" text:anchor-page-number="6" draw:z-index="3946" draw:name="Shape2057" draw:style-name="gr3" draw:text-style-name="P4" svg:width="0.0098in" svg:height="0.0102in" svg:x="4.1031in" svg:y="2.9697in" svg:viewBox="0 0 26 27" draw:points="0,0 26,0 26,27 0,27">
        <text:p/>
      </draw:polygon>
      <draw:polygon text:anchor-type="page" text:anchor-page-number="7" draw:z-index="3945" draw:name="Shape3062" draw:style-name="gr2" draw:text-style-name="P3" svg:width="2.363in" svg:height="0.1283in" svg:x="4.3in" svg:y="9.3866in" svg:viewBox="0 0 6003 327" draw:points="0,0 6003,0 6003,327 0,327">
        <text:p/>
      </draw:polygon>
      <draw:polygon text:anchor-type="page" text:anchor-page-number="5" draw:z-index="3944" draw:name="Shape1461" draw:style-name="gr2" draw:text-style-name="P3" svg:width="1.0831in" svg:height="0.1114in" svg:x="2.3799in" svg:y="8.5232in" svg:viewBox="0 0 2752 284" draw:points="0,0 2752,0 2752,284 0,284">
        <text:p/>
      </draw:polygon>
      <draw:polygon text:anchor-type="page" text:anchor-page-number="6" draw:z-index="3943" draw:name="Shape2056" draw:style-name="gr3" draw:text-style-name="P4" svg:width="0.5799in" svg:height="0.0102in" svg:x="3.5232in" svg:y="2.9697in" svg:viewBox="0 0 1474 27" draw:points="0,0 1474,0 1474,27 0,27">
        <text:p/>
      </draw:polygon>
      <draw:frame text:anchor-type="page" text:anchor-page-number="7" draw:z-index="3942" draw:name="Shape3060" draw:style-name="gr1" draw:text-style-name="P2" svg:width="0.5551in" svg:height="0.1295in" svg:x="2.7728in" svg:y="9.389in">
        <draw:text-box>
          <text:p><text:span text:style-name="T1">1.54 g/cm3</text:span></text:p>
        </draw:text-box>
      </draw:frame>
      <draw:polygon text:anchor-type="page" text:anchor-page-number="14" draw:z-index="3941" draw:name="Shape4648" draw:style-name="gr2" draw:text-style-name="P3" svg:width="1.2799in" svg:height="0.1118in" svg:x="0.4114in" svg:y="6.7031in" svg:viewBox="0 0 3252 285" draw:points="0,0 3252,0 3252,285 0,285">
        <text:p/>
      </draw:polygon>
      <draw:polygon text:anchor-type="page" text:anchor-page-number="5" draw:z-index="3940" draw:name="Shape1460" draw:style-name="gr2" draw:text-style-name="P3" svg:width="1.1815in" svg:height="0.1917in" svg:x="2.3315in" svg:y="8.5232in" svg:viewBox="0 0 3002 488" draw:points="0,0 3002,0 3002,488 0,488">
        <text:p/>
      </draw:polygon>
      <draw:polygon text:anchor-type="page" text:anchor-page-number="14" draw:z-index="3939" draw:name="Shape4647" draw:style-name="gr2" draw:text-style-name="P3" svg:width="1.3768in" svg:height="0.1917in" svg:x="0.363in" svg:y="6.7031in" svg:viewBox="0 0 3498 488" draw:points="0,0 3498,0 3498,488 0,488">
        <text:p/>
      </draw:polygon>
      <draw:polygon text:anchor-type="page" text:anchor-page-number="6" draw:z-index="3938" draw:name="Shape2055" draw:style-name="gr3" draw:text-style-name="P4" svg:width="0.0102in" svg:height="0.0102in" svg:x="3.513in" svg:y="2.9697in" svg:viewBox="0 0 27 27" draw:points="0,0 27,0 27,27 0,27">
        <text:p/>
      </draw:polygon>
      <draw:frame text:anchor-type="page" text:anchor-page-number="5" draw:z-index="3937" draw:name="Shape1458" draw:style-name="gr1" draw:text-style-name="P2" svg:width="0.1949in" svg:height="0.113in" svg:x="1.5917in" svg:y="8.5256in">
        <draw:text-box>
          <text:p><text:span text:style-name="T4">ESP</text:span></text:p>
        </draw:text-box>
      </draw:frame>
      <draw:frame text:anchor-type="page" text:anchor-page-number="7" draw:z-index="3936" draw:name="Shape3044" draw:style-name="gr1" draw:text-style-name="P2" svg:width="0.0433in" svg:height="0.1925in" svg:x="1.811in" svg:y="9.3417in">
        <draw:text-box>
          <text:p><text:span text:style-name="T2"><text:s/></text:span></text:p>
        </draw:text-box>
      </draw:frame>
      <draw:polygon text:anchor-type="page" text:anchor-page-number="7" draw:z-index="3935" draw:name="Shape3059" draw:style-name="gr2" draw:text-style-name="P3" svg:width="1.4783in" svg:height="0.1283in" svg:x="2.7732in" svg:y="9.3866in" svg:viewBox="0 0 3756 327" draw:points="0,0 3756,0 3756,327 0,327">
        <text:p/>
      </draw:polygon>
      <draw:frame text:anchor-type="page" text:anchor-page-number="5" draw:z-index="3934" draw:name="Shape1434" draw:style-name="gr1" draw:text-style-name="P2" svg:width="0.0433in" svg:height="0.1925in" svg:x="0.6366in" svg:y="8.4646in">
        <draw:text-box>
          <text:p><text:span text:style-name="T2"><text:s/></text:span></text:p>
        </draw:text-box>
      </draw:frame>
      <draw:frame text:anchor-type="page" text:anchor-page-number="14" draw:z-index="3933" draw:name="Shape4631" draw:style-name="gr1" draw:text-style-name="P2" svg:width="0.0433in" svg:height="0.1925in" svg:x="3.3634in" svg:y="6.4661in">
        <draw:text-box>
          <text:p><text:span text:style-name="T2"><text:s/></text:span></text:p>
        </draw:text-box>
      </draw:frame>
      <draw:polygon text:anchor-type="page" text:anchor-page-number="6" draw:z-index="3932" draw:name="Shape2054" draw:style-name="gr3" draw:text-style-name="P4" svg:width="1.1717in" svg:height="0.0102in" svg:x="2.3413in" svg:y="2.9697in" svg:viewBox="0 0 2977 27" draw:points="0,0 2977,0 2977,27 0,27">
        <text:p/>
      </draw:polygon>
      <draw:polygon text:anchor-type="page" text:anchor-page-number="14" draw:z-index="3931" draw:name="Shape4650" draw:style-name="gr2" draw:text-style-name="P3" svg:width="0.4933in" svg:height="0.1917in" svg:x="6.1197in" svg:y="6.5114in" svg:viewBox="0 0 1254 488" draw:points="0,0 1254,0 1254,488 0,488">
        <text:p/>
      </draw:polygon>
      <draw:polygon text:anchor-type="page" text:anchor-page-number="6" draw:z-index="3930" draw:name="Shape2053" draw:style-name="gr3" draw:text-style-name="P4" svg:width="0.0098in" svg:height="0.0102in" svg:x="2.3315in" svg:y="2.9697in" svg:viewBox="0 0 26 27" draw:points="0,0 26,0 26,27 0,27">
        <text:p/>
      </draw:polygon>
      <draw:polygon text:anchor-type="page" text:anchor-page-number="7" draw:z-index="3929" draw:name="Shape3058" draw:style-name="gr2" draw:text-style-name="P3" svg:width="1.5752in" svg:height="0.1283in" svg:x="2.7248in" svg:y="9.3866in" svg:viewBox="0 0 4002 327" draw:points="0,0 4002,0 4002,327 0,327">
        <text:p/>
      </draw:polygon>
      <draw:polygon text:anchor-type="page" text:anchor-page-number="5" draw:z-index="3928" draw:name="Shape1457" draw:style-name="gr2" draw:text-style-name="P3" svg:width="0.6917in" svg:height="0.1114in" svg:x="1.5913in" svg:y="8.5232in" svg:viewBox="0 0 1758 284" draw:points="0,0 1758,0 1758,284 0,284">
        <text:p/>
      </draw:polygon>
      <draw:frame text:anchor-type="page" text:anchor-page-number="7" draw:z-index="3927" draw:name="Shape3056" draw:style-name="gr1" draw:text-style-name="P2" svg:width="1.3689in" svg:height="0.1295in" svg:x="0.4535in" svg:y="9.389in">
        <draw:text-box>
          <text:p><text:span text:style-name="T1">Densità e/o Densità relativa</text:span></text:p>
        </draw:text-box>
      </draw:frame>
      <draw:polygon text:anchor-type="page" text:anchor-page-number="6" draw:z-index="3926" draw:name="Shape2052" draw:style-name="gr3" draw:text-style-name="P4" svg:width="0.7768in" svg:height="0.0102in" svg:x="1.5547in" svg:y="2.9697in" svg:viewBox="0 0 1974 27" draw:points="0,0 1974,0 1974,27 0,27">
        <text:p/>
      </draw:polygon>
      <draw:polygon text:anchor-type="page" text:anchor-page-number="14" draw:z-index="3925" draw:name="Shape4649" draw:style-name="gr2" draw:text-style-name="P3" svg:width="0.5898in" svg:height="0.1917in" svg:x="6.0717in" svg:y="6.5114in" svg:viewBox="0 0 1499 488" draw:points="0,0 1499,0 1499,488 0,488">
        <text:p/>
      </draw:polygon>
      <draw:polygon text:anchor-type="page" text:anchor-page-number="5" draw:z-index="3924" draw:name="Shape1456" draw:style-name="gr2" draw:text-style-name="P3" svg:width="0.7882in" svg:height="0.1917in" svg:x="1.5433in" svg:y="8.5232in" svg:viewBox="0 0 2003 488" draw:points="0,0 2003,0 2003,488 0,488">
        <text:p/>
      </draw:polygon>
      <draw:frame text:anchor-type="page" text:anchor-page-number="5" draw:z-index="3923" draw:name="Shape1455" draw:style-name="gr1" draw:text-style-name="P2" svg:width="0.1843in" svg:height="0.113in" svg:x="0.4535in" svg:y="8.5256in">
        <draw:text-box>
          <text:p><text:span text:style-name="T4">VLA</text:span></text:p>
        </draw:text-box>
      </draw:frame>
      <draw:frame text:anchor-type="page" text:anchor-page-number="7" draw:z-index="3922" draw:name="Shape3052" draw:style-name="gr1" draw:text-style-name="P2" svg:width="0.0433in" svg:height="0.1925in" svg:x="0.411in" svg:y="9.3417in">
        <draw:text-box>
          <text:p><text:span text:style-name="T2"><text:s/></text:span></text:p>
        </draw:text-box>
      </draw:frame>
      <draw:frame text:anchor-type="page" text:anchor-page-number="14" draw:z-index="3921" draw:name="Shape4642" draw:style-name="gr1" draw:text-style-name="P2" svg:width="1.5862in" svg:height="0.1295in" svg:x="1.7882in" svg:y="6.5138in">
        <draw:text-box>
          <text:p><text:span text:style-name="T1">Corrosivo per le vie respiratorie.</text:span></text:p>
        </draw:text-box>
      </draw:frame>
      <draw:polygon text:anchor-type="page" text:anchor-page-number="6" draw:z-index="3920" draw:name="Shape2051" draw:style-name="gr3" draw:text-style-name="P4" svg:width="0.0098in" svg:height="0.0102in" svg:x="1.5449in" svg:y="2.9697in" svg:viewBox="0 0 26 27" draw:points="0,0 26,0 26,27 0,27">
        <text:p/>
      </draw:polygon>
      <draw:frame text:anchor-type="page" text:anchor-page-number="5" draw:z-index="3919" draw:name="Shape1433" draw:style-name="gr1" draw:text-style-name="P2" svg:width="0.0433in" svg:height="0.1925in" svg:x="0.411in" svg:y="8.4646in">
        <draw:text-box>
          <text:p><text:span text:style-name="T2"><text:s/></text:span></text:p>
        </draw:text-box>
      </draw:frame>
      <draw:polygon text:anchor-type="page" text:anchor-page-number="6" draw:z-index="3918" draw:name="Shape2050" draw:style-name="gr3" draw:text-style-name="P4" svg:width="1.1819in" svg:height="0.0102in" svg:x="0.363in" svg:y="2.9697in" svg:viewBox="0 0 3003 27" draw:points="0,0 3003,0 3003,27 0,27">
        <text:p/>
      </draw:polygon>
      <draw:frame text:anchor-type="page" text:anchor-page-number="7" draw:z-index="3917" draw:name="Shape3051" draw:style-name="gr1" draw:text-style-name="P2" svg:width="0.0433in" svg:height="0.1925in" svg:x="4.348in" svg:y="9.198in">
        <draw:text-box>
          <text:p><text:span text:style-name="T2"><text:s/></text:span></text:p>
        </draw:text-box>
      </draw:frame>
      <draw:frame text:anchor-type="page" text:anchor-page-number="14" draw:z-index="3916" draw:name="Shape4630" draw:style-name="gr1" draw:text-style-name="P2" svg:width="0.0433in" svg:height="0.1925in" svg:x="0.8217in" svg:y="6.4516in">
        <draw:text-box>
          <text:p><text:span text:style-name="T2"><text:s/></text:span></text:p>
        </draw:text-box>
      </draw:frame>
      <draw:frame text:anchor-type="page" text:anchor-page-number="5" draw:z-index="3915" draw:name="Shape1432" draw:style-name="gr1" draw:text-style-name="P2" svg:width="0.0433in" svg:height="0.1925in" svg:x="6.7098in" svg:y="8.3252in">
        <draw:text-box>
          <text:p><text:span text:style-name="T2"><text:s/></text:span></text:p>
        </draw:text-box>
      </draw:frame>
      <draw:polygon text:anchor-type="page" text:anchor-page-number="14" draw:z-index="3914" draw:name="Shape4641" draw:style-name="gr2" draw:text-style-name="P3" svg:width="4.235in" svg:height="0.1283in" svg:x="1.7882in" svg:y="6.5114in" svg:viewBox="0 0 10758 327" draw:points="0,0 10758,0 10758,327 0,327">
        <text:p/>
      </draw:polygon>
      <draw:frame text:anchor-type="page" text:anchor-page-number="6" draw:z-index="3913" draw:name="Shape2049" draw:style-name="gr1" draw:text-style-name="P2" svg:width="0.0433in" svg:height="0.1925in" svg:x="6.2693in" svg:y="2.9228in">
        <draw:text-box>
          <text:p><text:span text:style-name="T2"><text:s/></text:span></text:p>
        </draw:text-box>
      </draw:frame>
      <draw:polygon text:anchor-type="page" text:anchor-page-number="7" draw:z-index="3912" draw:name="Shape3055" draw:style-name="gr2" draw:text-style-name="P3" svg:width="2.265in" svg:height="0.1283in" svg:x="0.4114in" svg:y="9.3866in" svg:viewBox="0 0 5754 327" draw:points="0,0 5754,0 5754,327 0,327">
        <text:p/>
      </draw:polygon>
      <draw:polygon text:anchor-type="page" text:anchor-page-number="14" draw:z-index="3911" draw:name="Shape4640" draw:style-name="gr2" draw:text-style-name="P3" svg:width="4.3319in" svg:height="0.1917in" svg:x="1.7398in" svg:y="6.5114in" svg:viewBox="0 0 11004 488" draw:points="0,0 11004,0 11004,488 0,488">
        <text:p/>
      </draw:polygon>
      <draw:polygon text:anchor-type="page" text:anchor-page-number="7" draw:z-index="3910" draw:name="Shape3054" draw:style-name="gr2" draw:text-style-name="P3" svg:width="2.3618in" svg:height="0.1283in" svg:x="0.363in" svg:y="9.3866in" svg:viewBox="0 0 6000 327" draw:points="0,0 6000,0 6000,327 0,327">
        <text:p/>
      </draw:polygon>
      <draw:frame text:anchor-type="page" text:anchor-page-number="1" draw:z-index="3909" draw:name="Shape332" draw:style-name="gr1" draw:text-style-name="P2" svg:width="7.7276in" svg:height="0.1295in" svg:x="0.3634in" svg:y="10.139in">
        <draw:text-box>
          <text:p><text:span text:style-name="T1">Il <text:s/>prodotto, <text:s/>comunque, <text:s/>contenendo <text:s/>sostanze <text:s/>pericolose <text:s/>in <text:s/>concentrazione <text:s/>tale <text:s/>da <text:s/>essere <text:s/>dichiarate <text:s/>alla <text:s/>sezione <text:s/>n.3, <text:s/>richiede <text:s/>una <text:s/>scheda <text:s/>dati <text:s/>di </text:span></text:p>
        </draw:text-box>
      </draw:frame>
      <draw:polygon text:anchor-type="page" text:anchor-page-number="6" draw:z-index="3908" draw:name="Shape2113" draw:style-name="gr2" draw:text-style-name="P3" svg:width="1.085in" svg:height="0.1917in" svg:x="6.7098in" svg:y="2.9815in" svg:viewBox="0 0 2757 488" draw:points="0,0 2757,0 2757,488 0,488">
        <text:p/>
      </draw:polygon>
      <draw:polygon text:anchor-type="page" text:anchor-page-number="5" draw:z-index="3907" draw:name="Shape1440" draw:style-name="gr2" draw:text-style-name="P3" svg:width="1.0835in" svg:height="0.1114in" svg:x="0.4114in" svg:y="8.5232in" svg:viewBox="0 0 2753 284" draw:points="0,0 2753,0 2753,284 0,284">
        <text:p/>
      </draw:polygon>
      <draw:frame text:anchor-type="page" text:anchor-page-number="14" draw:z-index="3906" draw:name="Shape4639" draw:style-name="gr1" draw:text-style-name="P2" svg:width="0.3661in" svg:height="0.113in" svg:x="0.4535in" svg:y="6.5126in">
        <draw:text-box>
          <text:p><text:span text:style-name="T5">EUH071</text:span></text:p>
        </draw:text-box>
      </draw:frame>
      <draw:polygon text:anchor-type="page" text:anchor-page-number="6" draw:z-index="3905" draw:name="Shape2110" draw:style-name="gr2" draw:text-style-name="P3" svg:width="1.1819in" svg:height="0.1917in" svg:x="6.6614in" svg:y="2.9815in" svg:viewBox="0 0 3003 488" draw:points="0,0 3003,0 3003,488 0,488">
        <text:p/>
      </draw:polygon>
      <draw:frame text:anchor-type="page" text:anchor-page-number="7" draw:z-index="3904" draw:name="Shape3040" draw:style-name="gr1" draw:text-style-name="P2" svg:width="0.0433in" svg:height="0.1925in" svg:x="3.5154in" svg:y="9.1492in">
        <draw:text-box>
          <text:p><text:span text:style-name="T2"><text:s/></text:span></text:p>
        </draw:text-box>
      </draw:frame>
      <draw:polygon text:anchor-type="page" text:anchor-page-number="5" draw:z-index="3903" draw:name="Shape1439" draw:style-name="gr2" draw:text-style-name="P3" svg:width="1.1803in" svg:height="0.1917in" svg:x="0.363in" svg:y="8.5232in" svg:viewBox="0 0 2999 488" draw:points="0,0 2999,0 2999,488 0,488">
        <text:p/>
      </draw:polygon>
      <draw:frame text:anchor-type="page" text:anchor-page-number="1" draw:z-index="3902" draw:name="Shape331" draw:style-name="gr1" draw:text-style-name="P2" svg:width="5.5268in" svg:height="0.1295in" svg:x="0.3634in" svg:y="10.0102in">
        <draw:text-box>
          <text:p><text:span text:style-name="T1">Il prodotto non è classificato pericoloso ai sensi delle disposizioni di cui al Regolamento (CE) 1272/2008 (CLP). </text:span></text:p>
        </draw:text-box>
      </draw:frame>
      <draw:frame text:anchor-type="page" text:anchor-page-number="14" draw:z-index="3901" draw:name="Shape4629" draw:style-name="gr1" draw:text-style-name="P2" svg:width="0.0433in" svg:height="0.1925in" svg:x="0.411in" svg:y="6.4516in">
        <draw:text-box>
          <text:p><text:span text:style-name="T2"><text:s/></text:span></text:p>
        </draw:text-box>
      </draw:frame>
      <draw:frame text:anchor-type="page" text:anchor-page-number="1" draw:z-index="3900" draw:name="Shape330" draw:style-name="gr1" draw:text-style-name="P2" svg:width="0.0433in" svg:height="0.1925in" svg:x="0.3634in" svg:y="9.8217in">
        <draw:text-box>
          <text:p><text:span text:style-name="T2"><text:s/></text:span></text:p>
        </draw:text-box>
      </draw:frame>
      <draw:polygon text:anchor-type="page" text:anchor-page-number="5" draw:z-index="3899" draw:name="Shape1410" draw:style-name="gr3" draw:text-style-name="P4" svg:width="1.1717in" svg:height="0.0102in" svg:x="6.6732in" svg:y="8.3114in" svg:viewBox="0 0 2977 27" draw:points="0,0 2977,0 2977,27 0,27">
        <text:p/>
      </draw:polygon>
      <draw:frame text:anchor-type="page" text:anchor-page-number="6" draw:z-index="3898" draw:name="Shape2083" draw:style-name="gr1" draw:text-style-name="P2" svg:width="0.3449in" svg:height="0.113in" svg:x="5.9228in" svg:y="2.9839in">
        <draw:text-box>
          <text:p><text:span text:style-name="T4">INALAB</text:span></text:p>
        </draw:text-box>
      </draw:frame>
      <draw:polygon text:anchor-type="page" text:anchor-page-number="7" draw:z-index="3897" draw:name="Shape3050" draw:style-name="gr2" draw:text-style-name="P3" svg:width="2.265in" svg:height="0.1917in" svg:x="4.348in" svg:y="9.1949in" svg:viewBox="0 0 5754 488" draw:points="0,0 5754,0 5754,488 0,488">
        <text:p/>
      </draw:polygon>
      <draw:polygon text:anchor-type="page" text:anchor-page-number="5" draw:z-index="3896" draw:name="Shape1409" draw:style-name="gr3" draw:text-style-name="P4" svg:width="0.0102in" svg:height="0.0102in" svg:x="6.663in" svg:y="8.3114in" svg:viewBox="0 0 27 27" draw:points="0,0 27,0 27,27 0,27">
        <text:p/>
      </draw:polygon>
      <draw:frame text:anchor-type="page" text:anchor-page-number="14" draw:z-index="3895" draw:name="Shape4628" draw:style-name="gr1" draw:text-style-name="P2" svg:width="0.0433in" svg:height="0.1925in" svg:x="6.1193in" svg:y="6.3228in">
        <draw:text-box>
          <text:p><text:span text:style-name="T2"><text:s/></text:span></text:p>
        </draw:text-box>
      </draw:frame>
      <draw:polygon text:anchor-type="page" text:anchor-page-number="7" draw:z-index="3894" draw:name="Shape3049" draw:style-name="gr2" draw:text-style-name="P3" svg:width="2.363in" svg:height="0.1917in" svg:x="4.3in" svg:y="9.1949in" svg:viewBox="0 0 6003 488" draw:points="0,0 6003,0 6003,488 0,488">
        <text:p/>
      </draw:polygon>
      <draw:frame text:anchor-type="page" text:anchor-page-number="6" draw:z-index="3893" draw:name="Shape2105" draw:style-name="gr1" draw:text-style-name="P2" svg:width="0.0433in" svg:height="0.1925in" svg:x="5.3335in" svg:y="2.9846in">
        <draw:text-box>
          <text:p><text:span text:style-name="T2"><text:s/></text:span></text:p>
        </draw:text-box>
      </draw:frame>
      <draw:frame text:anchor-type="page" text:anchor-page-number="1" draw:z-index="3892" draw:name="Shape329" draw:style-name="gr1" draw:text-style-name="P2" svg:width="0.0433in" svg:height="0.1925in" svg:x="0.3634in" svg:y="9.6299in">
        <draw:text-box>
          <text:p><text:span text:style-name="T2"><text:s/></text:span></text:p>
        </draw:text-box>
      </draw:frame>
      <draw:frame text:anchor-type="page" text:anchor-page-number="1" draw:z-index="3891" draw:name="Shape328" draw:style-name="gr1" draw:text-style-name="P2" svg:width="2.6803in" svg:height="0.1295in" svg:x="0.3634in" svg:y="9.4984in">
        <draw:text-box>
          <text:p><text:span text:style-name="T3">2.1. Classificazione della sostanza o della miscela </text:span></text:p>
        </draw:text-box>
      </draw:frame>
      <draw:frame text:anchor-type="page" text:anchor-page-number="7" draw:z-index="3890" draw:name="Shape3047" draw:style-name="gr1" draw:text-style-name="P2" svg:width="0.7476in" svg:height="0.1295in" svg:x="2.7728in" svg:y="9.1972in">
        <draw:text-box>
          <text:p><text:span text:style-name="T1">non disponibile</text:span></text:p>
        </draw:text-box>
      </draw:frame>
      <draw:polygon text:anchor-type="page" text:anchor-page-number="5" draw:z-index="3889" draw:name="Shape1399" draw:style-name="gr3" draw:text-style-name="P4" svg:width="0.7783in" svg:height="0.0102in" svg:x="5.8846in" svg:y="8.3114in" svg:viewBox="0 0 1978 27" draw:points="0,0 1978,0 1978,27 0,27">
        <text:p/>
      </draw:polygon>
      <draw:polygon text:anchor-type="page" text:anchor-page-number="6" draw:z-index="3888" draw:name="Shape2107" draw:style-name="gr2" draw:text-style-name="P3" svg:width="0.6898in" svg:height="0.1118in" svg:x="5.9232in" svg:y="2.9815in" svg:viewBox="0 0 1753 285" draw:points="0,0 1753,0 1753,285 0,285">
        <text:p/>
      </draw:polygon>
      <draw:polygon text:anchor-type="page" text:anchor-page-number="14" draw:z-index="3887" draw:name="Shape4633" draw:style-name="gr2" draw:text-style-name="P3" svg:width="1.2799in" svg:height="0.1118in" svg:x="0.4114in" svg:y="6.5114in" svg:viewBox="0 0 3252 285" draw:points="0,0 3252,0 3252,285 0,285">
        <text:p/>
      </draw:polygon>
      <draw:frame text:anchor-type="page" text:anchor-page-number="1" draw:z-index="3886" draw:name="Shape327" draw:style-name="gr1" draw:text-style-name="P2" svg:width="0.0433in" svg:height="0.1925in" svg:x="4.1335in" svg:y="9.3098in">
        <draw:text-box>
          <text:p><text:span text:style-name="T2"><text:s/></text:span></text:p>
        </draw:text-box>
      </draw:frame>
      <draw:polygon text:anchor-type="page" text:anchor-page-number="6" draw:z-index="3885" draw:name="Shape2106" draw:style-name="gr2" draw:text-style-name="P3" svg:width="0.7866in" svg:height="0.1917in" svg:x="5.8748in" svg:y="2.9815in" svg:viewBox="0 0 1999 488" draw:points="0,0 1999,0 1999,488 0,488">
        <text:p/>
      </draw:polygon>
      <draw:polygon text:anchor-type="page" text:anchor-page-number="5" draw:z-index="3884" draw:name="Shape1398" draw:style-name="gr3" draw:text-style-name="P4" svg:width="0.0098in" svg:height="0.0102in" svg:x="5.8748in" svg:y="8.3114in" svg:viewBox="0 0 26 27" draw:points="0,0 26,0 26,27 0,27">
        <text:p/>
      </draw:polygon>
      <draw:frame text:anchor-type="page" text:anchor-page-number="7" draw:z-index="3883" draw:name="Shape3039" draw:style-name="gr1" draw:text-style-name="P2" svg:width="0.0433in" svg:height="0.1925in" svg:x="1.398in" svg:y="9.1492in">
        <draw:text-box>
          <text:p><text:span text:style-name="T2"><text:s/></text:span></text:p>
        </draw:text-box>
      </draw:frame>
      <draw:polygon text:anchor-type="page" text:anchor-page-number="14" draw:z-index="3882" draw:name="Shape4632" draw:style-name="gr2" draw:text-style-name="P3" svg:width="1.3768in" svg:height="0.1917in" svg:x="0.363in" svg:y="6.5114in" svg:viewBox="0 0 3498 488" draw:points="0,0 3498,0 3498,488 0,488">
        <text:p/>
      </draw:polygon>
      <draw:polygon text:anchor-type="page" text:anchor-page-number="7" draw:z-index="3881" draw:name="Shape3046" draw:style-name="gr2" draw:text-style-name="P3" svg:width="1.4783in" svg:height="0.1283in" svg:x="2.7732in" svg:y="9.1949in" svg:viewBox="0 0 3756 327" draw:points="0,0 3756,0 3756,327 0,327">
        <text:p/>
      </draw:polygon>
      <draw:polygon text:anchor-type="page" text:anchor-page-number="5" draw:z-index="3880" draw:name="Shape1388" draw:style-name="gr3" draw:text-style-name="P4" svg:width="0.5799in" svg:height="0.0102in" svg:x="5.2949in" svg:y="8.3114in" svg:viewBox="0 0 1474 27" draw:points="0,0 1474,0 1474,27 0,27">
        <text:p/>
      </draw:polygon>
      <draw:frame text:anchor-type="page" text:anchor-page-number="6" draw:z-index="3879" draw:name="Shape2093" draw:style-name="gr1" draw:text-style-name="P2" svg:width="0.0433in" svg:height="0.1925in" svg:x="4.1516in" svg:y="2.9846in">
        <draw:text-box>
          <text:p><text:span text:style-name="T2"><text:s/></text:span></text:p>
        </draw:text-box>
      </draw:frame>
      <draw:frame text:anchor-type="page" text:anchor-page-number="1" draw:z-index="3878" draw:name="Shape323" draw:style-name="gr1" draw:text-style-name="P2" svg:width="0.0433in" svg:height="0.1925in" svg:x="3.2465in" svg:y="9.1228in">
        <draw:text-box>
          <text:p><text:span text:style-name="T2"><text:s/></text:span></text:p>
        </draw:text-box>
      </draw:frame>
      <draw:frame text:anchor-type="page" text:anchor-page-number="14" draw:z-index="3877" draw:name="Shape4622" draw:style-name="gr1" draw:text-style-name="P2" svg:width="0.0433in" svg:height="0.1925in" svg:x="5.061in" svg:y="6.2752in">
        <draw:text-box>
          <text:p><text:span text:style-name="T2"><text:s/></text:span></text:p>
        </draw:text-box>
      </draw:frame>
      <draw:polygon text:anchor-type="page" text:anchor-page-number="5" draw:z-index="3876" draw:name="Shape1387" draw:style-name="gr3" draw:text-style-name="P4" svg:width="0.0102in" svg:height="0.0102in" svg:x="5.2846in" svg:y="8.3114in" svg:viewBox="0 0 27 27" draw:points="0,0 27,0 27,27 0,27">
        <text:p/>
      </draw:polygon>
      <draw:polygon text:anchor-type="page" text:anchor-page-number="14" draw:z-index="3875" draw:name="Shape4638" draw:style-name="gr2" draw:text-style-name="P3" svg:width="0.4933in" svg:height="0.1917in" svg:x="6.1197in" svg:y="6.3197in" svg:viewBox="0 0 1254 488" draw:points="0,0 1254,0 1254,488 0,488">
        <text:p/>
      </draw:polygon>
      <draw:polygon text:anchor-type="page" text:anchor-page-number="6" draw:z-index="3874" draw:name="Shape2104" draw:style-name="gr2" draw:text-style-name="P3" svg:width="0.4917in" svg:height="0.1917in" svg:x="5.3331in" svg:y="2.9815in" svg:viewBox="0 0 1250 488" draw:points="0,0 1250,0 1250,488 0,488">
        <text:p/>
      </draw:polygon>
      <draw:frame text:anchor-type="page" text:anchor-page-number="1" draw:z-index="3873" draw:name="Shape326" draw:style-name="gr1" draw:text-style-name="P2" svg:width="2.8071in" svg:height="0.1776in" svg:x="0.4535in" svg:y="9.1327in">
        <draw:text-box>
          <text:p><text:span text:style-name="T6">SEZIONE 2. Identificazione dei pericoli</text:span></text:p>
        </draw:text-box>
      </draw:frame>
      <draw:polygon text:anchor-type="page" text:anchor-page-number="7" draw:z-index="3872" draw:name="Shape3045" draw:style-name="gr2" draw:text-style-name="P3" svg:width="1.5752in" svg:height="0.1917in" svg:x="2.7248in" svg:y="9.1949in" svg:viewBox="0 0 4002 488" draw:points="0,0 4002,0 4002,488 0,488">
        <text:p/>
      </draw:polygon>
      <draw:polygon text:anchor-type="page" text:anchor-page-number="5" draw:z-index="3871" draw:name="Shape1383" draw:style-name="gr3" draw:text-style-name="P4" svg:width="1.1717in" svg:height="0.0102in" svg:x="4.113in" svg:y="8.3114in" svg:viewBox="0 0 2977 27" draw:points="0,0 2977,0 2977,27 0,27">
        <text:p/>
      </draw:polygon>
      <draw:polygon text:anchor-type="page" text:anchor-page-number="14" draw:z-index="3870" draw:name="Shape4637" draw:style-name="gr2" draw:text-style-name="P3" svg:width="0.5898in" svg:height="0.1917in" svg:x="6.0717in" svg:y="6.3197in" svg:viewBox="0 0 1499 488" draw:points="0,0 1499,0 1499,488 0,488">
        <text:p/>
      </draw:polygon>
      <draw:polygon text:anchor-type="page" text:anchor-page-number="6" draw:z-index="3869" draw:name="Shape2101" draw:style-name="gr2" draw:text-style-name="P3" svg:width="0.5917in" svg:height="0.1917in" svg:x="5.2831in" svg:y="2.9815in" svg:viewBox="0 0 1504 488" draw:points="0,0 1504,0 1504,488 0,488">
        <text:p/>
      </draw:polygon>
      <draw:frame text:anchor-type="page" text:anchor-page-number="2" draw:z-index="3868" draw:name="Shape656" draw:style-name="gr1" draw:text-style-name="P2" svg:width="0.0433in" svg:height="0.1925in" svg:x="7.3016in" svg:y="10.028in">
        <draw:text-box>
          <text:p><text:span text:style-name="T2"><text:s/></text:span></text:p>
        </draw:text-box>
      </draw:frame>
      <draw:frame text:anchor-type="page" text:anchor-page-number="7" draw:z-index="3867" draw:name="Shape3043" draw:style-name="gr1" draw:text-style-name="P2" svg:width="0.9406in" svg:height="0.1295in" svg:x="0.4535in" svg:y="9.1972in">
        <draw:text-box>
          <text:p><text:span text:style-name="T1">Tensione di vapore</text:span></text:p>
        </draw:text-box>
      </draw:frame>
      <draw:frame text:anchor-type="page" text:anchor-page-number="1" draw:z-index="3866" draw:name="Shape322" draw:style-name="gr1" draw:text-style-name="P2" svg:width="0.0433in" svg:height="0.1925in" svg:x="0.411in" svg:y="9.1228in">
        <draw:text-box>
          <text:p><text:span text:style-name="T2"><text:s/></text:span></text:p>
        </draw:text-box>
      </draw:frame>
      <draw:frame text:anchor-type="page" text:anchor-page-number="7" draw:z-index="3865" draw:name="Shape3038" draw:style-name="gr1" draw:text-style-name="P2" svg:width="0.0433in" svg:height="0.1925in" svg:x="0.411in" svg:y="9.1492in">
        <draw:text-box>
          <text:p><text:span text:style-name="T2"><text:s/></text:span></text:p>
        </draw:text-box>
      </draw:frame>
      <draw:polygon text:anchor-type="page" text:anchor-page-number="5" draw:z-index="3864" draw:name="Shape1382" draw:style-name="gr3" draw:text-style-name="P4" svg:width="0.0098in" svg:height="0.0102in" svg:x="4.1031in" svg:y="8.3114in" svg:viewBox="0 0 26 27" draw:points="0,0 26,0 26,27 0,27">
        <text:p/>
      </draw:polygon>
      <draw:frame text:anchor-type="page" text:anchor-page-number="2" draw:z-index="3863" draw:name="Shape653" draw:style-name="gr1" draw:text-style-name="P2" svg:width="0.0433in" svg:height="0.1925in" svg:x="3.3634in" svg:y="10.028in">
        <draw:text-box>
          <text:p><text:span text:style-name="T2"><text:s/></text:span></text:p>
        </draw:text-box>
      </draw:frame>
      <draw:frame text:anchor-type="page" text:anchor-page-number="1" draw:z-index="3862" draw:name="Shape321" draw:style-name="gr1" draw:text-style-name="P2" svg:width="0.0433in" svg:height="0.1925in" svg:x="4.1335in" svg:y="8.9429in">
        <draw:text-box>
          <text:p><text:span text:style-name="T2"><text:s/></text:span></text:p>
        </draw:text-box>
      </draw:frame>
      <draw:frame text:anchor-type="page" text:anchor-page-number="14" draw:z-index="3861" draw:name="Shape4636" draw:style-name="gr1" draw:text-style-name="P2" svg:width="3.2933in" svg:height="0.1295in" svg:x="1.7882in" svg:y="6.322in">
        <draw:text-box>
          <text:p><text:span text:style-name="T1">Molto tossico per gli organismi acquatici con effetti di lunga durata.</text:span></text:p>
        </draw:text-box>
      </draw:frame>
      <draw:frame text:anchor-type="page" text:anchor-page-number="6" draw:z-index="3860" draw:name="Shape2084" draw:style-name="gr1" draw:text-style-name="P2" svg:width="0.0433in" svg:height="0.1925in" svg:x="3.561in" svg:y="2.9846in">
        <draw:text-box>
          <text:p><text:span text:style-name="T2"><text:s/></text:span></text:p>
        </draw:text-box>
      </draw:frame>
      <draw:frame text:anchor-type="page" text:anchor-page-number="7" draw:z-index="3859" draw:name="Shape3037" draw:style-name="gr1" draw:text-style-name="P2" svg:width="0.0433in" svg:height="0.1925in" svg:x="4.348in" svg:y="9.0063in">
        <draw:text-box>
          <text:p><text:span text:style-name="T2"><text:s/></text:span></text:p>
        </draw:text-box>
      </draw:frame>
      <draw:polygon text:anchor-type="page" text:anchor-page-number="6" draw:z-index="3858" draw:name="Shape2092" draw:style-name="gr2" draw:text-style-name="P3" svg:width="1.0831in" svg:height="0.1917in" svg:x="4.1516in" svg:y="2.9815in" svg:viewBox="0 0 2752 488" draw:points="0,0 2752,0 2752,488 0,488">
        <text:p/>
      </draw:polygon>
      <draw:polygon text:anchor-type="page" text:anchor-page-number="1" draw:z-index="3857" draw:name="Shape325" draw:style-name="gr5" draw:text-style-name="P6" svg:width="7.3835in" svg:height="0.1748in" svg:x="0.4114in" svg:y="9.1315in" svg:viewBox="0 0 18755 445" draw:points="0,0 18755,0 18755,445 0,445">
        <text:p/>
      </draw:polygon>
      <draw:polygon text:anchor-type="page" text:anchor-page-number="2" draw:z-index="3856" draw:name="Shape655" draw:style-name="gr2" draw:text-style-name="P3" svg:width="0.2965in" svg:height="0.1917in" svg:x="7.3016in" svg:y="10.0248in" svg:viewBox="0 0 754 488" draw:points="0,0 754,0 754,488 0,488">
        <text:p/>
      </draw:polygon>
      <draw:polygon text:anchor-type="page" text:anchor-page-number="5" draw:z-index="3855" draw:name="Shape1379" draw:style-name="gr3" draw:text-style-name="P4" svg:width="0.5799in" svg:height="0.0102in" svg:x="3.5232in" svg:y="8.3114in" svg:viewBox="0 0 1474 27" draw:points="0,0 1474,0 1474,27 0,27">
        <text:p/>
      </draw:polygon>
      <draw:frame text:anchor-type="page" text:anchor-page-number="14" draw:z-index="3854" draw:name="Shape4616" draw:style-name="gr1" draw:text-style-name="P2" svg:width="0.0433in" svg:height="0.1925in" svg:x="0.6846in" svg:y="6.2598in">
        <draw:text-box>
          <text:p><text:span text:style-name="T2"><text:s/></text:span></text:p>
        </draw:text-box>
      </draw:frame>
      <draw:polygon text:anchor-type="page" text:anchor-page-number="1" draw:z-index="3853" draw:name="Shape324" draw:style-name="gr5" draw:text-style-name="P6" svg:width="7.4803in" svg:height="0.1748in" svg:x="0.363in" svg:y="9.1315in" svg:viewBox="0 0 19001 445" draw:points="0,0 19001,0 19001,445 0,445">
        <text:p/>
      </draw:polygon>
      <draw:polygon text:anchor-type="page" text:anchor-page-number="7" draw:z-index="3852" draw:name="Shape3042" draw:style-name="gr2" draw:text-style-name="P3" svg:width="2.265in" svg:height="0.1283in" svg:x="0.4114in" svg:y="9.1949in" svg:viewBox="0 0 5754 327" draw:points="0,0 5754,0 5754,327 0,327">
        <text:p/>
      </draw:polygon>
      <draw:polygon text:anchor-type="page" text:anchor-page-number="2" draw:z-index="3851" draw:name="Shape654" draw:style-name="gr2" draw:text-style-name="P3" svg:width="0.3933in" svg:height="0.1917in" svg:x="7.2531in" svg:y="10.0248in" svg:viewBox="0 0 1000 488" draw:points="0,0 1000,0 1000,488 0,488">
        <text:p/>
      </draw:polygon>
      <draw:polygon text:anchor-type="page" text:anchor-page-number="6" draw:z-index="3850" draw:name="Shape2089" draw:style-name="gr2" draw:text-style-name="P3" svg:width="1.1799in" svg:height="0.1917in" svg:x="4.1031in" svg:y="2.9815in" svg:viewBox="0 0 2998 488" draw:points="0,0 2998,0 2998,488 0,488">
        <text:p/>
      </draw:polygon>
      <draw:polygon text:anchor-type="page" text:anchor-page-number="14" draw:z-index="3849" draw:name="Shape4635" draw:style-name="gr2" draw:text-style-name="P3" svg:width="4.235in" svg:height="0.1283in" svg:x="1.7882in" svg:y="6.3197in" svg:viewBox="0 0 10758 327" draw:points="0,0 10758,0 10758,327 0,327">
        <text:p/>
      </draw:polygon>
      <draw:polygon text:anchor-type="page" text:anchor-page-number="5" draw:z-index="3848" draw:name="Shape1378" draw:style-name="gr3" draw:text-style-name="P4" svg:width="0.0102in" svg:height="0.0102in" svg:x="3.513in" svg:y="8.3114in" svg:viewBox="0 0 27 27" draw:points="0,0 27,0 27,27 0,27">
        <text:p/>
      </draw:polygon>
      <draw:frame text:anchor-type="page" text:anchor-page-number="1" draw:z-index="3847" draw:name="Shape318" draw:style-name="gr1" draw:text-style-name="P2" svg:width="0.0433in" svg:height="0.1925in" svg:x="6.111in" svg:y="8.7646in">
        <draw:text-box>
          <text:p><text:span text:style-name="T2"><text:s/></text:span></text:p>
        </draw:text-box>
      </draw:frame>
      <draw:frame text:anchor-type="page" text:anchor-page-number="6" draw:z-index="3846" draw:name="Shape2036" draw:style-name="gr1" draw:text-style-name="P2" svg:width="0.0433in" svg:height="0.1925in" svg:x="2.5417in" svg:y="2.9228in">
        <draw:text-box>
          <text:p><text:span text:style-name="T2"><text:s/></text:span></text:p>
        </draw:text-box>
      </draw:frame>
      <draw:frame text:anchor-type="page" text:anchor-page-number="2" draw:z-index="3845" draw:name="Shape638" draw:style-name="gr1" draw:text-style-name="P2" svg:width="0.0433in" svg:height="0.1925in" svg:x="2.5965in" svg:y="9.9799in">
        <draw:text-box>
          <text:p><text:span text:style-name="T2"><text:s/></text:span></text:p>
        </draw:text-box>
      </draw:frame>
      <draw:polygon text:anchor-type="page" text:anchor-page-number="7" draw:z-index="3844" draw:name="Shape3041" draw:style-name="gr2" draw:text-style-name="P3" svg:width="2.3618in" svg:height="0.1917in" svg:x="0.363in" svg:y="9.1949in" svg:viewBox="0 0 6000 488" draw:points="0,0 6000,0 6000,488 0,488">
        <text:p/>
      </draw:polygon>
      <draw:polygon text:anchor-type="page" text:anchor-page-number="5" draw:z-index="3843" draw:name="Shape1377" draw:style-name="gr3" draw:text-style-name="P4" svg:width="1.1717in" svg:height="0.0102in" svg:x="2.3413in" svg:y="8.3114in" svg:viewBox="0 0 2977 27" draw:points="0,0 2977,0 2977,27 0,27">
        <text:p/>
      </draw:polygon>
      <draw:polygon text:anchor-type="page" text:anchor-page-number="14" draw:z-index="3842" draw:name="Shape4634" draw:style-name="gr2" draw:text-style-name="P3" svg:width="4.3319in" svg:height="0.1917in" svg:x="1.7398in" svg:y="6.3197in" svg:viewBox="0 0 11004 488" draw:points="0,0 11004,0 11004,488 0,488">
        <text:p/>
      </draw:polygon>
      <draw:polygon text:anchor-type="page" text:anchor-page-number="2" draw:z-index="3841" draw:name="Shape652" draw:style-name="gr2" draw:text-style-name="P3" svg:width="3.8417in" svg:height="0.1917in" svg:x="3.363in" svg:y="10.0248in" svg:viewBox="0 0 9759 488" draw:points="0,0 9759,0 9759,488 0,488">
        <text:p/>
      </draw:polygon>
      <draw:polygon text:anchor-type="page" text:anchor-page-number="6" draw:z-index="3840" draw:name="Shape2082" draw:style-name="gr2" draw:text-style-name="P3" svg:width="0.4933in" svg:height="0.1917in" svg:x="3.5614in" svg:y="2.9815in" svg:viewBox="0 0 1254 488" draw:points="0,0 1254,0 1254,488 0,488">
        <text:p/>
      </draw:polygon>
      <draw:frame text:anchor-type="page" text:anchor-page-number="14" draw:z-index="3839" draw:name="Shape4627" draw:style-name="gr1" draw:text-style-name="P2" svg:width="0.2323in" svg:height="0.113in" svg:x="0.4535in" svg:y="6.3201in">
        <draw:text-box>
          <text:p><text:span text:style-name="T5">H410</text:span></text:p>
        </draw:text-box>
      </draw:frame>
      <draw:frame text:anchor-type="page" text:anchor-page-number="1" draw:z-index="3838" draw:name="Shape320" draw:style-name="gr1" draw:text-style-name="P2" svg:width="2.9307in" svg:height="0.1295in" svg:x="3.1665in" svg:y="8.8126in">
        <draw:text-box>
          <text:p><text:span text:style-name="T3">CAV Centro antiveleni Veneto - Verona Tel. 800.011.858 </text:span></text:p>
        </draw:text-box>
      </draw:frame>
      <draw:polygon text:anchor-type="page" text:anchor-page-number="5" draw:z-index="3837" draw:name="Shape1408" draw:style-name="gr3" draw:text-style-name="P4" svg:width="0.0098in" svg:height="0.0102in" svg:x="2.3315in" svg:y="8.3114in" svg:viewBox="0 0 26 27" draw:points="0,0 26,0 26,27 0,27">
        <text:p/>
      </draw:polygon>
      <draw:frame text:anchor-type="page" text:anchor-page-number="7" draw:z-index="3836" draw:name="Shape3024" draw:style-name="gr1" draw:text-style-name="P2" svg:width="0.0433in" svg:height="0.1925in" svg:x="3.5154in" svg:y="8.9575in">
        <draw:text-box>
          <text:p><text:span text:style-name="T2"><text:s/></text:span></text:p>
        </draw:text-box>
      </draw:frame>
      <draw:polygon text:anchor-type="page" text:anchor-page-number="6" draw:z-index="3835" draw:name="Shape2080" draw:style-name="gr2" draw:text-style-name="P3" svg:width="0.5902in" svg:height="0.1917in" svg:x="3.513in" svg:y="2.9815in" svg:viewBox="0 0 1500 488" draw:points="0,0 1500,0 1500,488 0,488">
        <text:p/>
      </draw:polygon>
      <draw:polygon text:anchor-type="page" text:anchor-page-number="7" draw:z-index="3834" draw:name="Shape3036" draw:style-name="gr2" draw:text-style-name="P3" svg:width="2.265in" svg:height="0.1917in" svg:x="4.348in" svg:y="9.0031in" svg:viewBox="0 0 5754 488" draw:points="0,0 5754,0 5754,488 0,488">
        <text:p/>
      </draw:polygon>
      <draw:polygon text:anchor-type="page" text:anchor-page-number="5" draw:z-index="3833" draw:name="Shape1407" draw:style-name="gr3" draw:text-style-name="P4" svg:width="0.7768in" svg:height="0.0102in" svg:x="1.5547in" svg:y="8.3114in" svg:viewBox="0 0 1974 27" draw:points="0,0 1974,0 1974,27 0,27">
        <text:p/>
      </draw:polygon>
      <draw:frame text:anchor-type="page" text:anchor-page-number="14" draw:z-index="3832" draw:name="Shape4621" draw:style-name="gr1" draw:text-style-name="P2" svg:width="0.0433in" svg:height="0.1925in" svg:x="0.411in" svg:y="6.2598in">
        <draw:text-box>
          <text:p><text:span text:style-name="T2"><text:s/></text:span></text:p>
        </draw:text-box>
      </draw:frame>
      <draw:polygon text:anchor-type="page" text:anchor-page-number="2" draw:z-index="3831" draw:name="Shape651" draw:style-name="gr2" draw:text-style-name="P3" svg:width="3.9382in" svg:height="0.1917in" svg:x="3.315in" svg:y="10.0248in" svg:viewBox="0 0 10004 488" draw:points="0,0 10004,0 10004,488 0,488">
        <text:p/>
      </draw:polygon>
      <draw:frame text:anchor-type="page" text:anchor-page-number="1" draw:z-index="3830" draw:name="Shape317" draw:style-name="gr1" draw:text-style-name="P2" svg:width="3.9516in" svg:height="0.1295in" svg:x="3.1665in" svg:y="8.6839in">
        <draw:text-box>
          <text:p><text:span text:style-name="T3">CAV Azienda Ospedaliera Papa Giovanni XXIII - Bergamo Tel. 800.88.33.00 </text:span></text:p>
        </draw:text-box>
      </draw:frame>
      <draw:frame text:anchor-type="page" text:anchor-page-number="6" draw:z-index="3829" draw:name="Shape2079" draw:style-name="gr1" draw:text-style-name="P2" svg:width="0.163in" svg:height="0.113in" svg:x="2.3799in" svg:y="2.9839in">
        <draw:text-box>
          <text:p><text:span text:style-name="T4"><text:s text:c="2"/>10</text:span></text:p>
        </draw:text-box>
      </draw:frame>
      <draw:frame text:anchor-type="page" text:anchor-page-number="2" draw:z-index="3828" draw:name="Shape650" draw:style-name="gr1" draw:text-style-name="P2" svg:width="0.2189in" svg:height="0.1295in" svg:x="2.3799in" svg:y="10.0272in">
        <draw:text-box>
          <text:p><text:span text:style-name="T1">2.82</text:span></text:p>
        </draw:text-box>
      </draw:frame>
      <draw:frame text:anchor-type="page" text:anchor-page-number="14" draw:z-index="3827" draw:name="Shape4620" draw:style-name="gr1" draw:text-style-name="P2" svg:width="0.0433in" svg:height="0.1925in" svg:x="6.1193in" svg:y="6.1311in">
        <draw:text-box>
          <text:p><text:span text:style-name="T2"><text:s/></text:span></text:p>
        </draw:text-box>
      </draw:frame>
      <draw:polygon text:anchor-type="page" text:anchor-page-number="5" draw:z-index="3826" draw:name="Shape1406" draw:style-name="gr3" draw:text-style-name="P4" svg:width="0.0098in" svg:height="0.0102in" svg:x="1.5449in" svg:y="8.3114in" svg:viewBox="0 0 26 27" draw:points="0,0 26,0 26,27 0,27">
        <text:p/>
      </draw:polygon>
      <draw:polygon text:anchor-type="page" text:anchor-page-number="7" draw:z-index="3825" draw:name="Shape3035" draw:style-name="gr2" draw:text-style-name="P3" svg:width="2.363in" svg:height="0.1917in" svg:x="4.3in" svg:y="9.0031in" svg:viewBox="0 0 6003 488" draw:points="0,0 6003,0 6003,488 0,488">
        <text:p/>
      </draw:polygon>
      <draw:polygon text:anchor-type="page" text:anchor-page-number="1" draw:z-index="3824" draw:name="Shape319" draw:style-name="gr2" draw:text-style-name="P3" svg:width="4.6283in" svg:height="0.1283in" svg:x="3.1665in" svg:y="8.8114in" svg:viewBox="0 0 11757 327" draw:points="0,0 11757,0 11757,327 0,327">
        <text:p/>
      </draw:polygon>
      <draw:polygon text:anchor-type="page" text:anchor-page-number="14" draw:z-index="3823" draw:name="Shape4624" draw:style-name="gr2" draw:text-style-name="P3" svg:width="1.2799in" svg:height="0.1118in" svg:x="0.4114in" svg:y="6.3197in" svg:viewBox="0 0 3252 285" draw:points="0,0 3252,0 3252,285 0,285">
        <text:p/>
      </draw:polygon>
      <draw:frame text:anchor-type="page" text:anchor-page-number="2" draw:z-index="3822" draw:name="Shape637" draw:style-name="gr1" draw:text-style-name="P2" svg:width="0.0433in" svg:height="0.1925in" svg:x="0.9228in" svg:y="9.9799in">
        <draw:text-box>
          <text:p><text:span text:style-name="T2"><text:s/></text:span></text:p>
        </draw:text-box>
      </draw:frame>
      <draw:frame text:anchor-type="page" text:anchor-page-number="6" draw:z-index="3821" draw:name="Shape2070" draw:style-name="gr1" draw:text-style-name="P2" svg:width="0.0433in" svg:height="0.1925in" svg:x="1.7866in" svg:y="2.9228in">
        <draw:text-box>
          <text:p><text:span text:style-name="T2"><text:s/></text:span></text:p>
        </draw:text-box>
      </draw:frame>
      <draw:polygon text:anchor-type="page" text:anchor-page-number="5" draw:z-index="3820" draw:name="Shape1397" draw:style-name="gr3" draw:text-style-name="P4" svg:width="1.1819in" svg:height="0.0102in" svg:x="0.363in" svg:y="8.3114in" svg:viewBox="0 0 3003 27" draw:points="0,0 3003,0 3003,27 0,27">
        <text:p/>
      </draw:polygon>
      <draw:frame text:anchor-type="page" text:anchor-page-number="1" draw:z-index="3819" draw:name="Shape314" draw:style-name="gr1" draw:text-style-name="P2" svg:width="3.0205in" svg:height="0.1295in" svg:x="3.1665in" svg:y="8.5555in">
        <draw:text-box>
          <text:p><text:span text:style-name="T3">CAV Ospedale Niguarda - Milano Tel. (+39) 02.66.1010.29 </text:span></text:p>
        </draw:text-box>
      </draw:frame>
      <draw:frame text:anchor-type="page" text:anchor-page-number="7" draw:z-index="3818" draw:name="Shape3034" draw:style-name="gr1" draw:text-style-name="P2" svg:width="0.7476in" svg:height="0.1295in" svg:x="2.7728in" svg:y="9.0055in">
        <draw:text-box>
          <text:p><text:span text:style-name="T1">non disponibile</text:span></text:p>
        </draw:text-box>
      </draw:frame>
      <draw:frame text:anchor-type="page" text:anchor-page-number="7" draw:z-index="3817" draw:name="Shape3023" draw:style-name="gr1" draw:text-style-name="P2" svg:width="0.0433in" svg:height="0.1925in" svg:x="2.6217in" svg:y="8.9575in">
        <draw:text-box>
          <text:p><text:span text:style-name="T2"><text:s/></text:span></text:p>
        </draw:text-box>
      </draw:frame>
      <draw:polygon text:anchor-type="page" text:anchor-page-number="6" draw:z-index="3816" draw:name="Shape2078" draw:style-name="gr2" draw:text-style-name="P3" svg:width="1.0831in" svg:height="0.1118in" svg:x="2.3799in" svg:y="2.9815in" svg:viewBox="0 0 2752 285" draw:points="0,0 2752,0 2752,285 0,285">
        <text:p/>
      </draw:polygon>
      <draw:polygon text:anchor-type="page" text:anchor-page-number="2" draw:z-index="3815" draw:name="Shape649" draw:style-name="gr2" draw:text-style-name="P3" svg:width="0.8866in" svg:height="0.1283in" svg:x="2.3799in" svg:y="10.0248in" svg:viewBox="0 0 2253 327" draw:points="0,0 2253,0 2253,327 0,327">
        <text:p/>
      </draw:polygon>
      <draw:frame text:anchor-type="page" text:anchor-page-number="5" draw:z-index="3814" draw:name="Shape1429" draw:style-name="gr1" draw:text-style-name="P2" svg:width="0.0433in" svg:height="0.1925in" svg:x="5.9228in" svg:y="8.3252in">
        <draw:text-box>
          <text:p><text:span text:style-name="T2"><text:s/></text:span></text:p>
        </draw:text-box>
      </draw:frame>
      <draw:polygon text:anchor-type="page" text:anchor-page-number="1" draw:z-index="3813" draw:name="Shape316" draw:style-name="gr2" draw:text-style-name="P3" svg:width="4.6685in" svg:height="0.1283in" svg:x="3.1465in" svg:y="8.6831in" svg:viewBox="0 0 11859 327" draw:points="0,0 11859,0 11859,327 0,327">
        <text:p/>
      </draw:polygon>
      <draw:polygon text:anchor-type="page" text:anchor-page-number="14" draw:z-index="3812" draw:name="Shape4623" draw:style-name="gr2" draw:text-style-name="P3" svg:width="1.3768in" svg:height="0.1917in" svg:x="0.363in" svg:y="6.3197in" svg:viewBox="0 0 3498 488" draw:points="0,0 3498,0 3498,488 0,488">
        <text:p/>
      </draw:polygon>
      <draw:frame text:anchor-type="page" text:anchor-page-number="1" draw:z-index="3811" draw:name="Shape313" draw:style-name="gr1" draw:text-style-name="P2" svg:width="4.385in" svg:height="0.1295in" svg:x="3.1665in" svg:y="8.4283in">
        <draw:text-box>
          <text:p><text:span text:style-name="T3">CAV Centro Nazionale di Informazione Tossicologica - Pavia Tel. (+39) 0382 24.444 </text:span></text:p>
        </draw:text-box>
      </draw:frame>
      <draw:polygon text:anchor-type="page" text:anchor-page-number="2" draw:z-index="3810" draw:name="Shape648" draw:style-name="gr2" draw:text-style-name="P3" svg:width="0.9835in" svg:height="0.1917in" svg:x="2.3315in" svg:y="10.0248in" svg:viewBox="0 0 2499 488" draw:points="0,0 2499,0 2499,488 0,488">
        <text:p/>
      </draw:polygon>
      <draw:polygon text:anchor-type="page" text:anchor-page-number="5" draw:z-index="3809" draw:name="Shape1431" draw:style-name="gr4" draw:text-style-name="P5" svg:width="1.085in" svg:height="0.1917in" svg:x="6.7098in" svg:y="8.3213in" svg:viewBox="0 0 2757 488" draw:points="0,0 2757,0 2757,488 0,488">
        <text:p/>
      </draw:polygon>
      <draw:frame text:anchor-type="page" text:anchor-page-number="14" draw:z-index="3808" draw:name="Shape4607" draw:style-name="gr1" draw:text-style-name="P2" svg:width="0.0433in" svg:height="0.1925in" svg:x="3.7835in" svg:y="6.0835in">
        <draw:text-box>
          <text:p><text:span text:style-name="T2"><text:s/></text:span></text:p>
        </draw:text-box>
      </draw:frame>
      <draw:polygon text:anchor-type="page" text:anchor-page-number="7" draw:z-index="3807" draw:name="Shape3033" draw:style-name="gr2" draw:text-style-name="P3" svg:width="1.4783in" svg:height="0.1283in" svg:x="2.7732in" svg:y="9.0031in" svg:viewBox="0 0 3756 327" draw:points="0,0 3756,0 3756,327 0,327">
        <text:p/>
      </draw:polygon>
      <draw:polygon text:anchor-type="page" text:anchor-page-number="6" draw:z-index="3806" draw:name="Shape2077" draw:style-name="gr2" draw:text-style-name="P3" svg:width="1.1815in" svg:height="0.1917in" svg:x="2.3315in" svg:y="2.9815in" svg:viewBox="0 0 3002 488" draw:points="0,0 3002,0 3002,488 0,488">
        <text:p/>
      </draw:polygon>
      <draw:polygon text:anchor-type="page" text:anchor-page-number="14" draw:z-index="3805" draw:name="Shape4626" draw:style-name="gr2" draw:text-style-name="P3" svg:width="0.4933in" svg:height="0.1917in" svg:x="6.1197in" svg:y="6.128in" svg:viewBox="0 0 1254 488" draw:points="0,0 1254,0 1254,488 0,488">
        <text:p/>
      </draw:polygon>
      <draw:polygon text:anchor-type="page" text:anchor-page-number="1" draw:z-index="3804" draw:name="Shape315" draw:style-name="gr2" draw:text-style-name="P3" svg:width="4.6685in" svg:height="0.1268in" svg:x="3.1465in" svg:y="8.5563in" svg:viewBox="0 0 11859 323" draw:points="0,0 11859,0 11859,323 0,323">
        <text:p/>
      </draw:polygon>
      <draw:frame text:anchor-type="page" text:anchor-page-number="6" draw:z-index="3803" draw:name="Shape2076" draw:style-name="gr1" draw:text-style-name="P2" svg:width="0.1949in" svg:height="0.113in" svg:x="1.5917in" svg:y="2.9839in">
        <draw:text-box>
          <text:p><text:span text:style-name="T4">POL</text:span></text:p>
        </draw:text-box>
      </draw:frame>
      <draw:polygon text:anchor-type="page" text:anchor-page-number="7" draw:z-index="3802" draw:name="Shape3032" draw:style-name="gr2" draw:text-style-name="P3" svg:width="1.5752in" svg:height="0.1917in" svg:x="2.7248in" svg:y="9.0031in" svg:viewBox="0 0 4002 488" draw:points="0,0 4002,0 4002,488 0,488">
        <text:p/>
      </draw:polygon>
      <draw:frame text:anchor-type="page" text:anchor-page-number="2" draw:z-index="3801" draw:name="Shape647" draw:style-name="gr1" draw:text-style-name="P2" svg:width="0.474in" svg:height="0.1295in" svg:x="0.4535in" svg:y="10.0272in">
        <draw:text-box>
          <text:p><text:span text:style-name="T1">INDEX <text:s text:c="2"/>-</text:span></text:p>
        </draw:text-box>
      </draw:frame>
      <draw:polygon text:anchor-type="page" text:anchor-page-number="5" draw:z-index="3800" draw:name="Shape1430" draw:style-name="gr4" draw:text-style-name="P5" svg:width="1.1819in" svg:height="0.1913in" svg:x="6.6614in" svg:y="8.3217in" svg:viewBox="0 0 3003 487" draw:points="0,0 3003,0 3003,487 0,487">
        <text:p/>
      </draw:polygon>
      <draw:frame text:anchor-type="page" text:anchor-page-number="1" draw:z-index="3799" draw:name="Shape311" draw:style-name="gr1" draw:text-style-name="P2" svg:width="0.7169in" svg:height="0.1295in" svg:x="3.1665in" svg:y="8.3008in">
        <draw:text-box>
          <text:p><text:span text:style-name="T3">055.794.7819 </text:span></text:p>
        </draw:text-box>
      </draw:frame>
      <draw:polygon text:anchor-type="page" text:anchor-page-number="14" draw:z-index="3798" draw:name="Shape4625" draw:style-name="gr2" draw:text-style-name="P3" svg:width="0.5898in" svg:height="0.1917in" svg:x="6.0717in" svg:y="6.128in" svg:viewBox="0 0 1499 488" draw:points="0,0 1499,0 1499,488 0,488">
        <text:p/>
      </draw:polygon>
      <draw:frame text:anchor-type="page" text:anchor-page-number="7" draw:z-index="3797" draw:name="Shape3031" draw:style-name="gr1" draw:text-style-name="P2" svg:width="2.1807in" svg:height="0.1295in" svg:x="0.4535in" svg:y="9.0055in">
        <draw:text-box>
          <text:p><text:span text:style-name="T1">Coefficiente di ripartizione: n-ottanolo/acqua</text:span></text:p>
        </draw:text-box>
      </draw:frame>
      <draw:frame text:anchor-type="page" text:anchor-page-number="2" draw:z-index="3796" draw:name="Shape636" draw:style-name="gr1" draw:text-style-name="P2" svg:width="0.0433in" svg:height="0.1925in" svg:x="0.411in" svg:y="9.9799in">
        <draw:text-box>
          <text:p><text:span text:style-name="T2"><text:s/></text:span></text:p>
        </draw:text-box>
      </draw:frame>
      <draw:frame text:anchor-type="page" text:anchor-page-number="5" draw:z-index="3795" draw:name="Shape1396" draw:style-name="gr1" draw:text-style-name="P2" svg:width="0.0433in" svg:height="0.1925in" svg:x="5.5217in" svg:y="8.2634in">
        <draw:text-box>
          <text:p><text:span text:style-name="T2"><text:s/></text:span></text:p>
        </draw:text-box>
      </draw:frame>
      <draw:frame text:anchor-type="page" text:anchor-page-number="6" draw:z-index="3794" draw:name="Shape2069" draw:style-name="gr1" draw:text-style-name="P2" svg:width="0.0433in" svg:height="0.1925in" svg:x="1.0154in" svg:y="2.9228in">
        <draw:text-box>
          <text:p><text:span text:style-name="T2"><text:s/></text:span></text:p>
        </draw:text-box>
      </draw:frame>
      <draw:frame text:anchor-type="page" text:anchor-page-number="7" draw:z-index="3793" draw:name="Shape3028" draw:style-name="gr1" draw:text-style-name="P2" svg:width="0.0433in" svg:height="0.1925in" svg:x="0.411in" svg:y="8.9575in">
        <draw:text-box>
          <text:p><text:span text:style-name="T2"><text:s/></text:span></text:p>
        </draw:text-box>
      </draw:frame>
      <draw:polygon text:anchor-type="page" text:anchor-page-number="5" draw:z-index="3792" draw:name="Shape1428" draw:style-name="gr4" draw:text-style-name="P5" svg:width="0.6898in" svg:height="0.1917in" svg:x="5.9232in" svg:y="8.3213in" svg:viewBox="0 0 1753 488" draw:points="0,0 1753,0 1753,488 0,488">
        <text:p/>
      </draw:polygon>
      <draw:polygon text:anchor-type="page" text:anchor-page-number="1" draw:z-index="3791" draw:name="Shape312" draw:style-name="gr2" draw:text-style-name="P3" svg:width="4.6685in" svg:height="0.1283in" svg:x="3.1465in" svg:y="8.428in" svg:viewBox="0 0 11859 327" draw:points="0,0 11859,0 11859,327 0,327">
        <text:p/>
      </draw:polygon>
      <draw:polygon text:anchor-type="page" text:anchor-page-number="6" draw:z-index="3790" draw:name="Shape2075" draw:style-name="gr2" draw:text-style-name="P3" svg:width="0.6917in" svg:height="0.1118in" svg:x="1.5913in" svg:y="2.9815in" svg:viewBox="0 0 1758 285" draw:points="0,0 1758,0 1758,285 0,285">
        <text:p/>
      </draw:polygon>
      <draw:frame text:anchor-type="page" text:anchor-page-number="2" draw:z-index="3789" draw:name="Shape644" draw:style-name="gr1" draw:text-style-name="P2" svg:width="0.0433in" svg:height="0.1925in" svg:x="7.3016in" svg:y="9.8362in">
        <draw:text-box>
          <text:p><text:span text:style-name="T2"><text:s/></text:span></text:p>
        </draw:text-box>
      </draw:frame>
      <draw:frame text:anchor-type="page" text:anchor-page-number="14" draw:z-index="3788" draw:name="Shape4619" draw:style-name="gr1" draw:text-style-name="P2" svg:width="2.0087in" svg:height="0.1295in" svg:x="1.7882in" svg:y="6.1307in">
        <draw:text-box>
          <text:p><text:span text:style-name="T1">Molto tossico per gli organismi acquatici.</text:span></text:p>
        </draw:text-box>
      </draw:frame>
      <draw:polygon text:anchor-type="page" text:anchor-page-number="2" draw:z-index="3787" draw:name="Shape646" draw:style-name="gr2" draw:text-style-name="P3" svg:width="1.8717in" svg:height="0.1283in" svg:x="0.4114in" svg:y="10.0248in" svg:viewBox="0 0 4755 327" draw:points="0,0 4755,0 4755,327 0,327">
        <text:p/>
      </draw:polygon>
      <draw:polygon text:anchor-type="page" text:anchor-page-number="5" draw:z-index="3786" draw:name="Shape1427" draw:style-name="gr4" draw:text-style-name="P5" svg:width="0.7866in" svg:height="0.1913in" svg:x="5.8748in" svg:y="8.3217in" svg:viewBox="0 0 1999 487" draw:points="0,0 1999,0 1999,487 0,487">
        <text:p/>
      </draw:polygon>
      <draw:polygon text:anchor-type="page" text:anchor-page-number="6" draw:z-index="3785" draw:name="Shape2074" draw:style-name="gr2" draw:text-style-name="P3" svg:width="0.7882in" svg:height="0.1917in" svg:x="1.5433in" svg:y="2.9815in" svg:viewBox="0 0 2003 488" draw:points="0,0 2003,0 2003,488 0,488">
        <text:p/>
      </draw:polygon>
      <draw:frame text:anchor-type="page" text:anchor-page-number="1" draw:z-index="3784" draw:name="Shape308" draw:style-name="gr1" draw:text-style-name="P2" svg:width="4.3189in" svg:height="0.1295in" svg:x="3.1665in" svg:y="8.172in">
        <draw:text-box>
          <text:p><text:span text:style-name="T3">CAV Azienda Ospedaliera "Careggi" U.O. Tossicologia Medica - Firenze Tel. (+39) </text:span></text:p>
        </draw:text-box>
      </draw:frame>
      <draw:frame text:anchor-type="page" text:anchor-page-number="14" draw:z-index="3783" draw:name="Shape4606" draw:style-name="gr1" draw:text-style-name="P2" svg:width="0.0433in" svg:height="0.1925in" svg:x="0.6846in" svg:y="6.0681in">
        <draw:text-box>
          <text:p><text:span text:style-name="T2"><text:s/></text:span></text:p>
        </draw:text-box>
      </draw:frame>
      <draw:frame text:anchor-type="page" text:anchor-page-number="7" draw:z-index="3782" draw:name="Shape3027" draw:style-name="gr1" draw:text-style-name="P2" svg:width="0.0433in" svg:height="0.1925in" svg:x="4.348in" svg:y="8.8146in">
        <draw:text-box>
          <text:p><text:span text:style-name="T2"><text:s/></text:span></text:p>
        </draw:text-box>
      </draw:frame>
      <draw:polygon text:anchor-type="page" text:anchor-page-number="7" draw:z-index="3781" draw:name="Shape3030" draw:style-name="gr2" draw:text-style-name="P3" svg:width="2.265in" svg:height="0.1283in" svg:x="0.4114in" svg:y="9.0031in" svg:viewBox="0 0 5754 327" draw:points="0,0 5754,0 5754,327 0,327">
        <text:p/>
      </draw:polygon>
      <draw:polygon text:anchor-type="page" text:anchor-page-number="14" draw:z-index="3780" draw:name="Shape4618" draw:style-name="gr2" draw:text-style-name="P3" svg:width="4.235in" svg:height="0.128in" svg:x="1.7882in" svg:y="6.1283in" svg:viewBox="0 0 10758 326" draw:points="0,0 10758,0 10758,326 0,326">
        <text:p/>
      </draw:polygon>
      <draw:polygon text:anchor-type="page" text:anchor-page-number="2" draw:z-index="3779" draw:name="Shape645" draw:style-name="gr2" draw:text-style-name="P3" svg:width="1.9685in" svg:height="0.1917in" svg:x="0.363in" svg:y="10.0248in" svg:viewBox="0 0 5001 488" draw:points="0,0 5001,0 5001,488 0,488">
        <text:p/>
      </draw:polygon>
      <draw:frame text:anchor-type="page" text:anchor-page-number="5" draw:z-index="3778" draw:name="Shape1426" draw:style-name="gr1" draw:text-style-name="P2" svg:width="0.1894in" svg:height="0.113in" svg:x="5.3335in" svg:y="8.3244in">
        <draw:text-box>
          <text:p><text:span text:style-name="T4">ppm</text:span></text:p>
        </draw:text-box>
      </draw:frame>
      <draw:polygon text:anchor-type="page" text:anchor-page-number="1" draw:z-index="3777" draw:name="Shape310" draw:style-name="gr2" draw:text-style-name="P3" svg:width="4.6685in" svg:height="0.1283in" svg:x="3.1465in" svg:y="8.3in" svg:viewBox="0 0 11859 327" draw:points="0,0 11859,0 11859,327 0,327">
        <text:p/>
      </draw:polygon>
      <draw:frame text:anchor-type="page" text:anchor-page-number="6" draw:z-index="3776" draw:name="Shape2073" draw:style-name="gr1" draw:text-style-name="P2" svg:width="0.5594in" svg:height="0.113in" svg:x="0.4535in" svg:y="2.9839in">
        <draw:text-box>
          <text:p><text:span text:style-name="T4">NDS/NDSCh</text:span></text:p>
        </draw:text-box>
      </draw:frame>
      <draw:frame text:anchor-type="page" text:anchor-page-number="2" draw:z-index="3775" draw:name="Shape641" draw:style-name="gr1" draw:text-style-name="P2" svg:width="0.0433in" svg:height="0.1925in" svg:x="3.3634in" svg:y="9.8362in">
        <draw:text-box>
          <text:p><text:span text:style-name="T2"><text:s/></text:span></text:p>
        </draw:text-box>
      </draw:frame>
      <draw:frame text:anchor-type="page" text:anchor-page-number="5" draw:z-index="3774" draw:name="Shape1395" draw:style-name="gr1" draw:text-style-name="P2" svg:width="0.0433in" svg:height="0.1925in" svg:x="4.448in" svg:y="8.2634in">
        <draw:text-box>
          <text:p><text:span text:style-name="T2"><text:s/></text:span></text:p>
        </draw:text-box>
      </draw:frame>
      <draw:polygon text:anchor-type="page" text:anchor-page-number="14" draw:z-index="3773" draw:name="Shape4617" draw:style-name="gr2" draw:text-style-name="P3" svg:width="4.3319in" svg:height="0.1917in" svg:x="1.7398in" svg:y="6.128in" svg:viewBox="0 0 11004 488" draw:points="0,0 11004,0 11004,488 0,488">
        <text:p/>
      </draw:polygon>
      <draw:polygon text:anchor-type="page" text:anchor-page-number="7" draw:z-index="3772" draw:name="Shape3029" draw:style-name="gr2" draw:text-style-name="P3" svg:width="2.3618in" svg:height="0.1917in" svg:x="0.363in" svg:y="9.0031in" svg:viewBox="0 0 6000 488" draw:points="0,0 6000,0 6000,488 0,488">
        <text:p/>
      </draw:polygon>
      <draw:frame text:anchor-type="page" text:anchor-page-number="1" draw:z-index="3771" draw:name="Shape307" draw:style-name="gr1" draw:text-style-name="P2" svg:width="3.1079in" svg:height="0.1295in" svg:x="3.1665in" svg:y="8.0453in">
        <draw:text-box>
          <text:p><text:span text:style-name="T3">CAV Policlinico "A. Gemelli" - Roma Tel. (+39) 06.305.4343 </text:span></text:p>
        </draw:text-box>
      </draw:frame>
      <draw:frame text:anchor-type="page" text:anchor-page-number="6" draw:z-index="3770" draw:name="Shape2068" draw:style-name="gr1" draw:text-style-name="P2" svg:width="0.0433in" svg:height="0.1925in" svg:x="0.411in" svg:y="2.9228in">
        <draw:text-box>
          <text:p><text:span text:style-name="T2"><text:s/></text:span></text:p>
        </draw:text-box>
      </draw:frame>
      <draw:polygon text:anchor-type="page" text:anchor-page-number="5" draw:z-index="3769" draw:name="Shape1425" draw:style-name="gr4" draw:text-style-name="P5" svg:width="0.4917in" svg:height="0.1118in" svg:x="5.3331in" svg:y="8.3213in" svg:viewBox="0 0 1250 285" draw:points="0,0 1250,0 1250,285 0,285">
        <text:p/>
      </draw:polygon>
      <draw:frame text:anchor-type="page" text:anchor-page-number="14" draw:z-index="3768" draw:name="Shape4615" draw:style-name="gr1" draw:text-style-name="P2" svg:width="0.2323in" svg:height="0.113in" svg:x="0.4535in" svg:y="6.1291in">
        <draw:text-box>
          <text:p><text:span text:style-name="T5">H400</text:span></text:p>
        </draw:text-box>
      </draw:frame>
      <draw:frame text:anchor-type="page" text:anchor-page-number="7" draw:z-index="3767" draw:name="Shape3011" draw:style-name="gr1" draw:text-style-name="P2" svg:width="0.0433in" svg:height="0.1925in" svg:x="3.5154in" svg:y="8.7661in">
        <draw:text-box>
          <text:p><text:span text:style-name="T2"><text:s/></text:span></text:p>
        </draw:text-box>
      </draw:frame>
      <draw:frame text:anchor-type="page" text:anchor-page-number="6" draw:z-index="3766" draw:name="Shape2067" draw:style-name="gr1" draw:text-style-name="P2" svg:width="0.0433in" svg:height="0.1925in" svg:x="6.7098in" svg:y="2.7811in">
        <draw:text-box>
          <text:p><text:span text:style-name="T2"><text:s/></text:span></text:p>
        </draw:text-box>
      </draw:frame>
      <draw:polygon text:anchor-type="page" text:anchor-page-number="2" draw:z-index="3765" draw:name="Shape643" draw:style-name="gr2" draw:text-style-name="P3" svg:width="0.2965in" svg:height="0.1917in" svg:x="7.3016in" svg:y="9.8331in" svg:viewBox="0 0 754 488" draw:points="0,0 754,0 754,488 0,488">
        <text:p/>
      </draw:polygon>
      <draw:polygon text:anchor-type="page" text:anchor-page-number="1" draw:z-index="3764" draw:name="Shape309" draw:style-name="gr2" draw:text-style-name="P3" svg:width="4.6685in" svg:height="0.1264in" svg:x="3.1465in" svg:y="8.1732in" svg:viewBox="0 0 11859 322" draw:points="0,0 11859,0 11859,322 0,322">
        <text:p/>
      </draw:polygon>
      <draw:polygon text:anchor-type="page" text:anchor-page-number="7" draw:z-index="3763" draw:name="Shape3026" draw:style-name="gr2" draw:text-style-name="P3" svg:width="2.265in" svg:height="0.1917in" svg:x="4.348in" svg:y="8.8114in" svg:viewBox="0 0 5754 488" draw:points="0,0 5754,0 5754,488 0,488">
        <text:p/>
      </draw:polygon>
      <draw:polygon text:anchor-type="page" text:anchor-page-number="2" draw:z-index="3762" draw:name="Shape642" draw:style-name="gr2" draw:text-style-name="P3" svg:width="0.3933in" svg:height="0.1917in" svg:x="7.2531in" svg:y="9.8331in" svg:viewBox="0 0 1000 488" draw:points="0,0 1000,0 1000,488 0,488">
        <text:p/>
      </draw:polygon>
      <draw:frame text:anchor-type="page" text:anchor-page-number="1" draw:z-index="3761" draw:name="Shape305" draw:style-name="gr1" draw:text-style-name="P2" svg:width="3.1453in" svg:height="0.1295in" svg:x="3.1665in" svg:y="7.9165in">
        <draw:text-box>
          <text:p><text:span text:style-name="T3">CAV Policlinico "Umberto I" - Roma Tel. (+39) 06.4997.8000 </text:span></text:p>
        </draw:text-box>
      </draw:frame>
      <draw:frame text:anchor-type="page" text:anchor-page-number="14" draw:z-index="3760" draw:name="Shape4605" draw:style-name="gr1" draw:text-style-name="P2" svg:width="0.0433in" svg:height="0.1925in" svg:x="0.411in" svg:y="6.0681in">
        <draw:text-box>
          <text:p><text:span text:style-name="T2"><text:s/></text:span></text:p>
        </draw:text-box>
      </draw:frame>
      <draw:polygon text:anchor-type="page" text:anchor-page-number="6" draw:z-index="3759" draw:name="Shape2072" draw:style-name="gr2" draw:text-style-name="P3" svg:width="1.0835in" svg:height="0.1118in" svg:x="0.4114in" svg:y="2.9815in" svg:viewBox="0 0 2753 285" draw:points="0,0 2753,0 2753,285 0,285">
        <text:p/>
      </draw:polygon>
      <draw:polygon text:anchor-type="page" text:anchor-page-number="5" draw:z-index="3758" draw:name="Shape1424" draw:style-name="gr4" draw:text-style-name="P5" svg:width="0.5917in" svg:height="0.1913in" svg:x="5.2831in" svg:y="8.3217in" svg:viewBox="0 0 1504 487" draw:points="0,0 1504,0 1504,487 0,487">
        <text:p/>
      </draw:polygon>
      <draw:frame text:anchor-type="page" text:anchor-page-number="14" draw:z-index="3757" draw:name="Shape4604" draw:style-name="gr1" draw:text-style-name="P2" svg:width="0.0433in" svg:height="0.1925in" svg:x="6.1193in" svg:y="5.9398in">
        <draw:text-box>
          <text:p><text:span text:style-name="T2"><text:s/></text:span></text:p>
        </draw:text-box>
      </draw:frame>
      <draw:polygon text:anchor-type="page" text:anchor-page-number="1" draw:z-index="3756" draw:name="Shape306" draw:style-name="gr2" draw:text-style-name="P3" svg:width="4.6685in" svg:height="0.1283in" svg:x="3.1465in" svg:y="8.0449in" svg:viewBox="0 0 11859 327" draw:points="0,0 11859,0 11859,327 0,327">
        <text:p/>
      </draw:polygon>
      <draw:polygon text:anchor-type="page" text:anchor-page-number="6" draw:z-index="3755" draw:name="Shape2071" draw:style-name="gr2" draw:text-style-name="P3" svg:width="1.1803in" svg:height="0.1917in" svg:x="0.363in" svg:y="2.9815in" svg:viewBox="0 0 2999 488" draw:points="0,0 2999,0 2999,488 0,488">
        <text:p/>
      </draw:polygon>
      <draw:polygon text:anchor-type="page" text:anchor-page-number="7" draw:z-index="3754" draw:name="Shape3025" draw:style-name="gr2" draw:text-style-name="P3" svg:width="2.363in" svg:height="0.1917in" svg:x="4.3in" svg:y="8.8114in" svg:viewBox="0 0 6003 488" draw:points="0,0 6003,0 6003,488 0,488">
        <text:p/>
      </draw:polygon>
      <draw:frame text:anchor-type="page" text:anchor-page-number="5" draw:z-index="3753" draw:name="Shape1413" draw:style-name="gr1" draw:text-style-name="P2" svg:width="0.2969in" svg:height="0.113in" svg:x="4.1516in" svg:y="8.3244in">
        <draw:text-box>
          <text:p><text:span text:style-name="T4">mg/m3</text:span></text:p>
        </draw:text-box>
      </draw:frame>
      <draw:frame text:anchor-type="page" text:anchor-page-number="2" draw:z-index="3752" draw:name="Shape635" draw:style-name="gr1" draw:text-style-name="P2" svg:width="0.0433in" svg:height="0.1925in" svg:x="2.3799in" svg:y="9.8362in">
        <draw:text-box>
          <text:p><text:span text:style-name="T2"><text:s/></text:span></text:p>
        </draw:text-box>
      </draw:frame>
      <draw:frame text:anchor-type="page" text:anchor-page-number="5" draw:z-index="3751" draw:name="Shape1394" draw:style-name="gr1" draw:text-style-name="P2" svg:width="0.0433in" svg:height="0.1925in" svg:x="3.75in" svg:y="8.2634in">
        <draw:text-box>
          <text:p><text:span text:style-name="T2"><text:s/></text:span></text:p>
        </draw:text-box>
      </draw:frame>
      <draw:frame text:anchor-type="page" text:anchor-page-number="1" draw:z-index="3750" draw:name="Shape302" draw:style-name="gr1" draw:text-style-name="P2" svg:width="3.8496in" svg:height="0.1295in" svg:x="3.1665in" svg:y="7.789in">
        <draw:text-box>
          <text:p><text:span text:style-name="T3">CAV "Azienda Ospedaliera A. Cardarelli" - Napoli Tel. (+39) 081.545.3333 </text:span></text:p>
        </draw:text-box>
      </draw:frame>
      <draw:polygon text:anchor-type="page" text:anchor-page-number="2" draw:z-index="3749" draw:name="Shape640" draw:style-name="gr2" draw:text-style-name="P3" svg:width="3.8417in" svg:height="0.1917in" svg:x="3.363in" svg:y="9.8331in" svg:viewBox="0 0 9759 488" draw:points="0,0 9759,0 9759,488 0,488">
        <text:p/>
      </draw:polygon>
      <draw:polygon text:anchor-type="page" text:anchor-page-number="14" draw:z-index="3748" draw:name="Shape4609" draw:style-name="gr2" draw:text-style-name="P3" svg:width="1.2799in" svg:height="0.1118in" svg:x="0.4114in" svg:y="6.128in" svg:viewBox="0 0 3252 285" draw:points="0,0 3252,0 3252,285 0,285">
        <text:p/>
      </draw:polygon>
      <draw:polygon text:anchor-type="page" text:anchor-page-number="6" draw:z-index="3747" draw:name="Shape2028" draw:style-name="gr3" draw:text-style-name="P4" svg:width="1.1717in" svg:height="0.0098in" svg:x="6.6732in" svg:y="2.7681in" svg:viewBox="0 0 2977 26" draw:points="0,0 2977,0 2977,26 0,26">
        <text:p/>
      </draw:polygon>
      <draw:frame text:anchor-type="page" text:anchor-page-number="7" draw:z-index="3746" draw:name="Shape3022" draw:style-name="gr1" draw:text-style-name="P2" svg:width="0.7476in" svg:height="0.1295in" svg:x="2.7728in" svg:y="8.8138in">
        <draw:text-box>
          <text:p><text:span text:style-name="T1">non disponibile</text:span></text:p>
        </draw:text-box>
      </draw:frame>
      <draw:polygon text:anchor-type="page" text:anchor-page-number="6" draw:z-index="3745" draw:name="Shape2027" draw:style-name="gr3" draw:text-style-name="P4" svg:width="0.0102in" svg:height="0.0098in" svg:x="6.663in" svg:y="2.7681in" svg:viewBox="0 0 27 26" draw:points="0,0 27,0 27,26 0,26">
        <text:p/>
      </draw:polygon>
      <draw:polygon text:anchor-type="page" text:anchor-page-number="5" draw:z-index="3744" draw:name="Shape1423" draw:style-name="gr4" draw:text-style-name="P5" svg:width="1.0831in" svg:height="0.1118in" svg:x="4.1516in" svg:y="8.3213in" svg:viewBox="0 0 2752 285" draw:points="0,0 2752,0 2752,285 0,285">
        <text:p/>
      </draw:polygon>
      <draw:polygon text:anchor-type="page" text:anchor-page-number="1" draw:z-index="3743" draw:name="Shape304" draw:style-name="gr2" draw:text-style-name="P3" svg:width="4.6685in" svg:height="0.1283in" svg:x="3.1465in" svg:y="7.9165in" svg:viewBox="0 0 11859 327" draw:points="0,0 11859,0 11859,327 0,327">
        <text:p/>
      </draw:polygon>
      <draw:polygon text:anchor-type="page" text:anchor-page-number="14" draw:z-index="3742" draw:name="Shape4608" draw:style-name="gr2" draw:text-style-name="P3" svg:width="1.3768in" svg:height="0.1917in" svg:x="0.363in" svg:y="6.128in" svg:viewBox="0 0 3498 488" draw:points="0,0 3498,0 3498,488 0,488">
        <text:p/>
      </draw:polygon>
      <draw:polygon text:anchor-type="page" text:anchor-page-number="2" draw:z-index="3741" draw:name="Shape639" draw:style-name="gr2" draw:text-style-name="P3" svg:width="3.9382in" svg:height="0.1917in" svg:x="3.315in" svg:y="9.8331in" svg:viewBox="0 0 10004 488" draw:points="0,0 10004,0 10004,488 0,488">
        <text:p/>
      </draw:polygon>
      <draw:frame text:anchor-type="page" text:anchor-page-number="7" draw:z-index="3740" draw:name="Shape3016" draw:style-name="gr1" draw:text-style-name="P2" svg:width="0.0433in" svg:height="0.1925in" svg:x="0.9047in" svg:y="8.7661in">
        <draw:text-box>
          <text:p><text:span text:style-name="T2"><text:s/></text:span></text:p>
        </draw:text-box>
      </draw:frame>
      <draw:polygon text:anchor-type="page" text:anchor-page-number="5" draw:z-index="3739" draw:name="Shape1422" draw:style-name="gr4" draw:text-style-name="P5" svg:width="1.1799in" svg:height="0.1913in" svg:x="4.1031in" svg:y="8.3217in" svg:viewBox="0 0 2998 487" draw:points="0,0 2998,0 2998,487 0,487">
        <text:p/>
      </draw:polygon>
      <draw:frame text:anchor-type="page" text:anchor-page-number="2" draw:z-index="3738" draw:name="Shape627" draw:style-name="gr1" draw:text-style-name="P2" svg:width="0.0433in" svg:height="0.1925in" svg:x="0.8366in" svg:y="9.7862in">
        <draw:text-box>
          <text:p><text:span text:style-name="T2"><text:s/></text:span></text:p>
        </draw:text-box>
      </draw:frame>
      <draw:polygon text:anchor-type="page" text:anchor-page-number="7" draw:z-index="3737" draw:name="Shape3021" draw:style-name="gr2" draw:text-style-name="P3" svg:width="1.4783in" svg:height="0.1283in" svg:x="2.7732in" svg:y="8.8114in" svg:viewBox="0 0 3756 327" draw:points="0,0 3756,0 3756,327 0,327">
        <text:p/>
      </draw:polygon>
      <draw:polygon text:anchor-type="page" text:anchor-page-number="6" draw:z-index="3736" draw:name="Shape2026" draw:style-name="gr3" draw:text-style-name="P4" svg:width="0.7783in" svg:height="0.0098in" svg:x="5.8846in" svg:y="2.7681in" svg:viewBox="0 0 1978 26" draw:points="0,0 1978,0 1978,26 0,26">
        <text:p/>
      </draw:polygon>
      <draw:frame text:anchor-type="page" text:anchor-page-number="1" draw:z-index="3735" draw:name="Shape301" draw:style-name="gr1" draw:text-style-name="P2" svg:width="3.9307in" svg:height="0.1295in" svg:x="3.1665in" svg:y="7.6626in">
        <draw:text-box>
          <text:p><text:span text:style-name="T3">CAV "Azienda Ospedaliera Università di Foggia" - Foggia Tel. 800.183.459 </text:span></text:p>
        </draw:text-box>
      </draw:frame>
      <draw:frame text:anchor-type="page" text:anchor-page-number="14" draw:z-index="3734" draw:name="Shape4598" draw:style-name="gr1" draw:text-style-name="P2" svg:width="0.0433in" svg:height="0.1925in" svg:x="4.0866in" svg:y="5.8917in">
        <draw:text-box>
          <text:p><text:span text:style-name="T2"><text:s/></text:span></text:p>
        </draw:text-box>
      </draw:frame>
      <draw:polygon text:anchor-type="page" text:anchor-page-number="7" draw:z-index="3733" draw:name="Shape3020" draw:style-name="gr2" draw:text-style-name="P3" svg:width="1.5752in" svg:height="0.1917in" svg:x="2.7248in" svg:y="8.8114in" svg:viewBox="0 0 4002 488" draw:points="0,0 4002,0 4002,488 0,488">
        <text:p/>
      </draw:polygon>
      <draw:frame text:anchor-type="page" text:anchor-page-number="5" draw:z-index="3732" draw:name="Shape1412" draw:style-name="gr1" draw:text-style-name="P2" svg:width="0.1894in" svg:height="0.113in" svg:x="3.561in" svg:y="8.3244in">
        <draw:text-box>
          <text:p><text:span text:style-name="T4">ppm</text:span></text:p>
        </draw:text-box>
      </draw:frame>
      <draw:polygon text:anchor-type="page" text:anchor-page-number="6" draw:z-index="3731" draw:name="Shape2025" draw:style-name="gr3" draw:text-style-name="P4" svg:width="0.0098in" svg:height="0.0098in" svg:x="5.8748in" svg:y="2.7681in" svg:viewBox="0 0 26 26" draw:points="0,0 26,0 26,26 0,26">
        <text:p/>
      </draw:polygon>
      <draw:polygon text:anchor-type="page" text:anchor-page-number="14" draw:z-index="3730" draw:name="Shape4614" draw:style-name="gr2" draw:text-style-name="P3" svg:width="0.4933in" svg:height="0.1913in" svg:x="6.1197in" svg:y="5.9366in" svg:viewBox="0 0 1254 487" draw:points="0,0 1254,0 1254,487 0,487">
        <text:p/>
      </draw:polygon>
      <draw:polygon text:anchor-type="page" text:anchor-page-number="1" draw:z-index="3729" draw:name="Shape303" draw:style-name="gr2" draw:text-style-name="P3" svg:width="4.6685in" svg:height="0.1268in" svg:x="3.1465in" svg:y="7.7898in" svg:viewBox="0 0 11859 323" draw:points="0,0 11859,0 11859,323 0,323">
        <text:p/>
      </draw:polygon>
      <draw:polygon text:anchor-type="page" text:anchor-page-number="2" draw:z-index="3728" draw:name="Shape634" draw:style-name="gr2" draw:text-style-name="P3" svg:width="0.8866in" svg:height="0.1917in" svg:x="2.3799in" svg:y="9.8331in" svg:viewBox="0 0 2253 488" draw:points="0,0 2253,0 2253,488 0,488">
        <text:p/>
      </draw:polygon>
      <draw:frame text:anchor-type="page" text:anchor-page-number="3" draw:z-index="3727" draw:name="Shape957" draw:style-name="gr1" draw:text-style-name="P2" svg:width="5.6807in" svg:height="0.1295in" svg:x="0.3634in" svg:y="9.9626in">
        <draw:text-box>
          <text:p><text:span text:style-name="T3">4.3. Indicazione dell`eventuale necessità di consultare immediatamente un medico e di trattamenti speciali </text:span></text:p>
        </draw:text-box>
      </draw:frame>
      <draw:frame text:anchor-type="page" text:anchor-page-number="1" draw:z-index="3726" draw:name="Shape299" draw:style-name="gr1" draw:text-style-name="P2" svg:width="3.8598in" svg:height="0.1295in" svg:x="3.1665in" svg:y="7.5339in">
        <draw:text-box>
          <text:p><text:span text:style-name="T3">CAV "Ospedale Pediatrico Bambino Gesù" Roma Tel. (+39) 06.6859.3726 </text:span></text:p>
        </draw:text-box>
      </draw:frame>
      <draw:polygon text:anchor-type="page" text:anchor-page-number="2" draw:z-index="3725" draw:name="Shape633" draw:style-name="gr2" draw:text-style-name="P3" svg:width="0.9835in" svg:height="0.1917in" svg:x="2.3315in" svg:y="9.8331in" svg:viewBox="0 0 2499 488" draw:points="0,0 2499,0 2499,488 0,488">
        <text:p/>
      </draw:polygon>
      <draw:polygon text:anchor-type="page" text:anchor-page-number="14" draw:z-index="3724" draw:name="Shape4613" draw:style-name="gr2" draw:text-style-name="P3" svg:width="0.5898in" svg:height="0.1913in" svg:x="6.0717in" svg:y="5.9366in" svg:viewBox="0 0 1499 487" draw:points="0,0 1499,0 1499,487 0,487">
        <text:p/>
      </draw:polygon>
      <draw:frame text:anchor-type="page" text:anchor-page-number="5" draw:z-index="3723" draw:name="Shape1393" draw:style-name="gr1" draw:text-style-name="P2" svg:width="0.0433in" svg:height="0.1925in" svg:x="2.6764in" svg:y="8.2634in">
        <draw:text-box>
          <text:p><text:span text:style-name="T2"><text:s/></text:span></text:p>
        </draw:text-box>
      </draw:frame>
      <draw:polygon text:anchor-type="page" text:anchor-page-number="6" draw:z-index="3722" draw:name="Shape2024" draw:style-name="gr3" draw:text-style-name="P4" svg:width="0.5799in" svg:height="0.0098in" svg:x="5.2949in" svg:y="2.7681in" svg:viewBox="0 0 1474 26" draw:points="0,0 1474,0 1474,26 0,26">
        <text:p/>
      </draw:polygon>
      <draw:frame text:anchor-type="page" text:anchor-page-number="7" draw:z-index="3721" draw:name="Shape3019" draw:style-name="gr1" draw:text-style-name="P2" svg:width="0.4551in" svg:height="0.1295in" svg:x="0.4535in" svg:y="8.8138in">
        <draw:text-box>
          <text:p><text:span text:style-name="T1">Solubilità</text:span></text:p>
        </draw:text-box>
      </draw:frame>
      <draw:frame text:anchor-type="page" text:anchor-page-number="7" draw:z-index="3720" draw:name="Shape3015" draw:style-name="gr1" draw:text-style-name="P2" svg:width="0.0433in" svg:height="0.1925in" svg:x="0.411in" svg:y="8.7661in">
        <draw:text-box>
          <text:p><text:span text:style-name="T2"><text:s/></text:span></text:p>
        </draw:text-box>
      </draw:frame>
      <draw:frame text:anchor-type="page" text:anchor-page-number="2" draw:z-index="3719" draw:name="Shape632" draw:style-name="gr1" draw:text-style-name="P2" svg:width="0.3787in" svg:height="0.1295in" svg:x="0.4535in" svg:y="9.8339in">
        <draw:text-box>
          <text:p><text:span text:style-name="T3">TALCO</text:span></text:p>
        </draw:text-box>
      </draw:frame>
      <draw:frame text:anchor-type="page" text:anchor-page-number="3" draw:z-index="3718" draw:name="Shape956" draw:style-name="gr1" draw:text-style-name="P2" svg:width="0.0433in" svg:height="0.1925in" svg:x="0.3634in" svg:y="9.7728in">
        <draw:text-box>
          <text:p><text:span text:style-name="T2"><text:s/></text:span></text:p>
        </draw:text-box>
      </draw:frame>
      <draw:polygon text:anchor-type="page" text:anchor-page-number="1" draw:z-index="3717" draw:name="Shape300" draw:style-name="gr2" draw:text-style-name="P3" svg:width="4.6685in" svg:height="0.1283in" svg:x="3.1465in" svg:y="7.6614in" svg:viewBox="0 0 11859 327" draw:points="0,0 11859,0 11859,327 0,327">
        <text:p/>
      </draw:polygon>
      <draw:frame text:anchor-type="page" text:anchor-page-number="14" draw:z-index="3716" draw:name="Shape4612" draw:style-name="gr1" draw:text-style-name="P2" svg:width="2.3142in" svg:height="0.1295in" svg:x="1.7882in" svg:y="5.939in">
        <draw:text-box>
          <text:p><text:span text:style-name="T1">Può provocare una reazione allergica cutanea.</text:span></text:p>
        </draw:text-box>
      </draw:frame>
      <draw:polygon text:anchor-type="page" text:anchor-page-number="6" draw:z-index="3715" draw:name="Shape2023" draw:style-name="gr3" draw:text-style-name="P4" svg:width="0.0102in" svg:height="0.0098in" svg:x="5.2846in" svg:y="2.7681in" svg:viewBox="0 0 27 26" draw:points="0,0 27,0 27,26 0,26">
        <text:p/>
      </draw:polygon>
      <draw:polygon text:anchor-type="page" text:anchor-page-number="5" draw:z-index="3714" draw:name="Shape1421" draw:style-name="gr4" draw:text-style-name="P5" svg:width="0.4933in" svg:height="0.1118in" svg:x="3.5614in" svg:y="8.3213in" svg:viewBox="0 0 1254 285" draw:points="0,0 1254,0 1254,285 0,285">
        <text:p/>
      </draw:polygon>
      <draw:polygon text:anchor-type="page" text:anchor-page-number="5" draw:z-index="3713" draw:name="Shape1420" draw:style-name="gr4" draw:text-style-name="P5" svg:width="0.5902in" svg:height="0.1913in" svg:x="3.513in" svg:y="8.3217in" svg:viewBox="0 0 1500 487" draw:points="0,0 1500,0 1500,487 0,487">
        <text:p/>
      </draw:polygon>
      <draw:polygon text:anchor-type="page" text:anchor-page-number="6" draw:z-index="3712" draw:name="Shape2022" draw:style-name="gr3" draw:text-style-name="P4" svg:width="1.1717in" svg:height="0.0098in" svg:x="4.113in" svg:y="2.7681in" svg:viewBox="0 0 2977 26" draw:points="0,0 2977,0 2977,26 0,26">
        <text:p/>
      </draw:polygon>
      <draw:frame text:anchor-type="page" text:anchor-page-number="3" draw:z-index="3711" draw:name="Shape955" draw:style-name="gr1" draw:text-style-name="P2" svg:width="0.474in" svg:height="0.1295in" svg:x="0.3634in" svg:y="9.6437in">
        <draw:text-box>
          <text:p><text:span text:style-name="T1">prodotto. </text:span></text:p>
        </draw:text-box>
      </draw:frame>
      <draw:frame text:anchor-type="page" text:anchor-page-number="7" draw:z-index="3710" draw:name="Shape3014" draw:style-name="gr1" draw:text-style-name="P2" svg:width="0.0433in" svg:height="0.1925in" svg:x="4.348in" svg:y="8.6228in">
        <draw:text-box>
          <text:p><text:span text:style-name="T2"><text:s/></text:span></text:p>
        </draw:text-box>
      </draw:frame>
      <draw:frame text:anchor-type="page" text:anchor-page-number="14" draw:z-index="3709" draw:name="Shape4597" draw:style-name="gr1" draw:text-style-name="P2" svg:width="0.0433in" svg:height="0.1925in" svg:x="0.6846in" svg:y="5.8764in">
        <draw:text-box>
          <text:p><text:span text:style-name="T2"><text:s/></text:span></text:p>
        </draw:text-box>
      </draw:frame>
      <draw:frame text:anchor-type="page" text:anchor-page-number="1" draw:z-index="3708" draw:name="Shape293" draw:style-name="gr1" draw:text-style-name="P2" svg:width="0.0433in" svg:height="0.1925in" svg:x="2.1953in" svg:y="7.4874in">
        <draw:text-box>
          <text:p><text:span text:style-name="T2"><text:s/></text:span></text:p>
        </draw:text-box>
      </draw:frame>
      <draw:frame text:anchor-type="page" text:anchor-page-number="2" draw:z-index="3707" draw:name="Shape626" draw:style-name="gr1" draw:text-style-name="P2" svg:width="0.0433in" svg:height="0.1925in" svg:x="0.411in" svg:y="9.7862in">
        <draw:text-box>
          <text:p><text:span text:style-name="T2"><text:s/></text:span></text:p>
        </draw:text-box>
      </draw:frame>
      <draw:frame text:anchor-type="page" text:anchor-page-number="3" draw:z-index="3706" draw:name="Shape954" draw:style-name="gr1" draw:text-style-name="P2" svg:width="7.863in" svg:height="0.1295in" svg:x="0.3634in" svg:y="9.5154in">
        <draw:text-box>
          <text:p><text:span text:style-name="T1">EFFETTI <text:s/>RITARDATI: <text:s/>In <text:s/>base <text:s/>alle <text:s/>informazioni <text:s/>attualmente <text:s/>a <text:s/>disposizione, <text:s/>non <text:s/>sono <text:s/>noti <text:s/>casi <text:s/>di <text:s/>effetti <text:s/>ritardati <text:s/>successivi <text:s/>all`esposizione <text:s/>a <text:s/>questo </text:span></text:p>
        </draw:text-box>
      </draw:frame>
      <draw:polygon text:anchor-type="page" text:anchor-page-number="7" draw:z-index="3705" draw:name="Shape3018" draw:style-name="gr2" draw:text-style-name="P3" svg:width="2.265in" svg:height="0.1283in" svg:x="0.4114in" svg:y="8.8114in" svg:viewBox="0 0 5754 327" draw:points="0,0 5754,0 5754,327 0,327">
        <text:p/>
      </draw:polygon>
      <draw:polygon text:anchor-type="page" text:anchor-page-number="6" draw:z-index="3704" draw:name="Shape2021" draw:style-name="gr3" draw:text-style-name="P4" svg:width="0.0098in" svg:height="0.0098in" svg:x="4.1031in" svg:y="2.7681in" svg:viewBox="0 0 26 26" draw:points="0,0 26,0 26,26 0,26">
        <text:p/>
      </draw:polygon>
      <draw:frame text:anchor-type="page" text:anchor-page-number="2" draw:z-index="3703" draw:name="Shape625" draw:style-name="gr1" draw:text-style-name="P2" svg:width="0.0433in" svg:height="0.1925in" svg:x="7.3016in" svg:y="9.6445in">
        <draw:text-box>
          <text:p><text:span text:style-name="T2"><text:s/></text:span></text:p>
        </draw:text-box>
      </draw:frame>
      <draw:frame text:anchor-type="page" text:anchor-page-number="5" draw:z-index="3702" draw:name="Shape1411" draw:style-name="gr1" draw:text-style-name="P2" svg:width="0.2969in" svg:height="0.113in" svg:x="2.3799in" svg:y="8.3244in">
        <draw:text-box>
          <text:p><text:span text:style-name="T4">mg/m3</text:span></text:p>
        </draw:text-box>
      </draw:frame>
      <draw:polygon text:anchor-type="page" text:anchor-page-number="14" draw:z-index="3701" draw:name="Shape4611" draw:style-name="gr2" draw:text-style-name="P3" svg:width="4.235in" svg:height="0.1283in" svg:x="1.7882in" svg:y="5.9366in" svg:viewBox="0 0 10758 327" draw:points="0,0 10758,0 10758,327 0,327">
        <text:p/>
      </draw:polygon>
      <draw:polygon text:anchor-type="page" text:anchor-page-number="1" draw:z-index="3700" draw:name="Shape298" draw:style-name="gr2" draw:text-style-name="P3" svg:width="4.6685in" svg:height="0.1283in" svg:x="3.1465in" svg:y="7.5331in" svg:viewBox="0 0 11859 327" draw:points="0,0 11859,0 11859,327 0,327">
        <text:p/>
      </draw:polygon>
      <draw:frame text:anchor-type="page" text:anchor-page-number="3" draw:z-index="3699" draw:name="Shape953" draw:style-name="gr1" draw:text-style-name="P2" svg:width="0.0433in" svg:height="0.1925in" svg:x="0.3634in" svg:y="9.3264in">
        <draw:text-box>
          <text:p><text:span text:style-name="T2"><text:s/></text:span></text:p>
        </draw:text-box>
      </draw:frame>
      <draw:polygon text:anchor-type="page" text:anchor-page-number="7" draw:z-index="3698" draw:name="Shape3017" draw:style-name="gr2" draw:text-style-name="P3" svg:width="2.3618in" svg:height="0.1917in" svg:x="0.363in" svg:y="8.8114in" svg:viewBox="0 0 6000 488" draw:points="0,0 6000,0 6000,488 0,488">
        <text:p/>
      </draw:polygon>
      <draw:polygon text:anchor-type="page" text:anchor-page-number="2" draw:z-index="3697" draw:name="Shape631" draw:style-name="gr2" draw:text-style-name="P3" svg:width="1.8717in" svg:height="0.1283in" svg:x="0.4114in" svg:y="9.8331in" svg:viewBox="0 0 4755 327" draw:points="0,0 4755,0 4755,327 0,327">
        <text:p/>
      </draw:polygon>
      <draw:polygon text:anchor-type="page" text:anchor-page-number="1" draw:z-index="3696" draw:name="Shape297" draw:style-name="gr2" draw:text-style-name="P3" svg:width="4.7252in" svg:height="1.4067in" svg:x="3.1181in" svg:y="7.5331in" svg:viewBox="0 0 12003 3574" draw:points="0,0 12003,0 12003,3574 0,3574">
        <text:p/>
      </draw:polygon>
      <draw:polygon text:anchor-type="page" text:anchor-page-number="14" draw:z-index="3695" draw:name="Shape4610" draw:style-name="gr2" draw:text-style-name="P3" svg:width="4.3319in" svg:height="0.1913in" svg:x="1.7398in" svg:y="5.9366in" svg:viewBox="0 0 11004 487" draw:points="0,0 11004,0 11004,487 0,487">
        <text:p/>
      </draw:polygon>
      <draw:polygon text:anchor-type="page" text:anchor-page-number="6" draw:z-index="3694" draw:name="Shape2020" draw:style-name="gr3" draw:text-style-name="P4" svg:width="0.5799in" svg:height="0.0098in" svg:x="3.5232in" svg:y="2.7681in" svg:viewBox="0 0 1474 26" draw:points="0,0 1474,0 1474,26 0,26">
        <text:p/>
      </draw:polygon>
      <draw:frame text:anchor-type="page" text:anchor-page-number="5" draw:z-index="3693" draw:name="Shape1417" draw:style-name="gr1" draw:text-style-name="P2" svg:width="0.0433in" svg:height="0.1925in" svg:x="1.5917in" svg:y="8.3252in">
        <draw:text-box>
          <text:p><text:span text:style-name="T2"><text:s/></text:span></text:p>
        </draw:text-box>
      </draw:frame>
      <draw:frame text:anchor-type="page" text:anchor-page-number="14" draw:z-index="3692" draw:name="Shape4603" draw:style-name="gr1" draw:text-style-name="P2" svg:width="0.2323in" svg:height="0.113in" svg:x="0.4535in" svg:y="5.9374in">
        <draw:text-box>
          <text:p><text:span text:style-name="T5">H317</text:span></text:p>
        </draw:text-box>
      </draw:frame>
      <draw:polygon text:anchor-type="page" text:anchor-page-number="2" draw:z-index="3691" draw:name="Shape628" draw:style-name="gr2" draw:text-style-name="P3" svg:width="1.9685in" svg:height="0.1917in" svg:x="0.363in" svg:y="9.8331in" svg:viewBox="0 0 5001 488" draw:points="0,0 5001,0 5001,488 0,488">
        <text:p/>
      </draw:polygon>
      <draw:polygon text:anchor-type="page" text:anchor-page-number="5" draw:z-index="3690" draw:name="Shape1419" draw:style-name="gr4" draw:text-style-name="P5" svg:width="1.0831in" svg:height="0.1118in" svg:x="2.3799in" svg:y="8.3213in" svg:viewBox="0 0 2752 285" draw:points="0,0 2752,0 2752,285 0,285">
        <text:p/>
      </draw:polygon>
      <draw:polygon text:anchor-type="page" text:anchor-page-number="6" draw:z-index="3689" draw:name="Shape2019" draw:style-name="gr3" draw:text-style-name="P4" svg:width="0.0102in" svg:height="0.0098in" svg:x="3.513in" svg:y="2.7681in" svg:viewBox="0 0 27 26" draw:points="0,0 27,0 27,26 0,26">
        <text:p/>
      </draw:polygon>
      <draw:frame text:anchor-type="page" text:anchor-page-number="1" draw:z-index="3688" draw:name="Shape296" draw:style-name="gr1" draw:text-style-name="P2" svg:width="1.7539in" svg:height="0.1295in" svg:x="0.4535in" svg:y="7.5354in">
        <draw:text-box>
          <text:p><text:span text:style-name="T1">Per informazioni urgenti rivolgersi a</text:span></text:p>
        </draw:text-box>
      </draw:frame>
      <draw:frame text:anchor-type="page" text:anchor-page-number="3" draw:z-index="3687" draw:name="Shape952" draw:style-name="gr1" draw:text-style-name="P2" svg:width="4.0516in" svg:height="0.1295in" svg:x="0.3634in" svg:y="9.1972in">
        <draw:text-box>
          <text:p><text:span text:style-name="T1">Non sono note informazioni specifiche su sintomi ed effetti provocati dal prodotto. </text:span></text:p>
        </draw:text-box>
      </draw:frame>
      <draw:frame text:anchor-type="page" text:anchor-page-number="7" draw:z-index="3686" draw:name="Shape2998" draw:style-name="gr1" draw:text-style-name="P2" svg:width="0.0433in" svg:height="0.1925in" svg:x="3.5154in" svg:y="8.5752in">
        <draw:text-box>
          <text:p><text:span text:style-name="T2"><text:s/></text:span></text:p>
        </draw:text-box>
      </draw:frame>
      <draw:polygon text:anchor-type="page" text:anchor-page-number="5" draw:z-index="3685" draw:name="Shape1418" draw:style-name="gr4" draw:text-style-name="P5" svg:width="1.1815in" svg:height="0.1913in" svg:x="2.3315in" svg:y="8.3217in" svg:viewBox="0 0 3002 487" draw:points="0,0 3002,0 3002,487 0,487">
        <text:p/>
      </draw:polygon>
      <draw:polygon text:anchor-type="page" text:anchor-page-number="6" draw:z-index="3684" draw:name="Shape2018" draw:style-name="gr3" draw:text-style-name="P4" svg:width="1.1717in" svg:height="0.0098in" svg:x="2.3413in" svg:y="2.7681in" svg:viewBox="0 0 2977 26" draw:points="0,0 2977,0 2977,26 0,26">
        <text:p/>
      </draw:polygon>
      <draw:frame text:anchor-type="page" text:anchor-page-number="3" draw:z-index="3683" draw:name="Shape951" draw:style-name="gr1" draw:text-style-name="P2" svg:width="0.0433in" svg:height="0.1925in" svg:x="0.3634in" svg:y="9.0063in">
        <draw:text-box>
          <text:p><text:span text:style-name="T2"><text:s/></text:span></text:p>
        </draw:text-box>
      </draw:frame>
      <draw:frame text:anchor-type="page" text:anchor-page-number="14" draw:z-index="3682" draw:name="Shape4596" draw:style-name="gr1" draw:text-style-name="P2" svg:width="0.0433in" svg:height="0.1925in" svg:x="0.411in" svg:y="5.8764in">
        <draw:text-box>
          <text:p><text:span text:style-name="T2"><text:s/></text:span></text:p>
        </draw:text-box>
      </draw:frame>
      <draw:polygon text:anchor-type="page" text:anchor-page-number="7" draw:z-index="3681" draw:name="Shape3013" draw:style-name="gr2" draw:text-style-name="P3" svg:width="2.265in" svg:height="0.1917in" svg:x="4.348in" svg:y="8.6197in" svg:viewBox="0 0 5754 488" draw:points="0,0 5754,0 5754,488 0,488">
        <text:p/>
      </draw:polygon>
      <draw:frame text:anchor-type="page" text:anchor-page-number="1" draw:z-index="3680" draw:name="Shape292" draw:style-name="gr1" draw:text-style-name="P2" svg:width="0.0433in" svg:height="0.1925in" svg:x="0.411in" svg:y="7.4874in">
        <draw:text-box>
          <text:p><text:span text:style-name="T2"><text:s/></text:span></text:p>
        </draw:text-box>
      </draw:frame>
      <draw:frame text:anchor-type="page" text:anchor-page-number="2" draw:z-index="3679" draw:name="Shape624" draw:style-name="gr1" draw:text-style-name="P2" svg:width="0.0433in" svg:height="0.1925in" svg:x="3.3634in" svg:y="9.6445in">
        <draw:text-box>
          <text:p><text:span text:style-name="T2"><text:s/></text:span></text:p>
        </draw:text-box>
      </draw:frame>
      <draw:frame text:anchor-type="page" text:anchor-page-number="5" draw:z-index="3678" draw:name="Shape1414" draw:style-name="gr1" draw:text-style-name="P2" svg:width="0.085in" svg:height="0.1925in" svg:x="0.411in" svg:y="8.3252in">
        <draw:text-box>
          <text:p><text:span text:style-name="T2"><text:s text:c="2"/></text:span></text:p>
        </draw:text-box>
      </draw:frame>
      <draw:polygon text:anchor-type="page" text:anchor-page-number="2" draw:z-index="3677" draw:name="Shape630" draw:style-name="gr2" draw:text-style-name="P3" svg:width="0.2965in" svg:height="0.1917in" svg:x="7.3016in" svg:y="9.6413in" svg:viewBox="0 0 754 488" draw:points="0,0 754,0 754,488 0,488">
        <text:p/>
      </draw:polygon>
      <draw:frame text:anchor-type="page" text:anchor-page-number="3" draw:z-index="3676" draw:name="Shape950" draw:style-name="gr1" draw:text-style-name="P2" svg:width="2.8598in" svg:height="0.1295in" svg:x="0.3634in" svg:y="8.8756in">
        <draw:text-box>
          <text:p><text:span text:style-name="T3">4.2. Principali sintomi ed effetti, sia acuti che ritardati </text:span></text:p>
        </draw:text-box>
      </draw:frame>
      <draw:polygon text:anchor-type="page" text:anchor-page-number="6" draw:z-index="3675" draw:name="Shape2017" draw:style-name="gr3" draw:text-style-name="P4" svg:width="0.0098in" svg:height="0.0098in" svg:x="2.3315in" svg:y="2.7681in" svg:viewBox="0 0 26 26" draw:points="0,0 26,0 26,26 0,26">
        <text:p/>
      </draw:polygon>
      <draw:frame text:anchor-type="page" text:anchor-page-number="1" draw:z-index="3674" draw:name="Shape288" draw:style-name="gr1" draw:text-style-name="P2" svg:width="0.0433in" svg:height="0.1925in" svg:x="2.3866in" svg:y="7.3575in">
        <draw:text-box>
          <text:p><text:span text:style-name="T2"><text:s/></text:span></text:p>
        </draw:text-box>
      </draw:frame>
      <draw:frame text:anchor-type="page" text:anchor-page-number="14" draw:z-index="3673" draw:name="Shape4595" draw:style-name="gr1" draw:text-style-name="P2" svg:width="0.0433in" svg:height="0.1925in" svg:x="6.1193in" svg:y="5.748in">
        <draw:text-box>
          <text:p><text:span text:style-name="T2"><text:s/></text:span></text:p>
        </draw:text-box>
      </draw:frame>
      <draw:polygon text:anchor-type="page" text:anchor-page-number="7" draw:z-index="3672" draw:name="Shape3012" draw:style-name="gr2" draw:text-style-name="P3" svg:width="2.363in" svg:height="0.1917in" svg:x="4.3in" svg:y="8.6197in" svg:viewBox="0 0 6003 488" draw:points="0,0 6003,0 6003,488 0,488">
        <text:p/>
      </draw:polygon>
      <draw:polygon text:anchor-type="page" text:anchor-page-number="2" draw:z-index="3671" draw:name="Shape629" draw:style-name="gr2" draw:text-style-name="P3" svg:width="0.3933in" svg:height="0.1917in" svg:x="7.2531in" svg:y="9.6413in" svg:viewBox="0 0 1000 488" draw:points="0,0 1000,0 1000,488 0,488">
        <text:p/>
      </draw:polygon>
      <draw:polygon text:anchor-type="page" text:anchor-page-number="1" draw:z-index="3670" draw:name="Shape295" draw:style-name="gr2" draw:text-style-name="P3" svg:width="2.6583in" svg:height="0.1283in" svg:x="0.4114in" svg:y="7.5331in" svg:viewBox="0 0 6753 327" draw:points="0,0 6753,0 6753,327 0,327">
        <text:p/>
      </draw:polygon>
      <draw:polygon text:anchor-type="page" text:anchor-page-number="6" draw:z-index="3669" draw:name="Shape2016" draw:style-name="gr3" draw:text-style-name="P4" svg:width="0.7768in" svg:height="0.0098in" svg:x="1.5547in" svg:y="2.7681in" svg:viewBox="0 0 1974 26" draw:points="0,0 1974,0 1974,26 0,26">
        <text:p/>
      </draw:polygon>
      <draw:polygon text:anchor-type="page" text:anchor-page-number="14" draw:z-index="3668" draw:name="Shape4600" draw:style-name="gr2" draw:text-style-name="P3" svg:width="1.2799in" svg:height="0.1114in" svg:x="0.4114in" svg:y="5.9366in" svg:viewBox="0 0 3252 284" draw:points="0,0 3252,0 3252,284 0,284">
        <text:p/>
      </draw:polygon>
      <draw:frame text:anchor-type="page" text:anchor-page-number="7" draw:z-index="3667" draw:name="Shape3010" draw:style-name="gr1" draw:text-style-name="P2" svg:width="0.7476in" svg:height="0.1295in" svg:x="2.7728in" svg:y="8.622in">
        <draw:text-box>
          <text:p><text:span text:style-name="T1">non disponibile</text:span></text:p>
        </draw:text-box>
      </draw:frame>
      <draw:frame text:anchor-type="page" text:anchor-page-number="3" draw:z-index="3666" draw:name="Shape949" draw:style-name="gr1" draw:text-style-name="P2" svg:width="0.0433in" svg:height="0.1925in" svg:x="0.3634in" svg:y="8.6862in">
        <draw:text-box>
          <text:p><text:span text:style-name="T2"><text:s/></text:span></text:p>
        </draw:text-box>
      </draw:frame>
      <draw:polygon text:anchor-type="page" text:anchor-page-number="5" draw:z-index="3665" draw:name="Shape1416" draw:style-name="gr4" draw:text-style-name="P5" svg:width="0.6917in" svg:height="0.1917in" svg:x="1.5913in" svg:y="8.3213in" svg:viewBox="0 0 1758 488" draw:points="0,0 1758,0 1758,488 0,488">
        <text:p/>
      </draw:polygon>
      <draw:frame text:anchor-type="page" text:anchor-page-number="2" draw:z-index="3664" draw:name="Shape621" draw:style-name="gr1" draw:text-style-name="P2" svg:width="0.0433in" svg:height="0.1925in" svg:x="2.3799in" svg:y="9.6445in">
        <draw:text-box>
          <text:p><text:span text:style-name="T2"><text:s/></text:span></text:p>
        </draw:text-box>
      </draw:frame>
      <draw:frame text:anchor-type="page" text:anchor-page-number="7" draw:z-index="3663" draw:name="Shape2997" draw:style-name="gr1" draw:text-style-name="P2" svg:width="0.0433in" svg:height="0.1925in" svg:x="1.4598in" svg:y="8.5752in">
        <draw:text-box>
          <text:p><text:span text:style-name="T2"><text:s/></text:span></text:p>
        </draw:text-box>
      </draw:frame>
      <draw:frame text:anchor-type="page" text:anchor-page-number="3" draw:z-index="3662" draw:name="Shape948" draw:style-name="gr1" draw:text-style-name="P2" svg:width="5.9925in" svg:height="0.1295in" svg:x="0.3634in" svg:y="8.5571in">
        <draw:text-box>
          <text:p><text:span text:style-name="T1">biologici. Per la tipologia di DPI adatti per le caratteristiche della sostanza o della miscela, fare riferimento alla sezione 8. </text:span></text:p>
        </draw:text-box>
      </draw:frame>
      <draw:polygon text:anchor-type="page" text:anchor-page-number="14" draw:z-index="3661" draw:name="Shape4599" draw:style-name="gr2" draw:text-style-name="P3" svg:width="1.3768in" svg:height="0.1913in" svg:x="0.363in" svg:y="5.9366in" svg:viewBox="0 0 3498 487" draw:points="0,0 3498,0 3498,487 0,487">
        <text:p/>
      </draw:polygon>
      <draw:polygon text:anchor-type="page" text:anchor-page-number="1" draw:z-index="3660" draw:name="Shape294" draw:style-name="gr2" draw:text-style-name="P3" svg:width="2.7551in" svg:height="1.4067in" svg:x="0.363in" svg:y="7.5331in" svg:viewBox="0 0 6999 3574" draw:points="0,0 6999,0 6999,3574 0,3574">
        <text:p/>
      </draw:polygon>
      <draw:polygon text:anchor-type="page" text:anchor-page-number="6" draw:z-index="3659" draw:name="Shape2015" draw:style-name="gr3" draw:text-style-name="P4" svg:width="0.0098in" svg:height="0.0098in" svg:x="1.5449in" svg:y="2.7681in" svg:viewBox="0 0 26 26" draw:points="0,0 26,0 26,26 0,26">
        <text:p/>
      </draw:polygon>
      <draw:polygon text:anchor-type="page" text:anchor-page-number="5" draw:z-index="3658" draw:name="Shape1415" draw:style-name="gr4" draw:text-style-name="P5" svg:width="0.7882in" svg:height="0.1913in" svg:x="1.5433in" svg:y="8.3217in" svg:viewBox="0 0 2003 487" draw:points="0,0 2003,0 2003,487 0,487">
        <text:p/>
      </draw:polygon>
      <draw:frame text:anchor-type="page" text:anchor-page-number="14" draw:z-index="3657" draw:name="Shape4583" draw:style-name="gr1" draw:text-style-name="P2" svg:width="0.0433in" svg:height="0.1925in" svg:x="3.1654in" svg:y="5.6992in">
        <draw:text-box>
          <text:p><text:span text:style-name="T2"><text:s/></text:span></text:p>
        </draw:text-box>
      </draw:frame>
      <draw:frame text:anchor-type="page" text:anchor-page-number="5" draw:z-index="3656" draw:name="Shape1391" draw:style-name="gr1" draw:text-style-name="P2" svg:width="0.0433in" svg:height="0.1925in" svg:x="6.7098in" svg:y="8.0917in">
        <draw:text-box>
          <text:p><text:span text:style-name="T2"><text:s/></text:span></text:p>
        </draw:text-box>
      </draw:frame>
      <draw:polygon text:anchor-type="page" text:anchor-page-number="2" draw:z-index="3655" draw:name="Shape623" draw:style-name="gr2" draw:text-style-name="P3" svg:width="3.8417in" svg:height="0.1917in" svg:x="3.363in" svg:y="9.6413in" svg:viewBox="0 0 9759 488" draw:points="0,0 9759,0 9759,488 0,488">
        <text:p/>
      </draw:polygon>
      <draw:frame text:anchor-type="page" text:anchor-page-number="1" draw:z-index="3654" draw:name="Shape289" draw:style-name="gr1" draw:text-style-name="P2" svg:width="1.9461in" svg:height="0.1295in" svg:x="0.4535in" svg:y="7.4055in">
        <draw:text-box>
          <text:p><text:span text:style-name="T3">1.4. Numero telefonico di emergenza</text:span></text:p>
        </draw:text-box>
      </draw:frame>
      <draw:polygon text:anchor-type="page" text:anchor-page-number="7" draw:z-index="3653" draw:name="Shape3009" draw:style-name="gr2" draw:text-style-name="P3" svg:width="1.4783in" svg:height="0.1283in" svg:x="2.7732in" svg:y="8.6197in" svg:viewBox="0 0 3756 327" draw:points="0,0 3756,0 3756,327 0,327">
        <text:p/>
      </draw:polygon>
      <draw:frame text:anchor-type="page" text:anchor-page-number="3" draw:z-index="3652" draw:name="Shape947" draw:style-name="gr1" draw:text-style-name="P2" svg:width="7.4476in" svg:height="0.1295in" svg:x="0.3634in" svg:y="8.4307in">
        <draw:text-box>
          <text:p><text:span text:style-name="T1">della contaminazione. In assenza di altre indicazioni più specifiche, si raccomanda di utilizzare guanti monouso in caso di possibile contatto con liquidi </text:span></text:p>
        </draw:text-box>
      </draw:frame>
      <draw:polygon text:anchor-type="page" text:anchor-page-number="6" draw:z-index="3651" draw:name="Shape2012" draw:style-name="gr3" draw:text-style-name="P4" svg:width="1.1819in" svg:height="0.0098in" svg:x="0.363in" svg:y="2.7681in" svg:viewBox="0 0 3003 26" draw:points="0,0 3003,0 3003,26 0,26">
        <text:p/>
      </draw:polygon>
      <draw:polygon text:anchor-type="page" text:anchor-page-number="14" draw:z-index="3650" draw:name="Shape4602" draw:style-name="gr2" draw:text-style-name="P3" svg:width="0.4933in" svg:height="0.1917in" svg:x="6.1197in" svg:y="5.7449in" svg:viewBox="0 0 1254 488" draw:points="0,0 1254,0 1254,488 0,488">
        <text:p/>
      </draw:polygon>
      <draw:frame text:anchor-type="page" text:anchor-page-number="1" draw:z-index="3649" draw:name="Shape287" draw:style-name="gr1" draw:text-style-name="P2" svg:width="0.0433in" svg:height="0.1925in" svg:x="0.411in" svg:y="7.3575in">
        <draw:text-box>
          <text:p><text:span text:style-name="T2"><text:s/></text:span></text:p>
        </draw:text-box>
      </draw:frame>
      <draw:polygon text:anchor-type="page" text:anchor-page-number="2" draw:z-index="3648" draw:name="Shape622" draw:style-name="gr2" draw:text-style-name="P3" svg:width="3.9382in" svg:height="0.1917in" svg:x="3.315in" svg:y="9.6413in" svg:viewBox="0 0 10004 488" draw:points="0,0 10004,0 10004,488 0,488">
        <text:p/>
      </draw:polygon>
      <draw:polygon text:anchor-type="page" text:anchor-page-number="7" draw:z-index="3647" draw:name="Shape3008" draw:style-name="gr2" draw:text-style-name="P3" svg:width="1.5752in" svg:height="0.1917in" svg:x="2.7248in" svg:y="8.6197in" svg:viewBox="0 0 4002 488" draw:points="0,0 4002,0 4002,488 0,488">
        <text:p/>
      </draw:polygon>
      <draw:frame text:anchor-type="page" text:anchor-page-number="6" draw:z-index="3646" draw:name="Shape2048" draw:style-name="gr1" draw:text-style-name="P2" svg:width="0.0433in" svg:height="0.1925in" svg:x="5.9228in" svg:y="2.7811in">
        <draw:text-box>
          <text:p><text:span text:style-name="T2"><text:s/></text:span></text:p>
        </draw:text-box>
      </draw:frame>
      <draw:polygon text:anchor-type="page" text:anchor-page-number="5" draw:z-index="3645" draw:name="Shape1405" draw:style-name="gr4" draw:text-style-name="P5" svg:width="1.0835in" svg:height="0.1917in" svg:x="0.4114in" svg:y="8.3213in" svg:viewBox="0 0 2753 488" draw:points="0,0 2753,0 2753,488 0,488">
        <text:p/>
      </draw:polygon>
      <draw:frame text:anchor-type="page" text:anchor-page-number="3" draw:z-index="3644" draw:name="Shape946" draw:style-name="gr1" draw:text-style-name="P2" svg:width="7.485in" svg:height="0.1295in" svg:x="0.3634in" svg:y="8.302in">
        <draw:text-box>
          <text:p><text:span text:style-name="T1">di protezione individuale. La natura di tali protezioni dipende dalla pericolosità della sostanza o della miscela, dalla modalità di esposizione e dall`entità </text:span></text:p>
        </draw:text-box>
      </draw:frame>
      <draw:polygon text:anchor-type="page" text:anchor-page-number="14" draw:z-index="3643" draw:name="Shape4601" draw:style-name="gr2" draw:text-style-name="P3" svg:width="0.5898in" svg:height="0.1917in" svg:x="6.0717in" svg:y="5.7449in" svg:viewBox="0 0 1499 488" draw:points="0,0 1499,0 1499,488 0,488">
        <text:p/>
      </draw:polygon>
      <draw:polygon text:anchor-type="page" text:anchor-page-number="5" draw:z-index="3642" draw:name="Shape1404" draw:style-name="gr4" draw:text-style-name="P5" svg:width="1.1803in" svg:height="0.1913in" svg:x="0.363in" svg:y="8.3217in" svg:viewBox="0 0 2999 487" draw:points="0,0 2999,0 2999,487 0,487">
        <text:p/>
      </draw:polygon>
      <draw:frame text:anchor-type="page" text:anchor-page-number="7" draw:z-index="3641" draw:name="Shape3007" draw:style-name="gr1" draw:text-style-name="P2" svg:width="1.013in" svg:height="0.1295in" svg:x="0.4535in" svg:y="8.622in">
        <draw:text-box>
          <text:p><text:span text:style-name="T1">Viscosità cinematica</text:span></text:p>
        </draw:text-box>
      </draw:frame>
      <draw:frame text:anchor-type="page" text:anchor-page-number="2" draw:z-index="3640" draw:name="Shape595" draw:style-name="gr1" draw:text-style-name="P2" svg:width="0.0433in" svg:height="0.1925in" svg:x="1.2193in" svg:y="9.5965in">
        <draw:text-box>
          <text:p><text:span text:style-name="T2"><text:s/></text:span></text:p>
        </draw:text-box>
      </draw:frame>
      <draw:frame text:anchor-type="page" text:anchor-page-number="1" draw:z-index="3639" draw:name="Shape286" draw:style-name="gr1" draw:text-style-name="P2" svg:width="0.0433in" svg:height="0.1925in" svg:x="4.1335in" svg:y="7.2181in">
        <draw:text-box>
          <text:p><text:span text:style-name="T2"><text:s/></text:span></text:p>
        </draw:text-box>
      </draw:frame>
      <draw:frame text:anchor-type="page" text:anchor-page-number="3" draw:z-index="3638" draw:name="Shape945" draw:style-name="gr1" draw:text-style-name="P2" svg:width="7.5531in" svg:height="0.1295in" svg:x="0.3634in" svg:y="8.1736in">
        <draw:text-box>
          <text:p><text:span text:style-name="T1">E` buona norma per il soccorritore che presta aiuto ad un soggetto, che è stato esposto ad una sostanza chimica o ad una miscela, indossare dispositivi </text:span></text:p>
        </draw:text-box>
      </draw:frame>
      <draw:polygon text:anchor-type="page" text:anchor-page-number="6" draw:z-index="3637" draw:name="Shape2066" draw:style-name="gr2" draw:text-style-name="P3" svg:width="1.085in" svg:height="0.1917in" svg:x="6.7098in" svg:y="2.778in" svg:viewBox="0 0 2757 488" draw:points="0,0 2757,0 2757,488 0,488">
        <text:p/>
      </draw:polygon>
      <draw:polygon text:anchor-type="page" text:anchor-page-number="6" draw:z-index="3636" draw:name="Shape2063" draw:style-name="gr2" draw:text-style-name="P3" svg:width="1.1819in" svg:height="0.1917in" svg:x="6.6614in" svg:y="2.778in" svg:viewBox="0 0 3003 488" draw:points="0,0 3003,0 3003,488 0,488">
        <text:p/>
      </draw:polygon>
      <draw:polygon text:anchor-type="page" text:anchor-page-number="1" draw:z-index="3635" draw:name="Shape291" draw:style-name="gr2" draw:text-style-name="P3" svg:width="7.3835in" svg:height="0.1268in" svg:x="0.4114in" svg:y="7.4063in" svg:viewBox="0 0 18755 323" draw:points="0,0 18755,0 18755,323 0,323">
        <text:p/>
      </draw:polygon>
      <draw:frame text:anchor-type="page" text:anchor-page-number="7" draw:z-index="3634" draw:name="Shape2996" draw:style-name="gr1" draw:text-style-name="P2" svg:width="0.0433in" svg:height="0.1925in" svg:x="0.411in" svg:y="8.5752in">
        <draw:text-box>
          <text:p><text:span text:style-name="T2"><text:s/></text:span></text:p>
        </draw:text-box>
      </draw:frame>
      <draw:frame text:anchor-type="page" text:anchor-page-number="14" draw:z-index="3633" draw:name="Shape4594" draw:style-name="gr1" draw:text-style-name="P2" svg:width="1.3878in" svg:height="0.1295in" svg:x="1.7882in" svg:y="5.7472in">
        <draw:text-box>
          <text:p><text:span text:style-name="T1">Provoca irritazione cutanea.</text:span></text:p>
        </draw:text-box>
      </draw:frame>
      <draw:polygon text:anchor-type="page" text:anchor-page-number="5" draw:z-index="3632" draw:name="Shape1362" draw:style-name="gr3" draw:text-style-name="P4" svg:width="1.1717in" svg:height="0.0102in" svg:x="6.6732in" svg:y="8.0764in" svg:viewBox="0 0 2977 27" draw:points="0,0 2977,0 2977,27 0,27">
        <text:p/>
      </draw:polygon>
      <draw:polygon text:anchor-type="page" text:anchor-page-number="2" draw:z-index="3631" draw:name="Shape620" draw:style-name="gr2" draw:text-style-name="P3" svg:width="0.8866in" svg:height="0.1917in" svg:x="2.3799in" svg:y="9.6413in" svg:viewBox="0 0 2253 488" draw:points="0,0 2253,0 2253,488 0,488">
        <text:p/>
      </draw:polygon>
      <draw:frame text:anchor-type="page" text:anchor-page-number="3" draw:z-index="3630" draw:name="Shape944" draw:style-name="gr1" draw:text-style-name="P2" svg:width="0.0433in" svg:height="0.1925in" svg:x="0.3634in" svg:y="7.9846in">
        <draw:text-box>
          <text:p><text:span text:style-name="T2"><text:s/></text:span></text:p>
        </draw:text-box>
      </draw:frame>
      <draw:polygon text:anchor-type="page" text:anchor-page-number="1" draw:z-index="3629" draw:name="Shape290" draw:style-name="gr2" draw:text-style-name="P3" svg:width="7.4803in" svg:height="0.1268in" svg:x="0.363in" svg:y="7.4063in" svg:viewBox="0 0 19001 323" draw:points="0,0 19001,0 19001,323 0,323">
        <text:p/>
      </draw:polygon>
      <draw:frame text:anchor-type="page" text:anchor-page-number="14" draw:z-index="3628" draw:name="Shape4582" draw:style-name="gr1" draw:text-style-name="P2" svg:width="0.0433in" svg:height="0.1925in" svg:x="0.6846in" svg:y="5.6846in">
        <draw:text-box>
          <text:p><text:span text:style-name="T2"><text:s/></text:span></text:p>
        </draw:text-box>
      </draw:frame>
      <draw:frame text:anchor-type="page" text:anchor-page-number="7" draw:z-index="3627" draw:name="Shape2987" draw:style-name="gr1" draw:text-style-name="P2" svg:width="0.0433in" svg:height="0.1925in" svg:x="5.1764in" svg:y="8.4465in">
        <draw:text-box>
          <text:p><text:span text:style-name="T2"><text:s/></text:span></text:p>
        </draw:text-box>
      </draw:frame>
      <draw:frame text:anchor-type="page" text:anchor-page-number="6" draw:z-index="3626" draw:name="Shape2045" draw:style-name="gr1" draw:text-style-name="P2" svg:width="0.0433in" svg:height="0.1925in" svg:x="5.3335in" svg:y="2.7811in">
        <draw:text-box>
          <text:p><text:span text:style-name="T2"><text:s/></text:span></text:p>
        </draw:text-box>
      </draw:frame>
      <draw:polygon text:anchor-type="page" text:anchor-page-number="2" draw:z-index="3625" draw:name="Shape619" draw:style-name="gr2" draw:text-style-name="P3" svg:width="0.9835in" svg:height="0.1917in" svg:x="2.3315in" svg:y="9.6413in" svg:viewBox="0 0 2499 488" draw:points="0,0 2499,0 2499,488 0,488">
        <text:p/>
      </draw:polygon>
      <draw:frame text:anchor-type="page" text:anchor-page-number="3" draw:z-index="3624" draw:name="Shape942" draw:style-name="gr1" draw:text-style-name="P2" svg:width="1.3252in" svg:height="0.1295in" svg:x="0.3634in" svg:y="7.8555in">
        <draw:text-box>
          <text:p><text:span text:style-name="T1">Protezione dei soccorritori </text:span></text:p>
        </draw:text-box>
      </draw:frame>
      <draw:polygon text:anchor-type="page" text:anchor-page-number="5" draw:z-index="3623" draw:name="Shape1361" draw:style-name="gr3" draw:text-style-name="P4" svg:width="0.0102in" svg:height="0.0102in" svg:x="6.663in" svg:y="8.0764in" svg:viewBox="0 0 27 27" draw:points="0,0 27,0 27,27 0,27">
        <text:p/>
      </draw:polygon>
      <draw:polygon text:anchor-type="page" text:anchor-page-number="5" draw:z-index="3622" draw:name="Shape1360" draw:style-name="gr3" draw:text-style-name="P4" svg:width="0.7783in" svg:height="0.0102in" svg:x="5.8846in" svg:y="8.0764in" svg:viewBox="0 0 1978 27" draw:points="0,0 1978,0 1978,27 0,27">
        <text:p/>
      </draw:polygon>
      <draw:polygon text:anchor-type="page" text:anchor-page-number="6" draw:z-index="3621" draw:name="Shape2047" draw:style-name="gr2" draw:text-style-name="P3" svg:width="0.6898in" svg:height="0.1917in" svg:x="5.9232in" svg:y="2.778in" svg:viewBox="0 0 1753 488" draw:points="0,0 1753,0 1753,488 0,488">
        <text:p/>
      </draw:polygon>
      <draw:polygon text:anchor-type="page" text:anchor-page-number="7" draw:z-index="3620" draw:name="Shape3000" draw:style-name="gr2" draw:text-style-name="P3" svg:width="2.265in" svg:height="0.1283in" svg:x="0.4114in" svg:y="8.6197in" svg:viewBox="0 0 5754 327" draw:points="0,0 5754,0 5754,327 0,327">
        <text:p/>
      </draw:polygon>
      <draw:frame text:anchor-type="page" text:anchor-page-number="2" draw:z-index="3619" draw:name="Shape618" draw:style-name="gr1" draw:text-style-name="P2" svg:width="0.7724in" svg:height="0.1295in" svg:x="0.4535in" svg:y="9.6437in">
        <draw:text-box>
          <text:p><text:span text:style-name="T1">CAS <text:s text:c="2"/>471-34-1</text:span></text:p>
        </draw:text-box>
      </draw:frame>
      <draw:polygon text:anchor-type="page" text:anchor-page-number="3" draw:z-index="3618" draw:name="Shape943" draw:style-name="gr3" draw:text-style-name="P4" svg:width="1.285in" svg:height="0.0083in" svg:x="0.363in" svg:y="7.9681in" svg:viewBox="0 0 3265 22" draw:points="0,0 3265,0 3265,22 0,22">
        <text:p/>
      </draw:polygon>
      <draw:frame text:anchor-type="page" text:anchor-page-number="1" draw:z-index="3617" draw:name="Shape285" draw:style-name="gr1" draw:text-style-name="P2" svg:width="0.0433in" svg:height="0.1925in" svg:x="5.4799in" svg:y="7.0264in">
        <draw:text-box>
          <text:p><text:span text:style-name="T2"><text:s/></text:span></text:p>
        </draw:text-box>
      </draw:frame>
      <draw:polygon text:anchor-type="page" text:anchor-page-number="14" draw:z-index="3616" draw:name="Shape4593" draw:style-name="gr2" draw:text-style-name="P3" svg:width="4.235in" svg:height="0.1283in" svg:x="1.7882in" svg:y="5.7449in" svg:viewBox="0 0 10758 327" draw:points="0,0 10758,0 10758,327 0,327">
        <text:p/>
      </draw:polygon>
      <draw:polygon text:anchor-type="page" text:anchor-page-number="6" draw:z-index="3615" draw:name="Shape2046" draw:style-name="gr2" draw:text-style-name="P3" svg:width="0.7866in" svg:height="0.1917in" svg:x="5.8748in" svg:y="2.778in" svg:viewBox="0 0 1999 488" draw:points="0,0 1999,0 1999,488 0,488">
        <text:p/>
      </draw:polygon>
      <draw:polygon text:anchor-type="page" text:anchor-page-number="7" draw:z-index="3614" draw:name="Shape2999" draw:style-name="gr2" draw:text-style-name="P3" svg:width="2.3618in" svg:height="0.1917in" svg:x="0.363in" svg:y="8.6197in" svg:viewBox="0 0 6000 488" draw:points="0,0 6000,0 6000,488 0,488">
        <text:p/>
      </draw:polygon>
      <draw:frame text:anchor-type="page" text:anchor-page-number="1" draw:z-index="3613" draw:name="Shape282" draw:style-name="gr1" draw:text-style-name="P2" svg:width="0.085in" svg:height="0.1925in" svg:x="1.7398in" svg:y="7.0264in">
        <draw:text-box>
          <text:p><text:span text:style-name="T2"><text:s text:c="2"/></text:span></text:p>
        </draw:text-box>
      </draw:frame>
      <draw:polygon text:anchor-type="page" text:anchor-page-number="5" draw:z-index="3612" draw:name="Shape1359" draw:style-name="gr3" draw:text-style-name="P4" svg:width="0.0098in" svg:height="0.0102in" svg:x="5.8748in" svg:y="8.0764in" svg:viewBox="0 0 26 27" draw:points="0,0 26,0 26,27 0,27">
        <text:p/>
      </draw:polygon>
      <draw:frame text:anchor-type="page" text:anchor-page-number="2" draw:z-index="3611" draw:name="Shape615" draw:style-name="gr1" draw:text-style-name="P2" svg:width="0.0433in" svg:height="0.1925in" svg:x="0.411in" svg:y="9.5965in">
        <draw:text-box>
          <text:p><text:span text:style-name="T2"><text:s/></text:span></text:p>
        </draw:text-box>
      </draw:frame>
      <draw:polygon text:anchor-type="page" text:anchor-page-number="14" draw:z-index="3610" draw:name="Shape4592" draw:style-name="gr2" draw:text-style-name="P3" svg:width="4.3319in" svg:height="0.1917in" svg:x="1.7398in" svg:y="5.7449in" svg:viewBox="0 0 11004 488" draw:points="0,0 11004,0 11004,488 0,488">
        <text:p/>
      </draw:polygon>
      <draw:frame text:anchor-type="page" text:anchor-page-number="3" draw:z-index="3609" draw:name="Shape941" draw:style-name="gr1" draw:text-style-name="P2" svg:width="0.0433in" svg:height="0.1925in" svg:x="0.3634in" svg:y="7.6646in">
        <draw:text-box>
          <text:p><text:span text:style-name="T2"><text:s/></text:span></text:p>
        </draw:text-box>
      </draw:frame>
      <draw:frame text:anchor-type="page" text:anchor-page-number="14" draw:z-index="3608" draw:name="Shape4591" draw:style-name="gr1" draw:text-style-name="P2" svg:width="0.2323in" svg:height="0.113in" svg:x="0.4535in" svg:y="5.7457in">
        <draw:text-box>
          <text:p><text:span text:style-name="T5">H315</text:span></text:p>
        </draw:text-box>
      </draw:frame>
      <draw:polygon text:anchor-type="page" text:anchor-page-number="5" draw:z-index="3607" draw:name="Shape1358" draw:style-name="gr3" draw:text-style-name="P4" svg:width="0.5799in" svg:height="0.0102in" svg:x="5.2949in" svg:y="8.0764in" svg:viewBox="0 0 1474 27" draw:points="0,0 1474,0 1474,27 0,27">
        <text:p/>
      </draw:polygon>
      <draw:frame text:anchor-type="page" text:anchor-page-number="2" draw:z-index="3606" draw:name="Shape614" draw:style-name="gr1" draw:text-style-name="P2" svg:width="0.0433in" svg:height="0.1925in" svg:x="7.3016in" svg:y="9.4535in">
        <draw:text-box>
          <text:p><text:span text:style-name="T2"><text:s/></text:span></text:p>
        </draw:text-box>
      </draw:frame>
      <draw:frame text:anchor-type="page" text:anchor-page-number="7" draw:z-index="3605" draw:name="Shape3006" draw:style-name="gr1" draw:text-style-name="P2" svg:width="0.8343in" svg:height="0.1295in" svg:x="4.348in" svg:y="8.4937in">
        <draw:text-box>
          <text:p><text:span text:style-name="T1">Metodo:pHmetro</text:span></text:p>
        </draw:text-box>
      </draw:frame>
      <draw:frame text:anchor-type="page" text:anchor-page-number="3" draw:z-index="3604" draw:name="Shape940" draw:style-name="gr1" draw:text-style-name="P2" svg:width="5.4634in" svg:height="0.1295in" svg:x="0.3634in" svg:y="7.5346in">
        <draw:text-box>
          <text:p><text:span text:style-name="T1">INALAZIONE: Portare il soggetto all'aria aperta, lontano dal luogo dell'incidente. Consultare subito un medico. </text:span></text:p>
        </draw:text-box>
      </draw:frame>
      <draw:polygon text:anchor-type="page" text:anchor-page-number="1" draw:z-index="3603" draw:name="Shape284" draw:style-name="gr2" draw:text-style-name="P3" svg:width="4.6283in" svg:height="0.1917in" svg:x="3.1665in" svg:y="7.0232in" svg:viewBox="0 0 11757 488" draw:points="0,0 11757,0 11757,488 0,488">
        <text:p/>
      </draw:polygon>
      <draw:frame text:anchor-type="page" text:anchor-page-number="6" draw:z-index="3602" draw:name="Shape2042" draw:style-name="gr1" draw:text-style-name="P2" svg:width="0.0433in" svg:height="0.1925in" svg:x="4.1516in" svg:y="2.7811in">
        <draw:text-box>
          <text:p><text:span text:style-name="T2"><text:s/></text:span></text:p>
        </draw:text-box>
      </draw:frame>
      <draw:frame text:anchor-type="page" text:anchor-page-number="7" draw:z-index="3601" draw:name="Shape2986" draw:style-name="gr1" draw:text-style-name="P2" svg:width="0.0433in" svg:height="0.1925in" svg:x="2.8346in" svg:y="8.4465in">
        <draw:text-box>
          <text:p><text:span text:style-name="T2"><text:s/></text:span></text:p>
        </draw:text-box>
      </draw:frame>
      <draw:frame text:anchor-type="page" text:anchor-page-number="14" draw:z-index="3600" draw:name="Shape4581" draw:style-name="gr1" draw:text-style-name="P2" svg:width="0.0433in" svg:height="0.1925in" svg:x="0.411in" svg:y="5.6846in">
        <draw:text-box>
          <text:p><text:span text:style-name="T2"><text:s/></text:span></text:p>
        </draw:text-box>
      </draw:frame>
      <draw:frame text:anchor-type="page" text:anchor-page-number="3" draw:z-index="3599" draw:name="Shape939" draw:style-name="gr1" draw:text-style-name="P2" svg:width="1.4807in" svg:height="0.1295in" svg:x="0.3634in" svg:y="7.4071in">
        <draw:text-box>
          <text:p><text:span text:style-name="T1">Consultare subito un medico. </text:span></text:p>
        </draw:text-box>
      </draw:frame>
      <draw:polygon text:anchor-type="page" text:anchor-page-number="6" draw:z-index="3598" draw:name="Shape2044" draw:style-name="gr2" draw:text-style-name="P3" svg:width="0.4917in" svg:height="0.1917in" svg:x="5.3331in" svg:y="2.778in" svg:viewBox="0 0 1250 488" draw:points="0,0 1250,0 1250,488 0,488">
        <text:p/>
      </draw:polygon>
      <draw:polygon text:anchor-type="page" text:anchor-page-number="1" draw:z-index="3597" draw:name="Shape283" draw:style-name="gr2" draw:text-style-name="P3" svg:width="4.7252in" svg:height="0.1917in" svg:x="3.1181in" svg:y="7.0232in" svg:viewBox="0 0 12003 488" draw:points="0,0 12003,0 12003,488 0,488">
        <text:p/>
      </draw:polygon>
      <draw:polygon text:anchor-type="page" text:anchor-page-number="2" draw:z-index="3596" draw:name="Shape617" draw:style-name="gr2" draw:text-style-name="P3" svg:width="1.8717in" svg:height="0.1283in" svg:x="0.4114in" svg:y="9.6413in" svg:viewBox="0 0 4755 327" draw:points="0,0 4755,0 4755,327 0,327">
        <text:p/>
      </draw:polygon>
      <draw:polygon text:anchor-type="page" text:anchor-page-number="5" draw:z-index="3595" draw:name="Shape1357" draw:style-name="gr3" draw:text-style-name="P4" svg:width="0.0102in" svg:height="0.0102in" svg:x="5.2846in" svg:y="8.0764in" svg:viewBox="0 0 27 27" draw:points="0,0 27,0 27,27 0,27">
        <text:p/>
      </draw:polygon>
      <draw:frame text:anchor-type="page" text:anchor-page-number="14" draw:z-index="3594" draw:name="Shape4580" draw:style-name="gr1" draw:text-style-name="P2" svg:width="0.0433in" svg:height="0.1925in" svg:x="6.1193in" svg:y="5.5563in">
        <draw:text-box>
          <text:p><text:span text:style-name="T2"><text:s/></text:span></text:p>
        </draw:text-box>
      </draw:frame>
      <draw:polygon text:anchor-type="page" text:anchor-page-number="7" draw:z-index="3593" draw:name="Shape3005" draw:style-name="gr2" draw:text-style-name="P3" svg:width="2.265in" svg:height="0.1283in" svg:x="4.348in" svg:y="8.4913in" svg:viewBox="0 0 5754 327" draw:points="0,0 5754,0 5754,327 0,327">
        <text:p/>
      </draw:polygon>
      <draw:polygon text:anchor-type="page" text:anchor-page-number="2" draw:z-index="3592" draw:name="Shape616" draw:style-name="gr2" draw:text-style-name="P3" svg:width="1.9685in" svg:height="0.1917in" svg:x="0.363in" svg:y="9.6413in" svg:viewBox="0 0 5001 488" draw:points="0,0 5001,0 5001,488 0,488">
        <text:p/>
      </draw:polygon>
      <draw:polygon text:anchor-type="page" text:anchor-page-number="5" draw:z-index="3591" draw:name="Shape1356" draw:style-name="gr3" draw:text-style-name="P4" svg:width="1.1717in" svg:height="0.0102in" svg:x="4.113in" svg:y="8.0764in" svg:viewBox="0 0 2977 27" draw:points="0,0 2977,0 2977,27 0,27">
        <text:p/>
      </draw:polygon>
      <draw:polygon text:anchor-type="page" text:anchor-page-number="6" draw:z-index="3590" draw:name="Shape2043" draw:style-name="gr2" draw:text-style-name="P3" svg:width="0.5917in" svg:height="0.1917in" svg:x="5.2831in" svg:y="2.778in" svg:viewBox="0 0 1504 488" draw:points="0,0 1504,0 1504,488 0,488">
        <text:p/>
      </draw:polygon>
      <draw:frame text:anchor-type="page" text:anchor-page-number="1" draw:z-index="3589" draw:name="Shape269" draw:style-name="gr1" draw:text-style-name="P2" svg:width="0.0433in" svg:height="0.1925in" svg:x="4.0866in" svg:y="6.848in">
        <draw:text-box>
          <text:p><text:span text:style-name="T2"><text:s/></text:span></text:p>
        </draw:text-box>
      </draw:frame>
      <draw:frame text:anchor-type="page" text:anchor-page-number="3" draw:z-index="3588" draw:name="Shape938" draw:style-name="gr1" draw:text-style-name="P2" svg:width="7.4031in" svg:height="0.1295in" svg:x="0.3634in" svg:y="7.2807in">
        <draw:text-box>
          <text:p><text:span text:style-name="T1">INGESTIONE: Non indurre il vomito se non espressamente autorizzati dal medico. Non somministrare nulla per via orale se il soggetto è incosciente. </text:span></text:p>
        </draw:text-box>
      </draw:frame>
      <draw:polygon text:anchor-type="page" text:anchor-page-number="14" draw:z-index="3587" draw:name="Shape4585" draw:style-name="gr2" draw:text-style-name="P3" svg:width="1.2799in" svg:height="0.1114in" svg:x="0.4114in" svg:y="5.7449in" svg:viewBox="0 0 3252 284" draw:points="0,0 3252,0 3252,284 0,284">
        <text:p/>
      </draw:polygon>
      <draw:frame text:anchor-type="page" text:anchor-page-number="2" draw:z-index="3586" draw:name="Shape611" draw:style-name="gr1" draw:text-style-name="P2" svg:width="0.0433in" svg:height="0.1925in" svg:x="3.3634in" svg:y="9.4535in">
        <draw:text-box>
          <text:p><text:span text:style-name="T2"><text:s/></text:span></text:p>
        </draw:text-box>
      </draw:frame>
      <draw:frame text:anchor-type="page" text:anchor-page-number="3" draw:z-index="3585" draw:name="Shape937" draw:style-name="gr1" draw:text-style-name="P2" svg:width="3.0961in" svg:height="0.1295in" svg:x="0.3634in" svg:y="7.152in">
        <draw:text-box>
          <text:p><text:span text:style-name="T1">medico. Evitare ulteriori contatti con gli indumenti contaminati. </text:span></text:p>
        </draw:text-box>
      </draw:frame>
      <draw:polygon text:anchor-type="page" text:anchor-page-number="7" draw:z-index="3584" draw:name="Shape3004" draw:style-name="gr2" draw:text-style-name="P3" svg:width="2.363in" svg:height="0.1283in" svg:x="4.3in" svg:y="8.4913in" svg:viewBox="0 0 6003 327" draw:points="0,0 6003,0 6003,327 0,327">
        <text:p/>
      </draw:polygon>
      <draw:polygon text:anchor-type="page" text:anchor-page-number="1" draw:z-index="3583" draw:name="Shape277" draw:style-name="gr2" draw:text-style-name="P3" svg:width="2.6583in" svg:height="0.1917in" svg:x="0.4114in" svg:y="7.0232in" svg:viewBox="0 0 6753 488" draw:points="0,0 6753,0 6753,488 0,488">
        <text:p/>
      </draw:polygon>
      <draw:frame text:anchor-type="page" text:anchor-page-number="6" draw:z-index="3582" draw:name="Shape2039" draw:style-name="gr1" draw:text-style-name="P2" svg:width="0.0433in" svg:height="0.1925in" svg:x="3.561in" svg:y="2.7811in">
        <draw:text-box>
          <text:p><text:span text:style-name="T2"><text:s/></text:span></text:p>
        </draw:text-box>
      </draw:frame>
      <draw:polygon text:anchor-type="page" text:anchor-page-number="5" draw:z-index="3581" draw:name="Shape1355" draw:style-name="gr3" draw:text-style-name="P4" svg:width="0.0098in" svg:height="0.0102in" svg:x="4.1031in" svg:y="8.0764in" svg:viewBox="0 0 26 27" draw:points="0,0 26,0 26,27 0,27">
        <text:p/>
      </draw:polygon>
      <draw:frame text:anchor-type="page" text:anchor-page-number="7" draw:z-index="3580" draw:name="Shape3003" draw:style-name="gr1" draw:text-style-name="P2" svg:width="0.0642in" svg:height="0.1295in" svg:x="2.7728in" svg:y="8.4937in">
        <draw:text-box>
          <text:p><text:span text:style-name="T1">8</text:span></text:p>
        </draw:text-box>
      </draw:frame>
      <draw:polygon text:anchor-type="page" text:anchor-page-number="5" draw:z-index="3579" draw:name="Shape1354" draw:style-name="gr3" draw:text-style-name="P4" svg:width="0.5799in" svg:height="0.0102in" svg:x="3.5232in" svg:y="8.0764in" svg:viewBox="0 0 1474 27" draw:points="0,0 1474,0 1474,27 0,27">
        <text:p/>
      </draw:polygon>
      <draw:polygon text:anchor-type="page" text:anchor-page-number="6" draw:z-index="3578" draw:name="Shape2041" draw:style-name="gr2" draw:text-style-name="P3" svg:width="1.0831in" svg:height="0.1917in" svg:x="4.1516in" svg:y="2.778in" svg:viewBox="0 0 2752 488" draw:points="0,0 2752,0 2752,488 0,488">
        <text:p/>
      </draw:polygon>
      <draw:polygon text:anchor-type="page" text:anchor-page-number="14" draw:z-index="3577" draw:name="Shape4584" draw:style-name="gr2" draw:text-style-name="P3" svg:width="1.3768in" svg:height="0.1917in" svg:x="0.363in" svg:y="5.7449in" svg:viewBox="0 0 3498 488" draw:points="0,0 3498,0 3498,488 0,488">
        <text:p/>
      </draw:polygon>
      <draw:polygon text:anchor-type="page" text:anchor-page-number="1" draw:z-index="3576" draw:name="Shape281" draw:style-name="gr2" draw:text-style-name="P3" svg:width="2.7551in" svg:height="0.1917in" svg:x="0.363in" svg:y="7.0232in" svg:viewBox="0 0 6999 488" draw:points="0,0 6999,0 6999,488 0,488">
        <text:p/>
      </draw:polygon>
      <draw:frame text:anchor-type="page" text:anchor-page-number="3" draw:z-index="3575" draw:name="Shape936" draw:style-name="gr1" draw:text-style-name="P2" svg:width="7.3713in" svg:height="0.1295in" svg:x="0.3634in" svg:y="7.0236in">
        <draw:text-box>
          <text:p><text:span text:style-name="T1">PELLE: Togliere gli indumenti contaminati. Lavare immediatamente ed abbondantemente con acqua corrente (e sapone se possibile). Consultare un </text:span></text:p>
        </draw:text-box>
      </draw:frame>
      <draw:polygon text:anchor-type="page" text:anchor-page-number="2" draw:z-index="3574" draw:name="Shape613" draw:style-name="gr2" draw:text-style-name="P3" svg:width="0.2965in" svg:height="0.1917in" svg:x="7.3016in" svg:y="9.45in" svg:viewBox="0 0 754 488" draw:points="0,0 754,0 754,488 0,488">
        <text:p/>
      </draw:polygon>
      <draw:polygon text:anchor-type="page" text:anchor-page-number="6" draw:z-index="3573" draw:name="Shape2040" draw:style-name="gr2" draw:text-style-name="P3" svg:width="1.1799in" svg:height="0.1917in" svg:x="4.1031in" svg:y="2.778in" svg:viewBox="0 0 2998 488" draw:points="0,0 2998,0 2998,488 0,488">
        <text:p/>
      </draw:polygon>
      <draw:polygon text:anchor-type="page" text:anchor-page-number="2" draw:z-index="3572" draw:name="Shape612" draw:style-name="gr2" draw:text-style-name="P3" svg:width="0.3933in" svg:height="0.1917in" svg:x="7.2531in" svg:y="9.45in" svg:viewBox="0 0 1000 488" draw:points="0,0 1000,0 1000,488 0,488">
        <text:p/>
      </draw:polygon>
      <draw:frame text:anchor-type="page" text:anchor-page-number="14" draw:z-index="3571" draw:name="Shape4574" draw:style-name="gr1" draw:text-style-name="P2" svg:width="0.0433in" svg:height="0.1925in" svg:x="3.4429in" svg:y="5.5075in">
        <draw:text-box>
          <text:p><text:span text:style-name="T2"><text:s/></text:span></text:p>
        </draw:text-box>
      </draw:frame>
      <draw:frame text:anchor-type="page" text:anchor-page-number="7" draw:z-index="3570" draw:name="Shape2985" draw:style-name="gr1" draw:text-style-name="P2" svg:width="0.0433in" svg:height="0.1925in" svg:x="0.5953in" svg:y="8.4465in">
        <draw:text-box>
          <text:p><text:span text:style-name="T2"><text:s/></text:span></text:p>
        </draw:text-box>
      </draw:frame>
      <draw:polygon text:anchor-type="page" text:anchor-page-number="5" draw:z-index="3569" draw:name="Shape1353" draw:style-name="gr3" draw:text-style-name="P4" svg:width="0.0102in" svg:height="0.0102in" svg:x="3.513in" svg:y="8.0764in" svg:viewBox="0 0 27 27" draw:points="0,0 27,0 27,27 0,27">
        <text:p/>
      </draw:polygon>
      <draw:frame text:anchor-type="page" text:anchor-page-number="3" draw:z-index="3568" draw:name="Shape935" draw:style-name="gr1" draw:text-style-name="P2" svg:width="5.4031in" svg:height="0.1295in" svg:x="0.3634in" svg:y="6.8965in">
        <draw:text-box>
          <text:p><text:span text:style-name="T1">abbondantemente con acqua per almeno 15 minuti, aprendo bene le palpebre. Consultare subito un medico. </text:span></text:p>
        </draw:text-box>
      </draw:frame>
      <draw:frame text:anchor-type="page" text:anchor-page-number="1" draw:z-index="3567" draw:name="Shape280" draw:style-name="gr1" draw:text-style-name="P2" svg:width="0.9189in" svg:height="0.1295in" svg:x="3.1665in" svg:y="6.8953in">
        <draw:text-box>
          <text:p><text:span text:style-name="T3">ITALMONT S.R.L.</text:span></text:p>
        </draw:text-box>
      </draw:frame>
      <draw:polygon text:anchor-type="page" text:anchor-page-number="14" draw:z-index="3566" draw:name="Shape4590" draw:style-name="gr2" draw:text-style-name="P3" svg:width="0.4933in" svg:height="0.1917in" svg:x="6.1197in" svg:y="5.5531in" svg:viewBox="0 0 1254 488" draw:points="0,0 1254,0 1254,488 0,488">
        <text:p/>
      </draw:polygon>
      <draw:frame text:anchor-type="page" text:anchor-page-number="1" draw:z-index="3565" draw:name="Shape271" draw:style-name="gr1" draw:text-style-name="P2" svg:width="0.0433in" svg:height="0.1925in" svg:x="0.928in" svg:y="6.8492in">
        <draw:text-box>
          <text:p><text:span text:style-name="T2"><text:s/></text:span></text:p>
        </draw:text-box>
      </draw:frame>
      <draw:frame text:anchor-type="page" text:anchor-page-number="2" draw:z-index="3564" draw:name="Shape608" draw:style-name="gr1" draw:text-style-name="P2" svg:width="0.0433in" svg:height="0.1925in" svg:x="2.3799in" svg:y="9.4535in">
        <draw:text-box>
          <text:p><text:span text:style-name="T2"><text:s/></text:span></text:p>
        </draw:text-box>
      </draw:frame>
      <draw:polygon text:anchor-type="page" text:anchor-page-number="5" draw:z-index="3563" draw:name="Shape1352" draw:style-name="gr3" draw:text-style-name="P4" svg:width="1.1717in" svg:height="0.0102in" svg:x="2.3413in" svg:y="8.0764in" svg:viewBox="0 0 2977 27" draw:points="0,0 2977,0 2977,27 0,27">
        <text:p/>
      </draw:polygon>
      <draw:frame text:anchor-type="page" text:anchor-page-number="3" draw:z-index="3562" draw:name="Shape934" draw:style-name="gr1" draw:text-style-name="P2" svg:width="7.6496in" svg:height="0.1295in" svg:x="0.3634in" svg:y="6.7689in">
        <draw:text-box>
          <text:p><text:span text:style-name="T1">OCCHI: <text:s/>Rimuovere, <text:s/>se <text:s/>presenti, <text:s/>le <text:s/>lenti <text:s/>a <text:s/>contatto <text:s/>se <text:s/>la <text:s/>situazione <text:s/>consente <text:s/>di <text:s/>effettuare <text:s/>l`operazione <text:s/>con <text:s/>facilità. <text:s/>Lavarsi <text:s/>immediatamente <text:s/>ed </text:span></text:p>
        </draw:text-box>
      </draw:frame>
      <draw:polygon text:anchor-type="page" text:anchor-page-number="7" draw:z-index="3561" draw:name="Shape3002" draw:style-name="gr2" draw:text-style-name="P3" svg:width="1.4783in" svg:height="0.1283in" svg:x="2.7732in" svg:y="8.4913in" svg:viewBox="0 0 3756 327" draw:points="0,0 3756,0 3756,327 0,327">
        <text:p/>
      </draw:polygon>
      <draw:frame text:anchor-type="page" text:anchor-page-number="6" draw:z-index="3560" draw:name="Shape2011" draw:style-name="gr1" draw:text-style-name="P2" svg:width="0.0433in" svg:height="0.1925in" svg:x="2.5417in" svg:y="2.7193in">
        <draw:text-box>
          <text:p><text:span text:style-name="T2"><text:s/></text:span></text:p>
        </draw:text-box>
      </draw:frame>
      <draw:polygon text:anchor-type="page" text:anchor-page-number="1" draw:z-index="3559" draw:name="Shape279" draw:style-name="gr2" draw:text-style-name="P3" svg:width="4.6283in" svg:height="0.1283in" svg:x="3.1665in" svg:y="6.8949in" svg:viewBox="0 0 11757 327" draw:points="0,0 11757,0 11757,327 0,327">
        <text:p/>
      </draw:polygon>
      <draw:polygon text:anchor-type="page" text:anchor-page-number="14" draw:z-index="3558" draw:name="Shape4589" draw:style-name="gr2" draw:text-style-name="P3" svg:width="0.5898in" svg:height="0.1917in" svg:x="6.0717in" svg:y="5.5531in" svg:viewBox="0 0 1499 488" draw:points="0,0 1499,0 1499,488 0,488">
        <text:p/>
      </draw:polygon>
      <draw:polygon text:anchor-type="page" text:anchor-page-number="6" draw:z-index="3557" draw:name="Shape2038" draw:style-name="gr2" draw:text-style-name="P3" svg:width="0.4933in" svg:height="0.1917in" svg:x="3.5614in" svg:y="2.778in" svg:viewBox="0 0 1254 488" draw:points="0,0 1254,0 1254,488 0,488">
        <text:p/>
      </draw:polygon>
      <draw:polygon text:anchor-type="page" text:anchor-page-number="5" draw:z-index="3556" draw:name="Shape1351" draw:style-name="gr3" draw:text-style-name="P4" svg:width="0.0098in" svg:height="0.0102in" svg:x="2.3315in" svg:y="8.0764in" svg:viewBox="0 0 26 27" draw:points="0,0 26,0 26,27 0,27">
        <text:p/>
      </draw:polygon>
      <draw:polygon text:anchor-type="page" text:anchor-page-number="7" draw:z-index="3555" draw:name="Shape3001" draw:style-name="gr2" draw:text-style-name="P3" svg:width="1.5752in" svg:height="0.1283in" svg:x="2.7248in" svg:y="8.4913in" svg:viewBox="0 0 4002 327" draw:points="0,0 4002,0 4002,327 0,327">
        <text:p/>
      </draw:polygon>
      <draw:polygon text:anchor-type="page" text:anchor-page-number="2" draw:z-index="3554" draw:name="Shape610" draw:style-name="gr2" draw:text-style-name="P3" svg:width="3.8417in" svg:height="0.1917in" svg:x="3.363in" svg:y="9.45in" svg:viewBox="0 0 9759 488" draw:points="0,0 9759,0 9759,488 0,488">
        <text:p/>
      </draw:polygon>
      <draw:frame text:anchor-type="page" text:anchor-page-number="3" draw:z-index="3553" draw:name="Shape933" draw:style-name="gr1" draw:text-style-name="P2" svg:width="4.3059in" svg:height="0.1295in" svg:x="0.3634in" svg:y="6.6425in">
        <draw:text-box>
          <text:p><text:span text:style-name="T1">In caso di sintomi più gravi, chiamare il 118 per ottenere soccorso sanitario immediato. </text:span></text:p>
        </draw:text-box>
      </draw:frame>
      <draw:frame text:anchor-type="page" text:anchor-page-number="14" draw:z-index="3552" draw:name="Shape4588" draw:style-name="gr1" draw:text-style-name="P2" svg:width="1.6669in" svg:height="0.1295in" svg:x="1.7882in" svg:y="5.5555in">
        <draw:text-box>
          <text:p><text:span text:style-name="T1">Provoca grave irritazione oculare.</text:span></text:p>
        </draw:text-box>
      </draw:frame>
      <draw:polygon text:anchor-type="page" text:anchor-page-number="5" draw:z-index="3551" draw:name="Shape1350" draw:style-name="gr3" draw:text-style-name="P4" svg:width="0.7768in" svg:height="0.0102in" svg:x="1.5547in" svg:y="8.0764in" svg:viewBox="0 0 1974 27" draw:points="0,0 1974,0 1974,27 0,27">
        <text:p/>
      </draw:polygon>
      <draw:frame text:anchor-type="page" text:anchor-page-number="3" draw:z-index="3550" draw:name="Shape932" draw:style-name="gr1" draw:text-style-name="P2" svg:width="4.7559in" svg:height="0.1295in" svg:x="0.3634in" svg:y="6.5138in">
        <draw:text-box>
          <text:p><text:span text:style-name="T1">In caso di dubbio o in presenza di sintomi contattare un medico e mostrargli questo documento. </text:span></text:p>
        </draw:text-box>
      </draw:frame>
      <draw:polygon text:anchor-type="page" text:anchor-page-number="2" draw:z-index="3549" draw:name="Shape609" draw:style-name="gr2" draw:text-style-name="P3" svg:width="3.9382in" svg:height="0.1917in" svg:x="3.315in" svg:y="9.45in" svg:viewBox="0 0 10004 488" draw:points="0,0 10004,0 10004,488 0,488">
        <text:p/>
      </draw:polygon>
      <draw:polygon text:anchor-type="page" text:anchor-page-number="1" draw:z-index="3548" draw:name="Shape278" draw:style-name="gr2" draw:text-style-name="P3" svg:width="4.7252in" svg:height="0.1283in" svg:x="3.1181in" svg:y="6.8949in" svg:viewBox="0 0 12003 327" draw:points="0,0 12003,0 12003,327 0,327">
        <text:p/>
      </draw:polygon>
      <draw:polygon text:anchor-type="page" text:anchor-page-number="6" draw:z-index="3547" draw:name="Shape2037" draw:style-name="gr2" draw:text-style-name="P3" svg:width="0.5902in" svg:height="0.1917in" svg:x="3.513in" svg:y="2.778in" svg:viewBox="0 0 1500 488" draw:points="0,0 1500,0 1500,488 0,488">
        <text:p/>
      </draw:polygon>
      <draw:frame text:anchor-type="page" text:anchor-page-number="7" draw:z-index="3546" draw:name="Shape2995" draw:style-name="gr1" draw:text-style-name="P2" svg:width="0.1449in" svg:height="0.1295in" svg:x="0.4535in" svg:y="8.4937in">
        <draw:text-box>
          <text:p><text:span text:style-name="T1">pH</text:span></text:p>
        </draw:text-box>
      </draw:frame>
      <draw:frame text:anchor-type="page" text:anchor-page-number="14" draw:z-index="3545" draw:name="Shape4568" draw:style-name="gr1" draw:text-style-name="P2" svg:width="0.0433in" svg:height="0.1925in" svg:x="0.6846in" svg:y="5.4929in">
        <draw:text-box>
          <text:p><text:span text:style-name="T2"><text:s/></text:span></text:p>
        </draw:text-box>
      </draw:frame>
      <draw:frame text:anchor-type="page" text:anchor-page-number="3" draw:z-index="3544" draw:name="Shape931" draw:style-name="gr1" draw:text-style-name="P2" svg:width="4.4953in" svg:height="0.1295in" svg:x="0.3634in" svg:y="6.3854in">
        <draw:text-box>
          <text:p><text:span text:style-name="T1">corretto comportamento in caso di contatto con un prodotto chimico anche non pericoloso. </text:span></text:p>
        </draw:text-box>
      </draw:frame>
      <draw:polygon text:anchor-type="page" text:anchor-page-number="5" draw:z-index="3543" draw:name="Shape1349" draw:style-name="gr3" draw:text-style-name="P4" svg:width="0.0098in" svg:height="0.0102in" svg:x="1.5449in" svg:y="8.0764in" svg:viewBox="0 0 26 27" draw:points="0,0 26,0 26,27 0,27">
        <text:p/>
      </draw:polygon>
      <draw:frame text:anchor-type="page" text:anchor-page-number="1" draw:z-index="3542" draw:name="Shape276" draw:style-name="gr1" draw:text-style-name="P2" svg:width="0.4803in" svg:height="0.1295in" svg:x="0.4535in" svg:y="6.8972in">
        <draw:text-box>
          <text:p><text:span text:style-name="T1">Fornitore:</text:span></text:p>
        </draw:text-box>
      </draw:frame>
      <draw:frame text:anchor-type="page" text:anchor-page-number="6" draw:z-index="3541" draw:name="Shape2035" draw:style-name="gr1" draw:text-style-name="P2" svg:width="0.163in" svg:height="0.113in" svg:x="2.3799in" svg:y="2.7807in">
        <draw:text-box>
          <text:p><text:span text:style-name="T4"><text:s text:c="2"/>10</text:span></text:p>
        </draw:text-box>
      </draw:frame>
      <draw:frame text:anchor-type="page" text:anchor-page-number="7" draw:z-index="3540" draw:name="Shape2984" draw:style-name="gr1" draw:text-style-name="P2" svg:width="0.0433in" svg:height="0.1925in" svg:x="0.411in" svg:y="8.4465in">
        <draw:text-box>
          <text:p><text:span text:style-name="T2"><text:s/></text:span></text:p>
        </draw:text-box>
      </draw:frame>
      <draw:frame text:anchor-type="page" text:anchor-page-number="2" draw:z-index="3539" draw:name="Shape591" draw:style-name="gr1" draw:text-style-name="P2" svg:width="0.0433in" svg:height="0.1925in" svg:x="1.2063in" svg:y="9.4047in">
        <draw:text-box>
          <text:p><text:span text:style-name="T2"><text:s/></text:span></text:p>
        </draw:text-box>
      </draw:frame>
      <draw:polygon text:anchor-type="page" text:anchor-page-number="2" draw:z-index="3538" draw:name="Shape597" draw:style-name="gr2" draw:text-style-name="P3" svg:width="0.8866in" svg:height="0.1917in" svg:x="2.3799in" svg:y="9.45in" svg:viewBox="0 0 2253 488" draw:points="0,0 2253,0 2253,488 0,488">
        <text:p/>
      </draw:polygon>
      <draw:frame text:anchor-type="page" text:anchor-page-number="6" draw:z-index="3537" draw:name="Shape2010" draw:style-name="gr1" draw:text-style-name="P2" svg:width="0.0433in" svg:height="0.1925in" svg:x="1.7866in" svg:y="2.7193in">
        <draw:text-box>
          <text:p><text:span text:style-name="T2"><text:s/></text:span></text:p>
        </draw:text-box>
      </draw:frame>
      <draw:frame text:anchor-type="page" text:anchor-page-number="7" draw:z-index="3536" draw:name="Shape2983" draw:style-name="gr1" draw:text-style-name="P2" svg:width="0.0433in" svg:height="0.1925in" svg:x="4.348in" svg:y="8.3035in">
        <draw:text-box>
          <text:p><text:span text:style-name="T2"><text:s/></text:span></text:p>
        </draw:text-box>
      </draw:frame>
      <draw:polygon text:anchor-type="page" text:anchor-page-number="14" draw:z-index="3535" draw:name="Shape4587" draw:style-name="gr2" draw:text-style-name="P3" svg:width="4.235in" svg:height="0.1283in" svg:x="1.7882in" svg:y="5.5531in" svg:viewBox="0 0 10758 327" draw:points="0,0 10758,0 10758,327 0,327">
        <text:p/>
      </draw:polygon>
      <draw:frame text:anchor-type="page" text:anchor-page-number="1" draw:z-index="3534" draw:name="Shape270" draw:style-name="gr1" draw:text-style-name="P2" svg:width="0.0433in" svg:height="0.1925in" svg:x="0.411in" svg:y="6.8492in">
        <draw:text-box>
          <text:p><text:span text:style-name="T2"><text:s/></text:span></text:p>
        </draw:text-box>
      </draw:frame>
      <draw:polygon text:anchor-type="page" text:anchor-page-number="5" draw:z-index="3533" draw:name="Shape1348" draw:style-name="gr3" draw:text-style-name="P4" svg:width="1.1819in" svg:height="0.0102in" svg:x="0.363in" svg:y="8.0764in" svg:viewBox="0 0 3003 27" draw:points="0,0 3003,0 3003,27 0,27">
        <text:p/>
      </draw:polygon>
      <draw:frame text:anchor-type="page" text:anchor-page-number="3" draw:z-index="3532" draw:name="Shape930" draw:style-name="gr1" draw:text-style-name="P2" svg:width="7.8858in" svg:height="0.1295in" svg:x="0.3634in" svg:y="6.2583in">
        <draw:text-box>
          <text:p><text:span text:style-name="T1">Non <text:s/>sono <text:s/>attesi <text:s/>effetti <text:s/>tali <text:s/>da <text:s/>richiedere <text:s/>l`attuazione <text:s/>di <text:s/>speciali <text:s/>misure <text:s/>di <text:s/>primo <text:s/>soccorso. <text:s/>Le <text:s/>informazioni <text:s/>che <text:s/>seguono <text:s/>sono <text:s/>indicazioni <text:s/>pratiche <text:s/>di </text:span></text:p>
        </draw:text-box>
      </draw:frame>
      <draw:polygon text:anchor-type="page" text:anchor-page-number="14" draw:z-index="3531" draw:name="Shape4586" draw:style-name="gr2" draw:text-style-name="P3" svg:width="4.3319in" svg:height="0.1917in" svg:x="1.7398in" svg:y="5.5531in" svg:viewBox="0 0 11004 488" draw:points="0,0 11004,0 11004,488 0,488">
        <text:p/>
      </draw:polygon>
      <draw:frame text:anchor-type="page" text:anchor-page-number="5" draw:z-index="3530" draw:name="Shape1392" draw:style-name="gr1" draw:text-style-name="P2" svg:width="0.0433in" svg:height="0.1925in" svg:x="6.4846in" svg:y="8.1417in">
        <draw:text-box>
          <text:p><text:span text:style-name="T2"><text:s/></text:span></text:p>
        </draw:text-box>
      </draw:frame>
      <draw:polygon text:anchor-type="page" text:anchor-page-number="2" draw:z-index="3529" draw:name="Shape596" draw:style-name="gr2" draw:text-style-name="P3" svg:width="0.9835in" svg:height="0.1917in" svg:x="2.3315in" svg:y="9.45in" svg:viewBox="0 0 2499 488" draw:points="0,0 2499,0 2499,488 0,488">
        <text:p/>
      </draw:polygon>
      <draw:polygon text:anchor-type="page" text:anchor-page-number="7" draw:z-index="3528" draw:name="Shape2989" draw:style-name="gr2" draw:text-style-name="P3" svg:width="2.265in" svg:height="0.1283in" svg:x="0.4114in" svg:y="8.4913in" svg:viewBox="0 0 5754 327" draw:points="0,0 5754,0 5754,327 0,327">
        <text:p/>
      </draw:polygon>
      <draw:frame text:anchor-type="page" text:anchor-page-number="3" draw:z-index="3527" draw:name="Shape929" draw:style-name="gr1" draw:text-style-name="P2" svg:width="0.0433in" svg:height="0.1925in" svg:x="0.3634in" svg:y="6.0681in">
        <draw:text-box>
          <text:p><text:span text:style-name="T2"><text:s/></text:span></text:p>
        </draw:text-box>
      </draw:frame>
      <draw:polygon text:anchor-type="page" text:anchor-page-number="6" draw:z-index="3526" draw:name="Shape2034" draw:style-name="gr2" draw:text-style-name="P3" svg:width="1.0831in" svg:height="0.1118in" svg:x="2.3799in" svg:y="2.778in" svg:viewBox="0 0 2752 285" draw:points="0,0 2752,0 2752,285 0,285">
        <text:p/>
      </draw:polygon>
      <draw:frame text:anchor-type="page" text:anchor-page-number="1" draw:z-index="3525" draw:name="Shape259" draw:style-name="gr1" draw:text-style-name="P2" svg:width="0.0433in" svg:height="0.1925in" svg:x="4.0398in" svg:y="6.7193in">
        <draw:text-box>
          <text:p><text:span text:style-name="T2"><text:s/></text:span></text:p>
        </draw:text-box>
      </draw:frame>
      <draw:frame text:anchor-type="page" text:anchor-page-number="3" draw:z-index="3524" draw:name="Shape928" draw:style-name="gr1" draw:text-style-name="P2" svg:width="2.5614in" svg:height="0.1295in" svg:x="0.3634in" svg:y="5.9366in">
        <draw:text-box>
          <text:p><text:span text:style-name="T3">4.1. Descrizione delle misure di primo soccorso </text:span></text:p>
        </draw:text-box>
      </draw:frame>
      <draw:polygon text:anchor-type="page" text:anchor-page-number="1" draw:z-index="3523" draw:name="Shape273" draw:style-name="gr2" draw:text-style-name="P3" svg:width="2.6583in" svg:height="0.1283in" svg:x="0.4114in" svg:y="6.8949in" svg:viewBox="0 0 6753 327" draw:points="0,0 6753,0 6753,327 0,327">
        <text:p/>
      </draw:polygon>
      <draw:polygon text:anchor-type="page" text:anchor-page-number="6" draw:z-index="3522" draw:name="Shape2033" draw:style-name="gr2" draw:text-style-name="P3" svg:width="1.1815in" svg:height="0.1917in" svg:x="2.3315in" svg:y="2.778in" svg:viewBox="0 0 3002 488" draw:points="0,0 3002,0 3002,488 0,488">
        <text:p/>
      </draw:polygon>
      <draw:frame text:anchor-type="page" text:anchor-page-number="2" draw:z-index="3521" draw:name="Shape607" draw:style-name="gr1" draw:text-style-name="P2" svg:width="0.7598in" svg:height="0.1295in" svg:x="0.4535in" svg:y="9.452in">
        <draw:text-box>
          <text:p><text:span text:style-name="T1">CE <text:s text:c="2"/>207-439-9</text:span></text:p>
        </draw:text-box>
      </draw:frame>
      <draw:polygon text:anchor-type="page" text:anchor-page-number="5" draw:z-index="3520" draw:name="Shape1403" draw:style-name="gr4" draw:text-style-name="P5" svg:width="1.085in" svg:height="0.1917in" svg:x="6.7098in" svg:y="8.0882in" svg:viewBox="0 0 2757 488" draw:points="0,0 2757,0 2757,488 0,488">
        <text:p/>
      </draw:polygon>
      <draw:frame text:anchor-type="page" text:anchor-page-number="14" draw:z-index="3519" draw:name="Shape4579" draw:style-name="gr1" draw:text-style-name="P2" svg:width="0.2323in" svg:height="0.113in" svg:x="0.4535in" svg:y="5.5543in">
        <draw:text-box>
          <text:p><text:span text:style-name="T5">H319</text:span></text:p>
        </draw:text-box>
      </draw:frame>
      <draw:polygon text:anchor-type="page" text:anchor-page-number="7" draw:z-index="3518" draw:name="Shape2988" draw:style-name="gr2" draw:text-style-name="P3" svg:width="2.3618in" svg:height="0.1283in" svg:x="0.363in" svg:y="8.4913in" svg:viewBox="0 0 6000 327" draw:points="0,0 6000,0 6000,327 0,327">
        <text:p/>
      </draw:polygon>
      <draw:polygon text:anchor-type="page" text:anchor-page-number="1" draw:z-index="3517" draw:name="Shape272" draw:style-name="gr2" draw:text-style-name="P3" svg:width="2.7551in" svg:height="0.1283in" svg:x="0.363in" svg:y="6.8949in" svg:viewBox="0 0 6999 327" draw:points="0,0 6999,0 6999,327 0,327">
        <text:p/>
      </draw:polygon>
      <draw:frame text:anchor-type="page" text:anchor-page-number="14" draw:z-index="3516" draw:name="Shape4573" draw:style-name="gr1" draw:text-style-name="P2" svg:width="0.0433in" svg:height="0.1925in" svg:x="0.411in" svg:y="5.4929in">
        <draw:text-box>
          <text:p><text:span text:style-name="T2"><text:s/></text:span></text:p>
        </draw:text-box>
      </draw:frame>
      <draw:frame text:anchor-type="page" text:anchor-page-number="6" draw:z-index="3515" draw:name="Shape2032" draw:style-name="gr1" draw:text-style-name="P2" svg:width="0.1949in" svg:height="0.113in" svg:x="1.5917in" svg:y="2.7807in">
        <draw:text-box>
          <text:p><text:span text:style-name="T4">FRA</text:span></text:p>
        </draw:text-box>
      </draw:frame>
      <draw:polygon text:anchor-type="page" text:anchor-page-number="5" draw:z-index="3514" draw:name="Shape1402" draw:style-name="gr4" draw:text-style-name="P5" svg:width="1.1819in" svg:height="0.2232in" svg:x="6.6614in" svg:y="8.0882in" svg:viewBox="0 0 3003 568" draw:points="0,0 3003,0 3003,568 0,568">
        <text:p/>
      </draw:polygon>
      <draw:frame text:anchor-type="page" text:anchor-page-number="7" draw:z-index="3513" draw:name="Shape2977" draw:style-name="gr1" draw:text-style-name="P2" svg:width="0.0433in" svg:height="0.1925in" svg:x="3.5154in" svg:y="8.2547in">
        <draw:text-box>
          <text:p><text:span text:style-name="T2"><text:s/></text:span></text:p>
        </draw:text-box>
      </draw:frame>
      <draw:frame text:anchor-type="page" text:anchor-page-number="2" draw:z-index="3512" draw:name="Shape602" draw:style-name="gr1" draw:text-style-name="P2" svg:width="0.0433in" svg:height="0.1925in" svg:x="0.411in" svg:y="9.4047in">
        <draw:text-box>
          <text:p><text:span text:style-name="T2"><text:s/></text:span></text:p>
        </draw:text-box>
      </draw:frame>
      <draw:frame text:anchor-type="page" text:anchor-page-number="3" draw:z-index="3511" draw:name="Shape927" draw:style-name="gr1" draw:text-style-name="P2" svg:width="0.0433in" svg:height="0.1925in" svg:x="0.3634in" svg:y="5.748in">
        <draw:text-box>
          <text:p><text:span text:style-name="T2"><text:s/></text:span></text:p>
        </draw:text-box>
      </draw:frame>
      <draw:frame text:anchor-type="page" text:anchor-page-number="1" draw:z-index="3510" draw:name="Shape265" draw:style-name="gr1" draw:text-style-name="P2" svg:width="0.8807in" svg:height="0.1295in" svg:x="3.1665in" svg:y="6.7665in">
        <draw:text-box>
          <text:p><text:span text:style-name="T3">info@italmont.it </text:span></text:p>
        </draw:text-box>
      </draw:frame>
      <draw:polygon text:anchor-type="page" text:anchor-page-number="7" draw:z-index="3509" draw:name="Shape2994" draw:style-name="gr2" draw:text-style-name="P3" svg:width="2.265in" svg:height="0.1917in" svg:x="4.348in" svg:y="8.3in" svg:viewBox="0 0 5754 488" draw:points="0,0 5754,0 5754,488 0,488">
        <text:p/>
      </draw:polygon>
      <draw:frame text:anchor-type="page" text:anchor-page-number="6" draw:z-index="3508" draw:name="Shape2009" draw:style-name="gr1" draw:text-style-name="P2" svg:width="0.0433in" svg:height="0.1925in" svg:x="0.7016in" svg:y="2.7193in">
        <draw:text-box>
          <text:p><text:span text:style-name="T2"><text:s/></text:span></text:p>
        </draw:text-box>
      </draw:frame>
      <draw:frame text:anchor-type="page" text:anchor-page-number="3" draw:z-index="3507" draw:name="Shape923" draw:style-name="gr1" draw:text-style-name="P2" svg:width="0.0433in" svg:height="0.1925in" svg:x="3.1965in" svg:y="5.561in">
        <draw:text-box>
          <text:p><text:span text:style-name="T2"><text:s/></text:span></text:p>
        </draw:text-box>
      </draw:frame>
      <draw:frame text:anchor-type="page" text:anchor-page-number="5" draw:z-index="3506" draw:name="Shape1401" draw:style-name="gr1" draw:text-style-name="P2" svg:width="0.5594in" svg:height="0.113in" svg:x="5.9228in" svg:y="8.202in">
        <draw:text-box>
          <text:p><text:span text:style-name="T4">Osservazioni</text:span></text:p>
        </draw:text-box>
      </draw:frame>
      <draw:frame text:anchor-type="page" text:anchor-page-number="2" draw:z-index="3505" draw:name="Shape601" draw:style-name="gr1" draw:text-style-name="P2" svg:width="0.0433in" svg:height="0.1925in" svg:x="7.3016in" svg:y="9.261in">
        <draw:text-box>
          <text:p><text:span text:style-name="T2"><text:s/></text:span></text:p>
        </draw:text-box>
      </draw:frame>
      <draw:frame text:anchor-type="page" text:anchor-page-number="14" draw:z-index="3504" draw:name="Shape4572" draw:style-name="gr1" draw:text-style-name="P2" svg:width="0.0433in" svg:height="0.1925in" svg:x="6.1193in" svg:y="5.3646in">
        <draw:text-box>
          <text:p><text:span text:style-name="T2"><text:s/></text:span></text:p>
        </draw:text-box>
      </draw:frame>
      <draw:frame text:anchor-type="page" text:anchor-page-number="3" draw:z-index="3503" draw:name="Shape926" draw:style-name="gr1" draw:text-style-name="P2" svg:width="2.7567in" svg:height="0.1776in" svg:x="0.4535in" svg:y="5.5709in">
        <draw:text-box>
          <text:p><text:span text:style-name="T6">SEZIONE 4. Misure di primo soccorso</text:span></text:p>
        </draw:text-box>
      </draw:frame>
      <draw:frame text:anchor-type="page" text:anchor-page-number="1" draw:z-index="3502" draw:name="Shape261" draw:style-name="gr1" draw:text-style-name="P2" svg:width="0.0433in" svg:height="0.1925in" svg:x="2.5665in" svg:y="6.7217in">
        <draw:text-box>
          <text:p><text:span text:style-name="T2"><text:s/></text:span></text:p>
        </draw:text-box>
      </draw:frame>
      <draw:polygon text:anchor-type="page" text:anchor-page-number="2" draw:z-index="3501" draw:name="Shape604" draw:style-name="gr2" draw:text-style-name="P3" svg:width="1.8717in" svg:height="0.1283in" svg:x="0.4114in" svg:y="9.45in" svg:viewBox="0 0 4755 327" draw:points="0,0 4755,0 4755,327 0,327">
        <text:p/>
      </draw:polygon>
      <draw:polygon text:anchor-type="page" text:anchor-page-number="7" draw:z-index="3500" draw:name="Shape2993" draw:style-name="gr2" draw:text-style-name="P3" svg:width="2.363in" svg:height="0.1917in" svg:x="4.3in" svg:y="8.3in" svg:viewBox="0 0 6003 488" draw:points="0,0 6003,0 6003,488 0,488">
        <text:p/>
      </draw:polygon>
      <draw:polygon text:anchor-type="page" text:anchor-page-number="14" draw:z-index="3499" draw:name="Shape4576" draw:style-name="gr2" draw:text-style-name="P3" svg:width="1.2799in" svg:height="0.1118in" svg:x="0.4114in" svg:y="5.5531in" svg:viewBox="0 0 3252 285" draw:points="0,0 3252,0 3252,285 0,285">
        <text:p/>
      </draw:polygon>
      <draw:polygon text:anchor-type="page" text:anchor-page-number="6" draw:z-index="3498" draw:name="Shape2031" draw:style-name="gr2" draw:text-style-name="P3" svg:width="0.6917in" svg:height="0.1118in" svg:x="1.5913in" svg:y="2.778in" svg:viewBox="0 0 1758 285" draw:points="0,0 1758,0 1758,285 0,285">
        <text:p/>
      </draw:polygon>
      <draw:frame text:anchor-type="page" text:anchor-page-number="5" draw:z-index="3497" draw:name="Shape1375" draw:style-name="gr1" draw:text-style-name="P2" svg:width="0.2858in" svg:height="0.113in" svg:x="5.9228in" svg:y="8.0902in">
        <draw:text-box>
          <text:p><text:span text:style-name="T4">Note / </text:span></text:p>
        </draw:text-box>
      </draw:frame>
      <draw:frame text:anchor-type="page" text:anchor-page-number="10" draw:z-index="3496" draw:name="Shape3749" draw:style-name="gr1" draw:text-style-name="P2" svg:width="0.0433in" svg:height="0.1925in" svg:x="0.3634in" svg:y="9.9646in">
        <draw:text-box>
          <text:p><text:span text:style-name="T2"><text:s/></text:span></text:p>
        </draw:text-box>
      </draw:frame>
      <draw:polygon text:anchor-type="page" text:anchor-page-number="5" draw:z-index="3495" draw:name="Shape1400" draw:style-name="gr4" draw:text-style-name="P5" svg:width="0.6898in" svg:height="0.1118in" svg:x="5.9232in" svg:y="8.2in" svg:viewBox="0 0 1753 285" draw:points="0,0 1753,0 1753,285 0,285">
        <text:p/>
      </draw:polygon>
      <draw:frame text:anchor-type="page" text:anchor-page-number="7" draw:z-index="3494" draw:name="Shape2992" draw:style-name="gr1" draw:text-style-name="P2" svg:width="0.7476in" svg:height="0.1295in" svg:x="2.7728in" svg:y="8.302in">
        <draw:text-box>
          <text:p><text:span text:style-name="T1">non disponibile</text:span></text:p>
        </draw:text-box>
      </draw:frame>
      <draw:frame text:anchor-type="page" text:anchor-page-number="3" draw:z-index="3493" draw:name="Shape922" draw:style-name="gr1" draw:text-style-name="P2" svg:width="0.0433in" svg:height="0.1925in" svg:x="0.411in" svg:y="5.561in">
        <draw:text-box>
          <text:p><text:span text:style-name="T2"><text:s/></text:span></text:p>
        </draw:text-box>
      </draw:frame>
      <draw:polygon text:anchor-type="page" text:anchor-page-number="6" draw:z-index="3492" draw:name="Shape2030" draw:style-name="gr2" draw:text-style-name="P3" svg:width="0.7882in" svg:height="0.1917in" svg:x="1.5433in" svg:y="2.778in" svg:viewBox="0 0 2003 488" draw:points="0,0 2003,0 2003,488 0,488">
        <text:p/>
      </draw:polygon>
      <draw:polygon text:anchor-type="page" text:anchor-page-number="1" draw:z-index="3491" draw:name="Shape275" draw:style-name="gr2" draw:text-style-name="P3" svg:width="4.6283in" svg:height="0.1268in" svg:x="3.1665in" svg:y="6.7681in" svg:viewBox="0 0 11757 323" draw:points="0,0 11757,0 11757,323 0,323">
        <text:p/>
      </draw:polygon>
      <draw:polygon text:anchor-type="page" text:anchor-page-number="14" draw:z-index="3490" draw:name="Shape4575" draw:style-name="gr2" draw:text-style-name="P3" svg:width="1.3768in" svg:height="0.1917in" svg:x="0.363in" svg:y="5.5531in" svg:viewBox="0 0 3498 488" draw:points="0,0 3498,0 3498,488 0,488">
        <text:p/>
      </draw:polygon>
      <draw:polygon text:anchor-type="page" text:anchor-page-number="2" draw:z-index="3489" draw:name="Shape603" draw:style-name="gr2" draw:text-style-name="P3" svg:width="1.9685in" svg:height="0.1917in" svg:x="0.363in" svg:y="9.45in" svg:viewBox="0 0 5001 488" draw:points="0,0 5001,0 5001,488 0,488">
        <text:p/>
      </draw:polygon>
      <draw:frame text:anchor-type="page" text:anchor-page-number="10" draw:z-index="3488" draw:name="Shape3748" draw:style-name="gr1" draw:text-style-name="P2" svg:width="1.8413in" svg:height="0.1295in" svg:x="0.3634in" svg:y="9.8354in">
        <draw:text-box>
          <text:p><text:span text:style-name="T1"><text:s text:c="3"/>Degradabilità: dato non disponibile </text:span></text:p>
        </draw:text-box>
      </draw:frame>
      <draw:frame text:anchor-type="page" text:anchor-page-number="6" draw:z-index="3487" draw:name="Shape2029" draw:style-name="gr1" draw:text-style-name="P2" svg:width="0.248in" svg:height="0.113in" svg:x="0.4535in" svg:y="2.7807in">
        <draw:text-box>
          <text:p><text:span text:style-name="T4">VLEP</text:span></text:p>
        </draw:text-box>
      </draw:frame>
      <draw:frame text:anchor-type="page" text:anchor-page-number="7" draw:z-index="3486" draw:name="Shape2976" draw:style-name="gr1" draw:text-style-name="P2" svg:width="0.0433in" svg:height="0.1925in" svg:x="2.0398in" svg:y="8.2547in">
        <draw:text-box>
          <text:p><text:span text:style-name="T2"><text:s/></text:span></text:p>
        </draw:text-box>
      </draw:frame>
      <draw:polygon text:anchor-type="page" text:anchor-page-number="1" draw:z-index="3485" draw:name="Shape274" draw:style-name="gr2" draw:text-style-name="P3" svg:width="4.7252in" svg:height="0.1268in" svg:x="3.1181in" svg:y="6.7681in" svg:viewBox="0 0 12003 323" draw:points="0,0 12003,0 12003,323 0,323">
        <text:p/>
      </draw:polygon>
      <draw:frame text:anchor-type="page" text:anchor-page-number="3" draw:z-index="3484" draw:name="Shape921" draw:style-name="gr1" draw:text-style-name="P2" svg:width="0.0433in" svg:height="0.1925in" svg:x="0.3634in" svg:y="5.3811in">
        <draw:text-box>
          <text:p><text:span text:style-name="T2"><text:s/></text:span></text:p>
        </draw:text-box>
      </draw:frame>
      <draw:frame text:anchor-type="page" text:anchor-page-number="14" draw:z-index="3483" draw:name="Shape4559" draw:style-name="gr1" draw:text-style-name="P2" svg:width="0.0433in" svg:height="0.1925in" svg:x="3.2035in" svg:y="5.3161in">
        <draw:text-box>
          <text:p><text:span text:style-name="T2"><text:s/></text:span></text:p>
        </draw:text-box>
      </draw:frame>
      <draw:frame text:anchor-type="page" text:anchor-page-number="5" draw:z-index="3482" draw:name="Shape1386" draw:style-name="gr1" draw:text-style-name="P2" svg:width="0.0433in" svg:height="0.1925in" svg:x="5.3335in" svg:y="8.0917in">
        <draw:text-box>
          <text:p><text:span text:style-name="T2"><text:s/></text:span></text:p>
        </draw:text-box>
      </draw:frame>
      <draw:frame text:anchor-type="page" text:anchor-page-number="2" draw:z-index="3481" draw:name="Shape600" draw:style-name="gr1" draw:text-style-name="P2" svg:width="0.0433in" svg:height="0.1925in" svg:x="3.3634in" svg:y="9.261in">
        <draw:text-box>
          <text:p><text:span text:style-name="T2"><text:s/></text:span></text:p>
        </draw:text-box>
      </draw:frame>
      <draw:frame text:anchor-type="page" text:anchor-page-number="10" draw:z-index="3480" draw:name="Shape3733" draw:style-name="gr1" draw:text-style-name="P2" svg:width="0.0433in" svg:height="0.1925in" svg:x="4.2063in" svg:y="9.5965in">
        <draw:text-box>
          <text:p><text:span text:style-name="T2"><text:s/></text:span></text:p>
        </draw:text-box>
      </draw:frame>
      <draw:frame text:anchor-type="page" text:anchor-page-number="1" draw:z-index="3479" draw:name="Shape268" draw:style-name="gr1" draw:text-style-name="P2" svg:width="2.1276in" svg:height="0.1295in" svg:x="0.4535in" svg:y="6.7689in">
        <draw:text-box>
          <text:p><text:span text:style-name="T1">responsabile della scheda dati di sicurezza</text:span></text:p>
        </draw:text-box>
      </draw:frame>
      <draw:polygon text:anchor-type="page" text:anchor-page-number="2" draw:z-index="3478" draw:name="Shape606" draw:style-name="gr2" draw:text-style-name="P3" svg:width="0.2965in" svg:height="0.1913in" svg:x="7.3016in" svg:y="9.2583in" svg:viewBox="0 0 754 487" draw:points="0,0 754,0 754,487 0,487">
        <text:p/>
      </draw:polygon>
      <draw:frame text:anchor-type="page" text:anchor-page-number="6" draw:z-index="3477" draw:name="Shape2008" draw:style-name="gr1" draw:text-style-name="P2" svg:width="0.0433in" svg:height="0.1925in" svg:x="0.411in" svg:y="2.7193in">
        <draw:text-box>
          <text:p><text:span text:style-name="T2"><text:s/></text:span></text:p>
        </draw:text-box>
      </draw:frame>
      <draw:frame text:anchor-type="page" text:anchor-page-number="10" draw:z-index="3476" draw:name="Shape3746" draw:style-name="gr1" draw:text-style-name="P2" svg:width="0.6512in" svg:height="0.1295in" svg:x="3.561in" svg:y="9.6437in">
        <draw:text-box>
          <text:p><text:span text:style-name="T1">&lt; 0.001 mg/l </text:span></text:p>
        </draw:text-box>
      </draw:frame>
      <draw:polygon text:anchor-type="page" text:anchor-page-number="7" draw:z-index="3475" draw:name="Shape2991" draw:style-name="gr2" draw:text-style-name="P3" svg:width="1.4783in" svg:height="0.1283in" svg:x="2.7732in" svg:y="8.3in" svg:viewBox="0 0 3756 327" draw:points="0,0 3756,0 3756,327 0,327">
        <text:p/>
      </draw:polygon>
      <draw:polygon text:anchor-type="page" text:anchor-page-number="3" draw:z-index="3474" draw:name="Shape925" draw:style-name="gr5" draw:text-style-name="P6" svg:width="7.3835in" svg:height="0.1752in" svg:x="0.4114in" svg:y="5.5697in" svg:viewBox="0 0 18755 446" draw:points="0,0 18755,0 18755,446 0,446">
        <text:p/>
      </draw:polygon>
      <draw:polygon text:anchor-type="page" text:anchor-page-number="5" draw:z-index="3473" draw:name="Shape1390" draw:style-name="gr4" draw:text-style-name="P5" svg:width="0.6898in" svg:height="0.1114in" svg:x="5.9232in" svg:y="8.0882in" svg:viewBox="0 0 1753 284" draw:points="0,0 1753,0 1753,284 0,284">
        <text:p/>
      </draw:polygon>
      <draw:polygon text:anchor-type="page" text:anchor-page-number="14" draw:z-index="3472" draw:name="Shape4578" draw:style-name="gr2" draw:text-style-name="P3" svg:width="0.4933in" svg:height="0.1917in" svg:x="6.1197in" svg:y="5.3614in" svg:viewBox="0 0 1254 488" draw:points="0,0 1254,0 1254,488 0,488">
        <text:p/>
      </draw:polygon>
      <draw:frame text:anchor-type="page" text:anchor-page-number="10" draw:z-index="3471" draw:name="Shape3747" draw:style-name="gr1" draw:text-style-name="P2" svg:width="0.0433in" svg:height="0.1925in" svg:x="2.7728in" svg:y="9.6445in">
        <draw:text-box>
          <text:p><text:span text:style-name="T2"><text:s/></text:span></text:p>
        </draw:text-box>
      </draw:frame>
      <draw:polygon text:anchor-type="page" text:anchor-page-number="2" draw:z-index="3470" draw:name="Shape605" draw:style-name="gr2" draw:text-style-name="P3" svg:width="0.3933in" svg:height="0.1913in" svg:x="7.2531in" svg:y="9.2583in" svg:viewBox="0 0 1000 487" draw:points="0,0 1000,0 1000,487 0,487">
        <text:p/>
      </draw:polygon>
      <draw:frame text:anchor-type="page" text:anchor-page-number="6" draw:z-index="3469" draw:name="Shape2007" draw:style-name="gr1" draw:text-style-name="P2" svg:width="0.0433in" svg:height="0.1925in" svg:x="6.7098in" svg:y="2.5799in">
        <draw:text-box>
          <text:p><text:span text:style-name="T2"><text:s/></text:span></text:p>
        </draw:text-box>
      </draw:frame>
      <draw:polygon text:anchor-type="page" text:anchor-page-number="5" draw:z-index="3468" draw:name="Shape1389" draw:style-name="gr4" draw:text-style-name="P5" svg:width="0.7866in" svg:height="0.2232in" svg:x="5.8748in" svg:y="8.0882in" svg:viewBox="0 0 1999 568" draw:points="0,0 1999,0 1999,568 0,568">
        <text:p/>
      </draw:polygon>
      <draw:polygon text:anchor-type="page" text:anchor-page-number="7" draw:z-index="3467" draw:name="Shape2990" draw:style-name="gr2" draw:text-style-name="P3" svg:width="1.5752in" svg:height="0.1917in" svg:x="2.7248in" svg:y="8.3in" svg:viewBox="0 0 4002 488" draw:points="0,0 4002,0 4002,488 0,488">
        <text:p/>
      </draw:polygon>
      <draw:polygon text:anchor-type="page" text:anchor-page-number="14" draw:z-index="3466" draw:name="Shape4577" draw:style-name="gr2" draw:text-style-name="P3" svg:width="0.5898in" svg:height="0.1917in" svg:x="6.0717in" svg:y="5.3614in" svg:viewBox="0 0 1499 488" draw:points="0,0 1499,0 1499,488 0,488">
        <text:p/>
      </draw:polygon>
      <draw:polygon text:anchor-type="page" text:anchor-page-number="3" draw:z-index="3465" draw:name="Shape924" draw:style-name="gr5" draw:text-style-name="P6" svg:width="7.4803in" svg:height="0.1752in" svg:x="0.363in" svg:y="5.5697in" svg:viewBox="0 0 19001 446" draw:points="0,0 19001,0 19001,446 0,446">
        <text:p/>
      </draw:polygon>
      <draw:frame text:anchor-type="page" text:anchor-page-number="1" draw:z-index="3464" draw:name="Shape260" draw:style-name="gr1" draw:text-style-name="P2" svg:width="0.0433in" svg:height="0.1925in" svg:x="0.411in" svg:y="6.7217in">
        <draw:text-box>
          <text:p><text:span text:style-name="T2"><text:s/></text:span></text:p>
        </draw:text-box>
      </draw:frame>
      <draw:frame text:anchor-type="page" text:anchor-page-number="14" draw:z-index="3463" draw:name="Shape4571" draw:style-name="gr1" draw:text-style-name="P2" svg:width="1.4248in" svg:height="0.1295in" svg:x="1.7882in" svg:y="5.3638in">
        <draw:text-box>
          <text:p><text:span text:style-name="T1">Provoca gravi lesioni oculari.</text:span></text:p>
        </draw:text-box>
      </draw:frame>
      <draw:frame text:anchor-type="page" text:anchor-page-number="5" draw:z-index="3462" draw:name="Shape1347" draw:style-name="gr1" draw:text-style-name="P2" svg:width="0.0433in" svg:height="0.1925in" svg:x="4.6866in" svg:y="8.0299in">
        <draw:text-box>
          <text:p><text:span text:style-name="T2"><text:s/></text:span></text:p>
        </draw:text-box>
      </draw:frame>
      <draw:polygon text:anchor-type="page" text:anchor-page-number="6" draw:z-index="3461" draw:name="Shape2014" draw:style-name="gr2" draw:text-style-name="P3" svg:width="1.0835in" svg:height="0.1118in" svg:x="0.4114in" svg:y="2.778in" svg:viewBox="0 0 2753 285" draw:points="0,0 2753,0 2753,285 0,285">
        <text:p/>
      </draw:polygon>
      <draw:frame text:anchor-type="page" text:anchor-page-number="1" draw:z-index="3460" draw:name="Shape264" draw:style-name="gr1" draw:text-style-name="P2" svg:width="0.0433in" svg:height="0.1925in" svg:x="3.1665in" svg:y="6.5799in">
        <draw:text-box>
          <text:p><text:span text:style-name="T2"><text:s/></text:span></text:p>
        </draw:text-box>
      </draw:frame>
      <draw:frame text:anchor-type="page" text:anchor-page-number="2" draw:z-index="3459" draw:name="Shape580" draw:style-name="gr1" draw:text-style-name="P2" svg:width="0.0433in" svg:height="0.1925in" svg:x="2.6583in" svg:y="9.2134in">
        <draw:text-box>
          <text:p><text:span text:style-name="T2"><text:s/></text:span></text:p>
        </draw:text-box>
      </draw:frame>
      <draw:polygon text:anchor-type="page" text:anchor-page-number="10" draw:z-index="3458" draw:name="Shape3745" draw:style-name="gr2" draw:text-style-name="P3" svg:width="3.8402in" svg:height="0.1283in" svg:x="3.5614in" svg:y="9.6413in" svg:viewBox="0 0 9755 327" draw:points="0,0 9755,0 9755,327 0,327">
        <text:p/>
      </draw:polygon>
      <draw:frame text:anchor-type="page" text:anchor-page-number="3" draw:z-index="3457" draw:name="Shape920" draw:style-name="gr1" draw:text-style-name="P2" svg:width="4.3953in" svg:height="0.1295in" svg:x="0.3634in" svg:y="5.252in">
        <draw:text-box>
          <text:p><text:span text:style-name="T1">Il testo completo delle indicazioni di pericolo (H) è riportato alla sezione 16 della scheda. </text:span></text:p>
        </draw:text-box>
      </draw:frame>
      <draw:frame text:anchor-type="page" text:anchor-page-number="7" draw:z-index="3456" draw:name="Shape2982" draw:style-name="gr1" draw:text-style-name="P2" svg:width="1.5862in" svg:height="0.1295in" svg:x="0.4535in" svg:y="8.302in">
        <draw:text-box>
          <text:p><text:span text:style-name="T1">Temperatura di decomposizione</text:span></text:p>
        </draw:text-box>
      </draw:frame>
      <draw:polygon text:anchor-type="page" text:anchor-page-number="10" draw:z-index="3455" draw:name="Shape3744" draw:style-name="gr2" draw:text-style-name="P3" svg:width="3.937in" svg:height="0.1917in" svg:x="3.513in" svg:y="9.6413in" svg:viewBox="0 0 10001 488" draw:points="0,0 10001,0 10001,488 0,488">
        <text:p/>
      </draw:polygon>
      <draw:frame text:anchor-type="page" text:anchor-page-number="7" draw:z-index="3454" draw:name="Shape2975" draw:style-name="gr1" draw:text-style-name="P2" svg:width="0.0433in" svg:height="0.1925in" svg:x="0.411in" svg:y="8.2547in">
        <draw:text-box>
          <text:p><text:span text:style-name="T2"><text:s/></text:span></text:p>
        </draw:text-box>
      </draw:frame>
      <draw:frame text:anchor-type="page" text:anchor-page-number="3" draw:z-index="3453" draw:name="Shape919" draw:style-name="gr1" draw:text-style-name="P2" svg:width="0.0433in" svg:height="0.1925in" svg:x="0.3634in" svg:y="5.061in">
        <draw:text-box>
          <text:p><text:span text:style-name="T2"><text:s/></text:span></text:p>
        </draw:text-box>
      </draw:frame>
      <draw:polygon text:anchor-type="page" text:anchor-page-number="1" draw:z-index="3452" draw:name="Shape267" draw:style-name="gr2" draw:text-style-name="P3" svg:width="2.6583in" svg:height="0.1268in" svg:x="0.4114in" svg:y="6.7681in" svg:viewBox="0 0 6753 323" draw:points="0,0 6753,0 6753,323 0,323">
        <text:p/>
      </draw:polygon>
      <draw:polygon text:anchor-type="page" text:anchor-page-number="6" draw:z-index="3451" draw:name="Shape2013" draw:style-name="gr2" draw:text-style-name="P3" svg:width="1.1803in" svg:height="0.1917in" svg:x="0.363in" svg:y="2.778in" svg:viewBox="0 0 2999 488" draw:points="0,0 2999,0 2999,488 0,488">
        <text:p/>
      </draw:polygon>
      <draw:polygon text:anchor-type="page" text:anchor-page-number="5" draw:z-index="3450" draw:name="Shape1385" draw:style-name="gr4" draw:text-style-name="P5" svg:width="0.4917in" svg:height="0.1917in" svg:x="5.3331in" svg:y="8.0882in" svg:viewBox="0 0 1250 488" draw:points="0,0 1250,0 1250,488 0,488">
        <text:p/>
      </draw:polygon>
      <draw:frame text:anchor-type="page" text:anchor-page-number="14" draw:z-index="3449" draw:name="Shape4558" draw:style-name="gr1" draw:text-style-name="P2" svg:width="0.0433in" svg:height="0.1925in" svg:x="0.6846in" svg:y="5.3016in">
        <draw:text-box>
          <text:p><text:span text:style-name="T2"><text:s/></text:span></text:p>
        </draw:text-box>
      </draw:frame>
      <draw:polygon text:anchor-type="page" text:anchor-page-number="2" draw:z-index="3448" draw:name="Shape599" draw:style-name="gr2" draw:text-style-name="P3" svg:width="3.8417in" svg:height="0.1913in" svg:x="3.363in" svg:y="9.2583in" svg:viewBox="0 0 9759 487" draw:points="0,0 9759,0 9759,487 0,487">
        <text:p/>
      </draw:polygon>
      <draw:polygon text:anchor-type="page" text:anchor-page-number="1" draw:z-index="3447" draw:name="Shape266" draw:style-name="gr2" draw:text-style-name="P3" svg:width="2.7551in" svg:height="0.1268in" svg:x="0.363in" svg:y="6.7681in" svg:viewBox="0 0 6999 323" draw:points="0,0 6999,0 6999,323 0,323">
        <text:p/>
      </draw:polygon>
      <draw:polygon text:anchor-type="page" text:anchor-page-number="6" draw:z-index="3446" draw:name="Shape1977" draw:style-name="gr3" draw:text-style-name="P4" svg:width="1.1717in" svg:height="0.0098in" svg:x="6.6732in" svg:y="2.5665in" svg:viewBox="0 0 2977 26" draw:points="0,0 2977,0 2977,26 0,26">
        <text:p/>
      </draw:polygon>
      <draw:polygon text:anchor-type="page" text:anchor-page-number="14" draw:z-index="3445" draw:name="Shape4570" draw:style-name="gr2" draw:text-style-name="P3" svg:width="4.235in" svg:height="0.1283in" svg:x="1.7882in" svg:y="5.3614in" svg:viewBox="0 0 10758 327" draw:points="0,0 10758,0 10758,327 0,327">
        <text:p/>
      </draw:polygon>
      <draw:polygon text:anchor-type="page" text:anchor-page-number="5" draw:z-index="3444" draw:name="Shape1384" draw:style-name="gr4" draw:text-style-name="P5" svg:width="0.5917in" svg:height="0.2232in" svg:x="5.2831in" svg:y="8.0882in" svg:viewBox="0 0 1504 568" draw:points="0,0 1504,0 1504,568 0,568">
        <text:p/>
      </draw:polygon>
      <draw:frame text:anchor-type="page" text:anchor-page-number="7" draw:z-index="3443" draw:name="Shape2974" draw:style-name="gr1" draw:text-style-name="P2" svg:width="0.0433in" svg:height="0.1925in" svg:x="4.348in" svg:y="8.111in">
        <draw:text-box>
          <text:p><text:span text:style-name="T2"><text:s/></text:span></text:p>
        </draw:text-box>
      </draw:frame>
      <draw:polygon text:anchor-type="page" text:anchor-page-number="2" draw:z-index="3442" draw:name="Shape598" draw:style-name="gr2" draw:text-style-name="P3" svg:width="3.9382in" svg:height="0.1913in" svg:x="3.315in" svg:y="9.2583in" svg:viewBox="0 0 10004 487" draw:points="0,0 10004,0 10004,487 0,487">
        <text:p/>
      </draw:polygon>
      <draw:frame text:anchor-type="page" text:anchor-page-number="3" draw:z-index="3441" draw:name="Shape913" draw:style-name="gr1" draw:text-style-name="P2" svg:width="0.0433in" svg:height="0.1925in" svg:x="7.3016in" svg:y="4.8063in">
        <draw:text-box>
          <text:p><text:span text:style-name="T2"><text:s/></text:span></text:p>
        </draw:text-box>
      </draw:frame>
      <draw:frame text:anchor-type="page" text:anchor-page-number="10" draw:z-index="3440" draw:name="Shape3732" draw:style-name="gr1" draw:text-style-name="P2" svg:width="0.0433in" svg:height="0.1925in" svg:x="1.3547in" svg:y="9.5965in">
        <draw:text-box>
          <text:p><text:span text:style-name="T2"><text:s/></text:span></text:p>
        </draw:text-box>
      </draw:frame>
      <draw:frame text:anchor-type="page" text:anchor-page-number="2" draw:z-index="3439" draw:name="Shape594" draw:style-name="gr1" draw:text-style-name="P2" svg:width="0.2815in" svg:height="0.1295in" svg:x="2.3799in" svg:y="9.2602in">
        <draw:text-box>
          <text:p><text:span text:style-name="T1">54.62</text:span></text:p>
        </draw:text-box>
      </draw:frame>
      <draw:polygon text:anchor-type="page" text:anchor-page-number="10" draw:z-index="3438" draw:name="Shape3743" draw:style-name="gr2" draw:text-style-name="P3" svg:width="0.6898in" svg:height="0.1917in" svg:x="2.7732in" svg:y="9.6413in" svg:viewBox="0 0 1753 488" draw:points="0,0 1753,0 1753,488 0,488">
        <text:p/>
      </draw:polygon>
      <draw:frame text:anchor-type="page" text:anchor-page-number="3" draw:z-index="3437" draw:name="Shape914" draw:style-name="gr1" draw:text-style-name="P2" svg:width="0.0433in" svg:height="0.1925in" svg:x="4.7898in" svg:y="4.8846in">
        <draw:text-box>
          <text:p><text:span text:style-name="T2"><text:s/></text:span></text:p>
        </draw:text-box>
      </draw:frame>
      <draw:polygon text:anchor-type="page" text:anchor-page-number="6" draw:z-index="3436" draw:name="Shape1976" draw:style-name="gr3" draw:text-style-name="P4" svg:width="0.0102in" svg:height="0.0098in" svg:x="6.663in" svg:y="2.5665in" svg:viewBox="0 0 27 26" draw:points="0,0 27,0 27,26 0,26">
        <text:p/>
      </draw:polygon>
      <draw:frame text:anchor-type="page" text:anchor-page-number="1" draw:z-index="3435" draw:name="Shape253" draw:style-name="gr1" draw:text-style-name="P2" svg:width="0.0433in" svg:height="0.1925in" svg:x="2.0965in" svg:y="6.5299in">
        <draw:text-box>
          <text:p><text:span text:style-name="T2"><text:s/></text:span></text:p>
        </draw:text-box>
      </draw:frame>
      <draw:frame text:anchor-type="page" text:anchor-page-number="5" draw:z-index="3434" draw:name="Shape1374" draw:style-name="gr1" draw:text-style-name="P2" svg:width="0.5331in" svg:height="0.113in" svg:x="4.1516in" svg:y="8.0902in">
        <draw:text-box>
          <text:p><text:span text:style-name="T4">STEL/15min</text:span></text:p>
        </draw:text-box>
      </draw:frame>
      <draw:polygon text:anchor-type="page" text:anchor-page-number="14" draw:z-index="3433" draw:name="Shape4569" draw:style-name="gr2" draw:text-style-name="P3" svg:width="4.3319in" svg:height="0.1917in" svg:x="1.7398in" svg:y="5.3614in" svg:viewBox="0 0 11004 488" draw:points="0,0 11004,0 11004,488 0,488">
        <text:p/>
      </draw:polygon>
      <draw:polygon text:anchor-type="page" text:anchor-page-number="7" draw:z-index="3432" draw:name="Shape2979" draw:style-name="gr2" draw:text-style-name="P3" svg:width="2.265in" svg:height="0.1283in" svg:x="0.4114in" svg:y="8.3in" svg:viewBox="0 0 5754 327" draw:points="0,0 5754,0 5754,327 0,327">
        <text:p/>
      </draw:polygon>
      <draw:frame text:anchor-type="page" text:anchor-page-number="14" draw:z-index="3431" draw:name="Shape4567" draw:style-name="gr1" draw:text-style-name="P2" svg:width="0.2323in" svg:height="0.113in" svg:x="0.4535in" svg:y="5.3626in">
        <draw:text-box>
          <text:p><text:span text:style-name="T5">H318</text:span></text:p>
        </draw:text-box>
      </draw:frame>
      <draw:frame text:anchor-type="page" text:anchor-page-number="2" draw:z-index="3430" draw:name="Shape576" draw:style-name="gr1" draw:text-style-name="P2" svg:width="0.0433in" svg:height="0.1925in" svg:x="0.9228in" svg:y="9.2134in">
        <draw:text-box>
          <text:p><text:span text:style-name="T2"><text:s/></text:span></text:p>
        </draw:text-box>
      </draw:frame>
      <draw:polygon text:anchor-type="page" text:anchor-page-number="6" draw:z-index="3429" draw:name="Shape1970" draw:style-name="gr3" draw:text-style-name="P4" svg:width="0.7783in" svg:height="0.0098in" svg:x="5.8846in" svg:y="2.5665in" svg:viewBox="0 0 1978 26" draw:points="0,0 1978,0 1978,26 0,26">
        <text:p/>
      </draw:polygon>
      <draw:frame text:anchor-type="page" text:anchor-page-number="5" draw:z-index="3428" draw:name="Shape1376" draw:style-name="gr1" draw:text-style-name="P2" svg:width="0.0433in" svg:height="0.1925in" svg:x="3.561in" svg:y="8.0917in">
        <draw:text-box>
          <text:p><text:span text:style-name="T2"><text:s/></text:span></text:p>
        </draw:text-box>
      </draw:frame>
      <draw:polygon text:anchor-type="page" text:anchor-page-number="10" draw:z-index="3427" draw:name="Shape3742" draw:style-name="gr2" draw:text-style-name="P3" svg:width="0.7882in" svg:height="0.1917in" svg:x="2.7248in" svg:y="9.6413in" svg:viewBox="0 0 2003 488" draw:points="0,0 2003,0 2003,488 0,488">
        <text:p/>
      </draw:polygon>
      <draw:polygon text:anchor-type="page" text:anchor-page-number="7" draw:z-index="3426" draw:name="Shape2978" draw:style-name="gr2" draw:text-style-name="P3" svg:width="2.3618in" svg:height="0.1917in" svg:x="0.363in" svg:y="8.3in" svg:viewBox="0 0 6000 488" draw:points="0,0 6000,0 6000,488 0,488">
        <text:p/>
      </draw:polygon>
      <draw:polygon text:anchor-type="page" text:anchor-page-number="3" draw:z-index="3425" draw:name="Shape918" draw:style-name="gr2" draw:text-style-name="P3" svg:width="0.2965in" svg:height="0.1917in" svg:x="7.3016in" svg:y="4.8031in" svg:viewBox="0 0 754 488" draw:points="0,0 754,0 754,488 0,488">
        <text:p/>
      </draw:polygon>
      <draw:polygon text:anchor-type="page" text:anchor-page-number="1" draw:z-index="3424" draw:name="Shape263" draw:style-name="gr2" draw:text-style-name="P3" svg:width="4.6283in" svg:height="0.1917in" svg:x="3.1665in" svg:y="6.5764in" svg:viewBox="0 0 11757 488" draw:points="0,0 11757,0 11757,488 0,488">
        <text:p/>
      </draw:polygon>
      <draw:polygon text:anchor-type="page" text:anchor-page-number="3" draw:z-index="3423" draw:name="Shape917" draw:style-name="gr2" draw:text-style-name="P3" svg:width="0.3933in" svg:height="0.2551in" svg:x="7.2531in" svg:y="4.8031in" svg:viewBox="0 0 1000 649" draw:points="0,0 1000,0 1000,649 0,649">
        <text:p/>
      </draw:polygon>
      <draw:frame text:anchor-type="page" text:anchor-page-number="14" draw:z-index="3422" draw:name="Shape4557" draw:style-name="gr1" draw:text-style-name="P2" svg:width="0.0433in" svg:height="0.1925in" svg:x="0.411in" svg:y="5.3016in">
        <draw:text-box>
          <text:p><text:span text:style-name="T2"><text:s/></text:span></text:p>
        </draw:text-box>
      </draw:frame>
      <draw:polygon text:anchor-type="page" text:anchor-page-number="1" draw:z-index="3421" draw:name="Shape262" draw:style-name="gr2" draw:text-style-name="P3" svg:width="4.7252in" svg:height="0.1917in" svg:x="3.1181in" svg:y="6.5764in" svg:viewBox="0 0 12003 488" draw:points="0,0 12003,0 12003,488 0,488">
        <text:p/>
      </draw:polygon>
      <draw:frame text:anchor-type="page" text:anchor-page-number="7" draw:z-index="3420" draw:name="Shape2962" draw:style-name="gr1" draw:text-style-name="P2" svg:width="0.0433in" svg:height="0.1925in" svg:x="3.5154in" svg:y="8.0634in">
        <draw:text-box>
          <text:p><text:span text:style-name="T2"><text:s/></text:span></text:p>
        </draw:text-box>
      </draw:frame>
      <draw:frame text:anchor-type="page" text:anchor-page-number="10" draw:z-index="3419" draw:name="Shape3741" draw:style-name="gr1" draw:text-style-name="P2" svg:width="0.9094in" svg:height="0.1295in" svg:x="0.4535in" svg:y="9.6437in">
        <draw:text-box>
          <text:p><text:span text:style-name="T1">Solubilità in acqua</text:span></text:p>
        </draw:text-box>
      </draw:frame>
      <draw:polygon text:anchor-type="page" text:anchor-page-number="5" draw:z-index="3418" draw:name="Shape1381" draw:style-name="gr4" draw:text-style-name="P5" svg:width="1.0831in" svg:height="0.1114in" svg:x="4.1516in" svg:y="8.0882in" svg:viewBox="0 0 2752 284" draw:points="0,0 2752,0 2752,284 0,284">
        <text:p/>
      </draw:polygon>
      <draw:polygon text:anchor-type="page" text:anchor-page-number="2" draw:z-index="3417" draw:name="Shape593" draw:style-name="gr2" draw:text-style-name="P3" svg:width="0.8866in" svg:height="0.1283in" svg:x="2.3799in" svg:y="9.2583in" svg:viewBox="0 0 2253 327" draw:points="0,0 2253,0 2253,327 0,327">
        <text:p/>
      </draw:polygon>
      <draw:polygon text:anchor-type="page" text:anchor-page-number="6" draw:z-index="3416" draw:name="Shape1969" draw:style-name="gr3" draw:text-style-name="P4" svg:width="0.0098in" svg:height="0.0098in" svg:x="5.8748in" svg:y="2.5665in" svg:viewBox="0 0 26 26" draw:points="0,0 26,0 26,26 0,26">
        <text:p/>
      </draw:polygon>
      <draw:frame text:anchor-type="page" text:anchor-page-number="14" draw:z-index="3415" draw:name="Shape4556" draw:style-name="gr1" draw:text-style-name="P2" svg:width="0.0433in" svg:height="0.1925in" svg:x="6.1193in" svg:y="5.1728in">
        <draw:text-box>
          <text:p><text:span text:style-name="T2"><text:s/></text:span></text:p>
        </draw:text-box>
      </draw:frame>
      <draw:frame text:anchor-type="page" text:anchor-page-number="3" draw:z-index="3414" draw:name="Shape916" draw:style-name="gr1" draw:text-style-name="P2" svg:width="1.4378in" svg:height="0.1295in" svg:x="3.3634in" svg:y="4.9319in">
        <draw:text-box>
          <text:p><text:span text:style-name="T1">nebbie/polveri: 0.171 mg/l/4h</text:span></text:p>
        </draw:text-box>
      </draw:frame>
      <draw:polygon text:anchor-type="page" text:anchor-page-number="2" draw:z-index="3413" draw:name="Shape592" draw:style-name="gr2" draw:text-style-name="P3" svg:width="0.9835in" svg:height="0.1913in" svg:x="2.3315in" svg:y="9.2583in" svg:viewBox="0 0 2499 487" draw:points="0,0 2499,0 2499,487 0,487">
        <text:p/>
      </draw:polygon>
      <draw:polygon text:anchor-type="page" text:anchor-page-number="7" draw:z-index="3412" draw:name="Shape2981" draw:style-name="gr2" draw:text-style-name="P3" svg:width="2.265in" svg:height="0.1913in" svg:x="4.348in" svg:y="8.1083in" svg:viewBox="0 0 5754 487" draw:points="0,0 5754,0 5754,487 0,487">
        <text:p/>
      </draw:polygon>
      <draw:frame text:anchor-type="page" text:anchor-page-number="1" draw:z-index="3411" draw:name="Shape258" draw:style-name="gr1" draw:text-style-name="P2" svg:width="1.6551in" svg:height="0.1295in" svg:x="0.4535in" svg:y="6.5772in">
        <draw:text-box>
          <text:p><text:span text:style-name="T1">e-mail della persona competente,</text:span></text:p>
        </draw:text-box>
      </draw:frame>
      <draw:frame text:anchor-type="page" text:anchor-page-number="10" draw:z-index="3410" draw:name="Shape3731" draw:style-name="gr1" draw:text-style-name="P2" svg:width="0.0433in" svg:height="0.1925in" svg:x="0.411in" svg:y="9.5965in">
        <draw:text-box>
          <text:p><text:span text:style-name="T2"><text:s/></text:span></text:p>
        </draw:text-box>
      </draw:frame>
      <draw:polygon text:anchor-type="page" text:anchor-page-number="6" draw:z-index="3409" draw:name="Shape1963" draw:style-name="gr3" draw:text-style-name="P4" svg:width="0.5799in" svg:height="0.0098in" svg:x="5.2949in" svg:y="2.5665in" svg:viewBox="0 0 1474 26" draw:points="0,0 1474,0 1474,26 0,26">
        <text:p/>
      </draw:polygon>
      <draw:polygon text:anchor-type="page" text:anchor-page-number="5" draw:z-index="3408" draw:name="Shape1380" draw:style-name="gr4" draw:text-style-name="P5" svg:width="1.1799in" svg:height="0.2232in" svg:x="4.1031in" svg:y="8.0882in" svg:viewBox="0 0 2998 568" draw:points="0,0 2998,0 2998,568 0,568">
        <text:p/>
      </draw:polygon>
      <draw:polygon text:anchor-type="page" text:anchor-page-number="6" draw:z-index="3407" draw:name="Shape1962" draw:style-name="gr3" draw:text-style-name="P4" svg:width="0.0102in" svg:height="0.0098in" svg:x="5.2846in" svg:y="2.5665in" svg:viewBox="0 0 27 26" draw:points="0,0 27,0 27,26 0,26">
        <text:p/>
      </draw:polygon>
      <draw:polygon text:anchor-type="page" text:anchor-page-number="7" draw:z-index="3406" draw:name="Shape2980" draw:style-name="gr2" draw:text-style-name="P3" svg:width="2.363in" svg:height="0.1913in" svg:x="4.3in" svg:y="8.1083in" svg:viewBox="0 0 6003 487" draw:points="0,0 6003,0 6003,487 0,487">
        <text:p/>
      </draw:polygon>
      <draw:frame text:anchor-type="page" text:anchor-page-number="10" draw:z-index="3405" draw:name="Shape3726" draw:style-name="gr1" draw:text-style-name="P2" svg:width="0.0433in" svg:height="0.1925in" svg:x="3.561in" svg:y="9.261in">
        <draw:text-box>
          <text:p><text:span text:style-name="T2"><text:s/></text:span></text:p>
        </draw:text-box>
      </draw:frame>
      <draw:frame text:anchor-type="page" text:anchor-page-number="1" draw:z-index="3404" draw:name="Shape252" draw:style-name="gr1" draw:text-style-name="P2" svg:width="0.0433in" svg:height="0.1925in" svg:x="0.411in" svg:y="6.5299in">
        <draw:text-box>
          <text:p><text:span text:style-name="T2"><text:s/></text:span></text:p>
        </draw:text-box>
      </draw:frame>
      <draw:frame text:anchor-type="page" text:anchor-page-number="3" draw:z-index="3403" draw:name="Shape909" draw:style-name="gr1" draw:text-style-name="P2" svg:width="3.4551in" svg:height="0.1295in" svg:x="3.3634in" svg:y="4.8055in">
        <draw:text-box>
          <text:p><text:span text:style-name="T1">STA Orale: 100 mg/kg, LD50 Cutanea: 87.12 mg/kg, LC50 Inalazione </text:span></text:p>
        </draw:text-box>
      </draw:frame>
      <draw:frame text:anchor-type="page" text:anchor-page-number="2" draw:z-index="3402" draw:name="Shape590" draw:style-name="gr1" draw:text-style-name="P2" svg:width="0.474in" svg:height="0.1295in" svg:x="0.4535in" svg:y="9.2602in">
        <draw:text-box>
          <text:p><text:span text:style-name="T1">INDEX <text:s text:c="2"/>-</text:span></text:p>
        </draw:text-box>
      </draw:frame>
      <draw:polygon text:anchor-type="page" text:anchor-page-number="14" draw:z-index="3401" draw:name="Shape4561" draw:style-name="gr2" draw:text-style-name="P3" svg:width="1.2799in" svg:height="0.1118in" svg:x="0.4114in" svg:y="5.3614in" svg:viewBox="0 0 3252 285" draw:points="0,0 3252,0 3252,285 0,285">
        <text:p/>
      </draw:polygon>
      <draw:frame text:anchor-type="page" text:anchor-page-number="5" draw:z-index="3400" draw:name="Shape1346" draw:style-name="gr1" draw:text-style-name="P2" svg:width="0.0433in" svg:height="0.1925in" svg:x="2.7311in" svg:y="8.0299in">
        <draw:text-box>
          <text:p><text:span text:style-name="T2"><text:s/></text:span></text:p>
        </draw:text-box>
      </draw:frame>
      <draw:polygon text:anchor-type="page" text:anchor-page-number="5" draw:z-index="3399" draw:name="Shape1373" draw:style-name="gr4" draw:text-style-name="P5" svg:width="0.4933in" svg:height="0.1917in" svg:x="3.5614in" svg:y="8.0882in" svg:viewBox="0 0 1254 488" draw:points="0,0 1254,0 1254,488 0,488">
        <text:p/>
      </draw:polygon>
      <draw:frame text:anchor-type="page" text:anchor-page-number="7" draw:z-index="3398" draw:name="Shape2973" draw:style-name="gr1" draw:text-style-name="P2" svg:width="0.7476in" svg:height="0.1295in" svg:x="2.7728in" svg:y="8.1102in">
        <draw:text-box>
          <text:p><text:span text:style-name="T1">non disponibile</text:span></text:p>
        </draw:text-box>
      </draw:frame>
      <draw:frame text:anchor-type="page" text:anchor-page-number="2" draw:z-index="3397" draw:name="Shape587" draw:style-name="gr1" draw:text-style-name="P2" svg:width="0.0433in" svg:height="0.1925in" svg:x="0.411in" svg:y="9.2134in">
        <draw:text-box>
          <text:p><text:span text:style-name="T2"><text:s/></text:span></text:p>
        </draw:text-box>
      </draw:frame>
      <draw:polygon text:anchor-type="page" text:anchor-page-number="10" draw:z-index="3396" draw:name="Shape3737" draw:style-name="gr2" draw:text-style-name="P3" svg:width="2.265in" svg:height="0.1283in" svg:x="0.4114in" svg:y="9.6413in" svg:viewBox="0 0 5754 327" draw:points="0,0 5754,0 5754,327 0,327">
        <text:p/>
      </draw:polygon>
      <draw:polygon text:anchor-type="page" text:anchor-page-number="14" draw:z-index="3395" draw:name="Shape4560" draw:style-name="gr2" draw:text-style-name="P3" svg:width="1.3768in" svg:height="0.1917in" svg:x="0.363in" svg:y="5.3614in" svg:viewBox="0 0 3498 488" draw:points="0,0 3498,0 3498,488 0,488">
        <text:p/>
      </draw:polygon>
      <draw:polygon text:anchor-type="page" text:anchor-page-number="6" draw:z-index="3394" draw:name="Shape1988" draw:style-name="gr3" draw:text-style-name="P4" svg:width="1.1717in" svg:height="0.0098in" svg:x="4.113in" svg:y="2.5665in" svg:viewBox="0 0 2977 26" draw:points="0,0 2977,0 2977,26 0,26">
        <text:p/>
      </draw:polygon>
      <draw:polygon text:anchor-type="page" text:anchor-page-number="3" draw:z-index="3393" draw:name="Shape915" draw:style-name="gr2" draw:text-style-name="P3" svg:width="3.8417in" svg:height="0.1268in" svg:x="3.363in" svg:y="4.9315in" svg:viewBox="0 0 9759 323" draw:points="0,0 9759,0 9759,323 0,323">
        <text:p/>
      </draw:polygon>
      <draw:frame text:anchor-type="page" text:anchor-page-number="1" draw:z-index="3392" draw:name="Shape245" draw:style-name="gr1" draw:text-style-name="P2" svg:width="0.0433in" svg:height="0.1925in" svg:x="4.2563in" svg:y="6.3362in">
        <draw:text-box>
          <text:p><text:span text:style-name="T2"><text:s/></text:span></text:p>
        </draw:text-box>
      </draw:frame>
      <draw:polygon text:anchor-type="page" text:anchor-page-number="10" draw:z-index="3391" draw:name="Shape3734" draw:style-name="gr2" draw:text-style-name="P3" svg:width="2.3618in" svg:height="0.1917in" svg:x="0.363in" svg:y="9.6413in" svg:viewBox="0 0 6000 488" draw:points="0,0 6000,0 6000,488 0,488">
        <text:p/>
      </draw:polygon>
      <draw:frame text:anchor-type="page" text:anchor-page-number="7" draw:z-index="3390" draw:name="Shape2961" draw:style-name="gr1" draw:text-style-name="P2" svg:width="0.0433in" svg:height="0.1925in" svg:x="2.0165in" svg:y="8.0634in">
        <draw:text-box>
          <text:p><text:span text:style-name="T2"><text:s/></text:span></text:p>
        </draw:text-box>
      </draw:frame>
      <draw:polygon text:anchor-type="page" text:anchor-page-number="1" draw:z-index="3389" draw:name="Shape255" draw:style-name="gr2" draw:text-style-name="P3" svg:width="2.6583in" svg:height="0.1268in" svg:x="0.4114in" svg:y="6.5764in" svg:viewBox="0 0 6753 323" draw:points="0,0 6753,0 6753,323 0,323">
        <text:p/>
      </draw:polygon>
      <draw:polygon text:anchor-type="page" text:anchor-page-number="5" draw:z-index="3388" draw:name="Shape1372" draw:style-name="gr4" draw:text-style-name="P5" svg:width="0.5902in" svg:height="0.2232in" svg:x="3.513in" svg:y="8.0882in" svg:viewBox="0 0 1500 568" draw:points="0,0 1500,0 1500,568 0,568">
        <text:p/>
      </draw:polygon>
      <draw:frame text:anchor-type="page" text:anchor-page-number="2" draw:z-index="3387" draw:name="Shape586" draw:style-name="gr1" draw:text-style-name="P2" svg:width="0.0433in" svg:height="0.1925in" svg:x="7.3016in" svg:y="9.0693in">
        <draw:text-box>
          <text:p><text:span text:style-name="T2"><text:s/></text:span></text:p>
        </draw:text-box>
      </draw:frame>
      <draw:frame text:anchor-type="page" text:anchor-page-number="3" draw:z-index="3386" draw:name="Shape910" draw:style-name="gr1" draw:text-style-name="P2" svg:width="0.0433in" svg:height="0.1925in" svg:x="2.3799in" svg:y="4.8063in">
        <draw:text-box>
          <text:p><text:span text:style-name="T2"><text:s/></text:span></text:p>
        </draw:text-box>
      </draw:frame>
      <draw:polygon text:anchor-type="page" text:anchor-page-number="6" draw:z-index="3385" draw:name="Shape1987" draw:style-name="gr3" draw:text-style-name="P4" svg:width="0.0098in" svg:height="0.0098in" svg:x="4.1031in" svg:y="2.5665in" svg:viewBox="0 0 26 26" draw:points="0,0 26,0 26,26 0,26">
        <text:p/>
      </draw:polygon>
      <draw:frame text:anchor-type="page" text:anchor-page-number="14" draw:z-index="3384" draw:name="Shape4550" draw:style-name="gr1" draw:text-style-name="P2" svg:width="0.0433in" svg:height="0.1925in" svg:x="4.3453in" svg:y="5.1252in">
        <draw:text-box>
          <text:p><text:span text:style-name="T2"><text:s/></text:span></text:p>
        </draw:text-box>
      </draw:frame>
      <draw:polygon text:anchor-type="page" text:anchor-page-number="14" draw:z-index="3383" draw:name="Shape4566" draw:style-name="gr2" draw:text-style-name="P3" svg:width="0.4933in" svg:height="0.1917in" svg:x="6.1197in" svg:y="5.1697in" svg:viewBox="0 0 1254 488" draw:points="0,0 1254,0 1254,488 0,488">
        <text:p/>
      </draw:polygon>
      <draw:polygon text:anchor-type="page" text:anchor-page-number="1" draw:z-index="3382" draw:name="Shape254" draw:style-name="gr2" draw:text-style-name="P3" svg:width="2.7551in" svg:height="0.1917in" svg:x="0.363in" svg:y="6.5764in" svg:viewBox="0 0 6999 488" draw:points="0,0 6999,0 6999,488 0,488">
        <text:p/>
      </draw:polygon>
      <draw:polygon text:anchor-type="page" text:anchor-page-number="3" draw:z-index="3381" draw:name="Shape912" draw:style-name="gr2" draw:text-style-name="P3" svg:width="3.8417in" svg:height="0.1283in" svg:x="3.363in" svg:y="4.8031in" svg:viewBox="0 0 9759 327" draw:points="0,0 9759,0 9759,327 0,327">
        <text:p/>
      </draw:polygon>
      <draw:frame text:anchor-type="page" text:anchor-page-number="5" draw:z-index="3380" draw:name="Shape1371" draw:style-name="gr1" draw:text-style-name="P2" svg:width="0.3469in" svg:height="0.113in" svg:x="2.3799in" svg:y="8.0902in">
        <draw:text-box>
          <text:p><text:span text:style-name="T4">TWA/8h</text:span></text:p>
        </draw:text-box>
      </draw:frame>
      <draw:polygon text:anchor-type="page" text:anchor-page-number="6" draw:z-index="3379" draw:name="Shape1986" draw:style-name="gr3" draw:text-style-name="P4" svg:width="0.5799in" svg:height="0.0098in" svg:x="3.5232in" svg:y="2.5665in" svg:viewBox="0 0 1474 26" draw:points="0,0 1474,0 1474,26 0,26">
        <text:p/>
      </draw:polygon>
      <draw:polygon text:anchor-type="page" text:anchor-page-number="7" draw:z-index="3378" draw:name="Shape2972" draw:style-name="gr2" draw:text-style-name="P3" svg:width="1.4783in" svg:height="0.1283in" svg:x="2.7732in" svg:y="8.1083in" svg:viewBox="0 0 3756 327" draw:points="0,0 3756,0 3756,327 0,327">
        <text:p/>
      </draw:polygon>
      <draw:polygon text:anchor-type="page" text:anchor-page-number="2" draw:z-index="3377" draw:name="Shape589" draw:style-name="gr2" draw:text-style-name="P3" svg:width="1.8717in" svg:height="0.1283in" svg:x="0.4114in" svg:y="9.2583in" svg:viewBox="0 0 4755 327" draw:points="0,0 4755,0 4755,327 0,327">
        <text:p/>
      </draw:polygon>
      <draw:frame text:anchor-type="page" text:anchor-page-number="10" draw:z-index="3376" draw:name="Shape3725" draw:style-name="gr1" draw:text-style-name="P2" svg:width="0.0433in" svg:height="0.1925in" svg:x="2.7728in" svg:y="9.261in">
        <draw:text-box>
          <text:p><text:span text:style-name="T2"><text:s/></text:span></text:p>
        </draw:text-box>
      </draw:frame>
      <draw:frame text:anchor-type="page" text:anchor-page-number="1" draw:z-index="3375" draw:name="Shape246" draw:style-name="gr1" draw:text-style-name="P2" svg:width="1.0988in" svg:height="0.1295in" svg:x="3.1665in" svg:y="6.3839in">
        <draw:text-box>
          <text:p><text:span text:style-name="T3">tel. +39 0736 899238 </text:span></text:p>
        </draw:text-box>
      </draw:frame>
      <draw:polygon text:anchor-type="page" text:anchor-page-number="3" draw:z-index="3374" draw:name="Shape911" draw:style-name="gr2" draw:text-style-name="P3" svg:width="3.9382in" svg:height="0.2551in" svg:x="3.315in" svg:y="4.8031in" svg:viewBox="0 0 10004 649" draw:points="0,0 10004,0 10004,649 0,649">
        <text:p/>
      </draw:polygon>
      <draw:polygon text:anchor-type="page" text:anchor-page-number="2" draw:z-index="3373" draw:name="Shape588" draw:style-name="gr2" draw:text-style-name="P3" svg:width="1.9685in" svg:height="0.1913in" svg:x="0.363in" svg:y="9.2583in" svg:viewBox="0 0 5001 487" draw:points="0,0 5001,0 5001,487 0,487">
        <text:p/>
      </draw:polygon>
      <draw:frame text:anchor-type="page" text:anchor-page-number="5" draw:z-index="3372" draw:name="Shape1345" draw:style-name="gr1" draw:text-style-name="P2" svg:width="0.0433in" svg:height="0.1925in" svg:x="1.8181in" svg:y="8.0299in">
        <draw:text-box>
          <text:p><text:span text:style-name="T2"><text:s/></text:span></text:p>
        </draw:text-box>
      </draw:frame>
      <draw:polygon text:anchor-type="page" text:anchor-page-number="10" draw:z-index="3371" draw:name="Shape3729" draw:style-name="gr2" draw:text-style-name="P3" svg:width="3.8402in" svg:height="0.1913in" svg:x="3.5614in" svg:y="9.2583in" svg:viewBox="0 0 9755 487" draw:points="0,0 9755,0 9755,487 0,487">
        <text:p/>
      </draw:polygon>
      <draw:polygon text:anchor-type="page" text:anchor-page-number="7" draw:z-index="3370" draw:name="Shape2971" draw:style-name="gr2" draw:text-style-name="P3" svg:width="1.5752in" svg:height="0.1913in" svg:x="2.7248in" svg:y="8.1083in" svg:viewBox="0 0 4002 487" draw:points="0,0 4002,0 4002,487 0,487">
        <text:p/>
      </draw:polygon>
      <draw:polygon text:anchor-type="page" text:anchor-page-number="6" draw:z-index="3369" draw:name="Shape1985" draw:style-name="gr3" draw:text-style-name="P4" svg:width="0.0102in" svg:height="0.0098in" svg:x="3.513in" svg:y="2.5665in" svg:viewBox="0 0 27 26" draw:points="0,0 27,0 27,26 0,26">
        <text:p/>
      </draw:polygon>
      <draw:polygon text:anchor-type="page" text:anchor-page-number="14" draw:z-index="3368" draw:name="Shape4565" draw:style-name="gr2" draw:text-style-name="P3" svg:width="0.5898in" svg:height="0.1917in" svg:x="6.0717in" svg:y="5.1697in" svg:viewBox="0 0 1499 488" draw:points="0,0 1499,0 1499,488 0,488">
        <text:p/>
      </draw:polygon>
      <draw:frame text:anchor-type="page" text:anchor-page-number="14" draw:z-index="3367" draw:name="Shape4564" draw:style-name="gr1" draw:text-style-name="P2" svg:width="2.5748in" svg:height="0.1295in" svg:x="1.7882in" svg:y="5.172in">
        <draw:text-box>
          <text:p><text:span text:style-name="T1">Provoca gravi ustioni cutanee e gravi lesioni oculari.</text:span></text:p>
        </draw:text-box>
      </draw:frame>
      <draw:frame text:anchor-type="page" text:anchor-page-number="3" draw:z-index="3366" draw:name="Shape902" draw:style-name="gr1" draw:text-style-name="P2" svg:width="0.0433in" svg:height="0.1925in" svg:x="1.3429in" svg:y="4.7575in">
        <draw:text-box>
          <text:p><text:span text:style-name="T2"><text:s/></text:span></text:p>
        </draw:text-box>
      </draw:frame>
      <draw:polygon text:anchor-type="page" text:anchor-page-number="6" draw:z-index="3365" draw:name="Shape1984" draw:style-name="gr3" draw:text-style-name="P4" svg:width="1.1717in" svg:height="0.0098in" svg:x="2.3413in" svg:y="2.5665in" svg:viewBox="0 0 2977 26" draw:points="0,0 2977,0 2977,26 0,26">
        <text:p/>
      </draw:polygon>
      <draw:polygon text:anchor-type="page" text:anchor-page-number="5" draw:z-index="3364" draw:name="Shape1370" draw:style-name="gr4" draw:text-style-name="P5" svg:width="1.0831in" svg:height="0.1114in" svg:x="2.3799in" svg:y="8.0882in" svg:viewBox="0 0 2752 284" draw:points="0,0 2752,0 2752,284 0,284">
        <text:p/>
      </draw:polygon>
      <draw:frame text:anchor-type="page" text:anchor-page-number="7" draw:z-index="3363" draw:name="Shape2970" draw:style-name="gr1" draw:text-style-name="P2" svg:width="1.5614in" svg:height="0.1295in" svg:x="0.4535in" svg:y="8.1102in">
        <draw:text-box>
          <text:p><text:span text:style-name="T1">Temperatura di autoaccensione</text:span></text:p>
        </draw:text-box>
      </draw:frame>
      <draw:polygon text:anchor-type="page" text:anchor-page-number="10" draw:z-index="3362" draw:name="Shape3740" draw:style-name="gr2" draw:text-style-name="P3" svg:width="3.937in" svg:height="0.3831in" svg:x="3.513in" svg:y="9.2583in" svg:viewBox="0 0 10001 974" draw:points="0,0 10001,0 10001,974 0,974">
        <text:p/>
      </draw:polygon>
      <draw:frame text:anchor-type="page" text:anchor-page-number="2" draw:z-index="3361" draw:name="Shape583" draw:style-name="gr1" draw:text-style-name="P2" svg:width="0.0433in" svg:height="0.1925in" svg:x="3.3634in" svg:y="9.0693in">
        <draw:text-box>
          <text:p><text:span text:style-name="T2"><text:s/></text:span></text:p>
        </draw:text-box>
      </draw:frame>
      <draw:frame text:anchor-type="page" text:anchor-page-number="1" draw:z-index="3360" draw:name="Shape251" draw:style-name="gr1" draw:text-style-name="P2" svg:width="0.085in" svg:height="0.1925in" svg:x="1.7398in" svg:y="6.3874in">
        <draw:text-box>
          <text:p><text:span text:style-name="T2"><text:s text:c="2"/></text:span></text:p>
        </draw:text-box>
      </draw:frame>
      <draw:frame text:anchor-type="page" text:anchor-page-number="10" draw:z-index="3359" draw:name="Shape3730" draw:style-name="gr1" draw:text-style-name="P2" svg:width="0.0433in" svg:height="0.1925in" svg:x="1.55in" svg:y="9.4681in">
        <draw:text-box>
          <text:p><text:span text:style-name="T2"><text:s/></text:span></text:p>
        </draw:text-box>
      </draw:frame>
      <draw:polygon text:anchor-type="page" text:anchor-page-number="5" draw:z-index="3358" draw:name="Shape1369" draw:style-name="gr4" draw:text-style-name="P5" svg:width="1.1815in" svg:height="0.2232in" svg:x="2.3315in" svg:y="8.0882in" svg:viewBox="0 0 3002 568" draw:points="0,0 3002,0 3002,568 0,568">
        <text:p/>
      </draw:polygon>
      <draw:frame text:anchor-type="page" text:anchor-page-number="14" draw:z-index="3357" draw:name="Shape4549" draw:style-name="gr1" draw:text-style-name="P2" svg:width="0.0433in" svg:height="0.1925in" svg:x="0.6846in" svg:y="5.1098in">
        <draw:text-box>
          <text:p><text:span text:style-name="T2"><text:s/></text:span></text:p>
        </draw:text-box>
      </draw:frame>
      <draw:frame text:anchor-type="page" text:anchor-page-number="7" draw:z-index="3356" draw:name="Shape2960" draw:style-name="gr1" draw:text-style-name="P2" svg:width="0.0433in" svg:height="0.1925in" svg:x="0.411in" svg:y="8.0634in">
        <draw:text-box>
          <text:p><text:span text:style-name="T2"><text:s/></text:span></text:p>
        </draw:text-box>
      </draw:frame>
      <draw:polygon text:anchor-type="page" text:anchor-page-number="1" draw:z-index="3355" draw:name="Shape257" draw:style-name="gr2" draw:text-style-name="P3" svg:width="4.6283in" svg:height="0.1268in" svg:x="3.1665in" svg:y="6.3846in" svg:viewBox="0 0 11757 323" draw:points="0,0 11757,0 11757,323 0,323">
        <text:p/>
      </draw:polygon>
      <draw:polygon text:anchor-type="page" text:anchor-page-number="3" draw:z-index="3354" draw:name="Shape908" draw:style-name="gr2" draw:text-style-name="P3" svg:width="0.8866in" svg:height="0.1917in" svg:x="2.3799in" svg:y="4.8031in" svg:viewBox="0 0 2253 488" draw:points="0,0 2253,0 2253,488 0,488">
        <text:p/>
      </draw:polygon>
      <draw:polygon text:anchor-type="page" text:anchor-page-number="6" draw:z-index="3353" draw:name="Shape1983" draw:style-name="gr3" draw:text-style-name="P4" svg:width="0.0098in" svg:height="0.0098in" svg:x="2.3315in" svg:y="2.5665in" svg:viewBox="0 0 26 26" draw:points="0,0 26,0 26,26 0,26">
        <text:p/>
      </draw:polygon>
      <draw:polygon text:anchor-type="page" text:anchor-page-number="2" draw:z-index="3352" draw:name="Shape585" draw:style-name="gr2" draw:text-style-name="P3" svg:width="0.2965in" svg:height="0.1917in" svg:x="7.3016in" svg:y="9.0665in" svg:viewBox="0 0 754 488" draw:points="0,0 754,0 754,488 0,488">
        <text:p/>
      </draw:polygon>
      <draw:polygon text:anchor-type="page" text:anchor-page-number="3" draw:z-index="3351" draw:name="Shape907" draw:style-name="gr2" draw:text-style-name="P3" svg:width="0.9835in" svg:height="0.2551in" svg:x="2.3315in" svg:y="4.8031in" svg:viewBox="0 0 2499 649" draw:points="0,0 2499,0 2499,649 0,649">
        <text:p/>
      </draw:polygon>
      <draw:polygon text:anchor-type="page" text:anchor-page-number="10" draw:z-index="3350" draw:name="Shape3739" draw:style-name="gr2" draw:text-style-name="P3" svg:width="0.6898in" svg:height="0.1913in" svg:x="2.7732in" svg:y="9.2583in" svg:viewBox="0 0 1753 487" draw:points="0,0 1753,0 1753,487 0,487">
        <text:p/>
      </draw:polygon>
      <draw:polygon text:anchor-type="page" text:anchor-page-number="14" draw:z-index="3349" draw:name="Shape4563" draw:style-name="gr2" draw:text-style-name="P3" svg:width="4.235in" svg:height="0.1283in" svg:x="1.7882in" svg:y="5.1697in" svg:viewBox="0 0 10758 327" draw:points="0,0 10758,0 10758,327 0,327">
        <text:p/>
      </draw:polygon>
      <draw:polygon text:anchor-type="page" text:anchor-page-number="6" draw:z-index="3348" draw:name="Shape1981" draw:style-name="gr3" draw:text-style-name="P4" svg:width="0.7768in" svg:height="0.0098in" svg:x="1.5547in" svg:y="2.5665in" svg:viewBox="0 0 1974 26" draw:points="0,0 1974,0 1974,26 0,26">
        <text:p/>
      </draw:polygon>
      <draw:polygon text:anchor-type="page" text:anchor-page-number="1" draw:z-index="3347" draw:name="Shape256" draw:style-name="gr2" draw:text-style-name="P3" svg:width="4.7252in" svg:height="0.1917in" svg:x="3.1181in" svg:y="6.3846in" svg:viewBox="0 0 12003 488" draw:points="0,0 12003,0 12003,488 0,488">
        <text:p/>
      </draw:polygon>
      <draw:frame text:anchor-type="page" text:anchor-page-number="7" draw:z-index="3346" draw:name="Shape2959" draw:style-name="gr1" draw:text-style-name="P2" svg:width="0.0433in" svg:height="0.1925in" svg:x="4.348in" svg:y="7.9193in">
        <draw:text-box>
          <text:p><text:span text:style-name="T2"><text:s/></text:span></text:p>
        </draw:text-box>
      </draw:frame>
      <draw:frame text:anchor-type="page" text:anchor-page-number="5" draw:z-index="3345" draw:name="Shape1368" draw:style-name="gr1" draw:text-style-name="P2" svg:width="0.2276in" svg:height="0.113in" svg:x="1.5917in" svg:y="8.0902in">
        <draw:text-box>
          <text:p><text:span text:style-name="T4">Stato</text:span></text:p>
        </draw:text-box>
      </draw:frame>
      <draw:polygon text:anchor-type="page" text:anchor-page-number="2" draw:z-index="3344" draw:name="Shape584" draw:style-name="gr2" draw:text-style-name="P3" svg:width="0.3933in" svg:height="0.1917in" svg:x="7.2531in" svg:y="9.0665in" svg:viewBox="0 0 1000 488" draw:points="0,0 1000,0 1000,488 0,488">
        <text:p/>
      </draw:polygon>
      <draw:polygon text:anchor-type="page" text:anchor-page-number="10" draw:z-index="3343" draw:name="Shape3738" draw:style-name="gr2" draw:text-style-name="P3" svg:width="0.7882in" svg:height="0.3831in" svg:x="2.7248in" svg:y="9.2583in" svg:viewBox="0 0 2003 974" draw:points="0,0 2003,0 2003,974 0,974">
        <text:p/>
      </draw:polygon>
      <draw:frame text:anchor-type="page" text:anchor-page-number="1" draw:z-index="3342" draw:name="Shape240" draw:style-name="gr1" draw:text-style-name="P2" svg:width="0.0433in" svg:height="0.1925in" svg:x="3.45in" svg:y="6.1445in">
        <draw:text-box>
          <text:p><text:span text:style-name="T2"><text:s/></text:span></text:p>
        </draw:text-box>
      </draw:frame>
      <draw:polygon text:anchor-type="page" text:anchor-page-number="7" draw:z-index="3341" draw:name="Shape2969" draw:style-name="gr2" draw:text-style-name="P3" svg:width="2.265in" svg:height="0.1283in" svg:x="0.4114in" svg:y="8.1083in" svg:viewBox="0 0 5754 327" draw:points="0,0 5754,0 5754,327 0,327">
        <text:p/>
      </draw:polygon>
      <draw:polygon text:anchor-type="page" text:anchor-page-number="6" draw:z-index="3340" draw:name="Shape1980" draw:style-name="gr3" draw:text-style-name="P4" svg:width="0.0098in" svg:height="0.0098in" svg:x="1.5449in" svg:y="2.5665in" svg:viewBox="0 0 26 26" draw:points="0,0 26,0 26,26 0,26">
        <text:p/>
      </draw:polygon>
      <draw:frame text:anchor-type="page" text:anchor-page-number="3" draw:z-index="3339" draw:name="Shape906" draw:style-name="gr1" draw:text-style-name="P2" svg:width="0.8969in" svg:height="0.1295in" svg:x="0.4535in" svg:y="4.8055in">
        <draw:text-box>
          <text:p><text:span text:style-name="T1">CAS <text:s text:c="2"/>55965-84-9</text:span></text:p>
        </draw:text-box>
      </draw:frame>
      <draw:frame text:anchor-type="page" text:anchor-page-number="2" draw:z-index="3338" draw:name="Shape579" draw:style-name="gr1" draw:text-style-name="P2" svg:width="0.0433in" svg:height="0.1925in" svg:x="2.3799in" svg:y="9.0693in">
        <draw:text-box>
          <text:p><text:span text:style-name="T2"><text:s/></text:span></text:p>
        </draw:text-box>
      </draw:frame>
      <draw:polygon text:anchor-type="page" text:anchor-page-number="14" draw:z-index="3337" draw:name="Shape4562" draw:style-name="gr2" draw:text-style-name="P3" svg:width="4.3319in" svg:height="0.1917in" svg:x="1.7398in" svg:y="5.1697in" svg:viewBox="0 0 11004 488" draw:points="0,0 11004,0 11004,488 0,488">
        <text:p/>
      </draw:polygon>
      <draw:frame text:anchor-type="page" text:anchor-page-number="5" draw:z-index="3336" draw:name="Shape1344" draw:style-name="gr1" draw:text-style-name="P2" svg:width="0.0433in" svg:height="0.1925in" svg:x="0.6417in" svg:y="8.0299in">
        <draw:text-box>
          <text:p><text:span text:style-name="T2"><text:s/></text:span></text:p>
        </draw:text-box>
      </draw:frame>
      <draw:polygon text:anchor-type="page" text:anchor-page-number="5" draw:z-index="3335" draw:name="Shape1367" draw:style-name="gr4" draw:text-style-name="P5" svg:width="0.6917in" svg:height="0.1114in" svg:x="1.5913in" svg:y="8.0882in" svg:viewBox="0 0 1758 284" draw:points="0,0 1758,0 1758,284 0,284">
        <text:p/>
      </draw:polygon>
      <draw:frame text:anchor-type="page" text:anchor-page-number="14" draw:z-index="3334" draw:name="Shape4555" draw:style-name="gr1" draw:text-style-name="P2" svg:width="0.2323in" svg:height="0.113in" svg:x="0.4535in" svg:y="5.1701in">
        <draw:text-box>
          <text:p><text:span text:style-name="T5">H314</text:span></text:p>
        </draw:text-box>
      </draw:frame>
      <draw:polygon text:anchor-type="page" text:anchor-page-number="6" draw:z-index="3333" draw:name="Shape1958" draw:style-name="gr3" draw:text-style-name="P4" svg:width="1.1819in" svg:height="0.0098in" svg:x="0.363in" svg:y="2.5665in" svg:viewBox="0 0 3003 26" draw:points="0,0 3003,0 3003,26 0,26">
        <text:p/>
      </draw:polygon>
      <draw:frame text:anchor-type="page" text:anchor-page-number="3" draw:z-index="3332" draw:name="Shape901" draw:style-name="gr1" draw:text-style-name="P2" svg:width="0.0433in" svg:height="0.1925in" svg:x="0.411in" svg:y="4.7575in">
        <draw:text-box>
          <text:p><text:span text:style-name="T2"><text:s/></text:span></text:p>
        </draw:text-box>
      </draw:frame>
      <draw:polygon text:anchor-type="page" text:anchor-page-number="2" draw:z-index="3331" draw:name="Shape582" draw:style-name="gr2" draw:text-style-name="P3" svg:width="3.8417in" svg:height="0.1917in" svg:x="3.363in" svg:y="9.0665in" svg:viewBox="0 0 9759 488" draw:points="0,0 9759,0 9759,488 0,488">
        <text:p/>
      </draw:polygon>
      <draw:polygon text:anchor-type="page" text:anchor-page-number="1" draw:z-index="3330" draw:name="Shape248" draw:style-name="gr2" draw:text-style-name="P3" svg:width="2.6583in" svg:height="0.1917in" svg:x="0.4114in" svg:y="6.3846in" svg:viewBox="0 0 6753 488" draw:points="0,0 6753,0 6753,488 0,488">
        <text:p/>
      </draw:polygon>
      <draw:polygon text:anchor-type="page" text:anchor-page-number="7" draw:z-index="3329" draw:name="Shape2963" draw:style-name="gr2" draw:text-style-name="P3" svg:width="2.3618in" svg:height="0.1913in" svg:x="0.363in" svg:y="8.1083in" svg:viewBox="0 0 6000 487" draw:points="0,0 6000,0 6000,487 0,487">
        <text:p/>
      </draw:polygon>
      <draw:frame text:anchor-type="page" text:anchor-page-number="10" draw:z-index="3328" draw:name="Shape3736" draw:style-name="gr1" draw:text-style-name="P2" svg:width="1.1469in" svg:height="0.1295in" svg:x="0.411in" svg:y="9.5154in">
        <draw:text-box>
          <text:p><text:span text:style-name="T1">aerodinamico ≤ 10 μm)</text:span></text:p>
        </draw:text-box>
      </draw:frame>
      <draw:polygon text:anchor-type="page" text:anchor-page-number="2" draw:z-index="3327" draw:name="Shape581" draw:style-name="gr2" draw:text-style-name="P3" svg:width="3.9382in" svg:height="0.1917in" svg:x="3.315in" svg:y="9.0665in" svg:viewBox="0 0 10004 488" draw:points="0,0 10004,0 10004,488 0,488">
        <text:p/>
      </draw:polygon>
      <draw:polygon text:anchor-type="page" text:anchor-page-number="1" draw:z-index="3326" draw:name="Shape247" draw:style-name="gr2" draw:text-style-name="P3" svg:width="2.7551in" svg:height="0.1917in" svg:x="0.363in" svg:y="6.3846in" svg:viewBox="0 0 6999 488" draw:points="0,0 6999,0 6999,488 0,488">
        <text:p/>
      </draw:polygon>
      <draw:frame text:anchor-type="page" text:anchor-page-number="7" draw:z-index="3325" draw:name="Shape2953" draw:style-name="gr1" draw:text-style-name="P2" svg:width="0.0433in" svg:height="0.1925in" svg:x="3.148in" svg:y="7.8717in">
        <draw:text-box>
          <text:p><text:span text:style-name="T2"><text:s/></text:span></text:p>
        </draw:text-box>
      </draw:frame>
      <draw:frame text:anchor-type="page" text:anchor-page-number="10" draw:z-index="3324" draw:name="Shape3728" draw:style-name="gr1" draw:text-style-name="P2" svg:width="2.1488in" svg:height="0.1295in" svg:x="0.411in" svg:y="9.389in">
        <draw:text-box>
          <text:p><text:span text:style-name="T1">contenente &lt; 1% di particelle con diametro </text:span></text:p>
        </draw:text-box>
      </draw:frame>
      <draw:frame text:anchor-type="page" text:anchor-page-number="6" draw:z-index="3323" draw:name="Shape2004" draw:style-name="gr1" draw:text-style-name="P2" svg:width="0.0433in" svg:height="0.1925in" svg:x="5.9228in" svg:y="2.5799in">
        <draw:text-box>
          <text:p><text:span text:style-name="T2"><text:s/></text:span></text:p>
        </draw:text-box>
      </draw:frame>
      <draw:polygon text:anchor-type="page" text:anchor-page-number="5" draw:z-index="3322" draw:name="Shape1366" draw:style-name="gr4" draw:text-style-name="P5" svg:width="0.7882in" svg:height="0.2232in" svg:x="1.5433in" svg:y="8.0882in" svg:viewBox="0 0 2003 568" draw:points="0,0 2003,0 2003,568 0,568">
        <text:p/>
      </draw:polygon>
      <draw:frame text:anchor-type="page" text:anchor-page-number="14" draw:z-index="3321" draw:name="Shape4548" draw:style-name="gr1" draw:text-style-name="P2" svg:width="0.0433in" svg:height="0.1925in" svg:x="0.411in" svg:y="5.1098in">
        <draw:text-box>
          <text:p><text:span text:style-name="T2"><text:s/></text:span></text:p>
        </draw:text-box>
      </draw:frame>
      <draw:frame text:anchor-type="page" text:anchor-page-number="3" draw:z-index="3320" draw:name="Shape897" draw:style-name="gr1" draw:text-style-name="P2" svg:width="0.0433in" svg:height="0.1925in" svg:x="7.3016in" svg:y="4.4228in">
        <draw:text-box>
          <text:p><text:span text:style-name="T2"><text:s/></text:span></text:p>
        </draw:text-box>
      </draw:frame>
      <draw:polygon text:anchor-type="page" text:anchor-page-number="7" draw:z-index="3319" draw:name="Shape2968" draw:style-name="gr2" draw:text-style-name="P3" svg:width="2.265in" svg:height="0.1917in" svg:x="4.348in" svg:y="7.9165in" svg:viewBox="0 0 5754 488" draw:points="0,0 5754,0 5754,488 0,488">
        <text:p/>
      </draw:polygon>
      <draw:frame text:anchor-type="page" text:anchor-page-number="2" draw:z-index="3318" draw:name="Shape570" draw:style-name="gr1" draw:text-style-name="P2" svg:width="0.0433in" svg:height="0.1925in" svg:x="1.6311in" svg:y="9.0193in">
        <draw:text-box>
          <text:p><text:span text:style-name="T2"><text:s/></text:span></text:p>
        </draw:text-box>
      </draw:frame>
      <draw:polygon text:anchor-type="page" text:anchor-page-number="6" draw:z-index="3317" draw:name="Shape2006" draw:style-name="gr2" draw:text-style-name="P3" svg:width="1.085in" svg:height="0.1917in" svg:x="6.7098in" svg:y="2.5764in" svg:viewBox="0 0 2757 488" draw:points="0,0 2757,0 2757,488 0,488">
        <text:p/>
      </draw:polygon>
      <draw:frame text:anchor-type="page" text:anchor-page-number="14" draw:z-index="3316" draw:name="Shape4547" draw:style-name="gr1" draw:text-style-name="P2" svg:width="0.0433in" svg:height="0.1925in" svg:x="6.1193in" svg:y="4.9811in">
        <draw:text-box>
          <text:p><text:span text:style-name="T2"><text:s/></text:span></text:p>
        </draw:text-box>
      </draw:frame>
      <draw:frame text:anchor-type="page" text:anchor-page-number="1" draw:z-index="3315" draw:name="Shape241" draw:style-name="gr1" draw:text-style-name="P2" svg:width="0.2878in" svg:height="0.1295in" svg:x="3.1665in" svg:y="6.1925in">
        <draw:text-box>
          <text:p><text:span text:style-name="T3">Italia </text:span></text:p>
        </draw:text-box>
      </draw:frame>
      <draw:polygon text:anchor-type="page" text:anchor-page-number="10" draw:z-index="3314" draw:name="Shape3735" draw:style-name="gr2" draw:text-style-name="P3" svg:width="2.265in" svg:height="0.1264in" svg:x="0.4114in" svg:y="9.515in" svg:viewBox="0 0 5754 322" draw:points="0,0 5754,0 5754,322 0,322">
        <text:p/>
      </draw:polygon>
      <draw:frame text:anchor-type="page" text:anchor-page-number="5" draw:z-index="3313" draw:name="Shape1365" draw:style-name="gr1" draw:text-style-name="P2" svg:width="0.1858in" svg:height="0.113in" svg:x="0.4535in" svg:y="8.0902in">
        <draw:text-box>
          <text:p><text:span text:style-name="T4">Tipo</text:span></text:p>
        </draw:text-box>
      </draw:frame>
      <draw:polygon text:anchor-type="page" text:anchor-page-number="3" draw:z-index="3312" draw:name="Shape905" draw:style-name="gr2" draw:text-style-name="P3" svg:width="1.8717in" svg:height="0.1283in" svg:x="0.4114in" svg:y="4.8031in" svg:viewBox="0 0 4755 327" draw:points="0,0 4755,0 4755,327 0,327">
        <text:p/>
      </draw:polygon>
      <draw:frame text:anchor-type="page" text:anchor-page-number="5" draw:z-index="3311" draw:name="Shape1343" draw:style-name="gr1" draw:text-style-name="P2" svg:width="0.0433in" svg:height="0.1925in" svg:x="0.411in" svg:y="8.0299in">
        <draw:text-box>
          <text:p><text:span text:style-name="T2"><text:s/></text:span></text:p>
        </draw:text-box>
      </draw:frame>
      <draw:polygon text:anchor-type="page" text:anchor-page-number="2" draw:z-index="3310" draw:name="Shape578" draw:style-name="gr2" draw:text-style-name="P3" svg:width="0.8866in" svg:height="0.1917in" svg:x="2.3799in" svg:y="9.0665in" svg:viewBox="0 0 2253 488" draw:points="0,0 2253,0 2253,488 0,488">
        <text:p/>
      </draw:polygon>
      <draw:frame text:anchor-type="page" text:anchor-page-number="1" draw:z-index="3309" draw:name="Shape244" draw:style-name="gr1" draw:text-style-name="P2" svg:width="0.085in" svg:height="0.1925in" svg:x="1.7398in" svg:y="6.1965in">
        <draw:text-box>
          <text:p><text:span text:style-name="T2"><text:s text:c="2"/></text:span></text:p>
        </draw:text-box>
      </draw:frame>
      <draw:polygon text:anchor-type="page" text:anchor-page-number="3" draw:z-index="3308" draw:name="Shape903" draw:style-name="gr2" draw:text-style-name="P3" svg:width="1.9685in" svg:height="0.2551in" svg:x="0.363in" svg:y="4.8031in" svg:viewBox="0 0 5001 649" draw:points="0,0 5001,0 5001,649 0,649">
        <text:p/>
      </draw:polygon>
      <draw:frame text:anchor-type="page" text:anchor-page-number="10" draw:z-index="3307" draw:name="Shape3724" draw:style-name="gr1" draw:text-style-name="P2" svg:width="1.7307in" svg:height="0.1295in" svg:x="0.4535in" svg:y="9.2602in">
        <draw:text-box>
          <text:p><text:span text:style-name="T1">BIOSSIDO DI TITANIO (in polvere </text:span></text:p>
        </draw:text-box>
      </draw:frame>
      <draw:polygon text:anchor-type="page" text:anchor-page-number="14" draw:z-index="3306" draw:name="Shape4552" draw:style-name="gr2" draw:text-style-name="P3" svg:width="1.2799in" svg:height="0.1118in" svg:x="0.4114in" svg:y="5.1697in" svg:viewBox="0 0 3252 285" draw:points="0,0 3252,0 3252,285 0,285">
        <text:p/>
      </draw:polygon>
      <draw:polygon text:anchor-type="page" text:anchor-page-number="6" draw:z-index="3305" draw:name="Shape2005" draw:style-name="gr2" draw:text-style-name="P3" svg:width="1.1819in" svg:height="0.1917in" svg:x="6.6614in" svg:y="2.5764in" svg:viewBox="0 0 3003 488" draw:points="0,0 3003,0 3003,488 0,488">
        <text:p/>
      </draw:polygon>
      <draw:polygon text:anchor-type="page" text:anchor-page-number="7" draw:z-index="3304" draw:name="Shape2967" draw:style-name="gr2" draw:text-style-name="P3" svg:width="2.363in" svg:height="0.1917in" svg:x="4.3in" svg:y="7.9165in" svg:viewBox="0 0 6003 488" draw:points="0,0 6003,0 6003,488 0,488">
        <text:p/>
      </draw:polygon>
      <draw:polygon text:anchor-type="page" text:anchor-page-number="1" draw:z-index="3303" draw:name="Shape250" draw:style-name="gr2" draw:text-style-name="P3" svg:width="4.6283in" svg:height="0.1264in" svg:x="3.1665in" svg:y="6.1933in" svg:viewBox="0 0 11757 322" draw:points="0,0 11757,0 11757,322 0,322">
        <text:p/>
      </draw:polygon>
      <draw:polygon text:anchor-type="page" text:anchor-page-number="10" draw:z-index="3302" draw:name="Shape3727" draw:style-name="gr2" draw:text-style-name="P3" svg:width="2.265in" svg:height="0.1283in" svg:x="0.4114in" svg:y="9.3866in" svg:viewBox="0 0 5754 327" draw:points="0,0 5754,0 5754,327 0,327">
        <text:p/>
      </draw:polygon>
      <draw:polygon text:anchor-type="page" text:anchor-page-number="14" draw:z-index="3301" draw:name="Shape4551" draw:style-name="gr2" draw:text-style-name="P3" svg:width="1.3768in" svg:height="0.1917in" svg:x="0.363in" svg:y="5.1697in" svg:viewBox="0 0 3498 488" draw:points="0,0 3498,0 3498,488 0,488">
        <text:p/>
      </draw:polygon>
      <draw:frame text:anchor-type="page" text:anchor-page-number="3" draw:z-index="3300" draw:name="Shape898" draw:style-name="gr1" draw:text-style-name="P2" svg:width="0.0433in" svg:height="0.1925in" svg:x="3.711in" svg:y="4.6299in">
        <draw:text-box>
          <text:p><text:span text:style-name="T2"><text:s/></text:span></text:p>
        </draw:text-box>
      </draw:frame>
      <draw:frame text:anchor-type="page" text:anchor-page-number="6" draw:z-index="3299" draw:name="Shape2001" draw:style-name="gr1" draw:text-style-name="P2" svg:width="0.0433in" svg:height="0.1925in" svg:x="5.3335in" svg:y="2.5799in">
        <draw:text-box>
          <text:p><text:span text:style-name="T2"><text:s/></text:span></text:p>
        </draw:text-box>
      </draw:frame>
      <draw:polygon text:anchor-type="page" text:anchor-page-number="2" draw:z-index="3298" draw:name="Shape577" draw:style-name="gr2" draw:text-style-name="P3" svg:width="0.9835in" svg:height="0.1917in" svg:x="2.3315in" svg:y="9.0665in" svg:viewBox="0 0 2499 488" draw:points="0,0 2499,0 2499,488 0,488">
        <text:p/>
      </draw:polygon>
      <draw:frame text:anchor-type="page" text:anchor-page-number="7" draw:z-index="3297" draw:name="Shape2966" draw:style-name="gr1" draw:text-style-name="P2" svg:width="0.3787in" svg:height="0.1295in" svg:x="2.7728in" svg:y="7.9189in">
        <draw:text-box>
          <text:p><text:span text:style-name="T1">&gt; 60 °C</text:span></text:p>
        </draw:text-box>
      </draw:frame>
      <draw:frame text:anchor-type="page" text:anchor-page-number="5" draw:z-index="3296" draw:name="Shape1339" draw:style-name="gr1" draw:text-style-name="P2" svg:width="0.0433in" svg:height="0.1925in" svg:x="1.5953in" svg:y="7.9016in">
        <draw:text-box>
          <text:p><text:span text:style-name="T2"><text:s/></text:span></text:p>
        </draw:text-box>
      </draw:frame>
      <draw:frame text:anchor-type="page" text:anchor-page-number="7" draw:z-index="3295" draw:name="Shape2947" draw:style-name="gr1" draw:text-style-name="P2" svg:width="0.0433in" svg:height="0.1925in" svg:x="1.5717in" svg:y="7.8717in">
        <draw:text-box>
          <text:p><text:span text:style-name="T2"><text:s/></text:span></text:p>
        </draw:text-box>
      </draw:frame>
      <draw:polygon text:anchor-type="page" text:anchor-page-number="6" draw:z-index="3294" draw:name="Shape2003" draw:style-name="gr2" draw:text-style-name="P3" svg:width="0.6898in" svg:height="0.1917in" svg:x="5.9232in" svg:y="2.5764in" svg:viewBox="0 0 1753 488" draw:points="0,0 1753,0 1753,488 0,488">
        <text:p/>
      </draw:polygon>
      <draw:frame text:anchor-type="page" text:anchor-page-number="10" draw:z-index="3293" draw:name="Shape3721" draw:style-name="gr1" draw:text-style-name="P2" svg:width="0.0433in" svg:height="0.1925in" svg:x="0.411in" svg:y="9.2134in">
        <draw:text-box>
          <text:p><text:span text:style-name="T2"><text:s/></text:span></text:p>
        </draw:text-box>
      </draw:frame>
      <draw:frame text:anchor-type="page" text:anchor-page-number="14" draw:z-index="3292" draw:name="Shape4535" draw:style-name="gr1" draw:text-style-name="P2" svg:width="0.0433in" svg:height="0.1925in" svg:x="2.7453in" svg:y="4.9335in">
        <draw:text-box>
          <text:p><text:span text:style-name="T2"><text:s/></text:span></text:p>
        </draw:text-box>
      </draw:frame>
      <draw:polygon text:anchor-type="page" text:anchor-page-number="5" draw:z-index="3291" draw:name="Shape1364" draw:style-name="gr4" draw:text-style-name="P5" svg:width="1.0835in" svg:height="0.1114in" svg:x="0.4114in" svg:y="8.0882in" svg:viewBox="0 0 2753 284" draw:points="0,0 2753,0 2753,284 0,284">
        <text:p/>
      </draw:polygon>
      <draw:frame text:anchor-type="page" text:anchor-page-number="2" draw:z-index="3290" draw:name="Shape575" draw:style-name="gr1" draw:text-style-name="P2" svg:width="1.1776in" svg:height="0.1295in" svg:x="0.4535in" svg:y="9.0665in">
        <draw:text-box>
          <text:p><text:span text:style-name="T3">CALCIO CARBONATO</text:span></text:p>
        </draw:text-box>
      </draw:frame>
      <draw:polygon text:anchor-type="page" text:anchor-page-number="3" draw:z-index="3289" draw:name="Shape896" draw:style-name="gr2" draw:text-style-name="P3" svg:width="0.2965in" svg:height="0.1917in" svg:x="7.3016in" svg:y="4.4197in" svg:viewBox="0 0 754 488" draw:points="0,0 754,0 754,488 0,488">
        <text:p/>
      </draw:polygon>
      <draw:polygon text:anchor-type="page" text:anchor-page-number="1" draw:z-index="3288" draw:name="Shape249" draw:style-name="gr2" draw:text-style-name="P3" svg:width="4.7252in" svg:height="0.1913in" svg:x="3.1181in" svg:y="6.1933in" svg:viewBox="0 0 12003 487" draw:points="0,0 12003,0 12003,487 0,487">
        <text:p/>
      </draw:polygon>
      <draw:polygon text:anchor-type="page" text:anchor-page-number="6" draw:z-index="3287" draw:name="Shape2002" draw:style-name="gr2" draw:text-style-name="P3" svg:width="0.7866in" svg:height="0.1917in" svg:x="5.8748in" svg:y="2.5764in" svg:viewBox="0 0 1999 488" draw:points="0,0 1999,0 1999,488 0,488">
        <text:p/>
      </draw:polygon>
      <draw:frame text:anchor-type="page" text:anchor-page-number="2" draw:z-index="3286" draw:name="Shape569" draw:style-name="gr1" draw:text-style-name="P2" svg:width="0.0433in" svg:height="0.1925in" svg:x="0.411in" svg:y="9.0193in">
        <draw:text-box>
          <text:p><text:span text:style-name="T2"><text:s/></text:span></text:p>
        </draw:text-box>
      </draw:frame>
      <draw:polygon text:anchor-type="page" text:anchor-page-number="14" draw:z-index="3285" draw:name="Shape4554" draw:style-name="gr2" draw:text-style-name="P3" svg:width="0.4933in" svg:height="0.1917in" svg:x="6.1197in" svg:y="4.978in" svg:viewBox="0 0 1254 488" draw:points="0,0 1254,0 1254,488 0,488">
        <text:p/>
      </draw:polygon>
      <draw:polygon text:anchor-type="page" text:anchor-page-number="3" draw:z-index="3284" draw:name="Shape904" draw:style-name="gr2" draw:text-style-name="P3" svg:width="0.3933in" svg:height="0.3835in" svg:x="7.2531in" svg:y="4.4197in" svg:viewBox="0 0 1000 975" draw:points="0,0 1000,0 1000,975 0,975">
        <text:p/>
      </draw:polygon>
      <draw:polygon text:anchor-type="page" text:anchor-page-number="7" draw:z-index="3283" draw:name="Shape2965" draw:style-name="gr2" draw:text-style-name="P3" svg:width="1.4783in" svg:height="0.1283in" svg:x="2.7732in" svg:y="7.9165in" svg:viewBox="0 0 3756 327" draw:points="0,0 3756,0 3756,327 0,327">
        <text:p/>
      </draw:polygon>
      <draw:polygon text:anchor-type="page" text:anchor-page-number="5" draw:z-index="3282" draw:name="Shape1363" draw:style-name="gr4" draw:text-style-name="P5" svg:width="1.1803in" svg:height="0.2232in" svg:x="0.363in" svg:y="8.0882in" svg:viewBox="0 0 2999 568" draw:points="0,0 2999,0 2999,568 0,568">
        <text:p/>
      </draw:polygon>
      <draw:frame text:anchor-type="page" text:anchor-page-number="10" draw:z-index="3281" draw:name="Shape3720" draw:style-name="gr1" draw:text-style-name="P2" svg:width="0.0433in" svg:height="0.1925in" svg:x="0.3634in" svg:y="9.0693in">
        <draw:text-box>
          <text:p><text:span text:style-name="T2"><text:s/></text:span></text:p>
        </draw:text-box>
      </draw:frame>
      <draw:frame text:anchor-type="page" text:anchor-page-number="1" draw:z-index="3280" draw:name="Shape229" draw:style-name="gr1" draw:text-style-name="P2" svg:width="0.0433in" svg:height="0.1925in" svg:x="4.2654in" svg:y="6.0181in">
        <draw:text-box>
          <text:p><text:span text:style-name="T2"><text:s/></text:span></text:p>
        </draw:text-box>
      </draw:frame>
      <draw:frame text:anchor-type="page" text:anchor-page-number="3" draw:z-index="3279" draw:name="Shape900" draw:style-name="gr1" draw:text-style-name="P2" svg:width="0.3531in" svg:height="0.1295in" svg:x="3.3634in" svg:y="4.6772in">
        <draw:text-box>
          <text:p><text:span text:style-name="T1">&lt; 0.6%</text:span></text:p>
        </draw:text-box>
      </draw:frame>
      <draw:polygon text:anchor-type="page" text:anchor-page-number="1" draw:z-index="3278" draw:name="Shape243" draw:style-name="gr2" draw:text-style-name="P3" svg:width="2.6583in" svg:height="0.1913in" svg:x="0.4114in" svg:y="6.1933in" svg:viewBox="0 0 6753 487" draw:points="0,0 6753,0 6753,487 0,487">
        <text:p/>
      </draw:polygon>
      <draw:polygon text:anchor-type="page" text:anchor-page-number="7" draw:z-index="3277" draw:name="Shape2964" draw:style-name="gr2" draw:text-style-name="P3" svg:width="1.5752in" svg:height="0.1917in" svg:x="2.7248in" svg:y="7.9165in" svg:viewBox="0 0 4002 488" draw:points="0,0 4002,0 4002,488 0,488">
        <text:p/>
      </draw:polygon>
      <draw:polygon text:anchor-type="page" text:anchor-page-number="14" draw:z-index="3276" draw:name="Shape4553" draw:style-name="gr2" draw:text-style-name="P3" svg:width="0.5898in" svg:height="0.1917in" svg:x="6.0717in" svg:y="4.978in" svg:viewBox="0 0 1499 488" draw:points="0,0 1499,0 1499,488 0,488">
        <text:p/>
      </draw:polygon>
      <draw:frame text:anchor-type="page" text:anchor-page-number="6" draw:z-index="3275" draw:name="Shape1998" draw:style-name="gr1" draw:text-style-name="P2" svg:width="0.0433in" svg:height="0.1925in" svg:x="4.1516in" svg:y="2.5799in">
        <draw:text-box>
          <text:p><text:span text:style-name="T2"><text:s/></text:span></text:p>
        </draw:text-box>
      </draw:frame>
      <draw:frame text:anchor-type="page" text:anchor-page-number="2" draw:z-index="3274" draw:name="Shape568" draw:style-name="gr1" draw:text-style-name="P2" svg:width="0.0433in" svg:height="0.1925in" svg:x="7.3016in" svg:y="8.878in">
        <draw:text-box>
          <text:p><text:span text:style-name="T2"><text:s/></text:span></text:p>
        </draw:text-box>
      </draw:frame>
      <draw:polygon text:anchor-type="page" text:anchor-page-number="10" draw:z-index="3273" draw:name="Shape3723" draw:style-name="gr2" draw:text-style-name="P3" svg:width="2.265in" svg:height="0.1283in" svg:x="0.4114in" svg:y="9.2583in" svg:viewBox="0 0 5754 327" draw:points="0,0 5754,0 5754,327 0,327">
        <text:p/>
      </draw:polygon>
      <draw:frame text:anchor-type="page" text:anchor-page-number="5" draw:z-index="3272" draw:name="Shape1340" draw:style-name="gr1" draw:text-style-name="P2" svg:width="1.1449in" svg:height="0.1295in" svg:x="0.4535in" svg:y="7.9484in">
        <draw:text-box>
          <text:p><text:span text:style-name="T3">Valore limite di soglia</text:span></text:p>
        </draw:text-box>
      </draw:frame>
      <draw:frame text:anchor-type="page" text:anchor-page-number="3" draw:z-index="3271" draw:name="Shape895" draw:style-name="gr1" draw:text-style-name="P2" svg:width="3.8213in" svg:height="0.1295in" svg:x="3.3634in" svg:y="4.5484in">
        <draw:text-box>
          <text:p><text:span text:style-name="T1">1A H317: ≥ 0.0015%, Eye Dam. 1 H318: ≥ 0.6%, Eye Irrit. 2 H319: ≥ 0.06% - </text:span></text:p>
        </draw:text-box>
      </draw:frame>
      <draw:polygon text:anchor-type="page" text:anchor-page-number="6" draw:z-index="3270" draw:name="Shape2000" draw:style-name="gr2" draw:text-style-name="P3" svg:width="0.4917in" svg:height="0.1917in" svg:x="5.3331in" svg:y="2.5764in" svg:viewBox="0 0 1250 488" draw:points="0,0 1250,0 1250,488 0,488">
        <text:p/>
      </draw:polygon>
      <draw:frame text:anchor-type="page" text:anchor-page-number="14" draw:z-index="3269" draw:name="Shape4546" draw:style-name="gr1" draw:text-style-name="P2" svg:width="0.9524in" svg:height="0.1295in" svg:x="1.7882in" svg:y="4.9807in">
        <draw:text-box>
          <text:p><text:span text:style-name="T1">Tossico se ingerito.</text:span></text:p>
        </draw:text-box>
      </draw:frame>
      <draw:frame text:anchor-type="page" text:anchor-page-number="5" draw:z-index="3268" draw:name="Shape1338" draw:style-name="gr1" draw:text-style-name="P2" svg:width="0.0433in" svg:height="0.1925in" svg:x="0.411in" svg:y="7.9016in">
        <draw:text-box>
          <text:p><text:span text:style-name="T2"><text:s/></text:span></text:p>
        </draw:text-box>
      </draw:frame>
      <draw:polygon text:anchor-type="page" text:anchor-page-number="10" draw:z-index="3267" draw:name="Shape3722" draw:style-name="gr2" draw:text-style-name="P3" svg:width="2.3618in" svg:height="0.3831in" svg:x="0.363in" svg:y="9.2583in" svg:viewBox="0 0 6000 974" draw:points="0,0 6000,0 6000,974 0,974">
        <text:p/>
      </draw:polygon>
      <draw:frame text:anchor-type="page" text:anchor-page-number="7" draw:z-index="3266" draw:name="Shape2958" draw:style-name="gr1" draw:text-style-name="P2" svg:width="1.1268in" svg:height="0.1295in" svg:x="0.4535in" svg:y="7.9189in">
        <draw:text-box>
          <text:p><text:span text:style-name="T1">Punto di infiammabilità</text:span></text:p>
        </draw:text-box>
      </draw:frame>
      <draw:polygon text:anchor-type="page" text:anchor-page-number="2" draw:z-index="3265" draw:name="Shape572" draw:style-name="gr2" draw:text-style-name="P3" svg:width="1.8717in" svg:height="0.1283in" svg:x="0.4114in" svg:y="9.0665in" svg:viewBox="0 0 4755 327" draw:points="0,0 4755,0 4755,327 0,327">
        <text:p/>
      </draw:polygon>
      <draw:polygon text:anchor-type="page" text:anchor-page-number="1" draw:z-index="3264" draw:name="Shape242" draw:style-name="gr2" draw:text-style-name="P3" svg:width="2.7551in" svg:height="0.1913in" svg:x="0.363in" svg:y="6.1933in" svg:viewBox="0 0 6999 487" draw:points="0,0 6999,0 6999,487 0,487">
        <text:p/>
      </draw:polygon>
      <draw:frame text:anchor-type="page" text:anchor-page-number="5" draw:z-index="3263" draw:name="Shape1334" draw:style-name="gr1" draw:text-style-name="P2" svg:width="0.0433in" svg:height="0.1925in" svg:x="0.8366in" svg:y="7.7752in">
        <draw:text-box>
          <text:p><text:span text:style-name="T2"><text:s/></text:span></text:p>
        </draw:text-box>
      </draw:frame>
      <draw:polygon text:anchor-type="page" text:anchor-page-number="6" draw:z-index="3262" draw:name="Shape1999" draw:style-name="gr2" draw:text-style-name="P3" svg:width="0.5917in" svg:height="0.1917in" svg:x="5.2831in" svg:y="2.5764in" svg:viewBox="0 0 1504 488" draw:points="0,0 1504,0 1504,488 0,488">
        <text:p/>
      </draw:polygon>
      <draw:frame text:anchor-type="page" text:anchor-page-number="7" draw:z-index="3261" draw:name="Shape2952" draw:style-name="gr1" draw:text-style-name="P2" svg:width="0.0433in" svg:height="0.1925in" svg:x="0.411in" svg:y="7.8717in">
        <draw:text-box>
          <text:p><text:span text:style-name="T2"><text:s/></text:span></text:p>
        </draw:text-box>
      </draw:frame>
      <draw:polygon text:anchor-type="page" text:anchor-page-number="2" draw:z-index="3260" draw:name="Shape571" draw:style-name="gr2" draw:text-style-name="P3" svg:width="1.9685in" svg:height="0.1917in" svg:x="0.363in" svg:y="9.0665in" svg:viewBox="0 0 5001 488" draw:points="0,0 5001,0 5001,488 0,488">
        <text:p/>
      </draw:polygon>
      <draw:frame text:anchor-type="page" text:anchor-page-number="14" draw:z-index="3259" draw:name="Shape4534" draw:style-name="gr1" draw:text-style-name="P2" svg:width="0.0433in" svg:height="0.1925in" svg:x="0.6846in" svg:y="4.9181in">
        <draw:text-box>
          <text:p><text:span text:style-name="T2"><text:s/></text:span></text:p>
        </draw:text-box>
      </draw:frame>
      <draw:frame text:anchor-type="page" text:anchor-page-number="10" draw:z-index="3258" draw:name="Shape3709" draw:style-name="gr1" draw:text-style-name="P2" svg:width="0.0433in" svg:height="0.1925in" svg:x="4.0835in" svg:y="8.8299in">
        <draw:text-box>
          <text:p><text:span text:style-name="T2"><text:s/></text:span></text:p>
        </draw:text-box>
      </draw:frame>
      <draw:polygon text:anchor-type="page" text:anchor-page-number="3" draw:z-index="3257" draw:name="Shape899" draw:style-name="gr2" draw:text-style-name="P3" svg:width="3.8417in" svg:height="0.1283in" svg:x="3.363in" svg:y="4.6748in" svg:viewBox="0 0 9759 327" draw:points="0,0 9759,0 9759,327 0,327">
        <text:p/>
      </draw:polygon>
      <draw:frame text:anchor-type="page" text:anchor-page-number="1" draw:z-index="3256" draw:name="Shape239" draw:style-name="gr1" draw:text-style-name="P2" svg:width="1.1079in" svg:height="0.1295in" svg:x="3.1665in" svg:y="6.0654in">
        <draw:text-box>
          <text:p><text:span text:style-name="T3">63078 Spinetoli (AP) </text:span></text:p>
        </draw:text-box>
      </draw:frame>
      <draw:polygon text:anchor-type="page" text:anchor-page-number="14" draw:z-index="3255" draw:name="Shape4545" draw:style-name="gr2" draw:text-style-name="P3" svg:width="4.235in" svg:height="0.128in" svg:x="1.7882in" svg:y="4.9783in" svg:viewBox="0 0 10758 326" draw:points="0,0 10758,0 10758,326 0,326">
        <text:p/>
      </draw:polygon>
      <draw:polygon text:anchor-type="page" text:anchor-page-number="5" draw:z-index="3254" draw:name="Shape1342" draw:style-name="gr4" draw:text-style-name="P5" svg:width="7.3835in" svg:height="0.1268in" svg:x="0.4114in" svg:y="7.95in" svg:viewBox="0 0 18755 323" draw:points="0,0 18755,0 18755,323 0,323">
        <text:p/>
      </draw:polygon>
      <draw:frame text:anchor-type="page" text:anchor-page-number="7" draw:z-index="3253" draw:name="Shape2951" draw:style-name="gr1" draw:text-style-name="P2" svg:width="0.0433in" svg:height="0.1925in" svg:x="4.348in" svg:y="7.728in">
        <draw:text-box>
          <text:p><text:span text:style-name="T2"><text:s/></text:span></text:p>
        </draw:text-box>
      </draw:frame>
      <draw:frame text:anchor-type="page" text:anchor-page-number="1" draw:z-index="3252" draw:name="Shape231" draw:style-name="gr1" draw:text-style-name="P2" svg:width="0.0433in" svg:height="0.1925in" svg:x="1.2193in" svg:y="6.0193in">
        <draw:text-box>
          <text:p><text:span text:style-name="T2"><text:s/></text:span></text:p>
        </draw:text-box>
      </draw:frame>
      <draw:frame text:anchor-type="page" text:anchor-page-number="3" draw:z-index="3251" draw:name="Shape890" draw:style-name="gr1" draw:text-style-name="P2" svg:width="3.8189in" svg:height="0.1295in" svg:x="3.3634in" svg:y="4.422in">
        <draw:text-box>
          <text:p><text:span text:style-name="T1">Skin Corr. 1C H314: ≥ 0.6%, Skin Irrit. 2 H315: ≥ 0.06% - &lt; 0.6%, Skin Sens. </text:span></text:p>
        </draw:text-box>
      </draw:frame>
      <draw:frame text:anchor-type="page" text:anchor-page-number="10" draw:z-index="3250" draw:name="Shape3718" draw:style-name="gr1" draw:text-style-name="P2" svg:width="0.5268in" svg:height="0.1295in" svg:x="3.561in" svg:y="8.8772in">
        <draw:text-box>
          <text:p><text:span text:style-name="T1">&lt; 0.1 mg/l </text:span></text:p>
        </draw:text-box>
      </draw:frame>
      <draw:frame text:anchor-type="page" text:anchor-page-number="6" draw:z-index="3249" draw:name="Shape1995" draw:style-name="gr1" draw:text-style-name="P2" svg:width="0.0433in" svg:height="0.1925in" svg:x="3.561in" svg:y="2.5799in">
        <draw:text-box>
          <text:p><text:span text:style-name="T2"><text:s/></text:span></text:p>
        </draw:text-box>
      </draw:frame>
      <draw:frame text:anchor-type="page" text:anchor-page-number="2" draw:z-index="3248" draw:name="Shape558" draw:style-name="gr1" draw:text-style-name="P2" svg:width="0.0433in" svg:height="0.1925in" svg:x="5.05in" svg:y="8.828in">
        <draw:text-box>
          <text:p><text:span text:style-name="T2"><text:s/></text:span></text:p>
        </draw:text-box>
      </draw:frame>
      <draw:frame text:anchor-type="page" text:anchor-page-number="10" draw:z-index="3247" draw:name="Shape3719" draw:style-name="gr1" draw:text-style-name="P2" svg:width="0.0433in" svg:height="0.1925in" svg:x="2.7728in" svg:y="8.878in">
        <draw:text-box>
          <text:p><text:span text:style-name="T2"><text:s/></text:span></text:p>
        </draw:text-box>
      </draw:frame>
      <draw:polygon text:anchor-type="page" text:anchor-page-number="2" draw:z-index="3246" draw:name="Shape574" draw:style-name="gr2" draw:text-style-name="P3" svg:width="0.2965in" svg:height="0.1917in" svg:x="7.3016in" svg:y="8.8748in" svg:viewBox="0 0 754 488" draw:points="0,0 754,0 754,488 0,488">
        <text:p/>
      </draw:polygon>
      <draw:polygon text:anchor-type="page" text:anchor-page-number="1" draw:z-index="3245" draw:name="Shape238" draw:style-name="gr2" draw:text-style-name="P3" svg:width="4.6283in" svg:height="0.1283in" svg:x="3.1665in" svg:y="6.065in" svg:viewBox="0 0 11757 327" draw:points="0,0 11757,0 11757,327 0,327">
        <text:p/>
      </draw:polygon>
      <draw:polygon text:anchor-type="page" text:anchor-page-number="6" draw:z-index="3244" draw:name="Shape1997" draw:style-name="gr2" draw:text-style-name="P3" svg:width="1.0831in" svg:height="0.1917in" svg:x="4.1516in" svg:y="2.5764in" svg:viewBox="0 0 2752 488" draw:points="0,0 2752,0 2752,488 0,488">
        <text:p/>
      </draw:polygon>
      <draw:polygon text:anchor-type="page" text:anchor-page-number="14" draw:z-index="3243" draw:name="Shape4544" draw:style-name="gr2" draw:text-style-name="P3" svg:width="4.3319in" svg:height="0.1917in" svg:x="1.7398in" svg:y="4.978in" svg:viewBox="0 0 11004 488" draw:points="0,0 11004,0 11004,488 0,488">
        <text:p/>
      </draw:polygon>
      <draw:polygon text:anchor-type="page" text:anchor-page-number="5" draw:z-index="3242" draw:name="Shape1341" draw:style-name="gr4" draw:text-style-name="P5" svg:width="7.4803in" svg:height="0.1268in" svg:x="0.363in" svg:y="7.95in" svg:viewBox="0 0 19001 323" draw:points="0,0 19001,0 19001,323 0,323">
        <text:p/>
      </draw:polygon>
      <draw:polygon text:anchor-type="page" text:anchor-page-number="3" draw:z-index="3241" draw:name="Shape894" draw:style-name="gr2" draw:text-style-name="P3" svg:width="3.8417in" svg:height="0.1268in" svg:x="3.363in" svg:y="4.548in" svg:viewBox="0 0 9759 323" draw:points="0,0 9759,0 9759,323 0,323">
        <text:p/>
      </draw:polygon>
      <draw:polygon text:anchor-type="page" text:anchor-page-number="7" draw:z-index="3240" draw:name="Shape2955" draw:style-name="gr2" draw:text-style-name="P3" svg:width="2.265in" svg:height="0.1283in" svg:x="0.4114in" svg:y="7.9165in" svg:viewBox="0 0 5754 327" draw:points="0,0 5754,0 5754,327 0,327">
        <text:p/>
      </draw:polygon>
      <draw:polygon text:anchor-type="page" text:anchor-page-number="1" draw:z-index="3239" draw:name="Shape237" draw:style-name="gr2" draw:text-style-name="P3" svg:width="4.7252in" svg:height="0.1283in" svg:x="3.1181in" svg:y="6.065in" svg:viewBox="0 0 12003 327" draw:points="0,0 12003,0 12003,327 0,327">
        <text:p/>
      </draw:polygon>
      <draw:frame text:anchor-type="page" text:anchor-page-number="14" draw:z-index="3238" draw:name="Shape4543" draw:style-name="gr1" draw:text-style-name="P2" svg:width="0.2323in" svg:height="0.113in" svg:x="0.4535in" svg:y="4.9791in">
        <draw:text-box>
          <text:p><text:span text:style-name="T5">H301</text:span></text:p>
        </draw:text-box>
      </draw:frame>
      <draw:polygon text:anchor-type="page" text:anchor-page-number="10" draw:z-index="3237" draw:name="Shape3717" draw:style-name="gr2" draw:text-style-name="P3" svg:width="3.8402in" svg:height="0.1283in" svg:x="3.5614in" svg:y="8.8748in" svg:viewBox="0 0 9755 327" draw:points="0,0 9755,0 9755,327 0,327">
        <text:p/>
      </draw:polygon>
      <draw:polygon text:anchor-type="page" text:anchor-page-number="7" draw:z-index="3236" draw:name="Shape2954" draw:style-name="gr2" draw:text-style-name="P3" svg:width="2.3618in" svg:height="0.1917in" svg:x="0.363in" svg:y="7.9165in" svg:viewBox="0 0 6000 488" draw:points="0,0 6000,0 6000,488 0,488">
        <text:p/>
      </draw:polygon>
      <draw:frame text:anchor-type="page" text:anchor-page-number="3" draw:z-index="3235" draw:name="Shape891" draw:style-name="gr1" draw:text-style-name="P2" svg:width="0.0433in" svg:height="0.1925in" svg:x="2.3799in" svg:y="4.4228in">
        <draw:text-box>
          <text:p><text:span text:style-name="T2"><text:s/></text:span></text:p>
        </draw:text-box>
      </draw:frame>
      <draw:polygon text:anchor-type="page" text:anchor-page-number="6" draw:z-index="3234" draw:name="Shape1996" draw:style-name="gr2" draw:text-style-name="P3" svg:width="1.1799in" svg:height="0.1917in" svg:x="4.1031in" svg:y="2.5764in" svg:viewBox="0 0 2998 488" draw:points="0,0 2998,0 2998,488 0,488">
        <text:p/>
      </draw:polygon>
      <draw:polygon text:anchor-type="page" text:anchor-page-number="2" draw:z-index="3233" draw:name="Shape573" draw:style-name="gr2" draw:text-style-name="P3" svg:width="0.3933in" svg:height="0.1917in" svg:x="7.2531in" svg:y="8.8748in" svg:viewBox="0 0 1000 488" draw:points="0,0 1000,0 1000,488 0,488">
        <text:p/>
      </draw:polygon>
      <draw:frame text:anchor-type="page" text:anchor-page-number="5" draw:z-index="3232" draw:name="Shape1337" draw:style-name="gr1" draw:text-style-name="P2" svg:width="0.3787in" svg:height="0.1295in" svg:x="0.4535in" svg:y="7.822in">
        <draw:text-box>
          <text:p><text:span text:style-name="T3">TALCO</text:span></text:p>
        </draw:text-box>
      </draw:frame>
      <draw:frame text:anchor-type="page" text:anchor-page-number="5" draw:z-index="3231" draw:name="Shape1333" draw:style-name="gr1" draw:text-style-name="P2" svg:width="0.0433in" svg:height="0.1925in" svg:x="0.411in" svg:y="7.7752in">
        <draw:text-box>
          <text:p><text:span text:style-name="T2"><text:s/></text:span></text:p>
        </draw:text-box>
      </draw:frame>
      <draw:polygon text:anchor-type="page" text:anchor-page-number="3" draw:z-index="3230" draw:name="Shape893" draw:style-name="gr2" draw:text-style-name="P3" svg:width="3.8417in" svg:height="0.1283in" svg:x="3.363in" svg:y="4.4197in" svg:viewBox="0 0 9759 327" draw:points="0,0 9759,0 9759,327 0,327">
        <text:p/>
      </draw:polygon>
      <draw:frame text:anchor-type="page" text:anchor-page-number="6" draw:z-index="3229" draw:name="Shape1957" draw:style-name="gr1" draw:text-style-name="P2" svg:width="0.0433in" svg:height="0.1925in" svg:x="2.5417in" svg:y="2.5181in">
        <draw:text-box>
          <text:p><text:span text:style-name="T2"><text:s/></text:span></text:p>
        </draw:text-box>
      </draw:frame>
      <draw:frame text:anchor-type="page" text:anchor-page-number="2" draw:z-index="3228" draw:name="Shape567" draw:style-name="gr1" draw:text-style-name="P2" svg:width="1.698in" svg:height="0.1295in" svg:x="3.3634in" svg:y="8.8756in">
        <draw:text-box>
          <text:p><text:span text:style-name="T3">Classificazione 1272/2008 (CLP)</text:span></text:p>
        </draw:text-box>
      </draw:frame>
      <draw:frame text:anchor-type="page" text:anchor-page-number="1" draw:z-index="3227" draw:name="Shape236" draw:style-name="gr1" draw:text-style-name="P2" svg:width="0.7724in" svg:height="0.1295in" svg:x="0.4535in" svg:y="6.0665in">
        <draw:text-box>
          <text:p><text:span text:style-name="T1">Località e Stato</text:span></text:p>
        </draw:text-box>
      </draw:frame>
      <draw:frame text:anchor-type="page" text:anchor-page-number="7" draw:z-index="3226" draw:name="Shape2938" draw:style-name="gr1" draw:text-style-name="P2" svg:width="0.0433in" svg:height="0.1925in" svg:x="3.5154in" svg:y="7.6799in">
        <draw:text-box>
          <text:p><text:span text:style-name="T2"><text:s/></text:span></text:p>
        </draw:text-box>
      </draw:frame>
      <draw:polygon text:anchor-type="page" text:anchor-page-number="10" draw:z-index="3225" draw:name="Shape3713" draw:style-name="gr2" draw:text-style-name="P3" svg:width="3.937in" svg:height="0.1917in" svg:x="3.513in" svg:y="8.8748in" svg:viewBox="0 0 10001 488" draw:points="0,0 10001,0 10001,488 0,488">
        <text:p/>
      </draw:polygon>
      <draw:frame text:anchor-type="page" text:anchor-page-number="14" draw:z-index="3224" draw:name="Shape4533" draw:style-name="gr1" draw:text-style-name="P2" svg:width="0.0433in" svg:height="0.1925in" svg:x="0.411in" svg:y="4.9181in">
        <draw:text-box>
          <text:p><text:span text:style-name="T2"><text:s/></text:span></text:p>
        </draw:text-box>
      </draw:frame>
      <draw:polygon text:anchor-type="page" text:anchor-page-number="6" draw:z-index="3223" draw:name="Shape1994" draw:style-name="gr2" draw:text-style-name="P3" svg:width="0.4933in" svg:height="0.1917in" svg:x="3.5614in" svg:y="2.5764in" svg:viewBox="0 0 1254 488" draw:points="0,0 1254,0 1254,488 0,488">
        <text:p/>
      </draw:polygon>
      <draw:polygon text:anchor-type="page" text:anchor-page-number="3" draw:z-index="3222" draw:name="Shape892" draw:style-name="gr2" draw:text-style-name="P3" svg:width="3.9382in" svg:height="0.3835in" svg:x="3.315in" svg:y="4.4197in" svg:viewBox="0 0 10004 975" draw:points="0,0 10004,0 10004,975 0,975">
        <text:p/>
      </draw:polygon>
      <draw:frame text:anchor-type="page" text:anchor-page-number="14" draw:z-index="3221" draw:name="Shape4532" draw:style-name="gr1" draw:text-style-name="P2" svg:width="0.0433in" svg:height="0.1925in" svg:x="6.1193in" svg:y="4.7898in">
        <draw:text-box>
          <text:p><text:span text:style-name="T2"><text:s/></text:span></text:p>
        </draw:text-box>
      </draw:frame>
      <draw:frame text:anchor-type="page" text:anchor-page-number="1" draw:z-index="3220" draw:name="Shape230" draw:style-name="gr1" draw:text-style-name="P2" svg:width="0.0433in" svg:height="0.1925in" svg:x="0.411in" svg:y="6.0193in">
        <draw:text-box>
          <text:p><text:span text:style-name="T2"><text:s/></text:span></text:p>
        </draw:text-box>
      </draw:frame>
      <draw:frame text:anchor-type="page" text:anchor-page-number="2" draw:z-index="3219" draw:name="Shape557" draw:style-name="gr1" draw:text-style-name="P2" svg:width="0.0433in" svg:height="0.1925in" svg:x="2.8181in" svg:y="8.828in">
        <draw:text-box>
          <text:p><text:span text:style-name="T2"><text:s/></text:span></text:p>
        </draw:text-box>
      </draw:frame>
      <draw:frame text:anchor-type="page" text:anchor-page-number="10" draw:z-index="3218" draw:name="Shape3708" draw:style-name="gr1" draw:text-style-name="P2" svg:width="0.0433in" svg:height="0.1925in" svg:x="1.3547in" svg:y="8.8299in">
        <draw:text-box>
          <text:p><text:span text:style-name="T2"><text:s/></text:span></text:p>
        </draw:text-box>
      </draw:frame>
      <draw:frame text:anchor-type="page" text:anchor-page-number="5" draw:z-index="3217" draw:name="Shape1332" draw:style-name="gr1" draw:text-style-name="P2" svg:width="0.0433in" svg:height="0.1925in" svg:x="0.3634in" svg:y="7.6335in">
        <draw:text-box>
          <text:p><text:span text:style-name="T2"><text:s/></text:span></text:p>
        </draw:text-box>
      </draw:frame>
      <draw:polygon text:anchor-type="page" text:anchor-page-number="7" draw:z-index="3216" draw:name="Shape2957" draw:style-name="gr2" draw:text-style-name="P3" svg:width="2.265in" svg:height="0.1917in" svg:x="4.348in" svg:y="7.7248in" svg:viewBox="0 0 5754 488" draw:points="0,0 5754,0 5754,488 0,488">
        <text:p/>
      </draw:polygon>
      <draw:polygon text:anchor-type="page" text:anchor-page-number="6" draw:z-index="3215" draw:name="Shape1993" draw:style-name="gr2" draw:text-style-name="P3" svg:width="0.5902in" svg:height="0.1917in" svg:x="3.513in" svg:y="2.5764in" svg:viewBox="0 0 1500 488" draw:points="0,0 1500,0 1500,488 0,488">
        <text:p/>
      </draw:polygon>
      <draw:polygon text:anchor-type="page" text:anchor-page-number="7" draw:z-index="3214" draw:name="Shape2956" draw:style-name="gr2" draw:text-style-name="P3" svg:width="2.363in" svg:height="0.1917in" svg:x="4.3in" svg:y="7.7248in" svg:viewBox="0 0 6003 488" draw:points="0,0 6003,0 6003,488 0,488">
        <text:p/>
      </draw:polygon>
      <draw:frame text:anchor-type="page" text:anchor-page-number="1" draw:z-index="3213" draw:name="Shape220" draw:style-name="gr1" draw:text-style-name="P2" svg:width="0.0433in" svg:height="0.1925in" svg:x="4.3154in" svg:y="5.8898in">
        <draw:text-box>
          <text:p><text:span text:style-name="T2"><text:s/></text:span></text:p>
        </draw:text-box>
      </draw:frame>
      <draw:polygon text:anchor-type="page" text:anchor-page-number="10" draw:z-index="3212" draw:name="Shape3712" draw:style-name="gr2" draw:text-style-name="P3" svg:width="0.6898in" svg:height="0.1917in" svg:x="2.7732in" svg:y="8.8748in" svg:viewBox="0 0 1753 488" draw:points="0,0 1753,0 1753,488 0,488">
        <text:p/>
      </draw:polygon>
      <draw:frame text:anchor-type="page" text:anchor-page-number="3" draw:z-index="3211" draw:name="Shape880" draw:style-name="gr1" draw:text-style-name="P2" svg:width="0.0433in" svg:height="0.1925in" svg:x="0.7366in" svg:y="4.3752in">
        <draw:text-box>
          <text:p><text:span text:style-name="T2"><text:s/></text:span></text:p>
        </draw:text-box>
      </draw:frame>
      <draw:polygon text:anchor-type="page" text:anchor-page-number="5" draw:z-index="3210" draw:name="Shape1336" draw:style-name="gr5" draw:text-style-name="P6" svg:width="7.3835in" svg:height="0.128in" svg:x="0.4114in" svg:y="7.8217in" svg:viewBox="0 0 18755 326" draw:points="0,0 18755,0 18755,326 0,326">
        <text:p/>
      </draw:polygon>
      <draw:polygon text:anchor-type="page" text:anchor-page-number="14" draw:z-index="3209" draw:name="Shape4537" draw:style-name="gr2" draw:text-style-name="P3" svg:width="1.2799in" svg:height="0.1118in" svg:x="0.4114in" svg:y="4.978in" svg:viewBox="0 0 3252 285" draw:points="0,0 3252,0 3252,285 0,285">
        <text:p/>
      </draw:polygon>
      <draw:polygon text:anchor-type="page" text:anchor-page-number="2" draw:z-index="3208" draw:name="Shape566" draw:style-name="gr2" draw:text-style-name="P3" svg:width="3.8417in" svg:height="0.1283in" svg:x="3.363in" svg:y="8.8748in" svg:viewBox="0 0 9759 327" draw:points="0,0 9759,0 9759,327 0,327">
        <text:p/>
      </draw:polygon>
      <draw:frame text:anchor-type="page" text:anchor-page-number="7" draw:z-index="3207" draw:name="Shape2950" draw:style-name="gr1" draw:text-style-name="P2" svg:width="0.7476in" svg:height="0.1295in" svg:x="2.7728in" svg:y="7.7272in">
        <draw:text-box>
          <text:p><text:span text:style-name="T1">non disponibile</text:span></text:p>
        </draw:text-box>
      </draw:frame>
      <draw:frame text:anchor-type="page" text:anchor-page-number="6" draw:z-index="3206" draw:name="Shape1992" draw:style-name="gr1" draw:text-style-name="P2" svg:width="0.163in" svg:height="0.113in" svg:x="2.3799in" svg:y="2.5791in">
        <draw:text-box>
          <text:p><text:span text:style-name="T4"><text:s text:c="2"/>10</text:span></text:p>
        </draw:text-box>
      </draw:frame>
      <draw:polygon text:anchor-type="page" text:anchor-page-number="3" draw:z-index="3205" draw:name="Shape889" draw:style-name="gr2" draw:text-style-name="P3" svg:width="0.8866in" svg:height="0.1917in" svg:x="2.3799in" svg:y="4.4197in" svg:viewBox="0 0 2253 488" draw:points="0,0 2253,0 2253,488 0,488">
        <text:p/>
      </draw:polygon>
      <draw:polygon text:anchor-type="page" text:anchor-page-number="5" draw:z-index="3204" draw:name="Shape1335" draw:style-name="gr5" draw:text-style-name="P6" svg:width="7.4803in" svg:height="0.128in" svg:x="0.363in" svg:y="7.8217in" svg:viewBox="0 0 19001 326" draw:points="0,0 19001,0 19001,326 0,326">
        <text:p/>
      </draw:polygon>
      <draw:polygon text:anchor-type="page" text:anchor-page-number="10" draw:z-index="3203" draw:name="Shape3716" draw:style-name="gr2" draw:text-style-name="P3" svg:width="0.7882in" svg:height="0.1917in" svg:x="2.7248in" svg:y="8.8748in" svg:viewBox="0 0 2003 488" draw:points="0,0 2003,0 2003,488 0,488">
        <text:p/>
      </draw:polygon>
      <draw:polygon text:anchor-type="page" text:anchor-page-number="2" draw:z-index="3202" draw:name="Shape565" draw:style-name="gr2" draw:text-style-name="P3" svg:width="3.9382in" svg:height="0.1917in" svg:x="3.315in" svg:y="8.8748in" svg:viewBox="0 0 10004 488" draw:points="0,0 10004,0 10004,488 0,488">
        <text:p/>
      </draw:polygon>
      <draw:frame text:anchor-type="page" text:anchor-page-number="9" draw:z-index="3201" draw:name="Shape3480" draw:style-name="gr1" draw:text-style-name="P2" svg:width="0.0433in" svg:height="0.1925in" svg:x="0.3634in" svg:y="10.0445in">
        <draw:text-box>
          <text:p><text:span text:style-name="T2"><text:s/></text:span></text:p>
        </draw:text-box>
      </draw:frame>
      <draw:polygon text:anchor-type="page" text:anchor-page-number="1" draw:z-index="3200" draw:name="Shape233" draw:style-name="gr2" draw:text-style-name="P3" svg:width="2.6583in" svg:height="0.1283in" svg:x="0.4114in" svg:y="6.065in" svg:viewBox="0 0 6753 327" draw:points="0,0 6753,0 6753,327 0,327">
        <text:p/>
      </draw:polygon>
      <draw:polygon text:anchor-type="page" text:anchor-page-number="14" draw:z-index="3199" draw:name="Shape4536" draw:style-name="gr2" draw:text-style-name="P3" svg:width="1.3768in" svg:height="0.1917in" svg:x="0.363in" svg:y="4.978in" svg:viewBox="0 0 3498 488" draw:points="0,0 3498,0 3498,488 0,488">
        <text:p/>
      </draw:polygon>
      <draw:frame text:anchor-type="page" text:anchor-page-number="10" draw:z-index="3198" draw:name="Shape3715" draw:style-name="gr1" draw:text-style-name="P2" svg:width="0.9094in" svg:height="0.1295in" svg:x="0.4535in" svg:y="8.8772in">
        <draw:text-box>
          <text:p><text:span text:style-name="T1">Solubilità in acqua</text:span></text:p>
        </draw:text-box>
      </draw:frame>
      <draw:frame text:anchor-type="page" text:anchor-page-number="14" draw:z-index="3197" draw:name="Shape4526" draw:style-name="gr1" draw:text-style-name="P2" svg:width="0.0433in" svg:height="0.1925in" svg:x="2.628in" svg:y="4.7417in">
        <draw:text-box>
          <text:p><text:span text:style-name="T2"><text:s/></text:span></text:p>
        </draw:text-box>
      </draw:frame>
      <draw:frame text:anchor-type="page" text:anchor-page-number="9" draw:z-index="3196" draw:name="Shape3478" draw:style-name="gr1" draw:text-style-name="P2" svg:width="0.0433in" svg:height="0.1925in" svg:x="3.748in" svg:y="9.8681in">
        <draw:text-box>
          <text:p><text:span text:style-name="T2"><text:s/></text:span></text:p>
        </draw:text-box>
      </draw:frame>
      <draw:frame text:anchor-type="page" text:anchor-page-number="6" draw:z-index="3195" draw:name="Shape1956" draw:style-name="gr1" draw:text-style-name="P2" svg:width="0.0433in" svg:height="0.1925in" svg:x="1.7866in" svg:y="2.5181in">
        <draw:text-box>
          <text:p><text:span text:style-name="T2"><text:s/></text:span></text:p>
        </draw:text-box>
      </draw:frame>
      <draw:polygon text:anchor-type="page" text:anchor-page-number="3" draw:z-index="3194" draw:name="Shape888" draw:style-name="gr2" draw:text-style-name="P3" svg:width="0.9835in" svg:height="0.3835in" svg:x="2.3315in" svg:y="4.4197in" svg:viewBox="0 0 2499 975" draw:points="0,0 2499,0 2499,975 0,975">
        <text:p/>
      </draw:polygon>
      <draw:polygon text:anchor-type="page" text:anchor-page-number="1" draw:z-index="3193" draw:name="Shape232" draw:style-name="gr2" draw:text-style-name="P3" svg:width="2.7551in" svg:height="0.1283in" svg:x="0.363in" svg:y="6.065in" svg:viewBox="0 0 6999 327" draw:points="0,0 6999,0 6999,327 0,327">
        <text:p/>
      </draw:polygon>
      <draw:frame text:anchor-type="page" text:anchor-page-number="2" draw:z-index="3192" draw:name="Shape564" draw:style-name="gr1" draw:text-style-name="P2" svg:width="0.4425in" svg:height="0.1295in" svg:x="2.3799in" svg:y="8.8756in">
        <draw:text-box>
          <text:p><text:span text:style-name="T3">Conc. %</text:span></text:p>
        </draw:text-box>
      </draw:frame>
      <draw:frame text:anchor-type="page" text:anchor-page-number="7" draw:z-index="3191" draw:name="Shape2937" draw:style-name="gr1" draw:text-style-name="P2" svg:width="0.0433in" svg:height="0.1925in" svg:x="1.7929in" svg:y="7.6799in">
        <draw:text-box>
          <text:p><text:span text:style-name="T2"><text:s/></text:span></text:p>
        </draw:text-box>
      </draw:frame>
      <draw:frame text:anchor-type="page" text:anchor-page-number="5" draw:z-index="3190" draw:name="Shape1316" draw:style-name="gr1" draw:text-style-name="P2" svg:width="0.0433in" svg:height="0.1925in" svg:x="3.3252in" svg:y="7.3799in">
        <draw:text-box>
          <text:p><text:span text:style-name="T2"><text:s/></text:span></text:p>
        </draw:text-box>
      </draw:frame>
      <draw:frame text:anchor-type="page" text:anchor-page-number="5" draw:z-index="3189" draw:name="Shape1328" draw:style-name="gr1" draw:text-style-name="P2" svg:width="0.5488in" svg:height="0.113in" svg:x="2.7728in" svg:y="7.4402in">
        <draw:text-box>
          <text:p><text:span text:style-name="T4">ACGIH 2023</text:span></text:p>
        </draw:text-box>
      </draw:frame>
      <draw:polygon text:anchor-type="page" text:anchor-page-number="7" draw:z-index="3188" draw:name="Shape2949" draw:style-name="gr2" draw:text-style-name="P3" svg:width="1.4783in" svg:height="0.1283in" svg:x="2.7732in" svg:y="7.7248in" svg:viewBox="0 0 3756 327" draw:points="0,0 3756,0 3756,327 0,327">
        <text:p/>
      </draw:polygon>
      <draw:frame text:anchor-type="page" text:anchor-page-number="3" draw:z-index="3187" draw:name="Shape887" draw:style-name="gr1" draw:text-style-name="P2" svg:width="0.287in" svg:height="0.1295in" svg:x="0.4535in" svg:y="4.422in">
        <draw:text-box>
          <text:p><text:span text:style-name="T1">CE <text:s text:c="2"/>-</text:span></text:p>
        </draw:text-box>
      </draw:frame>
      <draw:frame text:anchor-type="page" text:anchor-page-number="10" draw:z-index="3186" draw:name="Shape3707" draw:style-name="gr1" draw:text-style-name="P2" svg:width="0.0433in" svg:height="0.1925in" svg:x="0.411in" svg:y="8.8299in">
        <draw:text-box>
          <text:p><text:span text:style-name="T2"><text:s/></text:span></text:p>
        </draw:text-box>
      </draw:frame>
      <draw:frame text:anchor-type="page" text:anchor-page-number="1" draw:z-index="3185" draw:name="Shape227" draw:style-name="gr1" draw:text-style-name="P2" svg:width="1.1531in" svg:height="0.1295in" svg:x="3.1665in" svg:y="5.9366in">
        <draw:text-box>
          <text:p><text:span text:style-name="T3">VIA IV NOVEMBRE 13</text:span></text:p>
        </draw:text-box>
      </draw:frame>
      <draw:frame text:anchor-type="page" text:anchor-page-number="9" draw:z-index="3184" draw:name="Shape3479" draw:style-name="gr1" draw:text-style-name="P2" svg:width="3.4071in" svg:height="0.1295in" svg:x="0.3634in" svg:y="9.9154in">
        <draw:text-box>
          <text:p><text:span text:style-name="T1">Non risponde ai criteri di classificazione per questa classe di pericolo</text:span></text:p>
        </draw:text-box>
      </draw:frame>
      <draw:polygon text:anchor-type="page" text:anchor-page-number="6" draw:z-index="3183" draw:name="Shape1991" draw:style-name="gr2" draw:text-style-name="P3" svg:width="1.0831in" svg:height="0.1118in" svg:x="2.3799in" svg:y="2.5764in" svg:viewBox="0 0 2752 285" draw:points="0,0 2752,0 2752,285 0,285">
        <text:p/>
      </draw:polygon>
      <draw:frame text:anchor-type="page" text:anchor-page-number="2" draw:z-index="3182" draw:name="Shape556" draw:style-name="gr1" draw:text-style-name="P2" svg:width="0.0433in" svg:height="0.1925in" svg:x="1.2252in" svg:y="8.828in">
        <draw:text-box>
          <text:p><text:span text:style-name="T2"><text:s/></text:span></text:p>
        </draw:text-box>
      </draw:frame>
      <draw:polygon text:anchor-type="page" text:anchor-page-number="14" draw:z-index="3181" draw:name="Shape4542" draw:style-name="gr2" draw:text-style-name="P3" svg:width="0.4933in" svg:height="0.1913in" svg:x="6.1197in" svg:y="4.7866in" svg:viewBox="0 0 1254 487" draw:points="0,0 1254,0 1254,487 0,487">
        <text:p/>
      </draw:polygon>
      <draw:frame text:anchor-type="page" text:anchor-page-number="10" draw:z-index="3180" draw:name="Shape3706" draw:style-name="gr1" draw:text-style-name="P2" svg:width="0.0433in" svg:height="0.1925in" svg:x="3.561in" svg:y="8.6862in">
        <draw:text-box>
          <text:p><text:span text:style-name="T2"><text:s/></text:span></text:p>
        </draw:text-box>
      </draw:frame>
      <draw:polygon text:anchor-type="page" text:anchor-page-number="7" draw:z-index="3179" draw:name="Shape2948" draw:style-name="gr2" draw:text-style-name="P3" svg:width="1.5752in" svg:height="0.1917in" svg:x="2.7248in" svg:y="7.7248in" svg:viewBox="0 0 4002 488" draw:points="0,0 4002,0 4002,488 0,488">
        <text:p/>
      </draw:polygon>
      <draw:frame text:anchor-type="page" text:anchor-page-number="9" draw:z-index="3178" draw:name="Shape3477" draw:style-name="gr1" draw:text-style-name="P2" svg:width="0.0433in" svg:height="0.1925in" svg:x="0.3634in" svg:y="9.7252in">
        <draw:text-box>
          <text:p><text:span text:style-name="T2"><text:s/></text:span></text:p>
        </draw:text-box>
      </draw:frame>
      <draw:polygon text:anchor-type="page" text:anchor-page-number="2" draw:z-index="3177" draw:name="Shape563" draw:style-name="gr2" draw:text-style-name="P3" svg:width="0.8866in" svg:height="0.1283in" svg:x="2.3799in" svg:y="8.8748in" svg:viewBox="0 0 2253 327" draw:points="0,0 2253,0 2253,327 0,327">
        <text:p/>
      </draw:polygon>
      <draw:frame text:anchor-type="page" text:anchor-page-number="3" draw:z-index="3176" draw:name="Shape879" draw:style-name="gr1" draw:text-style-name="P2" svg:width="0.0433in" svg:height="0.1925in" svg:x="0.411in" svg:y="4.3752in">
        <draw:text-box>
          <text:p><text:span text:style-name="T2"><text:s/></text:span></text:p>
        </draw:text-box>
      </draw:frame>
      <draw:frame text:anchor-type="page" text:anchor-page-number="1" draw:z-index="3175" draw:name="Shape222" draw:style-name="gr1" draw:text-style-name="P2" svg:width="0.0433in" svg:height="0.1925in" svg:x="0.8665in" svg:y="5.8917in">
        <draw:text-box>
          <text:p><text:span text:style-name="T2"><text:s/></text:span></text:p>
        </draw:text-box>
      </draw:frame>
      <draw:polygon text:anchor-type="page" text:anchor-page-number="14" draw:z-index="3174" draw:name="Shape4541" draw:style-name="gr2" draw:text-style-name="P3" svg:width="0.5898in" svg:height="0.1913in" svg:x="6.0717in" svg:y="4.7866in" svg:viewBox="0 0 1499 487" draw:points="0,0 1499,0 1499,487 0,487">
        <text:p/>
      </draw:polygon>
      <draw:polygon text:anchor-type="page" text:anchor-page-number="6" draw:z-index="3173" draw:name="Shape1990" draw:style-name="gr2" draw:text-style-name="P3" svg:width="1.1815in" svg:height="0.1917in" svg:x="2.3315in" svg:y="2.5764in" svg:viewBox="0 0 3002 488" draw:points="0,0 3002,0 3002,488 0,488">
        <text:p/>
      </draw:polygon>
      <draw:frame text:anchor-type="page" text:anchor-page-number="5" draw:z-index="3172" draw:name="Shape1315" draw:style-name="gr1" draw:text-style-name="P2" svg:width="0.0433in" svg:height="0.1925in" svg:x="1.7165in" svg:y="7.3799in">
        <draw:text-box>
          <text:p><text:span text:style-name="T2"><text:s/></text:span></text:p>
        </draw:text-box>
      </draw:frame>
      <draw:polygon text:anchor-type="page" text:anchor-page-number="10" draw:z-index="3171" draw:name="Shape3711" draw:style-name="gr2" draw:text-style-name="P3" svg:width="2.265in" svg:height="0.1283in" svg:x="0.4114in" svg:y="8.8748in" svg:viewBox="0 0 5754 327" draw:points="0,0 5754,0 5754,327 0,327">
        <text:p/>
      </draw:polygon>
      <draw:frame text:anchor-type="page" text:anchor-page-number="14" draw:z-index="3170" draw:name="Shape4540" draw:style-name="gr1" draw:text-style-name="P2" svg:width="0.8469in" svg:height="0.1295in" svg:x="1.7882in" svg:y="4.789in">
        <draw:text-box>
          <text:p><text:span text:style-name="T1">Letale se inalato.</text:span></text:p>
        </draw:text-box>
      </draw:frame>
      <draw:frame text:anchor-type="page" text:anchor-page-number="6" draw:z-index="3169" draw:name="Shape1989" draw:style-name="gr1" draw:text-style-name="P2" svg:width="0.1949in" svg:height="0.113in" svg:x="1.5917in" svg:y="2.5791in">
        <draw:text-box>
          <text:p><text:span text:style-name="T4">ESP</text:span></text:p>
        </draw:text-box>
      </draw:frame>
      <draw:polygon text:anchor-type="page" text:anchor-page-number="1" draw:z-index="3168" draw:name="Shape235" draw:style-name="gr2" draw:text-style-name="P3" svg:width="4.6283in" svg:height="0.1283in" svg:x="3.1665in" svg:y="5.9366in" svg:viewBox="0 0 11757 327" draw:points="0,0 11757,0 11757,327 0,327">
        <text:p/>
      </draw:polygon>
      <draw:polygon text:anchor-type="page" text:anchor-page-number="2" draw:z-index="3167" draw:name="Shape562" draw:style-name="gr2" draw:text-style-name="P3" svg:width="0.9835in" svg:height="0.1917in" svg:x="2.3315in" svg:y="8.8748in" svg:viewBox="0 0 2499 488" draw:points="0,0 2499,0 2499,488 0,488">
        <text:p/>
      </draw:polygon>
      <draw:frame text:anchor-type="page" text:anchor-page-number="3" draw:z-index="3166" draw:name="Shape873" draw:style-name="gr1" draw:text-style-name="P2" svg:width="0.0433in" svg:height="0.1925in" svg:x="7.3016in" svg:y="3.911in">
        <draw:text-box>
          <text:p><text:span text:style-name="T2"><text:s/></text:span></text:p>
        </draw:text-box>
      </draw:frame>
      <draw:frame text:anchor-type="page" text:anchor-page-number="7" draw:z-index="3165" draw:name="Shape2946" draw:style-name="gr1" draw:text-style-name="P2" svg:width="1.3504in" svg:height="0.1295in" svg:x="0.4535in" svg:y="7.7272in">
        <draw:text-box>
          <text:p><text:span text:style-name="T1">Limite superiore esplosività</text:span></text:p>
        </draw:text-box>
      </draw:frame>
      <draw:polygon text:anchor-type="page" text:anchor-page-number="5" draw:z-index="3164" draw:name="Shape1331" draw:style-name="gr2" draw:text-style-name="P3" svg:width="4.6283in" svg:height="0.1118in" svg:x="2.7732in" svg:y="7.4382in" svg:viewBox="0 0 11757 285" draw:points="0,0 11757,0 11757,285 0,285">
        <text:p/>
      </draw:polygon>
      <draw:frame text:anchor-type="page" text:anchor-page-number="9" draw:z-index="3163" draw:name="Shape3474" draw:style-name="gr1" draw:text-style-name="P2" svg:width="0.0433in" svg:height="0.1925in" svg:x="1.4429in" svg:y="9.548in">
        <draw:text-box>
          <text:p><text:span text:style-name="T2"><text:s/></text:span></text:p>
        </draw:text-box>
      </draw:frame>
      <draw:frame text:anchor-type="page" text:anchor-page-number="7" draw:z-index="3162" draw:name="Shape2936" draw:style-name="gr1" draw:text-style-name="P2" svg:width="0.0433in" svg:height="0.1925in" svg:x="0.411in" svg:y="7.6799in">
        <draw:text-box>
          <text:p><text:span text:style-name="T2"><text:s/></text:span></text:p>
        </draw:text-box>
      </draw:frame>
      <draw:polygon text:anchor-type="page" text:anchor-page-number="10" draw:z-index="3161" draw:name="Shape3710" draw:style-name="gr2" draw:text-style-name="P3" svg:width="2.3618in" svg:height="0.1917in" svg:x="0.363in" svg:y="8.8748in" svg:viewBox="0 0 6000 488" draw:points="0,0 6000,0 6000,488 0,488">
        <text:p/>
      </draw:polygon>
      <draw:frame text:anchor-type="page" text:anchor-page-number="14" draw:z-index="3160" draw:name="Shape4520" draw:style-name="gr1" draw:text-style-name="P2" svg:width="0.0433in" svg:height="0.1925in" svg:x="0.6846in" svg:y="4.7264in">
        <draw:text-box>
          <text:p><text:span text:style-name="T2"><text:s/></text:span></text:p>
        </draw:text-box>
      </draw:frame>
      <draw:polygon text:anchor-type="page" text:anchor-page-number="1" draw:z-index="3159" draw:name="Shape234" draw:style-name="gr2" draw:text-style-name="P3" svg:width="4.7252in" svg:height="0.1283in" svg:x="3.1181in" svg:y="5.9366in" svg:viewBox="0 0 12003 327" draw:points="0,0 12003,0 12003,327 0,327">
        <text:p/>
      </draw:polygon>
      <draw:frame text:anchor-type="page" text:anchor-page-number="2" draw:z-index="3158" draw:name="Shape561" draw:style-name="gr1" draw:text-style-name="P2" svg:width="0.778in" svg:height="0.1295in" svg:x="0.4535in" svg:y="8.8756in">
        <draw:text-box>
          <text:p><text:span text:style-name="T3">Identificazione</text:span></text:p>
        </draw:text-box>
      </draw:frame>
      <draw:polygon text:anchor-type="page" text:anchor-page-number="3" draw:z-index="3157" draw:name="Shape882" draw:style-name="gr2" draw:text-style-name="P3" svg:width="1.8717in" svg:height="0.1283in" svg:x="0.4114in" svg:y="4.4197in" svg:viewBox="0 0 4755 327" draw:points="0,0 4755,0 4755,327 0,327">
        <text:p/>
      </draw:polygon>
      <draw:polygon text:anchor-type="page" text:anchor-page-number="9" draw:z-index="3156" draw:name="Shape3476" draw:style-name="gr3" draw:text-style-name="P4" svg:width="1.0803in" svg:height="0.0083in" svg:x="0.363in" svg:y="9.7083in" svg:viewBox="0 0 2745 22" draw:points="0,0 2745,0 2745,22 0,22">
        <text:p/>
      </draw:polygon>
      <draw:polygon text:anchor-type="page" text:anchor-page-number="5" draw:z-index="3155" draw:name="Shape1330" draw:style-name="gr2" draw:text-style-name="P3" svg:width="4.7252in" svg:height="0.1917in" svg:x="2.7248in" svg:y="7.4382in" svg:viewBox="0 0 12003 488" draw:points="0,0 12003,0 12003,488 0,488">
        <text:p/>
      </draw:polygon>
      <draw:frame text:anchor-type="page" text:anchor-page-number="6" draw:z-index="3154" draw:name="Shape1955" draw:style-name="gr1" draw:text-style-name="P2" svg:width="0.0433in" svg:height="0.1925in" svg:x="0.6366in" svg:y="2.5181in">
        <draw:text-box>
          <text:p><text:span text:style-name="T2"><text:s/></text:span></text:p>
        </draw:text-box>
      </draw:frame>
      <draw:polygon text:anchor-type="page" text:anchor-page-number="3" draw:z-index="3153" draw:name="Shape881" draw:style-name="gr2" draw:text-style-name="P3" svg:width="1.9685in" svg:height="0.3835in" svg:x="0.363in" svg:y="4.4197in" svg:viewBox="0 0 5001 975" draw:points="0,0 5001,0 5001,975 0,975">
        <text:p/>
      </draw:polygon>
      <draw:polygon text:anchor-type="page" text:anchor-page-number="14" draw:z-index="3152" draw:name="Shape4539" draw:style-name="gr2" draw:text-style-name="P3" svg:width="4.235in" svg:height="0.1283in" svg:x="1.7882in" svg:y="4.7866in" svg:viewBox="0 0 10758 327" draw:points="0,0 10758,0 10758,327 0,327">
        <text:p/>
      </draw:polygon>
      <draw:frame text:anchor-type="page" text:anchor-page-number="9" draw:z-index="3151" draw:name="Shape3475" draw:style-name="gr1" draw:text-style-name="P2" svg:width="1.0886in" svg:height="0.1295in" svg:x="0.3634in" svg:y="9.5953in">
        <draw:text-box>
          <text:p><text:span text:style-name="T1">CANCEROGENICITÀ</text:span></text:p>
        </draw:text-box>
      </draw:frame>
      <draw:frame text:anchor-type="page" text:anchor-page-number="5" draw:z-index="3150" draw:name="Shape1327" draw:style-name="gr1" draw:text-style-name="P2" svg:width="0.5039in" svg:height="0.113in" svg:x="1.198in" svg:y="7.4402in">
        <draw:text-box>
          <text:p><text:span text:style-name="T4">TLV-ACGIH</text:span></text:p>
        </draw:text-box>
      </draw:frame>
      <draw:frame text:anchor-type="page" text:anchor-page-number="10" draw:z-index="3149" draw:name="Shape3704" draw:style-name="gr1" draw:text-style-name="P2" svg:width="0.0433in" svg:height="0.1925in" svg:x="2.7728in" svg:y="8.6862in">
        <draw:text-box>
          <text:p><text:span text:style-name="T2"><text:s/></text:span></text:p>
        </draw:text-box>
      </draw:frame>
      <draw:frame text:anchor-type="page" text:anchor-page-number="7" draw:z-index="3148" draw:name="Shape2935" draw:style-name="gr1" draw:text-style-name="P2" svg:width="0.0433in" svg:height="0.1925in" svg:x="4.348in" svg:y="7.5362in">
        <draw:text-box>
          <text:p><text:span text:style-name="T2"><text:s/></text:span></text:p>
        </draw:text-box>
      </draw:frame>
      <draw:frame text:anchor-type="page" text:anchor-page-number="1" draw:z-index="3147" draw:name="Shape228" draw:style-name="gr1" draw:text-style-name="P2" svg:width="0.4185in" svg:height="0.1295in" svg:x="0.4535in" svg:y="5.939in">
        <draw:text-box>
          <text:p><text:span text:style-name="T1">Indirizzo</text:span></text:p>
        </draw:text-box>
      </draw:frame>
      <draw:frame text:anchor-type="page" text:anchor-page-number="2" draw:z-index="3146" draw:name="Shape555" draw:style-name="gr1" draw:text-style-name="P2" svg:width="0.0433in" svg:height="0.1925in" svg:x="0.411in" svg:y="8.828in">
        <draw:text-box>
          <text:p><text:span text:style-name="T2"><text:s/></text:span></text:p>
        </draw:text-box>
      </draw:frame>
      <draw:polygon text:anchor-type="page" text:anchor-page-number="6" draw:z-index="3145" draw:name="Shape1982" draw:style-name="gr2" draw:text-style-name="P3" svg:width="0.6917in" svg:height="0.1118in" svg:x="1.5913in" svg:y="2.5764in" svg:viewBox="0 0 1758 285" draw:points="0,0 1758,0 1758,285 0,285">
        <text:p/>
      </draw:polygon>
      <draw:frame text:anchor-type="page" text:anchor-page-number="9" draw:z-index="3144" draw:name="Shape3473" draw:style-name="gr1" draw:text-style-name="P2" svg:width="0.0433in" svg:height="0.1925in" svg:x="0.3634in" svg:y="9.4063in">
        <draw:text-box>
          <text:p><text:span text:style-name="T2"><text:s/></text:span></text:p>
        </draw:text-box>
      </draw:frame>
      <draw:frame text:anchor-type="page" text:anchor-page-number="1" draw:z-index="3143" draw:name="Shape221" draw:style-name="gr1" draw:text-style-name="P2" svg:width="0.0433in" svg:height="0.1925in" svg:x="0.411in" svg:y="5.8917in">
        <draw:text-box>
          <text:p><text:span text:style-name="T2"><text:s/></text:span></text:p>
        </draw:text-box>
      </draw:frame>
      <draw:polygon text:anchor-type="page" text:anchor-page-number="14" draw:z-index="3142" draw:name="Shape4538" draw:style-name="gr2" draw:text-style-name="P3" svg:width="4.3319in" svg:height="0.1913in" svg:x="1.7398in" svg:y="4.7866in" svg:viewBox="0 0 11004 487" draw:points="0,0 11004,0 11004,487 0,487">
        <text:p/>
      </draw:polygon>
      <draw:polygon text:anchor-type="page" text:anchor-page-number="6" draw:z-index="3141" draw:name="Shape1979" draw:style-name="gr2" draw:text-style-name="P3" svg:width="0.7882in" svg:height="0.1917in" svg:x="1.5433in" svg:y="2.5764in" svg:viewBox="0 0 2003 488" draw:points="0,0 2003,0 2003,488 0,488">
        <text:p/>
      </draw:polygon>
      <draw:polygon text:anchor-type="page" text:anchor-page-number="10" draw:z-index="3140" draw:name="Shape3714" draw:style-name="gr2" draw:text-style-name="P3" svg:width="3.8402in" svg:height="0.1917in" svg:x="3.5614in" svg:y="8.6831in" svg:viewBox="0 0 9755 488" draw:points="0,0 9755,0 9755,488 0,488">
        <text:p/>
      </draw:polygon>
      <draw:frame text:anchor-type="page" text:anchor-page-number="3" draw:z-index="3139" draw:name="Shape878" draw:style-name="gr1" draw:text-style-name="P2" svg:width="0.0433in" svg:height="0.1925in" svg:x="5.1882in" svg:y="4.2465in">
        <draw:text-box>
          <text:p><text:span text:style-name="T2"><text:s/></text:span></text:p>
        </draw:text-box>
      </draw:frame>
      <draw:frame text:anchor-type="page" text:anchor-page-number="2" draw:z-index="3138" draw:name="Shape554" draw:style-name="gr1" draw:text-style-name="P2" svg:width="0.0433in" svg:height="0.1925in" svg:x="0.3634in" svg:y="8.6862in">
        <draw:text-box>
          <text:p><text:span text:style-name="T2"><text:s/></text:span></text:p>
        </draw:text-box>
      </draw:frame>
      <draw:frame text:anchor-type="page" text:anchor-page-number="5" draw:z-index="3137" draw:name="Shape1329" draw:style-name="gr1" draw:text-style-name="P2" svg:width="0.085in" svg:height="0.1925in" svg:x="0.411in" svg:y="7.4417in">
        <draw:text-box>
          <text:p><text:span text:style-name="T2"><text:s text:c="2"/></text:span></text:p>
        </draw:text-box>
      </draw:frame>
      <draw:polygon text:anchor-type="page" text:anchor-page-number="7" draw:z-index="3136" draw:name="Shape2940" draw:style-name="gr2" draw:text-style-name="P3" svg:width="2.265in" svg:height="0.1283in" svg:x="0.4114in" svg:y="7.7248in" svg:viewBox="0 0 5754 327" draw:points="0,0 5754,0 5754,327 0,327">
        <text:p/>
      </draw:polygon>
      <draw:polygon text:anchor-type="page" text:anchor-page-number="5" draw:z-index="3135" draw:name="Shape1322" draw:style-name="gr2" draw:text-style-name="P3" svg:width="1.4783in" svg:height="0.1118in" svg:x="1.198in" svg:y="7.4382in" svg:viewBox="0 0 3756 285" draw:points="0,0 3756,0 3756,285 0,285">
        <text:p/>
      </draw:polygon>
      <draw:frame text:anchor-type="page" text:anchor-page-number="9" draw:z-index="3134" draw:name="Shape3471" draw:style-name="gr1" draw:text-style-name="P2" svg:width="0.0433in" svg:height="0.1925in" svg:x="3.748in" svg:y="9.2299in">
        <draw:text-box>
          <text:p><text:span text:style-name="T2"><text:s/></text:span></text:p>
        </draw:text-box>
      </draw:frame>
      <draw:frame text:anchor-type="page" text:anchor-page-number="14" draw:z-index="3133" draw:name="Shape4531" draw:style-name="gr1" draw:text-style-name="P2" svg:width="0.2323in" svg:height="0.113in" svg:x="0.4535in" svg:y="4.7874in">
        <draw:text-box>
          <text:p><text:span text:style-name="T5">H330</text:span></text:p>
        </draw:text-box>
      </draw:frame>
      <draw:frame text:anchor-type="page" text:anchor-page-number="1" draw:z-index="3132" draw:name="Shape213" draw:style-name="gr1" draw:text-style-name="P2" svg:width="0.0433in" svg:height="0.1925in" svg:x="4.1165in" svg:y="5.761in">
        <draw:text-box>
          <text:p><text:span text:style-name="T2"><text:s/></text:span></text:p>
        </draw:text-box>
      </draw:frame>
      <draw:polygon text:anchor-type="page" text:anchor-page-number="10" draw:z-index="3131" draw:name="Shape3705" draw:style-name="gr2" draw:text-style-name="P3" svg:width="3.937in" svg:height="0.1917in" svg:x="3.513in" svg:y="8.6831in" svg:viewBox="0 0 10001 488" draw:points="0,0 10001,0 10001,488 0,488">
        <text:p/>
      </draw:polygon>
      <draw:polygon text:anchor-type="page" text:anchor-page-number="2" draw:z-index="3130" draw:name="Shape560" draw:style-name="gr2" draw:text-style-name="P3" svg:width="1.8717in" svg:height="0.1283in" svg:x="0.4114in" svg:y="8.8748in" svg:viewBox="0 0 4755 327" draw:points="0,0 4755,0 4755,327 0,327">
        <text:p/>
      </draw:polygon>
      <draw:polygon text:anchor-type="page" text:anchor-page-number="7" draw:z-index="3129" draw:name="Shape2939" draw:style-name="gr2" draw:text-style-name="P3" svg:width="2.3618in" svg:height="0.1917in" svg:x="0.363in" svg:y="7.7248in" svg:viewBox="0 0 6000 488" draw:points="0,0 6000,0 6000,488 0,488">
        <text:p/>
      </draw:polygon>
      <draw:polygon text:anchor-type="page" text:anchor-page-number="3" draw:z-index="3128" draw:name="Shape886" draw:style-name="gr2" draw:text-style-name="P3" svg:width="0.2965in" svg:height="0.1913in" svg:x="7.3016in" svg:y="3.9083in" svg:viewBox="0 0 754 487" draw:points="0,0 754,0 754,487 0,487">
        <text:p/>
      </draw:polygon>
      <draw:frame text:anchor-type="page" text:anchor-page-number="6" draw:z-index="3127" draw:name="Shape1978" draw:style-name="gr1" draw:text-style-name="P2" svg:width="0.1843in" svg:height="0.113in" svg:x="0.4535in" svg:y="2.5791in">
        <draw:text-box>
          <text:p><text:span text:style-name="T4">VLA</text:span></text:p>
        </draw:text-box>
      </draw:frame>
      <draw:polygon text:anchor-type="page" text:anchor-page-number="2" draw:z-index="3126" draw:name="Shape559" draw:style-name="gr2" draw:text-style-name="P3" svg:width="1.9685in" svg:height="0.1917in" svg:x="0.363in" svg:y="8.8748in" svg:viewBox="0 0 5001 488" draw:points="0,0 5001,0 5001,488 0,488">
        <text:p/>
      </draw:polygon>
      <draw:frame text:anchor-type="page" text:anchor-page-number="10" draw:z-index="3125" draw:name="Shape3698" draw:style-name="gr1" draw:text-style-name="P2" svg:width="0.0433in" svg:height="0.1925in" svg:x="0.8228in" svg:y="8.6374in">
        <draw:text-box>
          <text:p><text:span text:style-name="T2"><text:s/></text:span></text:p>
        </draw:text-box>
      </draw:frame>
      <draw:polygon text:anchor-type="page" text:anchor-page-number="5" draw:z-index="3124" draw:name="Shape1319" draw:style-name="gr2" draw:text-style-name="P3" svg:width="1.5752in" svg:height="0.1917in" svg:x="1.15in" svg:y="7.4382in" svg:viewBox="0 0 4002 488" draw:points="0,0 4002,0 4002,488 0,488">
        <text:p/>
      </draw:polygon>
      <draw:frame text:anchor-type="page" text:anchor-page-number="7" draw:z-index="3123" draw:name="Shape2929" draw:style-name="gr1" draw:text-style-name="P2" svg:width="0.0433in" svg:height="0.1925in" svg:x="3.5154in" svg:y="7.4874in">
        <draw:text-box>
          <text:p><text:span text:style-name="T2"><text:s/></text:span></text:p>
        </draw:text-box>
      </draw:frame>
      <draw:polygon text:anchor-type="page" text:anchor-page-number="1" draw:z-index="3122" draw:name="Shape224" draw:style-name="gr2" draw:text-style-name="P3" svg:width="2.6583in" svg:height="0.1283in" svg:x="0.4114in" svg:y="5.9366in" svg:viewBox="0 0 6753 327" draw:points="0,0 6753,0 6753,327 0,327">
        <text:p/>
      </draw:polygon>
      <draw:frame text:anchor-type="page" text:anchor-page-number="6" draw:z-index="3121" draw:name="Shape1954" draw:style-name="gr1" draw:text-style-name="P2" svg:width="0.0433in" svg:height="0.1925in" svg:x="0.411in" svg:y="2.5181in">
        <draw:text-box>
          <text:p><text:span text:style-name="T2"><text:s/></text:span></text:p>
        </draw:text-box>
      </draw:frame>
      <draw:polygon text:anchor-type="page" text:anchor-page-number="3" draw:z-index="3120" draw:name="Shape885" draw:style-name="gr2" draw:text-style-name="P3" svg:width="0.3933in" svg:height="0.5114in" svg:x="7.2531in" svg:y="3.9083in" svg:viewBox="0 0 1000 1300" draw:points="0,0 1000,0 1000,1300 0,1300">
        <text:p/>
      </draw:polygon>
      <draw:frame text:anchor-type="page" text:anchor-page-number="14" draw:z-index="3119" draw:name="Shape4525" draw:style-name="gr1" draw:text-style-name="P2" svg:width="0.0433in" svg:height="0.1925in" svg:x="0.411in" svg:y="4.7264in">
        <draw:text-box>
          <text:p><text:span text:style-name="T2"><text:s/></text:span></text:p>
        </draw:text-box>
      </draw:frame>
      <draw:frame text:anchor-type="page" text:anchor-page-number="9" draw:z-index="3118" draw:name="Shape3472" draw:style-name="gr1" draw:text-style-name="P2" svg:width="3.4071in" svg:height="0.1295in" svg:x="0.3634in" svg:y="9.2772in">
        <draw:text-box>
          <text:p><text:span text:style-name="T1">Non risponde ai criteri di classificazione per questa classe di pericolo</text:span></text:p>
        </draw:text-box>
      </draw:frame>
      <draw:polygon text:anchor-type="page" text:anchor-page-number="1" draw:z-index="3117" draw:name="Shape223" draw:style-name="gr2" draw:text-style-name="P3" svg:width="2.7551in" svg:height="0.1283in" svg:x="0.363in" svg:y="5.9366in" svg:viewBox="0 0 6999 327" draw:points="0,0 6999,0 6999,327 0,327">
        <text:p/>
      </draw:polygon>
      <draw:polygon text:anchor-type="page" text:anchor-page-number="10" draw:z-index="3116" draw:name="Shape3703" draw:style-name="gr2" draw:text-style-name="P3" svg:width="0.6898in" svg:height="0.1917in" svg:x="2.7732in" svg:y="8.6831in" svg:viewBox="0 0 1753 488" draw:points="0,0 1753,0 1753,488 0,488">
        <text:p/>
      </draw:polygon>
      <draw:frame text:anchor-type="page" text:anchor-page-number="5" draw:z-index="3115" draw:name="Shape1311" draw:style-name="gr1" draw:text-style-name="P2" svg:width="0.0433in" svg:height="0.1925in" svg:x="5.361in" svg:y="7.2681in">
        <draw:text-box>
          <text:p><text:span text:style-name="T2"><text:s/></text:span></text:p>
        </draw:text-box>
      </draw:frame>
      <draw:frame text:anchor-type="page" text:anchor-page-number="6" draw:z-index="3114" draw:name="Shape1925" draw:style-name="gr1" draw:text-style-name="P2" svg:width="0.0433in" svg:height="0.1925in" svg:x="7.05in" svg:y="2.3161in">
        <draw:text-box>
          <text:p><text:span text:style-name="T2"><text:s/></text:span></text:p>
        </draw:text-box>
      </draw:frame>
      <draw:frame text:anchor-type="page" text:anchor-page-number="9" draw:z-index="3113" draw:name="Shape3470" draw:style-name="gr1" draw:text-style-name="P2" svg:width="0.0433in" svg:height="0.1925in" svg:x="0.3634in" svg:y="9.0862in">
        <draw:text-box>
          <text:p><text:span text:style-name="T2"><text:s/></text:span></text:p>
        </draw:text-box>
      </draw:frame>
      <draw:frame text:anchor-type="page" text:anchor-page-number="3" draw:z-index="3112" draw:name="Shape884" draw:style-name="gr1" draw:text-style-name="P2" svg:width="1.8378in" svg:height="0.1295in" svg:x="3.3634in" svg:y="4.2937in">
        <draw:text-box>
          <text:p><text:span text:style-name="T1">l'allegato VI del Regolamento CLP: B</text:span></text:p>
        </draw:text-box>
      </draw:frame>
      <draw:frame text:anchor-type="page" text:anchor-page-number="2" draw:z-index="3111" draw:name="Shape553" draw:style-name="gr1" draw:text-style-name="P2" svg:width="0.5114in" svg:height="0.1295in" svg:x="0.3634in" svg:y="8.5571in">
        <draw:text-box>
          <text:p><text:span text:style-name="T1">Contiene: </text:span></text:p>
        </draw:text-box>
      </draw:frame>
      <draw:frame text:anchor-type="page" text:anchor-page-number="14" draw:z-index="3110" draw:name="Shape4524" draw:style-name="gr1" draw:text-style-name="P2" svg:width="0.0433in" svg:height="0.1925in" svg:x="6.1193in" svg:y="4.598in">
        <draw:text-box>
          <text:p><text:span text:style-name="T2"><text:s/></text:span></text:p>
        </draw:text-box>
      </draw:frame>
      <draw:polygon text:anchor-type="page" text:anchor-page-number="7" draw:z-index="3109" draw:name="Shape2945" draw:style-name="gr2" draw:text-style-name="P3" svg:width="2.265in" svg:height="0.1917in" svg:x="4.348in" svg:y="7.5331in" svg:viewBox="0 0 5754 488" draw:points="0,0 5754,0 5754,488 0,488">
        <text:p/>
      </draw:polygon>
      <draw:frame text:anchor-type="page" text:anchor-page-number="2" draw:z-index="3108" draw:name="Shape552" draw:style-name="gr1" draw:text-style-name="P2" svg:width="0.0433in" svg:height="0.1925in" svg:x="0.3634in" svg:y="8.3681in">
        <draw:text-box>
          <text:p><text:span text:style-name="T2"><text:s/></text:span></text:p>
        </draw:text-box>
      </draw:frame>
      <draw:polygon text:anchor-type="page" text:anchor-page-number="14" draw:z-index="3107" draw:name="Shape4528" draw:style-name="gr2" draw:text-style-name="P3" svg:width="1.2799in" svg:height="0.1114in" svg:x="0.4114in" svg:y="4.7866in" svg:viewBox="0 0 3252 284" draw:points="0,0 3252,0 3252,284 0,284">
        <text:p/>
      </draw:polygon>
      <draw:frame text:anchor-type="page" text:anchor-page-number="3" draw:z-index="3106" draw:name="Shape877" draw:style-name="gr1" draw:text-style-name="P2" svg:width="3.6961in" svg:height="0.1295in" svg:x="3.3634in" svg:y="4.1654in">
        <draw:text-box>
          <text:p><text:span text:style-name="T1">Aquatic Chronic 1 H410 M=100, EUH071, Nota di classificazione secondo </text:span></text:p>
        </draw:text-box>
      </draw:frame>
      <draw:polygon text:anchor-type="page" text:anchor-page-number="5" draw:z-index="3105" draw:name="Shape1317" draw:style-name="gr2" draw:text-style-name="P3" svg:width="0.6902in" svg:height="0.1917in" svg:x="0.4114in" svg:y="7.4382in" svg:viewBox="0 0 1754 488" draw:points="0,0 1754,0 1754,488 0,488">
        <text:p/>
      </draw:polygon>
      <draw:polygon text:anchor-type="page" text:anchor-page-number="6" draw:z-index="3104" draw:name="Shape1975" draw:style-name="gr2" draw:text-style-name="P3" svg:width="1.0835in" svg:height="0.1118in" svg:x="0.4114in" svg:y="2.5764in" svg:viewBox="0 0 2753 285" draw:points="0,0 2753,0 2753,285 0,285">
        <text:p/>
      </draw:polygon>
      <draw:polygon text:anchor-type="page" text:anchor-page-number="10" draw:z-index="3103" draw:name="Shape3702" draw:style-name="gr2" draw:text-style-name="P3" svg:width="0.7882in" svg:height="0.1917in" svg:x="2.7248in" svg:y="8.6831in" svg:viewBox="0 0 2003 488" draw:points="0,0 2003,0 2003,488 0,488">
        <text:p/>
      </draw:polygon>
      <draw:polygon text:anchor-type="page" text:anchor-page-number="7" draw:z-index="3102" draw:name="Shape2944" draw:style-name="gr2" draw:text-style-name="P3" svg:width="2.363in" svg:height="0.1917in" svg:x="4.3in" svg:y="7.5331in" svg:viewBox="0 0 6003 488" draw:points="0,0 6003,0 6003,488 0,488">
        <text:p/>
      </draw:polygon>
      <draw:frame text:anchor-type="page" text:anchor-page-number="1" draw:z-index="3101" draw:name="Shape216" draw:style-name="gr1" draw:text-style-name="P2" svg:width="0.9496in" svg:height="0.1295in" svg:x="3.1665in" svg:y="5.8083in">
        <draw:text-box>
          <text:p><text:span text:style-name="T3">ITALMONT S.R.L. </text:span></text:p>
        </draw:text-box>
      </draw:frame>
      <draw:frame text:anchor-type="page" text:anchor-page-number="9" draw:z-index="3100" draw:name="Shape3467" draw:style-name="gr1" draw:text-style-name="P2" svg:width="0.0433in" svg:height="0.1925in" svg:x="2.7535in" svg:y="8.9098in">
        <draw:text-box>
          <text:p><text:span text:style-name="T2"><text:s/></text:span></text:p>
        </draw:text-box>
      </draw:frame>
      <draw:frame text:anchor-type="page" text:anchor-page-number="1" draw:z-index="3099" draw:name="Shape215" draw:style-name="gr1" draw:text-style-name="P2" svg:width="0.0433in" svg:height="0.1925in" svg:x="1.2634in" svg:y="5.7634in">
        <draw:text-box>
          <text:p><text:span text:style-name="T2"><text:s/></text:span></text:p>
        </draw:text-box>
      </draw:frame>
      <draw:polygon text:anchor-type="page" text:anchor-page-number="3" draw:z-index="3098" draw:name="Shape883" draw:style-name="gr2" draw:text-style-name="P3" svg:width="3.8417in" svg:height="0.1283in" svg:x="3.363in" svg:y="4.2913in" svg:viewBox="0 0 9759 327" draw:points="0,0 9759,0 9759,327 0,327">
        <text:p/>
      </draw:polygon>
      <draw:polygon text:anchor-type="page" text:anchor-page-number="14" draw:z-index="3097" draw:name="Shape4527" draw:style-name="gr2" draw:text-style-name="P3" svg:width="1.3768in" svg:height="0.1913in" svg:x="0.363in" svg:y="4.7866in" svg:viewBox="0 0 3498 487" draw:points="0,0 3498,0 3498,487 0,487">
        <text:p/>
      </draw:polygon>
      <draw:frame text:anchor-type="page" text:anchor-page-number="2" draw:z-index="3096" draw:name="Shape548" draw:style-name="gr1" draw:text-style-name="P2" svg:width="0.0433in" svg:height="0.1925in" svg:x="1.0717in" svg:y="8.1898in">
        <draw:text-box>
          <text:p><text:span text:style-name="T2"><text:s/></text:span></text:p>
        </draw:text-box>
      </draw:frame>
      <draw:frame text:anchor-type="page" text:anchor-page-number="7" draw:z-index="3095" draw:name="Shape2943" draw:style-name="gr1" draw:text-style-name="P2" svg:width="0.7476in" svg:height="0.1295in" svg:x="2.7728in" svg:y="7.5354in">
        <draw:text-box>
          <text:p><text:span text:style-name="T1">non disponibile</text:span></text:p>
        </draw:text-box>
      </draw:frame>
      <draw:frame text:anchor-type="page" text:anchor-page-number="10" draw:z-index="3094" draw:name="Shape3701" draw:style-name="gr1" draw:text-style-name="P2" svg:width="0.3661in" svg:height="0.1295in" svg:x="0.4535in" svg:y="8.6854in">
        <draw:text-box>
          <text:p><text:span text:style-name="T1">TALCO</text:span></text:p>
        </draw:text-box>
      </draw:frame>
      <draw:polygon text:anchor-type="page" text:anchor-page-number="9" draw:z-index="3093" draw:name="Shape3469" draw:style-name="gr3" draw:text-style-name="P4" svg:width="2.3902in" svg:height="0.0083in" svg:x="0.363in" svg:y="9.0697in" svg:viewBox="0 0 6072 22" draw:points="0,0 6072,0 6072,22 0,22">
        <text:p/>
      </draw:polygon>
      <draw:polygon text:anchor-type="page" text:anchor-page-number="5" draw:z-index="3092" draw:name="Shape1326" draw:style-name="gr2" draw:text-style-name="P3" svg:width="0.7866in" svg:height="0.1917in" svg:x="0.363in" svg:y="7.4382in" svg:viewBox="0 0 1999 488" draw:points="0,0 1999,0 1999,488 0,488">
        <text:p/>
      </draw:polygon>
      <draw:polygon text:anchor-type="page" text:anchor-page-number="6" draw:z-index="3091" draw:name="Shape1974" draw:style-name="gr2" draw:text-style-name="P3" svg:width="1.1803in" svg:height="0.1917in" svg:x="0.363in" svg:y="2.5764in" svg:viewBox="0 0 2999 488" draw:points="0,0 2999,0 2999,488 0,488">
        <text:p/>
      </draw:polygon>
      <draw:frame text:anchor-type="page" text:anchor-page-number="2" draw:z-index="3090" draw:name="Shape551" draw:style-name="gr1" draw:text-style-name="P2" svg:width="0.6232in" svg:height="0.1295in" svg:x="0.4535in" svg:y="8.2366in">
        <draw:text-box>
          <text:p><text:span text:style-name="T3">3.2. Miscele</text:span></text:p>
        </draw:text-box>
      </draw:frame>
      <draw:frame text:anchor-type="page" text:anchor-page-number="10" draw:z-index="3089" draw:name="Shape3697" draw:style-name="gr1" draw:text-style-name="P2" svg:width="0.0433in" svg:height="0.1925in" svg:x="0.411in" svg:y="8.6374in">
        <draw:text-box>
          <text:p><text:span text:style-name="T2"><text:s/></text:span></text:p>
        </draw:text-box>
      </draw:frame>
      <draw:frame text:anchor-type="page" text:anchor-page-number="9" draw:z-index="3088" draw:name="Shape3468" draw:style-name="gr1" draw:text-style-name="P2" svg:width="2.3976in" svg:height="0.1295in" svg:x="0.3634in" svg:y="8.9571in">
        <draw:text-box>
          <text:p><text:span text:style-name="T1">MUTAGENICITÀ SULLE CELLULE GERMINALI</text:span></text:p>
        </draw:text-box>
      </draw:frame>
      <draw:frame text:anchor-type="page" text:anchor-page-number="3" draw:z-index="3087" draw:name="Shape875" draw:style-name="gr1" draw:text-style-name="P2" svg:width="3.8398in" svg:height="0.1295in" svg:x="3.3634in" svg:y="4.039in">
        <draw:text-box>
          <text:p><text:span text:style-name="T1">H314, Eye Dam. 1 H318, Skin Sens. 1A H317, Aquatic Acute 1 H400 M=100, </text:span></text:p>
        </draw:text-box>
      </draw:frame>
      <draw:frame text:anchor-type="page" text:anchor-page-number="14" draw:z-index="3086" draw:name="Shape4511" draw:style-name="gr1" draw:text-style-name="P2" svg:width="0.0433in" svg:height="0.1925in" svg:x="3.3335in" svg:y="4.5492in">
        <draw:text-box>
          <text:p><text:span text:style-name="T2"><text:s/></text:span></text:p>
        </draw:text-box>
      </draw:frame>
      <draw:frame text:anchor-type="page" text:anchor-page-number="5" draw:z-index="3085" draw:name="Shape1325" draw:style-name="gr1" draw:text-style-name="P2" svg:width="2.5697in" svg:height="0.113in" svg:x="2.7728in" svg:y="7.3291in">
        <draw:text-box>
          <text:p><text:span text:style-name="T4">EH40/2005 Workplace exposure limits (Fourth Edition 2020)</text:span></text:p>
        </draw:text-box>
      </draw:frame>
      <draw:polygon text:anchor-type="page" text:anchor-page-number="6" draw:z-index="3084" draw:name="Shape1942" draw:style-name="gr3" draw:text-style-name="P4" svg:width="1.1717in" svg:height="0.0098in" svg:x="6.6732in" svg:y="2.365in" svg:viewBox="0 0 2977 26" draw:points="0,0 2977,0 2977,26 0,26">
        <text:p/>
      </draw:polygon>
      <draw:polygon text:anchor-type="page" text:anchor-page-number="1" draw:z-index="3083" draw:name="Shape226" draw:style-name="gr2" draw:text-style-name="P3" svg:width="4.6283in" svg:height="0.1268in" svg:x="3.1665in" svg:y="5.8098in" svg:viewBox="0 0 11757 323" draw:points="0,0 11757,0 11757,323 0,323">
        <text:p/>
      </draw:polygon>
      <draw:frame text:anchor-type="page" text:anchor-page-number="7" draw:z-index="3082" draw:name="Shape2928" draw:style-name="gr1" draw:text-style-name="P2" svg:width="0.0433in" svg:height="0.1925in" svg:x="1.7311in" svg:y="7.4874in">
        <draw:text-box>
          <text:p><text:span text:style-name="T2"><text:s/></text:span></text:p>
        </draw:text-box>
      </draw:frame>
      <draw:frame text:anchor-type="page" text:anchor-page-number="5" draw:z-index="3081" draw:name="Shape1308" draw:style-name="gr1" draw:text-style-name="P2" svg:width="0.0433in" svg:height="0.1925in" svg:x="1.8898in" svg:y="7.2681in">
        <draw:text-box>
          <text:p><text:span text:style-name="T2"><text:s/></text:span></text:p>
        </draw:text-box>
      </draw:frame>
      <draw:polygon text:anchor-type="page" text:anchor-page-number="1" draw:z-index="3080" draw:name="Shape225" draw:style-name="gr2" draw:text-style-name="P3" svg:width="4.7252in" svg:height="0.1268in" svg:x="3.1181in" svg:y="5.8098in" svg:viewBox="0 0 12003 323" draw:points="0,0 12003,0 12003,323 0,323">
        <text:p/>
      </draw:polygon>
      <draw:frame text:anchor-type="page" text:anchor-page-number="9" draw:z-index="3079" draw:name="Shape3466" draw:style-name="gr1" draw:text-style-name="P2" svg:width="0.0433in" svg:height="0.1925in" svg:x="0.3634in" svg:y="8.7661in">
        <draw:text-box>
          <text:p><text:span text:style-name="T2"><text:s/></text:span></text:p>
        </draw:text-box>
      </draw:frame>
      <draw:polygon text:anchor-type="page" text:anchor-page-number="14" draw:z-index="3078" draw:name="Shape4530" draw:style-name="gr2" draw:text-style-name="P3" svg:width="0.4933in" svg:height="0.1917in" svg:x="6.1197in" svg:y="4.5949in" svg:viewBox="0 0 1254 488" draw:points="0,0 1254,0 1254,488 0,488">
        <text:p/>
      </draw:polygon>
      <draw:polygon text:anchor-type="page" text:anchor-page-number="7" draw:z-index="3077" draw:name="Shape2942" draw:style-name="gr2" draw:text-style-name="P3" svg:width="1.4783in" svg:height="0.1283in" svg:x="2.7732in" svg:y="7.5331in" svg:viewBox="0 0 3756 327" draw:points="0,0 3756,0 3756,327 0,327">
        <text:p/>
      </draw:polygon>
      <draw:polygon text:anchor-type="page" text:anchor-page-number="6" draw:z-index="3076" draw:name="Shape1941" draw:style-name="gr3" draw:text-style-name="P4" svg:width="0.0102in" svg:height="0.0098in" svg:x="6.663in" svg:y="2.365in" svg:viewBox="0 0 27 26" draw:points="0,0 27,0 27,26 0,26">
        <text:p/>
      </draw:polygon>
      <draw:frame text:anchor-type="page" text:anchor-page-number="11" draw:z-index="3075" draw:name="Shape3967" draw:style-name="gr1" draw:text-style-name="P2" svg:width="2.4394in" svg:height="0.1295in" svg:x="0.3634in" svg:y="10.139in">
        <draw:text-box>
          <text:p><text:span text:style-name="T1">(RID), via mare (IMDG Code) e via aerea (IATA). </text:span></text:p>
        </draw:text-box>
      </draw:frame>
      <draw:polygon text:anchor-type="page" text:anchor-page-number="3" draw:z-index="3074" draw:name="Shape876" draw:style-name="gr2" draw:text-style-name="P3" svg:width="3.8417in" svg:height="0.1264in" svg:x="3.363in" svg:y="4.165in" svg:viewBox="0 0 9759 322" draw:points="0,0 9759,0 9759,322 0,322">
        <text:p/>
      </draw:polygon>
      <draw:frame text:anchor-type="page" text:anchor-page-number="2" draw:z-index="3073" draw:name="Shape547" draw:style-name="gr1" draw:text-style-name="P2" svg:width="0.0433in" svg:height="0.1925in" svg:x="0.411in" svg:y="8.1898in">
        <draw:text-box>
          <text:p><text:span text:style-name="T2"><text:s/></text:span></text:p>
        </draw:text-box>
      </draw:frame>
      <draw:frame text:anchor-type="page" text:anchor-page-number="10" draw:z-index="3072" draw:name="Shape3696" draw:style-name="gr1" draw:text-style-name="P2" svg:width="0.0433in" svg:height="0.1925in" svg:x="0.3634in" svg:y="8.4945in">
        <draw:text-box>
          <text:p><text:span text:style-name="T2"><text:s/></text:span></text:p>
        </draw:text-box>
      </draw:frame>
      <draw:polygon text:anchor-type="page" text:anchor-page-number="14" draw:z-index="3071" draw:name="Shape4529" draw:style-name="gr2" draw:text-style-name="P3" svg:width="0.5898in" svg:height="0.1917in" svg:x="6.0717in" svg:y="4.5949in" svg:viewBox="0 0 1499 488" draw:points="0,0 1499,0 1499,488 0,488">
        <text:p/>
      </draw:polygon>
      <draw:polygon text:anchor-type="page" text:anchor-page-number="7" draw:z-index="3070" draw:name="Shape2941" draw:style-name="gr2" draw:text-style-name="P3" svg:width="1.5752in" svg:height="0.1917in" svg:x="2.7248in" svg:y="7.5331in" svg:viewBox="0 0 4002 488" draw:points="0,0 4002,0 4002,488 0,488">
        <text:p/>
      </draw:polygon>
      <draw:polygon text:anchor-type="page" text:anchor-page-number="5" draw:z-index="3069" draw:name="Shape1324" draw:style-name="gr2" draw:text-style-name="P3" svg:width="4.6283in" svg:height="0.1118in" svg:x="2.7732in" svg:y="7.3264in" svg:viewBox="0 0 11757 285" draw:points="0,0 11757,0 11757,285 0,285">
        <text:p/>
      </draw:polygon>
      <draw:polygon text:anchor-type="page" text:anchor-page-number="6" draw:z-index="3068" draw:name="Shape1940" draw:style-name="gr3" draw:text-style-name="P4" svg:width="0.7783in" svg:height="0.0098in" svg:x="5.8846in" svg:y="2.365in" svg:viewBox="0 0 1978 26" draw:points="0,0 1978,0 1978,26 0,26">
        <text:p/>
      </draw:polygon>
      <draw:frame text:anchor-type="page" text:anchor-page-number="3" draw:z-index="3067" draw:name="Shape872" draw:style-name="gr1" draw:text-style-name="P2" svg:width="3.6067in" svg:height="0.1295in" svg:x="3.3634in" svg:y="3.9102in">
        <draw:text-box>
          <text:p><text:span text:style-name="T1">Acute Tox. 2 H310, Acute Tox. 2 H330, Acute Tox. 3 H301, Skin Corr. 1C </text:span></text:p>
        </draw:text-box>
      </draw:frame>
      <draw:frame text:anchor-type="page" text:anchor-page-number="9" draw:z-index="3066" draw:name="Shape3464" draw:style-name="gr1" draw:text-style-name="P2" svg:width="0.0433in" svg:height="0.1925in" svg:x="5.8217in" svg:y="8.5898in">
        <draw:text-box>
          <text:p><text:span text:style-name="T2"><text:s/></text:span></text:p>
        </draw:text-box>
      </draw:frame>
      <draw:polygon text:anchor-type="page" text:anchor-page-number="10" draw:z-index="3065" draw:name="Shape3700" draw:style-name="gr2" draw:text-style-name="P3" svg:width="2.265in" svg:height="0.1283in" svg:x="0.4114in" svg:y="8.6831in" svg:viewBox="0 0 5754 327" draw:points="0,0 5754,0 5754,327 0,327">
        <text:p/>
      </draw:polygon>
      <draw:frame text:anchor-type="page" text:anchor-page-number="2" draw:z-index="3064" draw:name="Shape546" draw:style-name="gr1" draw:text-style-name="P2" svg:width="0.0433in" svg:height="0.1925in" svg:x="0.3634in" svg:y="8.048in">
        <draw:text-box>
          <text:p><text:span text:style-name="T2"><text:s/></text:span></text:p>
        </draw:text-box>
      </draw:frame>
      <draw:frame text:anchor-type="page" text:anchor-page-number="11" draw:z-index="3063" draw:name="Shape3966" draw:style-name="gr1" draw:text-style-name="P2" svg:width="7.3969in" svg:height="0.1295in" svg:x="0.3634in" svg:y="10.0102in">
        <draw:text-box>
          <text:p><text:span text:style-name="T1">Il prodotto non è da considerarsi pericoloso ai sensi delle disposizioni vigenti in materia di trasporto di merci pericolose su strada (A.D.R.), su ferrovia </text:span></text:p>
        </draw:text-box>
      </draw:frame>
      <draw:frame text:anchor-type="page" text:anchor-page-number="1" draw:z-index="3062" draw:name="Shape219" draw:style-name="gr1" draw:text-style-name="P2" svg:width="0.8161in" svg:height="0.1295in" svg:x="0.4535in" svg:y="5.8102in">
        <draw:text-box>
          <text:p><text:span text:style-name="T1">Ragione Sociale</text:span></text:p>
        </draw:text-box>
      </draw:frame>
      <draw:polygon text:anchor-type="page" text:anchor-page-number="5" draw:z-index="3061" draw:name="Shape1323" draw:style-name="gr2" draw:text-style-name="P3" svg:width="4.7252in" svg:height="0.1118in" svg:x="2.7248in" svg:y="7.3264in" svg:viewBox="0 0 12003 285" draw:points="0,0 12003,0 12003,285 0,285">
        <text:p/>
      </draw:polygon>
      <draw:polygon text:anchor-type="page" text:anchor-page-number="6" draw:z-index="3060" draw:name="Shape1939" draw:style-name="gr3" draw:text-style-name="P4" svg:width="0.0098in" svg:height="0.0098in" svg:x="5.8748in" svg:y="2.365in" svg:viewBox="0 0 26 26" draw:points="0,0 26,0 26,26 0,26">
        <text:p/>
      </draw:polygon>
      <draw:frame text:anchor-type="page" text:anchor-page-number="1" draw:z-index="3059" draw:name="Shape214" draw:style-name="gr1" draw:text-style-name="P2" svg:width="0.0433in" svg:height="0.1925in" svg:x="0.411in" svg:y="5.7634in">
        <draw:text-box>
          <text:p><text:span text:style-name="T2"><text:s/></text:span></text:p>
        </draw:text-box>
      </draw:frame>
      <draw:frame text:anchor-type="page" text:anchor-page-number="7" draw:z-index="3058" draw:name="Shape2934" draw:style-name="gr1" draw:text-style-name="P2" svg:width="1.2878in" svg:height="0.1295in" svg:x="0.4535in" svg:y="7.5354in">
        <draw:text-box>
          <text:p><text:span text:style-name="T1">Limite inferiore esplosività</text:span></text:p>
        </draw:text-box>
      </draw:frame>
      <draw:polygon text:anchor-type="page" text:anchor-page-number="3" draw:z-index="3057" draw:name="Shape874" draw:style-name="gr2" draw:text-style-name="P3" svg:width="3.8417in" svg:height="0.1283in" svg:x="3.363in" svg:y="4.0366in" svg:viewBox="0 0 9759 327" draw:points="0,0 9759,0 9759,327 0,327">
        <text:p/>
      </draw:polygon>
      <draw:frame text:anchor-type="page" text:anchor-page-number="9" draw:z-index="3056" draw:name="Shape3465" draw:style-name="gr1" draw:text-style-name="P2" svg:width="5.487in" svg:height="0.1295in" svg:x="0.3634in" svg:y="8.6366in">
        <draw:text-box>
          <text:p><text:span text:style-name="T1">MASSA DI REAZIONE DI 5-CLORO-2- METIL-2H-ISOTIAZOL-3-ONE E 2-METIL-2H-ISOTIAZOL-3-ONE (3:1)</text:span></text:p>
        </draw:text-box>
      </draw:frame>
      <draw:polygon text:anchor-type="page" text:anchor-page-number="2" draw:z-index="3055" draw:name="Shape550" draw:style-name="gr2" draw:text-style-name="P3" svg:width="7.3835in" svg:height="0.1283in" svg:x="0.4114in" svg:y="8.2366in" svg:viewBox="0 0 18755 327" draw:points="0,0 18755,0 18755,327 0,327">
        <text:p/>
      </draw:polygon>
      <draw:polygon text:anchor-type="page" text:anchor-page-number="10" draw:z-index="3054" draw:name="Shape3699" draw:style-name="gr2" draw:text-style-name="P3" svg:width="2.3618in" svg:height="0.1917in" svg:x="0.363in" svg:y="8.6831in" svg:viewBox="0 0 6000 488" draw:points="0,0 6000,0 6000,488 0,488">
        <text:p/>
      </draw:polygon>
      <draw:frame text:anchor-type="page" text:anchor-page-number="14" draw:z-index="3053" draw:name="Shape4523" draw:style-name="gr1" draw:text-style-name="P2" svg:width="1.5559in" svg:height="0.1295in" svg:x="1.7882in" svg:y="4.5972in">
        <draw:text-box>
          <text:p><text:span text:style-name="T1">Letale per contatto con la pelle.</text:span></text:p>
        </draw:text-box>
      </draw:frame>
      <draw:frame text:anchor-type="page" text:anchor-page-number="11" draw:z-index="3052" draw:name="Shape3965" draw:style-name="gr1" draw:text-style-name="P2" svg:width="0.0433in" svg:height="0.1925in" svg:x="0.3634in" svg:y="9.8217in">
        <draw:text-box>
          <text:p><text:span text:style-name="T2"><text:s/></text:span></text:p>
        </draw:text-box>
      </draw:frame>
      <draw:frame text:anchor-type="page" text:anchor-page-number="11" draw:z-index="3051" draw:name="Shape3964" draw:style-name="gr1" draw:text-style-name="P2" svg:width="0.0433in" svg:height="0.1925in" svg:x="0.3634in" svg:y="9.6299in">
        <draw:text-box>
          <text:p><text:span text:style-name="T2"><text:s/></text:span></text:p>
        </draw:text-box>
      </draw:frame>
      <draw:polygon text:anchor-type="page" text:anchor-page-number="2" draw:z-index="3050" draw:name="Shape549" draw:style-name="gr2" draw:text-style-name="P3" svg:width="7.4803in" svg:height="0.1283in" svg:x="0.363in" svg:y="8.2366in" svg:viewBox="0 0 19001 327" draw:points="0,0 19001,0 19001,327 0,327">
        <text:p/>
      </draw:polygon>
      <draw:polygon text:anchor-type="page" text:anchor-page-number="6" draw:z-index="3049" draw:name="Shape1938" draw:style-name="gr3" draw:text-style-name="P4" svg:width="0.5799in" svg:height="0.0098in" svg:x="5.2949in" svg:y="2.365in" svg:viewBox="0 0 1474 26" draw:points="0,0 1474,0 1474,26 0,26">
        <text:p/>
      </draw:polygon>
      <draw:frame text:anchor-type="page" text:anchor-page-number="5" draw:z-index="3048" draw:name="Shape1321" draw:style-name="gr1" draw:text-style-name="P2" svg:width="0.6886in" svg:height="0.113in" svg:x="1.198in" svg:y="7.3291in">
        <draw:text-box>
          <text:p><text:span text:style-name="T4">United Kingdom</text:span></text:p>
        </draw:text-box>
      </draw:frame>
      <draw:frame text:anchor-type="page" text:anchor-page-number="9" draw:z-index="3047" draw:name="Shape3462" draw:style-name="gr1" draw:text-style-name="P2" svg:width="0.0433in" svg:height="0.1925in" svg:x="0.8382in" svg:y="8.4634in">
        <draw:text-box>
          <text:p><text:span text:style-name="T2"><text:s/></text:span></text:p>
        </draw:text-box>
      </draw:frame>
      <draw:frame text:anchor-type="page" text:anchor-page-number="14" draw:z-index="3046" draw:name="Shape4510" draw:style-name="gr1" draw:text-style-name="P2" svg:width="0.0433in" svg:height="0.1925in" svg:x="0.6846in" svg:y="4.5346in">
        <draw:text-box>
          <text:p><text:span text:style-name="T2"><text:s/></text:span></text:p>
        </draw:text-box>
      </draw:frame>
      <draw:frame text:anchor-type="page" text:anchor-page-number="7" draw:z-index="3045" draw:name="Shape2927" draw:style-name="gr1" draw:text-style-name="P2" svg:width="0.0433in" svg:height="0.1925in" svg:x="0.411in" svg:y="7.4874in">
        <draw:text-box>
          <text:p><text:span text:style-name="T2"><text:s/></text:span></text:p>
        </draw:text-box>
      </draw:frame>
      <draw:frame text:anchor-type="page" text:anchor-page-number="10" draw:z-index="3044" draw:name="Shape3693" draw:style-name="gr1" draw:text-style-name="P2" svg:width="1.7539in" svg:height="0.1295in" svg:x="0.3634in" svg:y="8.3638in">
        <draw:text-box>
          <text:p><text:span text:style-name="T3">12.2. Persistenza e degradabilità </text:span></text:p>
        </draw:text-box>
      </draw:frame>
      <draw:frame text:anchor-type="page" text:anchor-page-number="1" draw:z-index="3043" draw:name="Shape209" draw:style-name="gr1" draw:text-style-name="P2" svg:width="0.0433in" svg:height="0.1925in" svg:x="3.7264in" svg:y="5.6346in">
        <draw:text-box>
          <text:p><text:span text:style-name="T2"><text:s/></text:span></text:p>
        </draw:text-box>
      </draw:frame>
      <draw:frame text:anchor-type="page" text:anchor-page-number="3" draw:z-index="3042" draw:name="Shape858" draw:style-name="gr1" draw:text-style-name="P2" svg:width="0.0433in" svg:height="0.1925in" svg:x="2.6583in" svg:y="3.8634in">
        <draw:text-box>
          <text:p><text:span text:style-name="T2"><text:s/></text:span></text:p>
        </draw:text-box>
      </draw:frame>
      <draw:polygon text:anchor-type="page" text:anchor-page-number="1" draw:z-index="3041" draw:name="Shape218" draw:style-name="gr2" draw:text-style-name="P3" svg:width="2.6583in" svg:height="0.1268in" svg:x="0.4114in" svg:y="5.8098in" svg:viewBox="0 0 6753 323" draw:points="0,0 6753,0 6753,323 0,323">
        <text:p/>
      </draw:polygon>
      <draw:polygon text:anchor-type="page" text:anchor-page-number="6" draw:z-index="3040" draw:name="Shape1937" draw:style-name="gr3" draw:text-style-name="P4" svg:width="0.0102in" svg:height="0.0098in" svg:x="5.2846in" svg:y="2.365in" svg:viewBox="0 0 27 26" draw:points="0,0 27,0 27,26 0,26">
        <text:p/>
      </draw:polygon>
      <draw:polygon text:anchor-type="page" text:anchor-page-number="14" draw:z-index="3039" draw:name="Shape4522" draw:style-name="gr2" draw:text-style-name="P3" svg:width="4.235in" svg:height="0.1283in" svg:x="1.7882in" svg:y="4.5949in" svg:viewBox="0 0 10758 327" draw:points="0,0 10758,0 10758,327 0,327">
        <text:p/>
      </draw:polygon>
      <draw:frame text:anchor-type="page" text:anchor-page-number="7" draw:z-index="3038" draw:name="Shape2926" draw:style-name="gr1" draw:text-style-name="P2" svg:width="0.0433in" svg:height="0.1925in" svg:x="4.348in" svg:y="7.3445in">
        <draw:text-box>
          <text:p><text:span text:style-name="T2"><text:s/></text:span></text:p>
        </draw:text-box>
      </draw:frame>
      <draw:frame text:anchor-type="page" text:anchor-page-number="5" draw:z-index="3037" draw:name="Shape1307" draw:style-name="gr1" draw:text-style-name="P2" svg:width="0.0433in" svg:height="0.1925in" svg:x="0.6634in" svg:y="7.2681in">
        <draw:text-box>
          <text:p><text:span text:style-name="T2"><text:s/></text:span></text:p>
        </draw:text-box>
      </draw:frame>
      <draw:frame text:anchor-type="page" text:anchor-page-number="10" draw:z-index="3036" draw:name="Shape3683" draw:style-name="gr1" draw:text-style-name="P2" svg:width="0.0433in" svg:height="0.1925in" svg:x="5.3665in" svg:y="8.1264in">
        <draw:text-box>
          <text:p><text:span text:style-name="T2"><text:s/></text:span></text:p>
        </draw:text-box>
      </draw:frame>
      <draw:frame text:anchor-type="page" text:anchor-page-number="9" draw:z-index="3035" draw:name="Shape3463" draw:style-name="gr1" draw:text-style-name="P2" svg:width="0.4803in" svg:height="0.1295in" svg:x="0.3634in" svg:y="8.5102in">
        <draw:text-box>
          <text:p><text:span text:style-name="T1">Contiene:</text:span></text:p>
        </draw:text-box>
      </draw:frame>
      <draw:frame text:anchor-type="page" text:anchor-page-number="2" draw:z-index="3034" draw:name="Shape542" draw:style-name="gr1" draw:text-style-name="P2" svg:width="0.0433in" svg:height="0.1925in" svg:x="4.5535in" svg:y="7.861in">
        <draw:text-box>
          <text:p><text:span text:style-name="T2"><text:s/></text:span></text:p>
        </draw:text-box>
      </draw:frame>
      <draw:frame text:anchor-type="page" text:anchor-page-number="11" draw:z-index="3033" draw:name="Shape3960" draw:style-name="gr1" draw:text-style-name="P2" svg:width="0.0433in" svg:height="0.1925in" svg:x="3.3047in" svg:y="9.4417in">
        <draw:text-box>
          <text:p><text:span text:style-name="T2"><text:s/></text:span></text:p>
        </draw:text-box>
      </draw:frame>
      <draw:polygon text:anchor-type="page" text:anchor-page-number="3" draw:z-index="3032" draw:name="Shape871" draw:style-name="gr2" draw:text-style-name="P3" svg:width="3.8417in" svg:height="0.1283in" svg:x="3.363in" svg:y="3.9083in" svg:viewBox="0 0 9759 327" draw:points="0,0 9759,0 9759,327 0,327">
        <text:p/>
      </draw:polygon>
      <draw:frame text:anchor-type="page" text:anchor-page-number="11" draw:z-index="3031" draw:name="Shape3963" draw:style-name="gr1" draw:text-style-name="P2" svg:width="2.8669in" svg:height="0.1776in" svg:x="0.4535in" svg:y="9.4516in">
        <draw:text-box>
          <text:p><text:span text:style-name="T6">SEZIONE 14. Informazioni sul trasporto</text:span></text:p>
        </draw:text-box>
      </draw:frame>
      <draw:frame text:anchor-type="page" text:anchor-page-number="2" draw:z-index="3030" draw:name="Shape545" draw:style-name="gr1" draw:text-style-name="P2" svg:width="4.1205in" svg:height="0.1776in" svg:x="0.4535in" svg:y="7.8709in">
        <draw:text-box>
          <text:p><text:span text:style-name="T6">SEZIONE 3. Composizione/informazioni sugli ingredienti</text:span></text:p>
        </draw:text-box>
      </draw:frame>
      <draw:frame text:anchor-type="page" text:anchor-page-number="10" draw:z-index="3029" draw:name="Shape3691" draw:style-name="gr1" draw:text-style-name="P2" svg:width="1.8161in" svg:height="0.1295in" svg:x="3.561in" svg:y="8.1736in">
        <draw:text-box>
          <text:p><text:span text:style-name="T1">0.00049 mg/l Skeletonema costatum</text:span></text:p>
        </draw:text-box>
      </draw:frame>
      <draw:polygon text:anchor-type="page" text:anchor-page-number="14" draw:z-index="3028" draw:name="Shape4521" draw:style-name="gr2" draw:text-style-name="P3" svg:width="4.3319in" svg:height="0.1917in" svg:x="1.7398in" svg:y="4.5949in" svg:viewBox="0 0 11004 488" draw:points="0,0 11004,0 11004,488 0,488">
        <text:p/>
      </draw:polygon>
      <draw:polygon text:anchor-type="page" text:anchor-page-number="7" draw:z-index="3027" draw:name="Shape2933" draw:style-name="gr2" draw:text-style-name="P3" svg:width="2.265in" svg:height="0.1283in" svg:x="0.4114in" svg:y="7.5331in" svg:viewBox="0 0 5754 327" draw:points="0,0 5754,0 5754,327 0,327">
        <text:p/>
      </draw:polygon>
      <draw:polygon text:anchor-type="page" text:anchor-page-number="3" draw:z-index="3026" draw:name="Shape870" draw:style-name="gr2" draw:text-style-name="P3" svg:width="3.9382in" svg:height="0.5114in" svg:x="3.315in" svg:y="3.9083in" svg:viewBox="0 0 10004 1300" draw:points="0,0 10004,0 10004,1300 0,1300">
        <text:p/>
      </draw:polygon>
      <draw:polygon text:anchor-type="page" text:anchor-page-number="1" draw:z-index="3025" draw:name="Shape217" draw:style-name="gr2" draw:text-style-name="P3" svg:width="2.7551in" svg:height="0.1268in" svg:x="0.363in" svg:y="5.8098in" svg:viewBox="0 0 6999 323" draw:points="0,0 6999,0 6999,323 0,323">
        <text:p/>
      </draw:polygon>
      <draw:polygon text:anchor-type="page" text:anchor-page-number="6" draw:z-index="3024" draw:name="Shape1936" draw:style-name="gr3" draw:text-style-name="P4" svg:width="1.1717in" svg:height="0.0098in" svg:x="4.113in" svg:y="2.365in" svg:viewBox="0 0 2977 26" draw:points="0,0 2977,0 2977,26 0,26">
        <text:p/>
      </draw:polygon>
      <draw:polygon text:anchor-type="page" text:anchor-page-number="5" draw:z-index="3023" draw:name="Shape1320" draw:style-name="gr2" draw:text-style-name="P3" svg:width="1.4783in" svg:height="0.1118in" svg:x="1.198in" svg:y="7.3264in" svg:viewBox="0 0 3756 285" draw:points="0,0 3756,0 3756,285 0,285">
        <text:p/>
      </draw:polygon>
      <draw:frame text:anchor-type="page" text:anchor-page-number="9" draw:z-index="3022" draw:name="Shape3459" draw:style-name="gr1" draw:text-style-name="P2" svg:width="0.0433in" svg:height="0.1925in" svg:x="2.2346in" svg:y="8.3346in">
        <draw:text-box>
          <text:p><text:span text:style-name="T2"><text:s/></text:span></text:p>
        </draw:text-box>
      </draw:frame>
      <draw:frame text:anchor-type="page" text:anchor-page-number="3" draw:z-index="3021" draw:name="Shape869" draw:style-name="gr1" draw:text-style-name="P2" svg:width="0.2815in" svg:height="0.1295in" svg:x="2.3799in" svg:y="3.9102in">
        <draw:text-box>
          <text:p><text:span text:style-name="T1">0.001</text:span></text:p>
        </draw:text-box>
      </draw:frame>
      <draw:polygon text:anchor-type="page" text:anchor-page-number="7" draw:z-index="3020" draw:name="Shape2930" draw:style-name="gr2" draw:text-style-name="P3" svg:width="2.3618in" svg:height="0.1917in" svg:x="0.363in" svg:y="7.5331in" svg:viewBox="0 0 6000 488" draw:points="0,0 6000,0 6000,488 0,488">
        <text:p/>
      </draw:polygon>
      <draw:frame text:anchor-type="page" text:anchor-page-number="1" draw:z-index="3019" draw:name="Shape212" draw:style-name="gr1" draw:text-style-name="P2" svg:width="3.2949in" svg:height="0.1295in" svg:x="0.4535in" svg:y="5.6819in">
        <draw:text-box>
          <text:p><text:span text:style-name="T3">1.3. Informazioni sul fornitore della scheda di dati di sicurezza</text:span></text:p>
        </draw:text-box>
      </draw:frame>
      <draw:frame text:anchor-type="page" text:anchor-page-number="14" draw:z-index="3018" draw:name="Shape4519" draw:style-name="gr1" draw:text-style-name="P2" svg:width="0.2323in" svg:height="0.113in" svg:x="0.4535in" svg:y="4.5957in">
        <draw:text-box>
          <text:p><text:span text:style-name="T5">H310</text:span></text:p>
        </draw:text-box>
      </draw:frame>
      <draw:frame text:anchor-type="page" text:anchor-page-number="10" draw:z-index="3017" draw:name="Shape3692" draw:style-name="gr1" draw:text-style-name="P2" svg:width="0.0433in" svg:height="0.1925in" svg:x="2.7728in" svg:y="8.1764in">
        <draw:text-box>
          <text:p><text:span text:style-name="T2"><text:s/></text:span></text:p>
        </draw:text-box>
      </draw:frame>
      <draw:frame text:anchor-type="page" text:anchor-page-number="11" draw:z-index="3016" draw:name="Shape3959" draw:style-name="gr1" draw:text-style-name="P2" svg:width="0.0433in" svg:height="0.1925in" svg:x="0.411in" svg:y="9.4417in">
        <draw:text-box>
          <text:p><text:span text:style-name="T2"><text:s/></text:span></text:p>
        </draw:text-box>
      </draw:frame>
      <draw:polygon text:anchor-type="page" text:anchor-page-number="6" draw:z-index="3015" draw:name="Shape1935" draw:style-name="gr3" draw:text-style-name="P4" svg:width="0.0098in" svg:height="0.0098in" svg:x="4.1031in" svg:y="2.365in" svg:viewBox="0 0 26 26" draw:points="0,0 26,0 26,26 0,26">
        <text:p/>
      </draw:polygon>
      <draw:frame text:anchor-type="page" text:anchor-page-number="2" draw:z-index="3014" draw:name="Shape541" draw:style-name="gr1" draw:text-style-name="P2" svg:width="0.0433in" svg:height="0.1925in" svg:x="0.411in" svg:y="7.861in">
        <draw:text-box>
          <text:p><text:span text:style-name="T2"><text:s/></text:span></text:p>
        </draw:text-box>
      </draw:frame>
      <draw:polygon text:anchor-type="page" text:anchor-page-number="5" draw:z-index="3013" draw:name="Shape1318" draw:style-name="gr2" draw:text-style-name="P3" svg:width="1.5752in" svg:height="0.1118in" svg:x="1.15in" svg:y="7.3264in" svg:viewBox="0 0 4002 285" draw:points="0,0 4002,0 4002,285 0,285">
        <text:p/>
      </draw:polygon>
      <draw:frame text:anchor-type="page" text:anchor-page-number="9" draw:z-index="3012" draw:name="Shape3461" draw:style-name="gr1" draw:text-style-name="P2" svg:width="1.885in" svg:height="0.1295in" svg:x="0.3634in" svg:y="8.3819in">
        <draw:text-box>
          <text:p><text:span text:style-name="T1">Può provocare una reazione allergica.</text:span></text:p>
        </draw:text-box>
      </draw:frame>
      <draw:polygon text:anchor-type="page" text:anchor-page-number="10" draw:z-index="3011" draw:name="Shape3695" draw:style-name="gr2" draw:text-style-name="P3" svg:width="3.8402in" svg:height="0.1264in" svg:x="3.5614in" svg:y="8.1732in" svg:viewBox="0 0 9755 322" draw:points="0,0 9755,0 9755,322 0,322">
        <text:p/>
      </draw:polygon>
      <draw:frame text:anchor-type="page" text:anchor-page-number="1" draw:z-index="3010" draw:name="Shape208" draw:style-name="gr1" draw:text-style-name="P2" svg:width="0.0433in" svg:height="0.1925in" svg:x="0.411in" svg:y="5.6346in">
        <draw:text-box>
          <text:p><text:span text:style-name="T2"><text:s/></text:span></text:p>
        </draw:text-box>
      </draw:frame>
      <draw:frame text:anchor-type="page" text:anchor-page-number="2" draw:z-index="3009" draw:name="Shape540" draw:style-name="gr1" draw:text-style-name="P2" svg:width="0.0433in" svg:height="0.1925in" svg:x="0.3634in" svg:y="7.6811in">
        <draw:text-box>
          <text:p><text:span text:style-name="T2"><text:s/></text:span></text:p>
        </draw:text-box>
      </draw:frame>
      <draw:frame text:anchor-type="page" text:anchor-page-number="3" draw:z-index="3008" draw:name="Shape855" draw:style-name="gr1" draw:text-style-name="P2" svg:width="0.0433in" svg:height="0.1925in" svg:x="1.5535in" svg:y="3.8634in">
        <draw:text-box>
          <text:p><text:span text:style-name="T2"><text:s/></text:span></text:p>
        </draw:text-box>
      </draw:frame>
      <draw:frame text:anchor-type="page" text:anchor-page-number="7" draw:z-index="3007" draw:name="Shape2914" draw:style-name="gr1" draw:text-style-name="P2" svg:width="0.0433in" svg:height="0.1925in" svg:x="3.6134in" svg:y="7.2965in">
        <draw:text-box>
          <text:p><text:span text:style-name="T2"><text:s/></text:span></text:p>
        </draw:text-box>
      </draw:frame>
      <draw:frame text:anchor-type="page" text:anchor-page-number="9" draw:z-index="3006" draw:name="Shape3457" draw:style-name="gr1" draw:text-style-name="P2" svg:width="0.0433in" svg:height="0.1925in" svg:x="2.9799in" svg:y="8.2063in">
        <draw:text-box>
          <text:p><text:span text:style-name="T2"><text:s/></text:span></text:p>
        </draw:text-box>
      </draw:frame>
      <draw:frame text:anchor-type="page" text:anchor-page-number="5" draw:z-index="3005" draw:name="Shape1314" draw:style-name="gr1" draw:text-style-name="P2" svg:width="0.2106in" svg:height="0.113in" svg:x="0.4535in" svg:y="7.3291in">
        <draw:text-box>
          <text:p><text:span text:style-name="T4">GBR</text:span></text:p>
        </draw:text-box>
      </draw:frame>
      <draw:polygon text:anchor-type="page" text:anchor-page-number="6" draw:z-index="3004" draw:name="Shape1934" draw:style-name="gr3" draw:text-style-name="P4" svg:width="0.5799in" svg:height="0.0098in" svg:x="3.5232in" svg:y="2.365in" svg:viewBox="0 0 1474 26" draw:points="0,0 1474,0 1474,26 0,26">
        <text:p/>
      </draw:polygon>
      <draw:frame text:anchor-type="page" text:anchor-page-number="11" draw:z-index="3003" draw:name="Shape3958" draw:style-name="gr1" draw:text-style-name="P2" svg:width="0.0433in" svg:height="0.1925in" svg:x="0.3634in" svg:y="9.261in">
        <draw:text-box>
          <text:p><text:span text:style-name="T2"><text:s/></text:span></text:p>
        </draw:text-box>
      </draw:frame>
      <draw:frame text:anchor-type="page" text:anchor-page-number="14" draw:z-index="3002" draw:name="Shape4509" draw:style-name="gr1" draw:text-style-name="P2" svg:width="0.0433in" svg:height="0.1925in" svg:x="0.411in" svg:y="4.5346in">
        <draw:text-box>
          <text:p><text:span text:style-name="T2"><text:s/></text:span></text:p>
        </draw:text-box>
      </draw:frame>
      <draw:polygon text:anchor-type="page" text:anchor-page-number="6" draw:z-index="3001" draw:name="Shape1933" draw:style-name="gr3" draw:text-style-name="P4" svg:width="0.0102in" svg:height="0.0098in" svg:x="3.513in" svg:y="2.365in" svg:viewBox="0 0 27 26" draw:points="0,0 27,0 27,26 0,26">
        <text:p/>
      </draw:polygon>
      <draw:frame text:anchor-type="page" text:anchor-page-number="5" draw:z-index="3000" draw:name="Shape1306" draw:style-name="gr1" draw:text-style-name="P2" svg:width="0.0433in" svg:height="0.1925in" svg:x="0.411in" svg:y="7.2681in">
        <draw:text-box>
          <text:p><text:span text:style-name="T2"><text:s/></text:span></text:p>
        </draw:text-box>
      </draw:frame>
      <draw:polygon text:anchor-type="page" text:anchor-page-number="10" draw:z-index="2999" draw:name="Shape3694" draw:style-name="gr2" draw:text-style-name="P3" svg:width="3.937in" svg:height="0.1917in" svg:x="3.513in" svg:y="8.1732in" svg:viewBox="0 0 10001 488" draw:points="0,0 10001,0 10001,488 0,488">
        <text:p/>
      </draw:polygon>
      <draw:polygon text:anchor-type="page" text:anchor-page-number="2" draw:z-index="2998" draw:name="Shape544" draw:style-name="gr5" draw:text-style-name="P6" svg:width="7.3835in" svg:height="0.1752in" svg:x="0.4114in" svg:y="7.8697in" svg:viewBox="0 0 18755 446" draw:points="0,0 18755,0 18755,446 0,446">
        <text:p/>
      </draw:polygon>
      <draw:frame text:anchor-type="page" text:anchor-page-number="1" draw:z-index="2997" draw:name="Shape207" draw:style-name="gr1" draw:text-style-name="P2" svg:width="0.0433in" svg:height="0.1925in" svg:x="4.1335in" svg:y="5.4929in">
        <draw:text-box>
          <text:p><text:span text:style-name="T2"><text:s/></text:span></text:p>
        </draw:text-box>
      </draw:frame>
      <draw:polygon text:anchor-type="page" text:anchor-page-number="9" draw:z-index="2996" draw:name="Shape3460" draw:style-name="gr3" draw:text-style-name="P4" svg:width="2.6169in" svg:height="0.0083in" svg:x="0.363in" svg:y="8.3665in" svg:viewBox="0 0 6648 22" draw:points="0,0 6648,0 6648,22 0,22">
        <text:p/>
      </draw:polygon>
      <draw:polygon text:anchor-type="page" text:anchor-page-number="7" draw:z-index="2995" draw:name="Shape2932" draw:style-name="gr2" draw:text-style-name="P3" svg:width="2.265in" svg:height="0.1917in" svg:x="4.348in" svg:y="7.3413in" svg:viewBox="0 0 5754 488" draw:points="0,0 5754,0 5754,488 0,488">
        <text:p/>
      </draw:polygon>
      <draw:polygon text:anchor-type="page" text:anchor-page-number="11" draw:z-index="2994" draw:name="Shape3962" draw:style-name="gr5" draw:text-style-name="P6" svg:width="7.3835in" svg:height="0.1768in" svg:x="0.4114in" svg:y="9.45in" svg:viewBox="0 0 18755 450" draw:points="0,0 18755,0 18755,450 0,450">
        <text:p/>
      </draw:polygon>
      <draw:frame text:anchor-type="page" text:anchor-page-number="14" draw:z-index="2993" draw:name="Shape4508" draw:style-name="gr1" draw:text-style-name="P2" svg:width="0.0433in" svg:height="0.1925in" svg:x="6.1193in" svg:y="4.4063in">
        <draw:text-box>
          <text:p><text:span text:style-name="T2"><text:s/></text:span></text:p>
        </draw:text-box>
      </draw:frame>
      <draw:polygon text:anchor-type="page" text:anchor-page-number="3" draw:z-index="2992" draw:name="Shape868" draw:style-name="gr2" draw:text-style-name="P3" svg:width="0.8866in" svg:height="0.1283in" svg:x="2.3799in" svg:y="3.9083in" svg:viewBox="0 0 2253 327" draw:points="0,0 2253,0 2253,327 0,327">
        <text:p/>
      </draw:polygon>
      <draw:polygon text:anchor-type="page" text:anchor-page-number="1" draw:z-index="2991" draw:name="Shape211" draw:style-name="gr2" draw:text-style-name="P3" svg:width="7.3835in" svg:height="0.1283in" svg:x="0.4114in" svg:y="5.6815in" svg:viewBox="0 0 18755 327" draw:points="0,0 18755,0 18755,327 0,327">
        <text:p/>
      </draw:polygon>
      <draw:polygon text:anchor-type="page" text:anchor-page-number="2" draw:z-index="2990" draw:name="Shape543" draw:style-name="gr5" draw:text-style-name="P6" svg:width="7.4803in" svg:height="0.1752in" svg:x="0.363in" svg:y="7.8697in" svg:viewBox="0 0 19001 446" draw:points="0,0 19001,0 19001,446 0,446">
        <text:p/>
      </draw:polygon>
      <draw:frame text:anchor-type="page" text:anchor-page-number="10" draw:z-index="2989" draw:name="Shape3677" draw:style-name="gr1" draw:text-style-name="P2" svg:width="0.0433in" svg:height="0.1925in" svg:x="2.4917in" svg:y="8.1264in">
        <draw:text-box>
          <text:p><text:span text:style-name="T2"><text:s/></text:span></text:p>
        </draw:text-box>
      </draw:frame>
      <draw:frame text:anchor-type="page" text:anchor-page-number="5" draw:z-index="2988" draw:name="Shape1305" draw:style-name="gr1" draw:text-style-name="P2" svg:width="0.0433in" svg:height="0.1925in" svg:x="4.9134in" svg:y="7.1563in">
        <draw:text-box>
          <text:p><text:span text:style-name="T2"><text:s/></text:span></text:p>
        </draw:text-box>
      </draw:frame>
      <draw:polygon text:anchor-type="page" text:anchor-page-number="3" draw:z-index="2987" draw:name="Shape859" draw:style-name="gr2" draw:text-style-name="P3" svg:width="0.9835in" svg:height="0.5114in" svg:x="2.3315in" svg:y="3.9083in" svg:viewBox="0 0 2499 1300" draw:points="0,0 2499,0 2499,1300 0,1300">
        <text:p/>
      </draw:polygon>
      <draw:polygon text:anchor-type="page" text:anchor-page-number="11" draw:z-index="2986" draw:name="Shape3961" draw:style-name="gr5" draw:text-style-name="P6" svg:width="7.4803in" svg:height="0.1768in" svg:x="0.363in" svg:y="9.45in" svg:viewBox="0 0 19001 450" draw:points="0,0 19001,0 19001,450 0,450">
        <text:p/>
      </draw:polygon>
      <draw:frame text:anchor-type="page" text:anchor-page-number="9" draw:z-index="2985" draw:name="Shape3458" draw:style-name="gr1" draw:text-style-name="P2" svg:width="2.6106in" svg:height="0.1295in" svg:x="0.3634in" svg:y="8.2543in">
        <draw:text-box>
          <text:p><text:span text:style-name="T1">SENSIBILIZZAZIONE RESPIRATORIA O CUTANEA</text:span></text:p>
        </draw:text-box>
      </draw:frame>
      <draw:polygon text:anchor-type="page" text:anchor-page-number="7" draw:z-index="2984" draw:name="Shape2931" draw:style-name="gr2" draw:text-style-name="P3" svg:width="2.363in" svg:height="0.1917in" svg:x="4.3in" svg:y="7.3413in" svg:viewBox="0 0 6003 488" draw:points="0,0 6003,0 6003,488 0,488">
        <text:p/>
      </draw:polygon>
      <draw:polygon text:anchor-type="page" text:anchor-page-number="14" draw:z-index="2983" draw:name="Shape4513" draw:style-name="gr2" draw:text-style-name="P3" svg:width="1.2799in" svg:height="0.1114in" svg:x="0.4114in" svg:y="4.5949in" svg:viewBox="0 0 3252 284" draw:points="0,0 3252,0 3252,284 0,284">
        <text:p/>
      </draw:polygon>
      <draw:polygon text:anchor-type="page" text:anchor-page-number="6" draw:z-index="2982" draw:name="Shape1932" draw:style-name="gr3" draw:text-style-name="P4" svg:width="1.1717in" svg:height="0.0098in" svg:x="2.3413in" svg:y="2.365in" svg:viewBox="0 0 2977 26" draw:points="0,0 2977,0 2977,26 0,26">
        <text:p/>
      </draw:polygon>
      <draw:frame text:anchor-type="page" text:anchor-page-number="3" draw:z-index="2981" draw:name="Shape867" draw:style-name="gr1" draw:text-style-name="P2" svg:width="1.1079in" svg:height="0.1295in" svg:x="0.4535in" svg:y="3.9102in">
        <draw:text-box>
          <text:p><text:span text:style-name="T1">INDEX <text:s text:c="2"/>613-167-00-5</text:span></text:p>
        </draw:text-box>
      </draw:frame>
      <draw:polygon text:anchor-type="page" text:anchor-page-number="1" draw:z-index="2980" draw:name="Shape210" draw:style-name="gr2" draw:text-style-name="P3" svg:width="7.4803in" svg:height="0.1283in" svg:x="0.363in" svg:y="5.6815in" svg:viewBox="0 0 19001 327" draw:points="0,0 19001,0 19001,327 0,327">
        <text:p/>
      </draw:polygon>
      <draw:polygon text:anchor-type="page" text:anchor-page-number="6" draw:z-index="2979" draw:name="Shape1931" draw:style-name="gr3" draw:text-style-name="P4" svg:width="0.0098in" svg:height="0.0098in" svg:x="2.3315in" svg:y="2.365in" svg:viewBox="0 0 26 26" draw:points="0,0 26,0 26,26 0,26">
        <text:p/>
      </draw:polygon>
      <draw:frame text:anchor-type="page" text:anchor-page-number="9" draw:z-index="2978" draw:name="Shape3456" draw:style-name="gr1" draw:text-style-name="P2" svg:width="0.0433in" svg:height="0.1925in" svg:x="0.3634in" svg:y="8.0646in">
        <draw:text-box>
          <text:p><text:span text:style-name="T2"><text:s/></text:span></text:p>
        </draw:text-box>
      </draw:frame>
      <draw:polygon text:anchor-type="page" text:anchor-page-number="14" draw:z-index="2977" draw:name="Shape4512" draw:style-name="gr2" draw:text-style-name="P3" svg:width="1.3768in" svg:height="0.1917in" svg:x="0.363in" svg:y="4.5949in" svg:viewBox="0 0 3498 488" draw:points="0,0 3498,0 3498,488 0,488">
        <text:p/>
      </draw:polygon>
      <draw:frame text:anchor-type="page" text:anchor-page-number="7" draw:z-index="2976" draw:name="Shape2925" draw:style-name="gr1" draw:text-style-name="P2" svg:width="0.8469in" svg:height="0.1295in" svg:x="2.7728in" svg:y="7.3437in">
        <draw:text-box>
          <text:p><text:span text:style-name="T1">non infiammabile</text:span></text:p>
        </draw:text-box>
      </draw:frame>
      <draw:frame text:anchor-type="page" text:anchor-page-number="11" draw:z-index="2975" draw:name="Shape3957" draw:style-name="gr1" draw:text-style-name="P2" svg:width="0.0433in" svg:height="0.1925in" svg:x="0.3634in" svg:y="9.0693in">
        <draw:text-box>
          <text:p><text:span text:style-name="T2"><text:s/></text:span></text:p>
        </draw:text-box>
      </draw:frame>
      <draw:frame text:anchor-type="page" text:anchor-page-number="2" draw:z-index="2974" draw:name="Shape539" draw:style-name="gr1" draw:text-style-name="P2" svg:width="5.7685in" svg:height="0.1295in" svg:x="0.3634in" svg:y="7.552in">
        <draw:text-box>
          <text:p><text:span text:style-name="T1">Il prodotto non contiene sostanze aventi proprietà di interferenza con il sistema endocrino in concentrazione ≥ 0,1%. </text:span></text:p>
        </draw:text-box>
      </draw:frame>
      <draw:polygon text:anchor-type="page" text:anchor-page-number="5" draw:z-index="2973" draw:name="Shape1313" draw:style-name="gr2" draw:text-style-name="P3" svg:width="0.6902in" svg:height="0.1118in" svg:x="0.4114in" svg:y="7.3264in" svg:viewBox="0 0 1754 285" draw:points="0,0 1754,0 1754,285 0,285">
        <text:p/>
      </draw:polygon>
      <draw:polygon text:anchor-type="page" text:anchor-page-number="10" draw:z-index="2972" draw:name="Shape3690" draw:style-name="gr2" draw:text-style-name="P3" svg:width="0.6898in" svg:height="0.1917in" svg:x="2.7732in" svg:y="8.1732in" svg:viewBox="0 0 1753 488" draw:points="0,0 1753,0 1753,488 0,488">
        <text:p/>
      </draw:polygon>
      <draw:frame text:anchor-type="page" text:anchor-page-number="9" draw:z-index="2971" draw:name="Shape3454" draw:style-name="gr1" draw:text-style-name="P2" svg:width="0.0433in" svg:height="0.1925in" svg:x="3.748in" svg:y="7.8874in">
        <draw:text-box>
          <text:p><text:span text:style-name="T2"><text:s/></text:span></text:p>
        </draw:text-box>
      </draw:frame>
      <draw:frame text:anchor-type="page" text:anchor-page-number="2" draw:z-index="2970" draw:name="Shape538" draw:style-name="gr1" draw:text-style-name="P2" svg:width="0.0433in" svg:height="0.1925in" svg:x="0.3634in" svg:y="7.361in">
        <draw:text-box>
          <text:p><text:span text:style-name="T2"><text:s/></text:span></text:p>
        </draw:text-box>
      </draw:frame>
      <draw:frame text:anchor-type="page" text:anchor-page-number="11" draw:z-index="2969" draw:name="Shape3956" draw:style-name="gr1" draw:text-style-name="P2" svg:width="6.5394in" svg:height="0.1295in" svg:x="0.3634in" svg:y="8.9402in">
        <draw:text-box>
          <text:p><text:span text:style-name="T1">Gli imballaggi contaminati devono essere inviati a recupero o smaltimento nel rispetto delle norme nazionali sulla gestione dei rifiuti. </text:span></text:p>
        </draw:text-box>
      </draw:frame>
      <draw:polygon text:anchor-type="page" text:anchor-page-number="10" draw:z-index="2968" draw:name="Shape3689" draw:style-name="gr2" draw:text-style-name="P3" svg:width="0.7882in" svg:height="0.1917in" svg:x="2.7248in" svg:y="8.1732in" svg:viewBox="0 0 2003 488" draw:points="0,0 2003,0 2003,488 0,488">
        <text:p/>
      </draw:polygon>
      <draw:frame text:anchor-type="page" text:anchor-page-number="14" draw:z-index="2967" draw:name="Shape4502" draw:style-name="gr1" draw:text-style-name="P2" svg:width="0.0433in" svg:height="0.1925in" svg:x="5.0181in" svg:y="4.3575in">
        <draw:text-box>
          <text:p><text:span text:style-name="T2"><text:s/></text:span></text:p>
        </draw:text-box>
      </draw:frame>
      <draw:polygon text:anchor-type="page" text:anchor-page-number="5" draw:z-index="2966" draw:name="Shape1312" draw:style-name="gr2" draw:text-style-name="P3" svg:width="0.7866in" svg:height="0.1118in" svg:x="0.363in" svg:y="7.3264in" svg:viewBox="0 0 1999 285" draw:points="0,0 1999,0 1999,285 0,285">
        <text:p/>
      </draw:polygon>
      <draw:frame text:anchor-type="page" text:anchor-page-number="3" draw:z-index="2965" draw:name="Shape864" draw:style-name="gr1" draw:text-style-name="P2" svg:width="0.0433in" svg:height="0.1925in" svg:x="0.411in" svg:y="3.8634in">
        <draw:text-box>
          <text:p><text:span text:style-name="T2"><text:s/></text:span></text:p>
        </draw:text-box>
      </draw:frame>
      <draw:polygon text:anchor-type="page" text:anchor-page-number="6" draw:z-index="2964" draw:name="Shape1930" draw:style-name="gr3" draw:text-style-name="P4" svg:width="0.7768in" svg:height="0.0098in" svg:x="1.5547in" svg:y="2.365in" svg:viewBox="0 0 1974 26" draw:points="0,0 1974,0 1974,26 0,26">
        <text:p/>
      </draw:polygon>
      <draw:frame text:anchor-type="page" text:anchor-page-number="7" draw:z-index="2963" draw:name="Shape2913" draw:style-name="gr1" draw:text-style-name="P2" svg:width="0.0433in" svg:height="0.1925in" svg:x="1.1382in" svg:y="7.2965in">
        <draw:text-box>
          <text:p><text:span text:style-name="T2"><text:s/></text:span></text:p>
        </draw:text-box>
      </draw:frame>
      <draw:frame text:anchor-type="page" text:anchor-page-number="1" draw:z-index="2962" draw:name="Shape187" draw:style-name="gr1" draw:text-style-name="P2" svg:width="0.0433in" svg:height="0.1925in" svg:x="6.5693in" svg:y="4.9335in">
        <draw:text-box>
          <text:p><text:span text:style-name="T2"><text:s/></text:span></text:p>
        </draw:text-box>
      </draw:frame>
      <draw:frame text:anchor-type="page" text:anchor-page-number="11" draw:z-index="2961" draw:name="Shape3955" draw:style-name="gr1" draw:text-style-name="P2" svg:width="1.4949in" svg:height="0.1295in" svg:x="0.3634in" svg:y="8.8138in">
        <draw:text-box>
          <text:p><text:span text:style-name="T1">IMBALLAGGI CONTAMINATI </text:span></text:p>
        </draw:text-box>
      </draw:frame>
      <draw:frame text:anchor-type="page" text:anchor-page-number="3" draw:z-index="2960" draw:name="Shape863" draw:style-name="gr1" draw:text-style-name="P2" svg:width="0.0433in" svg:height="0.1925in" svg:x="7.3016in" svg:y="3.4016in">
        <draw:text-box>
          <text:p><text:span text:style-name="T2"><text:s/></text:span></text:p>
        </draw:text-box>
      </draw:frame>
      <draw:frame text:anchor-type="page" text:anchor-page-number="5" draw:z-index="2959" draw:name="Shape1310" draw:style-name="gr1" draw:text-style-name="P2" svg:width="2.1213in" svg:height="0.113in" svg:x="2.7728in" svg:y="7.2173in">
        <draw:text-box>
          <text:p><text:span text:style-name="T4">și completarea hotărârii guvernului nr. 1.093/2006</text:span></text:p>
        </draw:text-box>
      </draw:frame>
      <draw:frame text:anchor-type="page" text:anchor-page-number="1" draw:z-index="2958" draw:name="Shape195" draw:style-name="gr1" draw:text-style-name="P2" svg:width="0.2567in" svg:height="0.1295in" svg:x="6.3165in" svg:y="4.9807in">
        <draw:text-box>
          <text:p><text:span text:style-name="T1"><text:s text:c="7"/>-</text:span></text:p>
        </draw:text-box>
      </draw:frame>
      <draw:polygon text:anchor-type="page" text:anchor-page-number="6" draw:z-index="2957" draw:name="Shape1929" draw:style-name="gr3" draw:text-style-name="P4" svg:width="0.0098in" svg:height="0.0098in" svg:x="1.5449in" svg:y="2.365in" svg:viewBox="0 0 26 26" draw:points="0,0 26,0 26,26 0,26">
        <text:p/>
      </draw:polygon>
      <draw:frame text:anchor-type="page" text:anchor-page-number="2" draw:z-index="2956" draw:name="Shape537" draw:style-name="gr1" draw:text-style-name="P2" svg:width="4.8217in" svg:height="0.1295in" svg:x="0.3634in" svg:y="7.2319in">
        <draw:text-box>
          <text:p><text:span text:style-name="T1">In base ai dati disponibili, il prodotto non contiene sostanze PBT o vPvB in percentuale ≥ a 0,1%. </text:span></text:p>
        </draw:text-box>
      </draw:frame>
      <draw:polygon text:anchor-type="page" text:anchor-page-number="7" draw:z-index="2955" draw:name="Shape2924" draw:style-name="gr2" draw:text-style-name="P3" svg:width="1.4783in" svg:height="0.1283in" svg:x="2.7732in" svg:y="7.3413in" svg:viewBox="0 0 3756 327" draw:points="0,0 3756,0 3756,327 0,327">
        <text:p/>
      </draw:polygon>
      <draw:polygon text:anchor-type="page" text:anchor-page-number="14" draw:z-index="2954" draw:name="Shape4518" draw:style-name="gr2" draw:text-style-name="P3" svg:width="0.4933in" svg:height="0.1917in" svg:x="6.1197in" svg:y="4.4031in" svg:viewBox="0 0 1254 488" draw:points="0,0 1254,0 1254,488 0,488">
        <text:p/>
      </draw:polygon>
      <draw:frame text:anchor-type="page" text:anchor-page-number="10" draw:z-index="2953" draw:name="Shape3688" draw:style-name="gr1" draw:text-style-name="P2" svg:width="2.0398in" svg:height="0.1295in" svg:x="0.4535in" svg:y="8.1736in">
        <draw:text-box>
          <text:p><text:span text:style-name="T1">NOEC Cronica Alghe / Piante Acquatiche</text:span></text:p>
        </draw:text-box>
      </draw:frame>
      <draw:frame text:anchor-type="page" text:anchor-page-number="9" draw:z-index="2952" draw:name="Shape3455" draw:style-name="gr1" draw:text-style-name="P2" svg:width="3.4071in" svg:height="0.1295in" svg:x="0.3634in" svg:y="7.9354in">
        <draw:text-box>
          <text:p><text:span text:style-name="T1">Non risponde ai criteri di classificazione per questa classe di pericolo</text:span></text:p>
        </draw:text-box>
      </draw:frame>
      <draw:frame text:anchor-type="page" text:anchor-page-number="11" draw:z-index="2951" draw:name="Shape3954" draw:style-name="gr1" draw:text-style-name="P2" svg:width="3.6587in" svg:height="0.1295in" svg:x="0.3634in" svg:y="8.6854in">
        <draw:text-box>
          <text:p><text:span text:style-name="T1">lavoro. Si veda la sezione 8 per l'eventuale necessità di dotazione di DPI. </text:span></text:p>
        </draw:text-box>
      </draw:frame>
      <draw:polygon text:anchor-type="page" text:anchor-page-number="6" draw:z-index="2950" draw:name="Shape1926" draw:style-name="gr3" draw:text-style-name="P4" svg:width="1.1819in" svg:height="0.0098in" svg:x="0.363in" svg:y="2.365in" svg:viewBox="0 0 3003 26" draw:points="0,0 3003,0 3003,26 0,26">
        <text:p/>
      </draw:polygon>
      <draw:frame text:anchor-type="page" text:anchor-page-number="9" draw:z-index="2949" draw:name="Shape3453" draw:style-name="gr1" draw:text-style-name="P2" svg:width="0.0433in" svg:height="0.1925in" svg:x="0.3634in" svg:y="7.7445in">
        <draw:text-box>
          <text:p><text:span text:style-name="T2"><text:s/></text:span></text:p>
        </draw:text-box>
      </draw:frame>
      <draw:frame text:anchor-type="page" text:anchor-page-number="5" draw:z-index="2948" draw:name="Shape1304" draw:style-name="gr1" draw:text-style-name="P2" svg:width="4.5843in" svg:height="0.113in" svg:x="2.7728in" svg:y="7.1055in">
        <draw:text-box>
          <text:p><text:span text:style-name="T4">Hotărârea nr. 53/2021 pentru modificarea hotărârii guvernului nr. 1.218/2006, precum și pentru modificarea </text:span></text:p>
        </draw:text-box>
      </draw:frame>
      <draw:polygon text:anchor-type="page" text:anchor-page-number="7" draw:z-index="2947" draw:name="Shape2923" draw:style-name="gr2" draw:text-style-name="P3" svg:width="1.5752in" svg:height="0.1917in" svg:x="2.7248in" svg:y="7.3413in" svg:viewBox="0 0 4002 488" draw:points="0,0 4002,0 4002,488 0,488">
        <text:p/>
      </draw:polygon>
      <draw:frame text:anchor-type="page" text:anchor-page-number="1" draw:z-index="2946" draw:name="Shape183" draw:style-name="gr1" draw:text-style-name="P2" svg:width="0.0433in" svg:height="0.1925in" svg:x="5.0563in" svg:y="4.9335in">
        <draw:text-box>
          <text:p><text:span text:style-name="T2"><text:s/></text:span></text:p>
        </draw:text-box>
      </draw:frame>
      <draw:frame text:anchor-type="page" text:anchor-page-number="10" draw:z-index="2945" draw:name="Shape3682" draw:style-name="gr1" draw:text-style-name="P2" svg:width="0.0433in" svg:height="0.1925in" svg:x="0.411in" svg:y="8.1264in">
        <draw:text-box>
          <text:p><text:span text:style-name="T2"><text:s/></text:span></text:p>
        </draw:text-box>
      </draw:frame>
      <draw:polygon text:anchor-type="page" text:anchor-page-number="14" draw:z-index="2944" draw:name="Shape4517" draw:style-name="gr2" draw:text-style-name="P3" svg:width="0.5898in" svg:height="0.1917in" svg:x="6.0717in" svg:y="4.4031in" svg:viewBox="0 0 1499 488" draw:points="0,0 1499,0 1499,488 0,488">
        <text:p/>
      </draw:polygon>
      <draw:frame text:anchor-type="page" text:anchor-page-number="2" draw:z-index="2943" draw:name="Shape536" draw:style-name="gr1" draw:text-style-name="P2" svg:width="0.0433in" svg:height="0.1925in" svg:x="0.3634in" svg:y="7.0417in">
        <draw:text-box>
          <text:p><text:span text:style-name="T2"><text:s/></text:span></text:p>
        </draw:text-box>
      </draw:frame>
      <draw:polygon text:anchor-type="page" text:anchor-page-number="3" draw:z-index="2942" draw:name="Shape866" draw:style-name="gr2" draw:text-style-name="P3" svg:width="1.8717in" svg:height="0.1283in" svg:x="0.4114in" svg:y="3.9083in" svg:viewBox="0 0 4755 327" draw:points="0,0 4755,0 4755,327 0,327">
        <text:p/>
      </draw:polygon>
      <draw:polygon text:anchor-type="page" text:anchor-page-number="1" draw:z-index="2941" draw:name="Shape206" draw:style-name="gr2" draw:text-style-name="P3" svg:width="1.4783in" svg:height="0.128in" svg:x="6.3165in" svg:y="4.9783in" svg:viewBox="0 0 3756 326" draw:points="0,0 3756,0 3756,326 0,326">
        <text:p/>
      </draw:polygon>
      <draw:frame text:anchor-type="page" text:anchor-page-number="2" draw:z-index="2940" draw:name="Shape535" draw:style-name="gr1" draw:text-style-name="P2" svg:width="0.0433in" svg:height="0.1925in" svg:x="0.3634in" svg:y="6.8492in">
        <draw:text-box>
          <text:p><text:span text:style-name="T2"><text:s/></text:span></text:p>
        </draw:text-box>
      </draw:frame>
      <draw:frame text:anchor-type="page" text:anchor-page-number="11" draw:z-index="2939" draw:name="Shape3953" draw:style-name="gr1" draw:text-style-name="P2" svg:width="7.4933in" svg:height="0.1295in" svg:x="0.3634in" svg:y="8.5571in">
        <draw:text-box>
          <text:p><text:span text:style-name="T1">La gestione dei rifiuti originati dall'uso o dalla dispersione di questo prodotto deve essere organizzata nel rispetto delle norme relative alla sicurezza sul </text:span></text:p>
        </draw:text-box>
      </draw:frame>
      <draw:frame text:anchor-type="page" text:anchor-page-number="10" draw:z-index="2938" draw:name="Shape3671" draw:style-name="gr1" draw:text-style-name="P2" svg:width="0.0433in" svg:height="0.1925in" svg:x="4.7717in" svg:y="7.9346in">
        <draw:text-box>
          <text:p><text:span text:style-name="T2"><text:s/></text:span></text:p>
        </draw:text-box>
      </draw:frame>
      <draw:frame text:anchor-type="page" text:anchor-page-number="7" draw:z-index="2937" draw:name="Shape2922" draw:style-name="gr1" draw:text-style-name="P2" svg:width="0.6913in" svg:height="0.1295in" svg:x="0.4535in" svg:y="7.3437in">
        <draw:text-box>
          <text:p><text:span text:style-name="T1">Infiammabilità</text:span></text:p>
        </draw:text-box>
      </draw:frame>
      <draw:polygon text:anchor-type="page" text:anchor-page-number="5" draw:z-index="2936" draw:name="Shape1309" draw:style-name="gr2" draw:text-style-name="P3" svg:width="4.6283in" svg:height="0.1114in" svg:x="2.7732in" svg:y="7.215in" svg:viewBox="0 0 11757 284" draw:points="0,0 11757,0 11757,284 0,284">
        <text:p/>
      </draw:polygon>
      <draw:polygon text:anchor-type="page" text:anchor-page-number="3" draw:z-index="2935" draw:name="Shape865" draw:style-name="gr2" draw:text-style-name="P3" svg:width="1.9685in" svg:height="0.5114in" svg:x="0.363in" svg:y="3.9083in" svg:viewBox="0 0 5001 1300" draw:points="0,0 5001,0 5001,1300 0,1300">
        <text:p/>
      </draw:polygon>
      <draw:frame text:anchor-type="page" text:anchor-page-number="6" draw:z-index="2934" draw:name="Shape1973" draw:style-name="gr1" draw:text-style-name="P2" svg:width="0.3398in" svg:height="0.113in" svg:x="6.7098in" svg:y="2.3772in">
        <draw:text-box>
          <text:p><text:span text:style-name="T4">Hinweis</text:span></text:p>
        </draw:text-box>
      </draw:frame>
      <draw:frame text:anchor-type="page" text:anchor-page-number="9" draw:z-index="2933" draw:name="Shape3450" draw:style-name="gr1" draw:text-style-name="P2" svg:width="0.0433in" svg:height="0.1925in" svg:x="2.9752in" svg:y="7.5681in">
        <draw:text-box>
          <text:p><text:span text:style-name="T2"><text:s/></text:span></text:p>
        </draw:text-box>
      </draw:frame>
      <draw:frame text:anchor-type="page" text:anchor-page-number="14" draw:z-index="2932" draw:name="Shape4516" draw:style-name="gr1" draw:text-style-name="P2" svg:width="3.2516in" svg:height="0.1295in" svg:x="1.7882in" svg:y="4.4055in">
        <draw:text-box>
          <text:p><text:span text:style-name="T1">Pericoloso per l`ambiente acquatico, tossicità cronica, categoria 1</text:span></text:p>
        </draw:text-box>
      </draw:frame>
      <draw:frame text:anchor-type="page" text:anchor-page-number="3" draw:z-index="2931" draw:name="Shape849" draw:style-name="gr1" draw:text-style-name="P2" svg:width="0.0433in" svg:height="0.1925in" svg:x="3.3634in" svg:y="3.4016in">
        <draw:text-box>
          <text:p><text:span text:style-name="T2"><text:s/></text:span></text:p>
        </draw:text-box>
      </draw:frame>
      <draw:frame text:anchor-type="page" text:anchor-page-number="14" draw:z-index="2930" draw:name="Shape4501" draw:style-name="gr1" draw:text-style-name="P2" svg:width="0.0433in" svg:height="0.1925in" svg:x="1.2846in" svg:y="4.3429in">
        <draw:text-box>
          <text:p><text:span text:style-name="T2"><text:s/></text:span></text:p>
        </draw:text-box>
      </draw:frame>
      <draw:polygon text:anchor-type="page" text:anchor-page-number="9" draw:z-index="2929" draw:name="Shape3452" draw:style-name="gr3" draw:text-style-name="P4" svg:width="2.6118in" svg:height="0.0083in" svg:x="0.363in" svg:y="7.7283in" svg:viewBox="0 0 6635 22" draw:points="0,0 6635,0 6635,22 0,22">
        <text:p/>
      </draw:polygon>
      <draw:frame text:anchor-type="page" text:anchor-page-number="7" draw:z-index="2928" draw:name="Shape2912" draw:style-name="gr1" draw:text-style-name="P2" svg:width="0.0433in" svg:height="0.1925in" svg:x="0.411in" svg:y="7.2965in">
        <draw:text-box>
          <text:p><text:span text:style-name="T2"><text:s/></text:span></text:p>
        </draw:text-box>
      </draw:frame>
      <draw:polygon text:anchor-type="page" text:anchor-page-number="10" draw:z-index="2927" draw:name="Shape3685" draw:style-name="gr2" draw:text-style-name="P3" svg:width="2.265in" svg:height="0.1264in" svg:x="0.4114in" svg:y="8.1732in" svg:viewBox="0 0 5754 322" draw:points="0,0 5754,0 5754,322 0,322">
        <text:p/>
      </draw:polygon>
      <draw:polygon text:anchor-type="page" text:anchor-page-number="1" draw:z-index="2926" draw:name="Shape205" draw:style-name="gr2" draw:text-style-name="P3" svg:width="1.5752in" svg:height="0.5118in" svg:x="6.2681in" svg:y="4.978in" svg:viewBox="0 0 4002 1301" draw:points="0,0 4002,0 4002,1301 0,1301">
        <text:p/>
      </draw:polygon>
      <draw:frame text:anchor-type="page" text:anchor-page-number="6" draw:z-index="2925" draw:name="Shape1917" draw:style-name="gr1" draw:text-style-name="P2" svg:width="0.0433in" svg:height="0.1925in" svg:x="6.2846in" svg:y="2.3161in">
        <draw:text-box>
          <text:p><text:span text:style-name="T2"><text:s/></text:span></text:p>
        </draw:text-box>
      </draw:frame>
      <draw:frame text:anchor-type="page" text:anchor-page-number="11" draw:z-index="2924" draw:name="Shape3952" draw:style-name="gr1" draw:text-style-name="P2" svg:width="7.4516in" svg:height="0.1295in" svg:x="0.3634in" svg:y="8.4307in">
        <draw:text-box>
          <text:p><text:span text:style-name="T1">Lo smaltimento deve essere affidato ad una società autorizzata alla gestione dei rifiuti, nel rispetto della normativa nazionale ed eventualmente locale. </text:span></text:p>
        </draw:text-box>
      </draw:frame>
      <draw:frame text:anchor-type="page" text:anchor-page-number="5" draw:z-index="2923" draw:name="Shape1293" draw:style-name="gr1" draw:text-style-name="P2" svg:width="0.0433in" svg:height="0.1925in" svg:x="1.5866in" svg:y="7.0445in">
        <draw:text-box>
          <text:p><text:span text:style-name="T2"><text:s/></text:span></text:p>
        </draw:text-box>
      </draw:frame>
      <draw:frame text:anchor-type="page" text:anchor-page-number="2" draw:z-index="2922" draw:name="Shape534" draw:style-name="gr1" draw:text-style-name="P2" svg:width="0.898in" svg:height="0.1295in" svg:x="0.3634in" svg:y="6.7189in">
        <draw:text-box>
          <text:p><text:span text:style-name="T3">2.3. Altri pericoli </text:span></text:p>
        </draw:text-box>
      </draw:frame>
      <draw:frame text:anchor-type="page" text:anchor-page-number="7" draw:z-index="2921" draw:name="Shape2907" draw:style-name="gr1" draw:text-style-name="P2" svg:width="0.0433in" svg:height="0.1925in" svg:x="6.0846in" svg:y="7.1047in">
        <draw:text-box>
          <text:p><text:span text:style-name="T2"><text:s/></text:span></text:p>
        </draw:text-box>
      </draw:frame>
      <draw:frame text:anchor-type="page" text:anchor-page-number="1" draw:z-index="2920" draw:name="Shape194" draw:style-name="gr1" draw:text-style-name="P2" svg:width="0.3185in" svg:height="0.1295in" svg:x="4.7417in" svg:y="4.9807in">
        <draw:text-box>
          <text:p><text:span text:style-name="T1"><text:s text:c="9"/>-</text:span></text:p>
        </draw:text-box>
      </draw:frame>
      <draw:polygon text:anchor-type="page" text:anchor-page-number="14" draw:z-index="2919" draw:name="Shape4515" draw:style-name="gr2" draw:text-style-name="P3" svg:width="4.235in" svg:height="0.1283in" svg:x="1.7882in" svg:y="4.4031in" svg:viewBox="0 0 10758 327" draw:points="0,0 10758,0 10758,327 0,327">
        <text:p/>
      </draw:polygon>
      <draw:polygon text:anchor-type="page" text:anchor-page-number="6" draw:z-index="2918" draw:name="Shape1972" draw:style-name="gr2" draw:text-style-name="P3" svg:width="1.085in" svg:height="0.1118in" svg:x="6.7098in" svg:y="2.3748in" svg:viewBox="0 0 2757 285" draw:points="0,0 2757,0 2757,285 0,285">
        <text:p/>
      </draw:polygon>
      <draw:polygon text:anchor-type="page" text:anchor-page-number="5" draw:z-index="2917" draw:name="Shape1303" draw:style-name="gr2" draw:text-style-name="P3" svg:width="4.6283in" svg:height="0.1118in" svg:x="2.7732in" svg:y="7.1031in" svg:viewBox="0 0 11757 285" draw:points="0,0 11757,0 11757,285 0,285">
        <text:p/>
      </draw:polygon>
      <draw:polygon text:anchor-type="page" text:anchor-page-number="10" draw:z-index="2916" draw:name="Shape3684" draw:style-name="gr2" draw:text-style-name="P3" svg:width="2.3618in" svg:height="0.1917in" svg:x="0.363in" svg:y="8.1732in" svg:viewBox="0 0 6000 488" draw:points="0,0 6000,0 6000,488 0,488">
        <text:p/>
      </draw:polygon>
      <draw:frame text:anchor-type="page" text:anchor-page-number="9" draw:z-index="2915" draw:name="Shape3451" draw:style-name="gr1" draw:text-style-name="P2" svg:width="2.613in" svg:height="0.1295in" svg:x="0.3634in" svg:y="7.6154in">
        <draw:text-box>
          <text:p><text:span text:style-name="T1">GRAVI DANNI OCULARI / IRRITAZIONE OCULARE</text:span></text:p>
        </draw:text-box>
      </draw:frame>
      <draw:polygon text:anchor-type="page" text:anchor-page-number="3" draw:z-index="2914" draw:name="Shape862" draw:style-name="gr2" draw:text-style-name="P3" svg:width="0.2965in" svg:height="0.1917in" svg:x="7.3016in" svg:y="3.398in" svg:viewBox="0 0 754 488" draw:points="0,0 754,0 754,488 0,488">
        <text:p/>
      </draw:polygon>
      <draw:frame text:anchor-type="page" text:anchor-page-number="2" draw:z-index="2913" draw:name="Shape533" draw:style-name="gr1" draw:text-style-name="P2" svg:width="0.0433in" svg:height="0.1925in" svg:x="0.3634in" svg:y="6.5311in">
        <draw:text-box>
          <text:p><text:span text:style-name="T2"><text:s/></text:span></text:p>
        </draw:text-box>
      </draw:frame>
      <draw:frame text:anchor-type="page" text:anchor-page-number="11" draw:z-index="2912" draw:name="Shape3951" draw:style-name="gr1" draw:text-style-name="P2" svg:width="5.185in" svg:height="0.1295in" svg:x="0.3634in" svg:y="8.302in">
        <draw:text-box>
          <text:p><text:span text:style-name="T1">Riutilizzare, se possibile. I residui del prodotto tal quali sono da considerare rifiuti speciali non pericolosi. </text:span></text:p>
        </draw:text-box>
      </draw:frame>
      <draw:polygon text:anchor-type="page" text:anchor-page-number="14" draw:z-index="2911" draw:name="Shape4514" draw:style-name="gr2" draw:text-style-name="P3" svg:width="4.3319in" svg:height="0.1917in" svg:x="1.7398in" svg:y="4.4031in" svg:viewBox="0 0 11004 488" draw:points="0,0 11004,0 11004,488 0,488">
        <text:p/>
      </draw:polygon>
      <draw:frame text:anchor-type="page" text:anchor-page-number="10" draw:z-index="2910" draw:name="Shape3680" draw:style-name="gr1" draw:text-style-name="P2" svg:width="1.2197in" svg:height="0.1295in" svg:x="3.561in" svg:y="7.9819in">
        <draw:text-box>
          <text:p><text:span text:style-name="T1">0.1 mg/l Daphnia magna</text:span></text:p>
        </draw:text-box>
      </draw:frame>
      <draw:frame text:anchor-type="page" text:anchor-page-number="9" draw:z-index="2909" draw:name="Shape3449" draw:style-name="gr1" draw:text-style-name="P2" svg:width="0.0433in" svg:height="0.1925in" svg:x="0.3634in" svg:y="7.4252in">
        <draw:text-box>
          <text:p><text:span text:style-name="T2"><text:s/></text:span></text:p>
        </draw:text-box>
      </draw:frame>
      <draw:frame text:anchor-type="page" text:anchor-page-number="11" draw:z-index="2908" draw:name="Shape3950" draw:style-name="gr1" draw:text-style-name="P2" svg:width="0.0433in" svg:height="0.1925in" svg:x="0.3634in" svg:y="8.111in">
        <draw:text-box>
          <text:p><text:span text:style-name="T2"><text:s/></text:span></text:p>
        </draw:text-box>
      </draw:frame>
      <draw:frame text:anchor-type="page" text:anchor-page-number="1" draw:z-index="2907" draw:name="Shape200" draw:style-name="gr1" draw:text-style-name="P2" svg:width="0.0433in" svg:height="0.1925in" svg:x="3.698in" svg:y="5.3161in">
        <draw:text-box>
          <text:p><text:span text:style-name="T2"><text:s/></text:span></text:p>
        </draw:text-box>
      </draw:frame>
      <draw:polygon text:anchor-type="page" text:anchor-page-number="3" draw:z-index="2906" draw:name="Shape861" draw:style-name="gr2" draw:text-style-name="P3" svg:width="0.3933in" svg:height="0.5102in" svg:x="7.2531in" svg:y="3.398in" svg:viewBox="0 0 1000 1297" draw:points="0,0 1000,0 1000,1297 0,1297">
        <text:p/>
      </draw:polygon>
      <draw:polygon text:anchor-type="page" text:anchor-page-number="7" draw:z-index="2905" draw:name="Shape2915" draw:style-name="gr2" draw:text-style-name="P3" svg:width="2.265in" svg:height="0.1283in" svg:x="0.4114in" svg:y="7.3413in" svg:viewBox="0 0 5754 327" draw:points="0,0 5754,0 5754,327 0,327">
        <text:p/>
      </draw:polygon>
      <draw:frame text:anchor-type="page" text:anchor-page-number="13" draw:z-index="2904" draw:name="Shape4305" draw:style-name="gr1" draw:text-style-name="P2" svg:width="5.5949in" svg:height="0.1295in" svg:x="0.3634in" svg:y="10.1071in">
        <draw:text-box>
          <text:p><text:span text:style-name="T1">Non è stata elaborata una valutazione di sicurezza chimica per la miscela / per le sostanze indicate in sezione 3. </text:span></text:p>
        </draw:text-box>
      </draw:frame>
      <draw:polygon text:anchor-type="page" text:anchor-page-number="6" draw:z-index="2903" draw:name="Shape1971" draw:style-name="gr2" draw:text-style-name="P3" svg:width="1.1819in" svg:height="0.1917in" svg:x="6.6614in" svg:y="2.3748in" svg:viewBox="0 0 3003 488" draw:points="0,0 3003,0 3003,488 0,488">
        <text:p/>
      </draw:polygon>
      <draw:polygon text:anchor-type="page" text:anchor-page-number="5" draw:z-index="2902" draw:name="Shape1302" draw:style-name="gr2" draw:text-style-name="P3" svg:width="4.7252in" svg:height="0.2232in" svg:x="2.7248in" svg:y="7.1031in" svg:viewBox="0 0 12003 568" draw:points="0,0 12003,0 12003,568 0,568">
        <text:p/>
      </draw:polygon>
      <draw:frame text:anchor-type="page" text:anchor-page-number="2" draw:z-index="2901" draw:name="Shape532" draw:style-name="gr1" draw:text-style-name="P2" svg:width="0.0433in" svg:height="0.1925in" svg:x="4.9382in" svg:y="6.3398in">
        <draw:text-box>
          <text:p><text:span text:style-name="T2"><text:s/></text:span></text:p>
        </draw:text-box>
      </draw:frame>
      <draw:frame text:anchor-type="page" text:anchor-page-number="9" draw:z-index="2900" draw:name="Shape3447" draw:style-name="gr1" draw:text-style-name="P2" svg:width="0.0433in" svg:height="0.1925in" svg:x="3.748in" svg:y="7.248in">
        <draw:text-box>
          <text:p><text:span text:style-name="T2"><text:s/></text:span></text:p>
        </draw:text-box>
      </draw:frame>
      <draw:frame text:anchor-type="page" text:anchor-page-number="3" draw:z-index="2899" draw:name="Shape845" draw:style-name="gr1" draw:text-style-name="P2" svg:width="0.0433in" svg:height="0.1925in" svg:x="2.3799in" svg:y="3.4016in">
        <draw:text-box>
          <text:p><text:span text:style-name="T2"><text:s/></text:span></text:p>
        </draw:text-box>
      </draw:frame>
      <draw:polygon text:anchor-type="page" text:anchor-page-number="1" draw:z-index="2898" draw:name="Shape204" draw:style-name="gr2" draw:text-style-name="P3" svg:width="1.4783in" svg:height="0.128in" svg:x="4.7413in" svg:y="4.9783in" svg:viewBox="0 0 3756 326" draw:points="0,0 3756,0 3756,326 0,326">
        <text:p/>
      </draw:polygon>
      <draw:frame text:anchor-type="page" text:anchor-page-number="14" draw:z-index="2897" draw:name="Shape4507" draw:style-name="gr1" draw:text-style-name="P2" svg:width="0.8276in" svg:height="0.113in" svg:x="0.4535in" svg:y="4.4043in">
        <draw:text-box>
          <text:p><text:span text:style-name="T5">Aquatic Chronic 1</text:span></text:p>
        </draw:text-box>
      </draw:frame>
      <draw:frame text:anchor-type="page" text:anchor-page-number="10" draw:z-index="2896" draw:name="Shape3681" draw:style-name="gr1" draw:text-style-name="P2" svg:width="0.0433in" svg:height="0.1925in" svg:x="2.7728in" svg:y="7.9846in">
        <draw:text-box>
          <text:p><text:span text:style-name="T2"><text:s/></text:span></text:p>
        </draw:text-box>
      </draw:frame>
      <draw:frame text:anchor-type="page" text:anchor-page-number="5" draw:z-index="2895" draw:name="Shape1301" draw:style-name="gr1" draw:text-style-name="P2" svg:width="0.3878in" svg:height="0.113in" svg:x="1.198in" svg:y="7.1055in">
        <draw:text-box>
          <text:p><text:span text:style-name="T4">România</text:span></text:p>
        </draw:text-box>
      </draw:frame>
      <draw:frame text:anchor-type="page" text:anchor-page-number="2" draw:z-index="2894" draw:name="Shape519" draw:style-name="gr1" draw:text-style-name="P2" svg:width="0.0433in" svg:height="0.1925in" svg:x="4.6264in" svg:y="6.2898in">
        <draw:text-box>
          <text:p><text:span text:style-name="T2"><text:s/></text:span></text:p>
        </draw:text-box>
      </draw:frame>
      <draw:frame text:anchor-type="page" text:anchor-page-number="13" draw:z-index="2893" draw:name="Shape4304" draw:style-name="gr1" draw:text-style-name="P2" svg:width="0.0433in" svg:height="0.1925in" svg:x="0.3634in" svg:y="9.9161in">
        <draw:text-box>
          <text:p><text:span text:style-name="T2"><text:s/></text:span></text:p>
        </draw:text-box>
      </draw:frame>
      <draw:frame text:anchor-type="page" text:anchor-page-number="6" draw:z-index="2892" draw:name="Shape1967" draw:style-name="gr1" draw:text-style-name="P2" svg:width="0.3614in" svg:height="0.113in" svg:x="5.9228in" svg:y="2.3772in">
        <draw:text-box>
          <text:p><text:span text:style-name="T4">RESPIR</text:span></text:p>
        </draw:text-box>
      </draw:frame>
      <draw:frame text:anchor-type="page" text:anchor-page-number="11" draw:z-index="2891" draw:name="Shape3949" draw:style-name="gr1" draw:text-style-name="P2" svg:width="1.9524in" svg:height="0.1295in" svg:x="0.3634in" svg:y="7.9807in">
        <draw:text-box>
          <text:p><text:span text:style-name="T3">13.1. Metodi di trattamento dei rifiuti </text:span></text:p>
        </draw:text-box>
      </draw:frame>
      <draw:polygon text:anchor-type="page" text:anchor-page-number="7" draw:z-index="2890" draw:name="Shape2921" draw:style-name="gr2" draw:text-style-name="P3" svg:width="2.3618in" svg:height="0.1917in" svg:x="0.363in" svg:y="7.3413in" svg:viewBox="0 0 6000 488" draw:points="0,0 6000,0 6000,488 0,488">
        <text:p/>
      </draw:polygon>
      <draw:frame text:anchor-type="page" text:anchor-page-number="14" draw:z-index="2889" draw:name="Shape4500" draw:style-name="gr1" draw:text-style-name="P2" svg:width="0.0433in" svg:height="0.1925in" svg:x="0.411in" svg:y="4.3429in">
        <draw:text-box>
          <text:p><text:span text:style-name="T2"><text:s/></text:span></text:p>
        </draw:text-box>
      </draw:frame>
      <draw:frame text:anchor-type="page" text:anchor-page-number="5" draw:z-index="2888" draw:name="Shape1292" draw:style-name="gr1" draw:text-style-name="P2" svg:width="0.0433in" svg:height="0.1925in" svg:x="0.6693in" svg:y="7.0445in">
        <draw:text-box>
          <text:p><text:span text:style-name="T2"><text:s/></text:span></text:p>
        </draw:text-box>
      </draw:frame>
      <draw:frame text:anchor-type="page" text:anchor-page-number="11" draw:z-index="2887" draw:name="Shape3948" draw:style-name="gr1" draw:text-style-name="P2" svg:width="0.0433in" svg:height="0.1925in" svg:x="0.3634in" svg:y="7.7929in">
        <draw:text-box>
          <text:p><text:span text:style-name="T2"><text:s/></text:span></text:p>
        </draw:text-box>
      </draw:frame>
      <draw:polygon text:anchor-type="page" text:anchor-page-number="1" draw:z-index="2886" draw:name="Shape203" draw:style-name="gr2" draw:text-style-name="P3" svg:width="1.5748in" svg:height="0.5118in" svg:x="4.6933in" svg:y="4.978in" svg:viewBox="0 0 4001 1301" draw:points="0,0 4001,0 4001,1301 0,1301">
        <text:p/>
      </draw:polygon>
      <draw:frame text:anchor-type="page" text:anchor-page-number="7" draw:z-index="2885" draw:name="Shape2910" draw:style-name="gr1" draw:text-style-name="P2" svg:width="1.7496in" svg:height="0.1295in" svg:x="4.348in" svg:y="7.152in">
        <draw:text-box>
          <text:p><text:span text:style-name="T1">Punto di ebollizione iniziale: 100 °C</text:span></text:p>
        </draw:text-box>
      </draw:frame>
      <draw:polygon text:anchor-type="page" text:anchor-page-number="2" draw:z-index="2884" draw:name="Shape531" draw:style-name="gr2" draw:text-style-name="P3" svg:width="2.8567in" svg:height="0.1913in" svg:x="4.9382in" svg:y="6.3366in" svg:viewBox="0 0 7257 487" draw:points="0,0 7257,0 7257,487 0,487">
        <text:p/>
      </draw:polygon>
      <draw:polygon text:anchor-type="page" text:anchor-page-number="3" draw:z-index="2883" draw:name="Shape848" draw:style-name="gr2" draw:text-style-name="P3" svg:width="3.8417in" svg:height="0.1917in" svg:x="3.363in" svg:y="3.398in" svg:viewBox="0 0 9759 488" draw:points="0,0 9759,0 9759,488 0,488">
        <text:p/>
      </draw:polygon>
      <draw:frame text:anchor-type="page" text:anchor-page-number="9" draw:z-index="2882" draw:name="Shape3448" draw:style-name="gr1" draw:text-style-name="P2" svg:width="3.4071in" svg:height="0.1295in" svg:x="0.3634in" svg:y="7.2953in">
        <draw:text-box>
          <text:p><text:span text:style-name="T1">Non risponde ai criteri di classificazione per questa classe di pericolo</text:span></text:p>
        </draw:text-box>
      </draw:frame>
      <draw:frame text:anchor-type="page" text:anchor-page-number="13" draw:z-index="2881" draw:name="Shape4300" draw:style-name="gr1" draw:text-style-name="P2" svg:width="0.0433in" svg:height="0.1925in" svg:x="2.6083in" svg:y="9.7374in">
        <draw:text-box>
          <text:p><text:span text:style-name="T2"><text:s/></text:span></text:p>
        </draw:text-box>
      </draw:frame>
      <draw:polygon text:anchor-type="page" text:anchor-page-number="10" draw:z-index="2880" draw:name="Shape3687" draw:style-name="gr2" draw:text-style-name="P3" svg:width="3.8402in" svg:height="0.1268in" svg:x="3.5614in" svg:y="7.9815in" svg:viewBox="0 0 9755 323" draw:points="0,0 9755,0 9755,323 0,323">
        <text:p/>
      </draw:polygon>
      <draw:frame text:anchor-type="page" text:anchor-page-number="6" draw:z-index="2879" draw:name="Shape1968" draw:style-name="gr1" draw:text-style-name="P2" svg:width="0.0433in" svg:height="0.1925in" svg:x="5.3335in" svg:y="2.378in">
        <draw:text-box>
          <text:p><text:span text:style-name="T2"><text:s/></text:span></text:p>
        </draw:text-box>
      </draw:frame>
      <draw:frame text:anchor-type="page" text:anchor-page-number="9" draw:z-index="2878" draw:name="Shape3446" draw:style-name="gr1" draw:text-style-name="P2" svg:width="0.0433in" svg:height="0.1925in" svg:x="0.3634in" svg:y="7.1063in">
        <draw:text-box>
          <text:p><text:span text:style-name="T2"><text:s/></text:span></text:p>
        </draw:text-box>
      </draw:frame>
      <draw:frame text:anchor-type="page" text:anchor-page-number="1" draw:z-index="2877" draw:name="Shape202" draw:style-name="gr1" draw:text-style-name="P2" svg:width="0.5232in" svg:height="0.1295in" svg:x="3.1665in" svg:y="5.3638in">
        <draw:text-box>
          <text:p><text:span text:style-name="T1">LCS: F, M.</text:span></text:p>
        </draw:text-box>
      </draw:frame>
      <draw:frame text:anchor-type="page" text:anchor-page-number="7" draw:z-index="2876" draw:name="Shape2918" draw:style-name="gr1" draw:text-style-name="P2" svg:width="0.0433in" svg:height="0.1925in" svg:x="2.7728in" svg:y="7.1535in">
        <draw:text-box>
          <text:p><text:span text:style-name="T2"><text:s/></text:span></text:p>
        </draw:text-box>
      </draw:frame>
      <draw:frame text:anchor-type="page" text:anchor-page-number="13" draw:z-index="2875" draw:name="Shape4301" draw:style-name="gr1" draw:text-style-name="P2" svg:width="2.1642in" svg:height="0.1295in" svg:x="0.4535in" svg:y="9.7854in">
        <draw:text-box>
          <text:p><text:span text:style-name="T3">15.2. Valutazione della sicurezza chimica</text:span></text:p>
        </draw:text-box>
      </draw:frame>
      <draw:polygon text:anchor-type="page" text:anchor-page-number="5" draw:z-index="2874" draw:name="Shape1300" draw:style-name="gr2" draw:text-style-name="P3" svg:width="1.4783in" svg:height="0.1118in" svg:x="1.198in" svg:y="7.1031in" svg:viewBox="0 0 3756 285" draw:points="0,0 3756,0 3756,285 0,285">
        <text:p/>
      </draw:polygon>
      <draw:polygon text:anchor-type="page" text:anchor-page-number="6" draw:z-index="2873" draw:name="Shape1966" draw:style-name="gr2" draw:text-style-name="P3" svg:width="0.6898in" svg:height="0.1118in" svg:x="5.9232in" svg:y="2.3748in" svg:viewBox="0 0 1753 285" draw:points="0,0 1753,0 1753,285 0,285">
        <text:p/>
      </draw:polygon>
      <draw:frame text:anchor-type="page" text:anchor-page-number="14" draw:z-index="2872" draw:name="Shape4499" draw:style-name="gr1" draw:text-style-name="P2" svg:width="0.0433in" svg:height="0.1925in" svg:x="6.1193in" svg:y="4.2146in">
        <draw:text-box>
          <text:p><text:span text:style-name="T2"><text:s/></text:span></text:p>
        </draw:text-box>
      </draw:frame>
      <draw:polygon text:anchor-type="page" text:anchor-page-number="10" draw:z-index="2871" draw:name="Shape3686" draw:style-name="gr2" draw:text-style-name="P3" svg:width="3.937in" svg:height="0.1917in" svg:x="3.513in" svg:y="7.9815in" svg:viewBox="0 0 10001 488" draw:points="0,0 10001,0 10001,488 0,488">
        <text:p/>
      </draw:polygon>
      <draw:polygon text:anchor-type="page" text:anchor-page-number="3" draw:z-index="2870" draw:name="Shape860" draw:style-name="gr2" draw:text-style-name="P3" svg:width="3.9382in" svg:height="0.5102in" svg:x="3.315in" svg:y="3.398in" svg:viewBox="0 0 10004 1297" draw:points="0,0 10004,0 10004,1297 0,1297">
        <text:p/>
      </draw:polygon>
      <draw:polygon text:anchor-type="page" text:anchor-page-number="2" draw:z-index="2869" draw:name="Shape530" draw:style-name="gr2" draw:text-style-name="P3" svg:width="2.9535in" svg:height="0.1913in" svg:x="4.8898in" svg:y="6.3366in" svg:viewBox="0 0 7503 487" draw:points="0,0 7503,0 7503,487 0,487">
        <text:p/>
      </draw:polygon>
      <draw:frame text:anchor-type="page" text:anchor-page-number="11" draw:z-index="2868" draw:name="Shape3944" draw:style-name="gr1" draw:text-style-name="P2" svg:width="0.0433in" svg:height="0.1925in" svg:x="3.8583in" svg:y="7.6047in">
        <draw:text-box>
          <text:p><text:span text:style-name="T2"><text:s/></text:span></text:p>
        </draw:text-box>
      </draw:frame>
      <draw:polygon text:anchor-type="page" text:anchor-page-number="5" draw:z-index="2867" draw:name="Shape1299" draw:style-name="gr2" draw:text-style-name="P3" svg:width="1.5752in" svg:height="0.2232in" svg:x="1.15in" svg:y="7.1031in" svg:viewBox="0 0 4002 568" draw:points="0,0 4002,0 4002,568 0,568">
        <text:p/>
      </draw:polygon>
      <draw:polygon text:anchor-type="page" text:anchor-page-number="14" draw:z-index="2866" draw:name="Shape4504" draw:style-name="gr2" draw:text-style-name="P3" svg:width="1.2799in" svg:height="0.1118in" svg:x="0.4114in" svg:y="4.4031in" svg:viewBox="0 0 3252 285" draw:points="0,0 3252,0 3252,285 0,285">
        <text:p/>
      </draw:polygon>
      <draw:frame text:anchor-type="page" text:anchor-page-number="11" draw:z-index="2865" draw:name="Shape3947" draw:style-name="gr1" draw:text-style-name="P2" svg:width="3.4213in" svg:height="0.1776in" svg:x="0.4535in" svg:y="7.6138in">
        <draw:text-box>
          <text:p><text:span text:style-name="T6">SEZIONE 13. Considerazioni sullo smaltimento</text:span></text:p>
        </draw:text-box>
      </draw:frame>
      <draw:frame text:anchor-type="page" text:anchor-page-number="1" draw:z-index="2864" draw:name="Shape199" draw:style-name="gr1" draw:text-style-name="P2" svg:width="0.4059in" svg:height="0.1295in" svg:x="3.1665in" svg:y="5.2354in">
        <draw:text-box>
          <text:p><text:span text:style-name="T1">PC: 9a. </text:span></text:p>
        </draw:text-box>
      </draw:frame>
      <draw:frame text:anchor-type="page" text:anchor-page-number="2" draw:z-index="2863" draw:name="Shape529" draw:style-name="gr1" draw:text-style-name="P2" svg:width="0.2815in" svg:height="0.1295in" svg:x="4.348in" svg:y="6.3366in">
        <draw:text-box>
          <text:p><text:span text:style-name="T1">30.00</text:span></text:p>
        </draw:text-box>
      </draw:frame>
      <draw:frame text:anchor-type="page" text:anchor-page-number="9" draw:z-index="2862" draw:name="Shape3443" draw:style-name="gr1" draw:text-style-name="P2" svg:width="0.0433in" svg:height="0.1925in" svg:x="3.0417in" svg:y="6.9299in">
        <draw:text-box>
          <text:p><text:span text:style-name="T2"><text:s/></text:span></text:p>
        </draw:text-box>
      </draw:frame>
      <draw:frame text:anchor-type="page" text:anchor-page-number="10" draw:z-index="2861" draw:name="Shape3666" draw:style-name="gr1" draw:text-style-name="P2" svg:width="0.0433in" svg:height="0.1925in" svg:x="1.6882in" svg:y="7.9346in">
        <draw:text-box>
          <text:p><text:span text:style-name="T2"><text:s/></text:span></text:p>
        </draw:text-box>
      </draw:frame>
      <draw:frame text:anchor-type="page" text:anchor-page-number="3" draw:z-index="2860" draw:name="Shape852" draw:style-name="gr1" draw:text-style-name="P2" svg:width="0.0433in" svg:height="0.1925in" svg:x="0.9181in" svg:y="3.7335in">
        <draw:text-box>
          <text:p><text:span text:style-name="T2"><text:s/></text:span></text:p>
        </draw:text-box>
      </draw:frame>
      <draw:frame text:anchor-type="page" text:anchor-page-number="13" draw:z-index="2859" draw:name="Shape4299" draw:style-name="gr1" draw:text-style-name="P2" svg:width="0.0433in" svg:height="0.1925in" svg:x="0.411in" svg:y="9.7374in">
        <draw:text-box>
          <text:p><text:span text:style-name="T2"><text:s/></text:span></text:p>
        </draw:text-box>
      </draw:frame>
      <draw:polygon text:anchor-type="page" text:anchor-page-number="6" draw:z-index="2858" draw:name="Shape1965" draw:style-name="gr2" draw:text-style-name="P3" svg:width="0.7866in" svg:height="0.1917in" svg:x="5.8748in" svg:y="2.3748in" svg:viewBox="0 0 1999 488" draw:points="0,0 1999,0 1999,488 0,488">
        <text:p/>
      </draw:polygon>
      <draw:polygon text:anchor-type="page" text:anchor-page-number="7" draw:z-index="2857" draw:name="Shape2920" draw:style-name="gr2" draw:text-style-name="P3" svg:width="2.265in" svg:height="0.128in" svg:x="4.348in" svg:y="7.15in" svg:viewBox="0 0 5754 326" draw:points="0,0 5754,0 5754,326 0,326">
        <text:p/>
      </draw:polygon>
      <draw:polygon text:anchor-type="page" text:anchor-page-number="3" draw:z-index="2856" draw:name="Shape857" draw:style-name="gr2" draw:text-style-name="P3" svg:width="0.8866in" svg:height="0.1917in" svg:x="2.3799in" svg:y="3.398in" svg:viewBox="0 0 2253 488" draw:points="0,0 2253,0 2253,488 0,488">
        <text:p/>
      </draw:polygon>
      <draw:frame text:anchor-type="page" text:anchor-page-number="5" draw:z-index="2855" draw:name="Shape1298" draw:style-name="gr1" draw:text-style-name="P2" svg:width="0.2161in" svg:height="0.113in" svg:x="0.4535in" svg:y="7.1055in">
        <draw:text-box>
          <text:p><text:span text:style-name="T4">ROU</text:span></text:p>
        </draw:text-box>
      </draw:frame>
      <draw:frame text:anchor-type="page" text:anchor-page-number="2" draw:z-index="2854" draw:name="Shape515" draw:style-name="gr1" draw:text-style-name="P2" svg:width="0.0433in" svg:height="0.1925in" svg:x="1.2866in" svg:y="6.2898in">
        <draw:text-box>
          <text:p><text:span text:style-name="T2"><text:s/></text:span></text:p>
        </draw:text-box>
      </draw:frame>
      <draw:polygon text:anchor-type="page" text:anchor-page-number="14" draw:z-index="2853" draw:name="Shape4503" draw:style-name="gr2" draw:text-style-name="P3" svg:width="1.3768in" svg:height="0.1917in" svg:x="0.363in" svg:y="4.4031in" svg:viewBox="0 0 3498 488" draw:points="0,0 3498,0 3498,488 0,488">
        <text:p/>
      </draw:polygon>
      <draw:polygon text:anchor-type="page" text:anchor-page-number="1" draw:z-index="2852" draw:name="Shape201" draw:style-name="gr2" draw:text-style-name="P3" svg:width="1.4783in" svg:height="0.1283in" svg:x="3.1665in" svg:y="5.3614in" svg:viewBox="0 0 3756 327" draw:points="0,0 3756,0 3756,327 0,327">
        <text:p/>
      </draw:polygon>
      <draw:frame text:anchor-type="page" text:anchor-page-number="6" draw:z-index="2851" draw:name="Shape1910" draw:style-name="gr1" draw:text-style-name="P2" svg:width="0.0433in" svg:height="0.1925in" svg:x="4.3134in" svg:y="2.3161in">
        <draw:text-box>
          <text:p><text:span text:style-name="T2"><text:s/></text:span></text:p>
        </draw:text-box>
      </draw:frame>
      <draw:frame text:anchor-type="page" text:anchor-page-number="11" draw:z-index="2850" draw:name="Shape3943" draw:style-name="gr1" draw:text-style-name="P2" svg:width="0.0433in" svg:height="0.1925in" svg:x="0.411in" svg:y="7.6047in">
        <draw:text-box>
          <text:p><text:span text:style-name="T2"><text:s/></text:span></text:p>
        </draw:text-box>
      </draw:frame>
      <draw:polygon text:anchor-type="page" text:anchor-page-number="9" draw:z-index="2849" draw:name="Shape3445" draw:style-name="gr3" draw:text-style-name="P4" svg:width="2.6783in" svg:height="0.0083in" svg:x="0.363in" svg:y="7.0898in" svg:viewBox="0 0 6804 22" draw:points="0,0 6804,0 6804,22 0,22">
        <text:p/>
      </draw:polygon>
      <draw:polygon text:anchor-type="page" text:anchor-page-number="10" draw:z-index="2848" draw:name="Shape3679" draw:style-name="gr2" draw:text-style-name="P3" svg:width="0.6898in" svg:height="0.1917in" svg:x="2.7732in" svg:y="7.9815in" svg:viewBox="0 0 1753 488" draw:points="0,0 1753,0 1753,488 0,488">
        <text:p/>
      </draw:polygon>
      <draw:polygon text:anchor-type="page" text:anchor-page-number="7" draw:z-index="2847" draw:name="Shape2919" draw:style-name="gr2" draw:text-style-name="P3" svg:width="2.363in" svg:height="0.1913in" svg:x="4.3in" svg:y="7.15in" svg:viewBox="0 0 6003 487" draw:points="0,0 6003,0 6003,487 0,487">
        <text:p/>
      </draw:polygon>
      <draw:frame text:anchor-type="page" text:anchor-page-number="13" draw:z-index="2846" draw:name="Shape4298" draw:style-name="gr1" draw:text-style-name="P2" svg:width="0.0433in" svg:height="0.1925in" svg:x="0.3634in" svg:y="9.598in">
        <draw:text-box>
          <text:p><text:span text:style-name="T2"><text:s/></text:span></text:p>
        </draw:text-box>
      </draw:frame>
      <draw:frame text:anchor-type="page" text:anchor-page-number="1" draw:z-index="2845" draw:name="Shape197" draw:style-name="gr1" draw:text-style-name="P2" svg:width="0.8217in" svg:height="0.1295in" svg:x="3.1665in" svg:y="5.1083in">
        <draw:text-box>
          <text:p><text:span text:style-name="T1">PROC: 5, 8b, 9. </text:span></text:p>
        </draw:text-box>
      </draw:frame>
      <draw:polygon text:anchor-type="page" text:anchor-page-number="2" draw:z-index="2844" draw:name="Shape528" draw:style-name="gr2" draw:text-style-name="P3" svg:width="0.4933in" svg:height="0.1264in" svg:x="4.348in" svg:y="6.3366in" svg:viewBox="0 0 1254 322" draw:points="0,0 1254,0 1254,322 0,322">
        <text:p/>
      </draw:polygon>
      <draw:frame text:anchor-type="page" text:anchor-page-number="9" draw:z-index="2843" draw:name="Shape3444" draw:style-name="gr1" draw:text-style-name="P2" svg:width="2.6669in" svg:height="0.1295in" svg:x="0.3634in" svg:y="6.9772in">
        <draw:text-box>
          <text:p><text:span text:style-name="T1">CORROSIONE CUTANEA / IRRITAZIONE CUTANEA</text:span></text:p>
        </draw:text-box>
      </draw:frame>
      <draw:polygon text:anchor-type="page" text:anchor-page-number="6" draw:z-index="2842" draw:name="Shape1964" draw:style-name="gr2" draw:text-style-name="P3" svg:width="0.4917in" svg:height="0.1917in" svg:x="5.3331in" svg:y="2.3748in" svg:viewBox="0 0 1250 488" draw:points="0,0 1250,0 1250,488 0,488">
        <text:p/>
      </draw:polygon>
      <draw:polygon text:anchor-type="page" text:anchor-page-number="13" draw:z-index="2841" draw:name="Shape4303" draw:style-name="gr2" draw:text-style-name="P3" svg:width="7.3835in" svg:height="0.1264in" svg:x="0.4114in" svg:y="9.7866in" svg:viewBox="0 0 18755 322" draw:points="0,0 18755,0 18755,322 0,322">
        <text:p/>
      </draw:polygon>
      <draw:frame text:anchor-type="page" text:anchor-page-number="7" draw:z-index="2840" draw:name="Shape2911" draw:style-name="gr1" draw:text-style-name="P2" svg:width="0.085in" svg:height="0.1925in" svg:x="0.411in" svg:y="7.1535in">
        <draw:text-box>
          <text:p><text:span text:style-name="T2"><text:s text:c="2"/></text:span></text:p>
        </draw:text-box>
      </draw:frame>
      <draw:polygon text:anchor-type="page" text:anchor-page-number="3" draw:z-index="2839" draw:name="Shape856" draw:style-name="gr2" draw:text-style-name="P3" svg:width="0.9835in" svg:height="0.5102in" svg:x="2.3315in" svg:y="3.398in" svg:viewBox="0 0 2499 1297" draw:points="0,0 2499,0 2499,1297 0,1297">
        <text:p/>
      </draw:polygon>
      <draw:frame text:anchor-type="page" text:anchor-page-number="14" draw:z-index="2838" draw:name="Shape4487" draw:style-name="gr1" draw:text-style-name="P2" svg:width="0.0433in" svg:height="0.1925in" svg:x="4.9335in" svg:y="4.1661in">
        <draw:text-box>
          <text:p><text:span text:style-name="T2"><text:s/></text:span></text:p>
        </draw:text-box>
      </draw:frame>
      <draw:polygon text:anchor-type="page" text:anchor-page-number="10" draw:z-index="2837" draw:name="Shape3678" draw:style-name="gr2" draw:text-style-name="P3" svg:width="0.7882in" svg:height="0.1917in" svg:x="2.7248in" svg:y="7.9815in" svg:viewBox="0 0 2003 488" draw:points="0,0 2003,0 2003,488 0,488">
        <text:p/>
      </draw:polygon>
      <draw:frame text:anchor-type="page" text:anchor-page-number="5" draw:z-index="2836" draw:name="Shape1291" draw:style-name="gr1" draw:text-style-name="P2" svg:width="0.0433in" svg:height="0.1925in" svg:x="0.411in" svg:y="7.0445in">
        <draw:text-box>
          <text:p><text:span text:style-name="T2"><text:s/></text:span></text:p>
        </draw:text-box>
      </draw:frame>
      <draw:frame text:anchor-type="page" text:anchor-page-number="11" draw:z-index="2835" draw:name="Shape3942" draw:style-name="gr1" draw:text-style-name="P2" svg:width="0.0433in" svg:height="0.1925in" svg:x="0.3634in" svg:y="7.4252in">
        <draw:text-box>
          <text:p><text:span text:style-name="T2"><text:s/></text:span></text:p>
        </draw:text-box>
      </draw:frame>
      <draw:polygon text:anchor-type="page" text:anchor-page-number="6" draw:z-index="2834" draw:name="Shape1961" draw:style-name="gr2" draw:text-style-name="P3" svg:width="0.5917in" svg:height="0.1917in" svg:x="5.2831in" svg:y="2.3748in" svg:viewBox="0 0 1504 488" draw:points="0,0 1504,0 1504,488 0,488">
        <text:p/>
      </draw:polygon>
      <draw:frame text:anchor-type="page" text:anchor-page-number="10" draw:z-index="2833" draw:name="Shape3676" draw:style-name="gr1" draw:text-style-name="P2" svg:width="1.2441in" svg:height="0.1295in" svg:x="0.4535in" svg:y="7.9819in">
        <draw:text-box>
          <text:p><text:span text:style-name="T1">NOEC Cronica Crostacei</text:span></text:p>
        </draw:text-box>
      </draw:frame>
      <draw:polygon text:anchor-type="page" text:anchor-page-number="13" draw:z-index="2832" draw:name="Shape4302" draw:style-name="gr2" draw:text-style-name="P3" svg:width="7.4803in" svg:height="0.1264in" svg:x="0.363in" svg:y="9.7866in" svg:viewBox="0 0 19001 322" draw:points="0,0 19001,0 19001,322 0,322">
        <text:p/>
      </draw:polygon>
      <draw:polygon text:anchor-type="page" text:anchor-page-number="2" draw:z-index="2831" draw:name="Shape527" draw:style-name="gr2" draw:text-style-name="P3" svg:width="0.5898in" svg:height="0.1913in" svg:x="4.3in" svg:y="6.3366in" svg:viewBox="0 0 1499 487" draw:points="0,0 1499,0 1499,487 0,487">
        <text:p/>
      </draw:polygon>
      <draw:polygon text:anchor-type="page" text:anchor-page-number="7" draw:z-index="2830" draw:name="Shape2917" draw:style-name="gr2" draw:text-style-name="P3" svg:width="1.4783in" svg:height="0.1913in" svg:x="2.7732in" svg:y="7.15in" svg:viewBox="0 0 3756 487" draw:points="0,0 3756,0 3756,487 0,487">
        <text:p/>
      </draw:polygon>
      <draw:frame text:anchor-type="page" text:anchor-page-number="9" draw:z-index="2829" draw:name="Shape3442" draw:style-name="gr1" draw:text-style-name="P2" svg:width="0.0433in" svg:height="0.1925in" svg:x="0.3634in" svg:y="6.7862in">
        <draw:text-box>
          <text:p><text:span text:style-name="T2"><text:s/></text:span></text:p>
        </draw:text-box>
      </draw:frame>
      <draw:polygon text:anchor-type="page" text:anchor-page-number="11" draw:z-index="2828" draw:name="Shape3946" draw:style-name="gr5" draw:text-style-name="P6" svg:width="7.3835in" svg:height="0.1768in" svg:x="0.4114in" svg:y="7.613in" svg:viewBox="0 0 18755 450" draw:points="0,0 18755,0 18755,450 0,450">
        <text:p/>
      </draw:polygon>
      <draw:frame text:anchor-type="page" text:anchor-page-number="5" draw:z-index="2827" draw:name="Shape1290" draw:style-name="gr1" draw:text-style-name="P2" svg:width="0.0433in" svg:height="0.1925in" svg:x="3.5252in" svg:y="6.9335in">
        <draw:text-box>
          <text:p><text:span text:style-name="T2"><text:s/></text:span></text:p>
        </draw:text-box>
      </draw:frame>
      <draw:polygon text:anchor-type="page" text:anchor-page-number="14" draw:z-index="2826" draw:name="Shape4506" draw:style-name="gr2" draw:text-style-name="P3" svg:width="0.4933in" svg:height="0.1917in" svg:x="6.1197in" svg:y="4.2114in" svg:viewBox="0 0 1254 488" draw:points="0,0 1254,0 1254,488 0,488">
        <text:p/>
      </draw:polygon>
      <draw:polygon text:anchor-type="page" text:anchor-page-number="1" draw:z-index="2825" draw:name="Shape198" draw:style-name="gr2" draw:text-style-name="P3" svg:width="1.5185in" svg:height="0.1268in" svg:x="3.1465in" svg:y="5.2346in" svg:viewBox="0 0 3858 323" draw:points="0,0 3858,0 3858,323 0,323">
        <text:p/>
      </draw:polygon>
      <draw:frame text:anchor-type="page" text:anchor-page-number="3" draw:z-index="2824" draw:name="Shape853" draw:style-name="gr1" draw:text-style-name="P2" svg:width="0.5114in" svg:height="0.1295in" svg:x="0.411in" svg:y="3.7807in">
        <draw:text-box>
          <text:p><text:span text:style-name="T3">ONE (3:1)</text:span></text:p>
        </draw:text-box>
      </draw:frame>
      <draw:frame text:anchor-type="page" text:anchor-page-number="3" draw:z-index="2823" draw:name="Shape851" draw:style-name="gr1" draw:text-style-name="P2" svg:width="1.7657in" svg:height="0.1295in" svg:x="0.411in" svg:y="3.6543in">
        <draw:text-box>
          <text:p><text:span text:style-name="T3">ONE E 2-METIL-2H-ISOTIAZOL-3-</text:span></text:p>
        </draw:text-box>
      </draw:frame>
      <draw:polygon text:anchor-type="page" text:anchor-page-number="14" draw:z-index="2822" draw:name="Shape4505" draw:style-name="gr2" draw:text-style-name="P3" svg:width="0.5898in" svg:height="0.1917in" svg:x="6.0717in" svg:y="4.2114in" svg:viewBox="0 0 1499 488" draw:points="0,0 1499,0 1499,488 0,488">
        <text:p/>
      </draw:polygon>
      <draw:frame text:anchor-type="page" text:anchor-page-number="6" draw:z-index="2821" draw:name="Shape1952" draw:style-name="gr1" draw:text-style-name="P2" svg:width="0.163in" svg:height="0.113in" svg:x="4.1516in" svg:y="2.3772in">
        <draw:text-box>
          <text:p><text:span text:style-name="T4"><text:s/>2.4</text:span></text:p>
        </draw:text-box>
      </draw:frame>
      <draw:frame text:anchor-type="page" text:anchor-page-number="13" draw:z-index="2820" draw:name="Shape4297" draw:style-name="gr1" draw:text-style-name="P2" svg:width="0.0433in" svg:height="0.1925in" svg:x="0.3634in" svg:y="9.4063in">
        <draw:text-box>
          <text:p><text:span text:style-name="T2"><text:s/></text:span></text:p>
        </draw:text-box>
      </draw:frame>
      <draw:frame text:anchor-type="page" text:anchor-page-number="2" draw:z-index="2819" draw:name="Shape526" draw:style-name="gr1" draw:text-style-name="P2" svg:width="0.8406in" svg:height="0.1295in" svg:x="0.4535in" svg:y="6.3366in">
        <draw:text-box>
          <text:p><text:span text:style-name="T1">Limite massimo :</text:span></text:p>
        </draw:text-box>
      </draw:frame>
      <draw:frame text:anchor-type="page" text:anchor-page-number="10" draw:z-index="2818" draw:name="Shape3665" draw:style-name="gr1" draw:text-style-name="P2" svg:width="0.0433in" svg:height="0.1925in" svg:x="0.411in" svg:y="7.9346in">
        <draw:text-box>
          <text:p><text:span text:style-name="T2"><text:s/></text:span></text:p>
        </draw:text-box>
      </draw:frame>
      <draw:frame text:anchor-type="page" text:anchor-page-number="9" draw:z-index="2817" draw:name="Shape3435" draw:style-name="gr1" draw:text-style-name="P2" svg:width="0.0433in" svg:height="0.1925in" svg:x="4.3465in" svg:y="6.6098in">
        <draw:text-box>
          <text:p><text:span text:style-name="T2"><text:s/></text:span></text:p>
        </draw:text-box>
      </draw:frame>
      <draw:polygon text:anchor-type="page" text:anchor-page-number="7" draw:z-index="2816" draw:name="Shape2916" draw:style-name="gr2" draw:text-style-name="P3" svg:width="1.5752in" svg:height="0.1913in" svg:x="2.7248in" svg:y="7.15in" svg:viewBox="0 0 4002 487" draw:points="0,0 4002,0 4002,487 0,487">
        <text:p/>
      </draw:polygon>
      <draw:polygon text:anchor-type="page" text:anchor-page-number="11" draw:z-index="2815" draw:name="Shape3945" draw:style-name="gr5" draw:text-style-name="P6" svg:width="7.4803in" svg:height="0.1768in" svg:x="0.363in" svg:y="7.613in" svg:viewBox="0 0 19001 450" draw:points="0,0 19001,0 19001,450 0,450">
        <text:p/>
      </draw:polygon>
      <draw:frame text:anchor-type="page" text:anchor-page-number="1" draw:z-index="2814" draw:name="Shape193" draw:style-name="gr1" draw:text-style-name="P2" svg:width="0.424in" svg:height="0.1295in" svg:x="3.1665in" svg:y="4.9807in">
        <draw:text-box>
          <text:p><text:span text:style-name="T1">ERC: 2. </text:span></text:p>
        </draw:text-box>
      </draw:frame>
      <draw:polygon text:anchor-type="page" text:anchor-page-number="5" draw:z-index="2813" draw:name="Shape1294" draw:style-name="gr2" draw:text-style-name="P3" svg:width="0.6902in" svg:height="0.1118in" svg:x="0.4114in" svg:y="7.1031in" svg:viewBox="0 0 1754 285" draw:points="0,0 1754,0 1754,285 0,285">
        <text:p/>
      </draw:polygon>
      <draw:frame text:anchor-type="page" text:anchor-page-number="11" draw:z-index="2812" draw:name="Shape3941" draw:style-name="gr1" draw:text-style-name="P2" svg:width="0.0433in" svg:height="0.1925in" svg:x="0.3634in" svg:y="7.2335in">
        <draw:text-box>
          <text:p><text:span text:style-name="T2"><text:s/></text:span></text:p>
        </draw:text-box>
      </draw:frame>
      <draw:frame text:anchor-type="page" text:anchor-page-number="9" draw:z-index="2811" draw:name="Shape3441" draw:style-name="gr1" draw:text-style-name="P2" svg:width="0.7913in" svg:height="0.1295in" svg:x="3.561in" svg:y="6.6571in">
        <draw:text-box>
          <text:p><text:span text:style-name="T1">6450 mg/kg Rat</text:span></text:p>
        </draw:text-box>
      </draw:frame>
      <draw:frame text:anchor-type="page" text:anchor-page-number="10" draw:z-index="2810" draw:name="Shape3661" draw:style-name="gr1" draw:text-style-name="P2" svg:width="0.0433in" svg:height="0.1925in" svg:x="4.5929in" svg:y="7.7429in">
        <draw:text-box>
          <text:p><text:span text:style-name="T2"><text:s/></text:span></text:p>
        </draw:text-box>
      </draw:frame>
      <draw:polygon text:anchor-type="page" text:anchor-page-number="5" draw:z-index="2809" draw:name="Shape1297" draw:style-name="gr2" draw:text-style-name="P3" svg:width="0.7866in" svg:height="0.2232in" svg:x="0.363in" svg:y="7.1031in" svg:viewBox="0 0 1999 568" draw:points="0,0 1999,0 1999,568 0,568">
        <text:p/>
      </draw:polygon>
      <draw:frame text:anchor-type="page" text:anchor-page-number="14" draw:z-index="2808" draw:name="Shape4498" draw:style-name="gr1" draw:text-style-name="P2" svg:width="3.165in" svg:height="0.1295in" svg:x="1.7882in" svg:y="4.2138in">
        <draw:text-box>
          <text:p><text:span text:style-name="T1">Pericoloso per l`ambiente acquatico, tossicità acuta, categoria 1</text:span></text:p>
        </draw:text-box>
      </draw:frame>
      <draw:frame text:anchor-type="page" text:anchor-page-number="2" draw:z-index="2807" draw:name="Shape523" draw:style-name="gr1" draw:text-style-name="P2" svg:width="0.0433in" svg:height="0.1925in" svg:x="0.411in" svg:y="6.2898in">
        <draw:text-box>
          <text:p><text:span text:style-name="T2"><text:s/></text:span></text:p>
        </draw:text-box>
      </draw:frame>
      <draw:frame text:anchor-type="page" text:anchor-page-number="13" draw:z-index="2806" draw:name="Shape4296" draw:style-name="gr1" draw:text-style-name="P2" svg:width="2.9394in" svg:height="0.1295in" svg:x="0.3634in" svg:y="9.2772in">
        <draw:text-box>
          <text:p><text:span text:style-name="T1">Pitture opache per pareti e soffitti interni (gloss &lt; 25@60°). </text:span></text:p>
        </draw:text-box>
      </draw:frame>
      <draw:frame text:anchor-type="page" text:anchor-page-number="7" draw:z-index="2805" draw:name="Shape2897" draw:style-name="gr1" draw:text-style-name="P2" svg:width="0.0433in" svg:height="0.1925in" svg:x="5.2382in" svg:y="6.9764in">
        <draw:text-box>
          <text:p><text:span text:style-name="T2"><text:s/></text:span></text:p>
        </draw:text-box>
      </draw:frame>
      <draw:frame text:anchor-type="page" text:anchor-page-number="6" draw:z-index="2804" draw:name="Shape1953" draw:style-name="gr1" draw:text-style-name="P2" svg:width="0.0433in" svg:height="0.1925in" svg:x="3.561in" svg:y="2.378in">
        <draw:text-box>
          <text:p><text:span text:style-name="T2"><text:s/></text:span></text:p>
        </draw:text-box>
      </draw:frame>
      <draw:polygon text:anchor-type="page" text:anchor-page-number="3" draw:z-index="2803" draw:name="Shape854" draw:style-name="gr2" draw:text-style-name="P3" svg:width="1.8717in" svg:height="0.1268in" svg:x="0.4114in" svg:y="3.7815in" svg:viewBox="0 0 4755 323" draw:points="0,0 4755,0 4755,323 0,323">
        <text:p/>
      </draw:polygon>
      <draw:polygon text:anchor-type="page" text:anchor-page-number="1" draw:z-index="2802" draw:name="Shape196" draw:style-name="gr2" draw:text-style-name="P3" svg:width="1.5185in" svg:height="0.1283in" svg:x="3.1465in" svg:y="5.1063in" svg:viewBox="0 0 3858 327" draw:points="0,0 3858,0 3858,327 0,327">
        <text:p/>
      </draw:polygon>
      <draw:frame text:anchor-type="page" text:anchor-page-number="11" draw:z-index="2801" draw:name="Shape3940" draw:style-name="gr1" draw:text-style-name="P2" svg:width="1.3815in" svg:height="0.1295in" svg:x="0.3634in" svg:y="7.1043in">
        <draw:text-box>
          <text:p><text:span text:style-name="T1">Informazioni non disponibili </text:span></text:p>
        </draw:text-box>
      </draw:frame>
      <draw:frame text:anchor-type="page" text:anchor-page-number="14" draw:z-index="2800" draw:name="Shape4486" draw:style-name="gr1" draw:text-style-name="P2" svg:width="0.0433in" svg:height="0.1925in" svg:x="1.1882in" svg:y="4.1516in">
        <draw:text-box>
          <text:p><text:span text:style-name="T2"><text:s/></text:span></text:p>
        </draw:text-box>
      </draw:frame>
      <draw:polygon text:anchor-type="page" text:anchor-page-number="10" draw:z-index="2799" draw:name="Shape3673" draw:style-name="gr2" draw:text-style-name="P3" svg:width="2.265in" svg:height="0.1268in" svg:x="0.4114in" svg:y="7.9815in" svg:viewBox="0 0 5754 323" draw:points="0,0 5754,0 5754,323 0,323">
        <text:p/>
      </draw:polygon>
      <draw:frame text:anchor-type="page" text:anchor-page-number="1" draw:z-index="2798" draw:name="Shape182" draw:style-name="gr1" draw:text-style-name="P2" svg:width="0.0433in" svg:height="0.1925in" svg:x="2.0217in" svg:y="4.9335in">
        <draw:text-box>
          <text:p><text:span text:style-name="T2"><text:s/></text:span></text:p>
        </draw:text-box>
      </draw:frame>
      <draw:polygon text:anchor-type="page" text:anchor-page-number="7" draw:z-index="2797" draw:name="Shape2909" draw:style-name="gr2" draw:text-style-name="P3" svg:width="2.265in" svg:height="0.1913in" svg:x="0.4114in" svg:y="7.15in" svg:viewBox="0 0 5754 487" draw:points="0,0 5754,0 5754,487 0,487">
        <text:p/>
      </draw:polygon>
      <draw:frame text:anchor-type="page" text:anchor-page-number="2" draw:z-index="2796" draw:name="Shape522" draw:style-name="gr1" draw:text-style-name="P2" svg:width="0.0433in" svg:height="0.1925in" svg:x="4.9382in" svg:y="6.148in">
        <draw:text-box>
          <text:p><text:span text:style-name="T2"><text:s/></text:span></text:p>
        </draw:text-box>
      </draw:frame>
      <draw:frame text:anchor-type="page" text:anchor-page-number="9" draw:z-index="2795" draw:name="Shape3434" draw:style-name="gr1" draw:text-style-name="P2" svg:width="0.0433in" svg:height="0.1925in" svg:x="1.1264in" svg:y="6.6098in">
        <draw:text-box>
          <text:p><text:span text:style-name="T2"><text:s/></text:span></text:p>
        </draw:text-box>
      </draw:frame>
      <draw:polygon text:anchor-type="page" text:anchor-page-number="6" draw:z-index="2794" draw:name="Shape1960" draw:style-name="gr2" draw:text-style-name="P3" svg:width="1.0831in" svg:height="0.1118in" svg:x="4.1516in" svg:y="2.3748in" svg:viewBox="0 0 2752 285" draw:points="0,0 2752,0 2752,285 0,285">
        <text:p/>
      </draw:polygon>
      <draw:frame text:anchor-type="page" text:anchor-page-number="5" draw:z-index="2793" draw:name="Shape1296" draw:style-name="gr1" draw:text-style-name="P2" svg:width="0.7476in" svg:height="0.113in" svg:x="2.7728in" svg:y="6.9937in">
        <draw:text-box>
          <text:p><text:span text:style-name="T4">środowisku pracy</text:span></text:p>
        </draw:text-box>
      </draw:frame>
      <draw:frame text:anchor-type="page" text:anchor-page-number="13" draw:z-index="2792" draw:name="Shape4295" draw:style-name="gr1" draw:text-style-name="P2" svg:width="0.0433in" svg:height="0.1925in" svg:x="0.3634in" svg:y="9.0862in">
        <draw:text-box>
          <text:p><text:span text:style-name="T2"><text:s/></text:span></text:p>
        </draw:text-box>
      </draw:frame>
      <draw:frame text:anchor-type="page" text:anchor-page-number="3" draw:z-index="2791" draw:name="Shape847" draw:style-name="gr1" draw:text-style-name="P2" svg:width="1.8587in" svg:height="0.1295in" svg:x="0.411in" svg:y="3.5256in">
        <draw:text-box>
          <text:p><text:span text:style-name="T3">CLORO-2- METIL-2H-ISOTIAZOL-3-</text:span></text:p>
        </draw:text-box>
      </draw:frame>
      <draw:polygon text:anchor-type="page" text:anchor-page-number="14" draw:z-index="2790" draw:name="Shape4497" draw:style-name="gr2" draw:text-style-name="P3" svg:width="4.235in" svg:height="0.1283in" svg:x="1.7882in" svg:y="4.2114in" svg:viewBox="0 0 10758 327" draw:points="0,0 10758,0 10758,327 0,327">
        <text:p/>
      </draw:polygon>
      <draw:polygon text:anchor-type="page" text:anchor-page-number="7" draw:z-index="2789" draw:name="Shape2908" draw:style-name="gr2" draw:text-style-name="P3" svg:width="2.3618in" svg:height="0.1913in" svg:x="0.363in" svg:y="7.15in" svg:viewBox="0 0 6000 487" draw:points="0,0 6000,0 6000,487 0,487">
        <text:p/>
      </draw:polygon>
      <draw:polygon text:anchor-type="page" text:anchor-page-number="10" draw:z-index="2788" draw:name="Shape3672" draw:style-name="gr2" draw:text-style-name="P3" svg:width="2.3618in" svg:height="0.1917in" svg:x="0.363in" svg:y="7.9815in" svg:viewBox="0 0 6000 488" draw:points="0,0 6000,0 6000,488 0,488">
        <text:p/>
      </draw:polygon>
      <draw:frame text:anchor-type="page" text:anchor-page-number="5" draw:z-index="2787" draw:name="Shape1289" draw:style-name="gr1" draw:text-style-name="P2" svg:width="4.1217in" svg:height="0.113in" svg:x="2.7728in" svg:y="6.8819in">
        <draw:text-box>
          <text:p><text:span text:style-name="T4">w sprawie najwyższych dopuszczalnych stężeń i natężeń czynników szkodliwych <text:s/>dla zdrowia w </text:span></text:p>
        </draw:text-box>
      </draw:frame>
      <draw:polygon text:anchor-type="page" text:anchor-page-number="1" draw:z-index="2786" draw:name="Shape192" draw:style-name="gr2" draw:text-style-name="P3" svg:width="1.5185in" svg:height="0.128in" svg:x="3.1465in" svg:y="4.9783in" svg:viewBox="0 0 3858 326" draw:points="0,0 3858,0 3858,326 0,326">
        <text:p/>
      </draw:polygon>
      <draw:polygon text:anchor-type="page" text:anchor-page-number="3" draw:z-index="2785" draw:name="Shape850" draw:style-name="gr2" draw:text-style-name="P3" svg:width="1.8717in" svg:height="0.1283in" svg:x="0.4114in" svg:y="3.6531in" svg:viewBox="0 0 4755 327" draw:points="0,0 4755,0 4755,327 0,327">
        <text:p/>
      </draw:polygon>
      <draw:polygon text:anchor-type="page" text:anchor-page-number="2" draw:z-index="2784" draw:name="Shape525" draw:style-name="gr2" draw:text-style-name="P3" svg:width="3.8402in" svg:height="0.1264in" svg:x="0.4114in" svg:y="6.3366in" svg:viewBox="0 0 9755 322" draw:points="0,0 9755,0 9755,322 0,322">
        <text:p/>
      </draw:polygon>
      <draw:frame text:anchor-type="page" text:anchor-page-number="11" draw:z-index="2783" draw:name="Shape3939" draw:style-name="gr1" draw:text-style-name="P2" svg:width="0.0433in" svg:height="0.1925in" svg:x="0.3634in" svg:y="6.9146in">
        <draw:text-box>
          <text:p><text:span text:style-name="T2"><text:s/></text:span></text:p>
        </draw:text-box>
      </draw:frame>
      <draw:polygon text:anchor-type="page" text:anchor-page-number="6" draw:z-index="2782" draw:name="Shape1959" draw:style-name="gr2" draw:text-style-name="P3" svg:width="1.1799in" svg:height="0.1917in" svg:x="4.1031in" svg:y="2.3748in" svg:viewBox="0 0 2998 488" draw:points="0,0 2998,0 2998,488 0,488">
        <text:p/>
      </draw:polygon>
      <draw:polygon text:anchor-type="page" text:anchor-page-number="9" draw:z-index="2781" draw:name="Shape3440" draw:style-name="gr2" draw:text-style-name="P3" svg:width="3.8402in" svg:height="0.1283in" svg:x="3.5614in" svg:y="6.6547in" svg:viewBox="0 0 9755 327" draw:points="0,0 9755,0 9755,327 0,327">
        <text:p/>
      </draw:polygon>
      <draw:frame text:anchor-type="page" text:anchor-page-number="13" draw:z-index="2780" draw:name="Shape4293" draw:style-name="gr1" draw:text-style-name="P2" svg:width="1.4748in" svg:height="0.1295in" svg:x="0.3634in" svg:y="8.9571in">
        <draw:text-box>
          <text:p><text:span text:style-name="T1">VOC (Direttiva 2004/42/CE) : </text:span></text:p>
        </draw:text-box>
      </draw:frame>
      <draw:frame text:anchor-type="page" text:anchor-page-number="10" draw:z-index="2779" draw:name="Shape3669" draw:style-name="gr1" draw:text-style-name="P2" svg:width="1.0394in" svg:height="0.1295in" svg:x="3.561in" svg:y="7.7902in">
        <draw:text-box>
          <text:p><text:span text:style-name="T1">0.02 mg/l Danio rerio</text:span></text:p>
        </draw:text-box>
      </draw:frame>
      <draw:polygon text:anchor-type="page" text:anchor-page-number="9" draw:z-index="2778" draw:name="Shape3439" draw:style-name="gr2" draw:text-style-name="P3" svg:width="3.937in" svg:height="0.1283in" svg:x="3.513in" svg:y="6.6547in" svg:viewBox="0 0 10001 327" draw:points="0,0 10001,0 10001,327 0,327">
        <text:p/>
      </draw:polygon>
      <draw:polygon text:anchor-type="page" text:anchor-page-number="5" draw:z-index="2777" draw:name="Shape1295" draw:style-name="gr2" draw:text-style-name="P3" svg:width="4.6283in" svg:height="0.1118in" svg:x="2.7732in" svg:y="6.9913in" svg:viewBox="0 0 11757 285" draw:points="0,0 11757,0 11757,285 0,285">
        <text:p/>
      </draw:polygon>
      <draw:polygon text:anchor-type="page" text:anchor-page-number="1" draw:z-index="2776" draw:name="Shape191" draw:style-name="gr2" draw:text-style-name="P3" svg:width="1.5752in" svg:height="0.5118in" svg:x="3.1181in" svg:y="4.978in" svg:viewBox="0 0 4002 1301" draw:points="0,0 4002,0 4002,1301 0,1301">
        <text:p/>
      </draw:polygon>
      <draw:frame text:anchor-type="page" text:anchor-page-number="3" draw:z-index="2775" draw:name="Shape836" draw:style-name="gr1" draw:text-style-name="P2" svg:width="1.426in" svg:height="0.1295in" svg:x="0.4535in" svg:y="3.3972in">
        <draw:text-box>
          <text:p><text:span text:style-name="T3">MASSA DI REAZIONE DI 5-</text:span></text:p>
        </draw:text-box>
      </draw:frame>
      <draw:frame text:anchor-type="page" text:anchor-page-number="11" draw:z-index="2774" draw:name="Shape3938" draw:style-name="gr1" draw:text-style-name="P2" svg:width="1.2835in" svg:height="0.1295in" svg:x="0.3634in" svg:y="6.7839in">
        <draw:text-box>
          <text:p><text:span text:style-name="T3">12.7. Altri effetti avversi </text:span></text:p>
        </draw:text-box>
      </draw:frame>
      <draw:frame text:anchor-type="page" text:anchor-page-number="6" draw:z-index="2773" draw:name="Shape1924" draw:style-name="gr1" draw:text-style-name="P2" svg:width="0.0433in" svg:height="0.1925in" svg:x="2.5417in" svg:y="2.3161in">
        <draw:text-box>
          <text:p><text:span text:style-name="T2"><text:s/></text:span></text:p>
        </draw:text-box>
      </draw:frame>
      <draw:polygon text:anchor-type="page" text:anchor-page-number="2" draw:z-index="2772" draw:name="Shape524" draw:style-name="gr2" draw:text-style-name="P3" svg:width="3.937in" svg:height="0.1913in" svg:x="0.363in" svg:y="6.3366in" svg:viewBox="0 0 10001 487" draw:points="0,0 10001,0 10001,487 0,487">
        <text:p/>
      </draw:polygon>
      <draw:polygon text:anchor-type="page" text:anchor-page-number="14" draw:z-index="2771" draw:name="Shape4496" draw:style-name="gr2" draw:text-style-name="P3" svg:width="4.3319in" svg:height="0.1917in" svg:x="1.7398in" svg:y="4.2114in" svg:viewBox="0 0 11004 488" draw:points="0,0 11004,0 11004,488 0,488">
        <text:p/>
      </draw:polygon>
      <draw:polygon text:anchor-type="page" text:anchor-page-number="13" draw:z-index="2770" draw:name="Shape4294" draw:style-name="gr3" draw:text-style-name="P4" svg:width="1.4335in" svg:height="0.0083in" svg:x="0.363in" svg:y="9.0697in" svg:viewBox="0 0 3642 22" draw:points="0,0 3642,0 3642,22 0,22">
        <text:p/>
      </draw:polygon>
      <draw:frame text:anchor-type="page" text:anchor-page-number="7" draw:z-index="2769" draw:name="Shape2906" draw:style-name="gr1" draw:text-style-name="P2" svg:width="0.8969in" svg:height="0.1295in" svg:x="4.348in" svg:y="7.0236in">
        <draw:text-box>
          <text:p><text:span text:style-name="T1">Sostanza:ACQUA</text:span></text:p>
        </draw:text-box>
      </draw:frame>
      <draw:frame text:anchor-type="page" text:anchor-page-number="7" draw:z-index="2768" draw:name="Shape2896" draw:style-name="gr1" draw:text-style-name="P2" svg:width="0.0433in" svg:height="0.1925in" svg:x="3.2098in" svg:y="6.9764in">
        <draw:text-box>
          <text:p><text:span text:style-name="T2"><text:s/></text:span></text:p>
        </draw:text-box>
      </draw:frame>
      <draw:frame text:anchor-type="page" text:anchor-page-number="1" draw:z-index="2767" draw:name="Shape190" draw:style-name="gr1" draw:text-style-name="P2" svg:width="1.5803in" svg:height="0.1295in" svg:x="0.4535in" svg:y="4.9807in">
        <draw:text-box>
          <text:p><text:span text:style-name="T1">Produzione prodotto verniciante</text:span></text:p>
        </draw:text-box>
      </draw:frame>
      <draw:frame text:anchor-type="page" text:anchor-page-number="5" draw:z-index="2766" draw:name="Shape1287" draw:style-name="gr1" draw:text-style-name="P2" svg:width="4.5677in" svg:height="0.113in" svg:x="2.7728in" svg:y="6.7701in">
        <draw:text-box>
          <text:p><text:span text:style-name="T4">Rozporządzenie ministra rozwoju, pracy i technologii <text:s/>z dnia 18 lutego 2021 r. Zmieniające rozporządzenie </text:span></text:p>
        </draw:text-box>
      </draw:frame>
      <draw:polygon text:anchor-type="page" text:anchor-page-number="3" draw:z-index="2765" draw:name="Shape846" draw:style-name="gr2" draw:text-style-name="P3" svg:width="1.8717in" svg:height="0.1283in" svg:x="0.4114in" svg:y="3.5248in" svg:viewBox="0 0 4755 327" draw:points="0,0 4755,0 4755,327 0,327">
        <text:p/>
      </draw:polygon>
      <draw:frame text:anchor-type="page" text:anchor-page-number="9" draw:z-index="2764" draw:name="Shape3438" draw:style-name="gr1" draw:text-style-name="P2" svg:width="0.6787in" svg:height="0.1295in" svg:x="0.4535in" svg:y="6.6571in">
        <draw:text-box>
          <text:p><text:span text:style-name="T1">LD50 (Orale):</text:span></text:p>
        </draw:text-box>
      </draw:frame>
      <draw:polygon text:anchor-type="page" text:anchor-page-number="6" draw:z-index="2763" draw:name="Shape1951" draw:style-name="gr2" draw:text-style-name="P3" svg:width="0.4933in" svg:height="0.1917in" svg:x="3.5614in" svg:y="2.3748in" svg:viewBox="0 0 1254 488" draw:points="0,0 1254,0 1254,488 0,488">
        <text:p/>
      </draw:polygon>
      <draw:frame text:anchor-type="page" text:anchor-page-number="10" draw:z-index="2762" draw:name="Shape3670" draw:style-name="gr1" draw:text-style-name="P2" svg:width="0.0433in" svg:height="0.1925in" svg:x="2.7728in" svg:y="7.7929in">
        <draw:text-box>
          <text:p><text:span text:style-name="T2"><text:s/></text:span></text:p>
        </draw:text-box>
      </draw:frame>
      <draw:frame text:anchor-type="page" text:anchor-page-number="2" draw:z-index="2761" draw:name="Shape511" draw:style-name="gr1" draw:text-style-name="P2" svg:width="0.0433in" svg:height="0.1925in" svg:x="4.5654in" svg:y="6.098in">
        <draw:text-box>
          <text:p><text:span text:style-name="T2"><text:s/></text:span></text:p>
        </draw:text-box>
      </draw:frame>
      <draw:frame text:anchor-type="page" text:anchor-page-number="11" draw:z-index="2760" draw:name="Shape3937" draw:style-name="gr1" draw:text-style-name="P2" svg:width="0.0433in" svg:height="0.1925in" svg:x="0.3634in" svg:y="6.5945in">
        <draw:text-box>
          <text:p><text:span text:style-name="T2"><text:s/></text:span></text:p>
        </draw:text-box>
      </draw:frame>
      <draw:frame text:anchor-type="page" text:anchor-page-number="13" draw:z-index="2759" draw:name="Shape4292" draw:style-name="gr1" draw:text-style-name="P2" svg:width="0.0433in" svg:height="0.1925in" svg:x="0.3634in" svg:y="8.7661in">
        <draw:text-box>
          <text:p><text:span text:style-name="T2"><text:s/></text:span></text:p>
        </draw:text-box>
      </draw:frame>
      <draw:frame text:anchor-type="page" text:anchor-page-number="14" draw:z-index="2758" draw:name="Shape4495" draw:style-name="gr1" draw:text-style-name="P2" svg:width="0.7276in" svg:height="0.113in" svg:x="0.4535in" svg:y="4.2126in">
        <draw:text-box>
          <text:p><text:span text:style-name="T5">Aquatic Acute 1</text:span></text:p>
        </draw:text-box>
      </draw:frame>
      <draw:frame text:anchor-type="page" text:anchor-page-number="9" draw:z-index="2757" draw:name="Shape3433" draw:style-name="gr1" draw:text-style-name="P2" svg:width="0.0433in" svg:height="0.1925in" svg:x="0.411in" svg:y="6.6098in">
        <draw:text-box>
          <text:p><text:span text:style-name="T2"><text:s/></text:span></text:p>
        </draw:text-box>
      </draw:frame>
      <draw:polygon text:anchor-type="page" text:anchor-page-number="2" draw:z-index="2756" draw:name="Shape521" draw:style-name="gr2" draw:text-style-name="P3" svg:width="2.8567in" svg:height="0.1917in" svg:x="4.9382in" svg:y="6.1449in" svg:viewBox="0 0 7257 488" draw:points="0,0 7257,0 7257,488 0,488">
        <text:p/>
      </draw:polygon>
      <draw:frame text:anchor-type="page" text:anchor-page-number="3" draw:z-index="2755" draw:name="Shape835" draw:style-name="gr1" draw:text-style-name="P2" svg:width="0.0433in" svg:height="0.1925in" svg:x="0.411in" svg:y="3.3492in">
        <draw:text-box>
          <text:p><text:span text:style-name="T2"><text:s/></text:span></text:p>
        </draw:text-box>
      </draw:frame>
      <draw:frame text:anchor-type="page" text:anchor-page-number="11" draw:z-index="2754" draw:name="Shape3936" draw:style-name="gr1" draw:text-style-name="P2" svg:width="1.8476in" svg:height="0.1295in" svg:x="0.3634in" svg:y="6.4654in">
        <draw:text-box>
          <text:p><text:span text:style-name="T1">sull`ambiente oggetto di valutazione. </text:span></text:p>
        </draw:text-box>
      </draw:frame>
      <draw:frame text:anchor-type="page" text:anchor-page-number="14" draw:z-index="2753" draw:name="Shape4485" draw:style-name="gr1" draw:text-style-name="P2" svg:width="0.0433in" svg:height="0.1925in" svg:x="0.411in" svg:y="4.1516in">
        <draw:text-box>
          <text:p><text:span text:style-name="T2"><text:s/></text:span></text:p>
        </draw:text-box>
      </draw:frame>
      <draw:frame text:anchor-type="page" text:anchor-page-number="13" draw:z-index="2752" draw:name="Shape4291" draw:style-name="gr1" draw:text-style-name="P2" svg:width="1.3815in" svg:height="0.1295in" svg:x="0.3634in" svg:y="8.6366in">
        <draw:text-box>
          <text:p><text:span text:style-name="T1">Informazioni non disponibili </text:span></text:p>
        </draw:text-box>
      </draw:frame>
      <draw:polygon text:anchor-type="page" text:anchor-page-number="7" draw:z-index="2751" draw:name="Shape2905" draw:style-name="gr2" draw:text-style-name="P3" svg:width="2.265in" svg:height="0.1268in" svg:x="4.348in" svg:y="7.0232in" svg:viewBox="0 0 5754 323" draw:points="0,0 5754,0 5754,323 0,323">
        <text:p/>
      </draw:polygon>
      <draw:polygon text:anchor-type="page" text:anchor-page-number="10" draw:z-index="2750" draw:name="Shape3675" draw:style-name="gr2" draw:text-style-name="P3" svg:width="3.8402in" svg:height="0.1268in" svg:x="3.5614in" svg:y="7.7898in" svg:viewBox="0 0 9755 323" draw:points="0,0 9755,0 9755,323 0,323">
        <text:p/>
      </draw:polygon>
      <draw:polygon text:anchor-type="page" text:anchor-page-number="5" draw:z-index="2749" draw:name="Shape1288" draw:style-name="gr2" draw:text-style-name="P3" svg:width="4.6283in" svg:height="0.1114in" svg:x="2.7732in" svg:y="6.8799in" svg:viewBox="0 0 11757 284" draw:points="0,0 11757,0 11757,284 0,284">
        <text:p/>
      </draw:polygon>
      <draw:frame text:anchor-type="page" text:anchor-page-number="1" draw:z-index="2748" draw:name="Shape181" draw:style-name="gr1" draw:text-style-name="P2" svg:width="0.0433in" svg:height="0.1925in" svg:x="0.411in" svg:y="4.9335in">
        <draw:text-box>
          <text:p><text:span text:style-name="T2"><text:s/></text:span></text:p>
        </draw:text-box>
      </draw:frame>
      <draw:polygon text:anchor-type="page" text:anchor-page-number="6" draw:z-index="2747" draw:name="Shape1950" draw:style-name="gr2" draw:text-style-name="P3" svg:width="0.5902in" svg:height="0.1917in" svg:x="3.513in" svg:y="2.3748in" svg:viewBox="0 0 1500 488" draw:points="0,0 1500,0 1500,488 0,488">
        <text:p/>
      </draw:polygon>
      <draw:frame text:anchor-type="page" text:anchor-page-number="5" draw:z-index="2746" draw:name="Shape1276" draw:style-name="gr1" draw:text-style-name="P2" svg:width="0.0433in" svg:height="0.1925in" svg:x="1.4898in" svg:y="6.7098in">
        <draw:text-box>
          <text:p><text:span text:style-name="T2"><text:s/></text:span></text:p>
        </draw:text-box>
      </draw:frame>
      <draw:frame text:anchor-type="page" text:anchor-page-number="14" draw:z-index="2745" draw:name="Shape4484" draw:style-name="gr1" draw:text-style-name="P2" svg:width="0.0433in" svg:height="0.1925in" svg:x="6.1193in" svg:y="4.0228in">
        <draw:text-box>
          <text:p><text:span text:style-name="T2"><text:s/></text:span></text:p>
        </draw:text-box>
      </draw:frame>
      <draw:polygon text:anchor-type="page" text:anchor-page-number="10" draw:z-index="2744" draw:name="Shape3674" draw:style-name="gr2" draw:text-style-name="P3" svg:width="3.937in" svg:height="0.1917in" svg:x="3.513in" svg:y="7.7898in" svg:viewBox="0 0 10001 488" draw:points="0,0 10001,0 10001,488 0,488">
        <text:p/>
      </draw:polygon>
      <draw:frame text:anchor-type="page" text:anchor-page-number="9" draw:z-index="2743" draw:name="Shape3432" draw:style-name="gr1" draw:text-style-name="P2" svg:width="1.178in" svg:height="0.1295in" svg:x="0.3634in" svg:y="6.5283in">
        <draw:text-box>
          <text:p><text:span text:style-name="T1">CALCIO CARBONATO </text:span></text:p>
        </draw:text-box>
      </draw:frame>
      <draw:frame text:anchor-type="page" text:anchor-page-number="11" draw:z-index="2742" draw:name="Shape3935" draw:style-name="gr1" draw:text-style-name="P2" svg:width="7.5079in" svg:height="0.1295in" svg:x="0.3634in" svg:y="6.3366in">
        <draw:text-box>
          <text:p><text:span text:style-name="T1">In base ai dati disponibili, il prodotto non contiene sostanze elencate nelle principali liste europee di potenziali o sospetti interferenti endocrini con effetti </text:span></text:p>
        </draw:text-box>
      </draw:frame>
      <draw:frame text:anchor-type="page" text:anchor-page-number="13" draw:z-index="2741" draw:name="Shape4290" draw:style-name="gr1" draw:text-style-name="P2" svg:width="0.0433in" svg:height="0.1925in" svg:x="0.3634in" svg:y="8.448in">
        <draw:text-box>
          <text:p><text:span text:style-name="T2"><text:s/></text:span></text:p>
        </draw:text-box>
      </draw:frame>
      <draw:polygon text:anchor-type="page" text:anchor-page-number="7" draw:z-index="2740" draw:name="Shape2904" draw:style-name="gr2" draw:text-style-name="P3" svg:width="2.363in" svg:height="0.1268in" svg:x="4.3in" svg:y="7.0232in" svg:viewBox="0 0 6003 323" draw:points="0,0 6003,0 6003,323 0,323">
        <text:p/>
      </draw:polygon>
      <draw:frame text:anchor-type="page" text:anchor-page-number="1" draw:z-index="2739" draw:name="Shape179" draw:style-name="gr1" draw:text-style-name="P2" svg:width="0.0433in" svg:height="0.1925in" svg:x="6.7047in" svg:y="4.8047in">
        <draw:text-box>
          <text:p><text:span text:style-name="T2"><text:s/></text:span></text:p>
        </draw:text-box>
      </draw:frame>
      <draw:frame text:anchor-type="page" text:anchor-page-number="3" draw:z-index="2738" draw:name="Shape831" draw:style-name="gr1" draw:text-style-name="P2" svg:width="0.0433in" svg:height="0.1925in" svg:x="7.3016in" svg:y="3.1445in">
        <draw:text-box>
          <text:p><text:span text:style-name="T2"><text:s/></text:span></text:p>
        </draw:text-box>
      </draw:frame>
      <draw:frame text:anchor-type="page" text:anchor-page-number="6" draw:z-index="2737" draw:name="Shape1949" draw:style-name="gr1" draw:text-style-name="P2" svg:width="0.163in" svg:height="0.113in" svg:x="2.3799in" svg:y="2.3772in">
        <draw:text-box>
          <text:p><text:span text:style-name="T4"><text:s/>0.3</text:span></text:p>
        </draw:text-box>
      </draw:frame>
      <draw:polygon text:anchor-type="page" text:anchor-page-number="2" draw:z-index="2736" draw:name="Shape520" draw:style-name="gr2" draw:text-style-name="P3" svg:width="2.9535in" svg:height="0.1917in" svg:x="4.8898in" svg:y="6.1449in" svg:viewBox="0 0 7503 488" draw:points="0,0 7503,0 7503,488 0,488">
        <text:p/>
      </draw:polygon>
      <draw:frame text:anchor-type="page" text:anchor-page-number="10" draw:z-index="2735" draw:name="Shape3658" draw:style-name="gr1" draw:text-style-name="P2" svg:width="0.0433in" svg:height="0.1925in" svg:x="1.4898in" svg:y="7.7429in">
        <draw:text-box>
          <text:p><text:span text:style-name="T2"><text:s/></text:span></text:p>
        </draw:text-box>
      </draw:frame>
      <draw:frame text:anchor-type="page" text:anchor-page-number="13" draw:z-index="2734" draw:name="Shape4288" draw:style-name="gr1" draw:text-style-name="P2" svg:width="0.8531in" svg:height="0.1295in" svg:x="0.3634in" svg:y="8.3189in">
        <draw:text-box>
          <text:p><text:span text:style-name="T1">Controlli Sanitari </text:span></text:p>
        </draw:text-box>
      </draw:frame>
      <draw:polygon text:anchor-type="page" text:anchor-page-number="5" draw:z-index="2733" draw:name="Shape1286" draw:style-name="gr2" draw:text-style-name="P3" svg:width="4.6283in" svg:height="0.1118in" svg:x="2.7732in" svg:y="6.7681in" svg:viewBox="0 0 11757 285" draw:points="0,0 11757,0 11757,285 0,285">
        <text:p/>
      </draw:polygon>
      <draw:polygon text:anchor-type="page" text:anchor-page-number="1" draw:z-index="2732" draw:name="Shape189" draw:style-name="gr2" draw:text-style-name="P3" svg:width="2.6583in" svg:height="0.128in" svg:x="0.4114in" svg:y="4.9783in" svg:viewBox="0 0 6753 326" draw:points="0,0 6753,0 6753,326 0,326">
        <text:p/>
      </draw:polygon>
      <draw:polygon text:anchor-type="page" text:anchor-page-number="14" draw:z-index="2731" draw:name="Shape4489" draw:style-name="gr2" draw:text-style-name="P3" svg:width="1.2799in" svg:height="0.1118in" svg:x="0.4114in" svg:y="4.2114in" svg:viewBox="0 0 3252 285" draw:points="0,0 3252,0 3252,285 0,285">
        <text:p/>
      </draw:polygon>
      <draw:frame text:anchor-type="page" text:anchor-page-number="7" draw:z-index="2730" draw:name="Shape2903" draw:style-name="gr1" draw:text-style-name="P2" svg:width="0.4413in" svg:height="0.1295in" svg:x="2.7728in" svg:y="7.0236in">
        <draw:text-box>
          <text:p><text:span text:style-name="T1">&gt; 100 °C</text:span></text:p>
        </draw:text-box>
      </draw:frame>
      <draw:polygon text:anchor-type="page" text:anchor-page-number="3" draw:z-index="2729" draw:name="Shape838" draw:style-name="gr2" draw:text-style-name="P3" svg:width="1.8717in" svg:height="0.1268in" svg:x="0.4114in" svg:y="3.398in" svg:viewBox="0 0 4755 323" draw:points="0,0 4755,0 4755,323 0,323">
        <text:p/>
      </draw:polygon>
      <draw:frame text:anchor-type="page" text:anchor-page-number="11" draw:z-index="2728" draw:name="Shape3934" draw:style-name="gr1" draw:text-style-name="P2" svg:width="0.0433in" svg:height="0.1925in" svg:x="0.3634in" svg:y="6.148in">
        <draw:text-box>
          <text:p><text:span text:style-name="T2"><text:s/></text:span></text:p>
        </draw:text-box>
      </draw:frame>
      <draw:frame text:anchor-type="page" text:anchor-page-number="6" draw:z-index="2727" draw:name="Shape1923" draw:style-name="gr1" draw:text-style-name="P2" svg:width="0.0433in" svg:height="0.1925in" svg:x="1.7965in" svg:y="2.3161in">
        <draw:text-box>
          <text:p><text:span text:style-name="T2"><text:s/></text:span></text:p>
        </draw:text-box>
      </draw:frame>
      <draw:polygon text:anchor-type="page" text:anchor-page-number="9" draw:z-index="2726" draw:name="Shape3437" draw:style-name="gr2" draw:text-style-name="P3" svg:width="3.0516in" svg:height="0.1283in" svg:x="0.4114in" svg:y="6.6547in" svg:viewBox="0 0 7752 327" draw:points="0,0 7752,0 7752,327 0,327">
        <text:p/>
      </draw:polygon>
      <draw:frame text:anchor-type="page" text:anchor-page-number="2" draw:z-index="2725" draw:name="Shape518" draw:style-name="gr1" draw:text-style-name="P2" svg:width="0.2189in" svg:height="0.1295in" svg:x="4.348in" svg:y="6.1453in">
        <draw:text-box>
          <text:p><text:span text:style-name="T1">8.22</text:span></text:p>
        </draw:text-box>
      </draw:frame>
      <draw:polygon text:anchor-type="page" text:anchor-page-number="14" draw:z-index="2724" draw:name="Shape4488" draw:style-name="gr2" draw:text-style-name="P3" svg:width="1.3768in" svg:height="0.1917in" svg:x="0.363in" svg:y="4.2114in" svg:viewBox="0 0 3498 488" draw:points="0,0 3498,0 3498,488 0,488">
        <text:p/>
      </draw:polygon>
      <draw:polygon text:anchor-type="page" text:anchor-page-number="6" draw:z-index="2723" draw:name="Shape1948" draw:style-name="gr2" draw:text-style-name="P3" svg:width="1.0831in" svg:height="0.1118in" svg:x="2.3799in" svg:y="2.3748in" svg:viewBox="0 0 2752 285" draw:points="0,0 2752,0 2752,285 0,285">
        <text:p/>
      </draw:polygon>
      <draw:frame text:anchor-type="page" text:anchor-page-number="7" draw:z-index="2722" draw:name="Shape2895" draw:style-name="gr1" draw:text-style-name="P2" svg:width="0.0433in" svg:height="0.1925in" svg:x="1.7882in" svg:y="6.9764in">
        <draw:text-box>
          <text:p><text:span text:style-name="T2"><text:s/></text:span></text:p>
        </draw:text-box>
      </draw:frame>
      <draw:polygon text:anchor-type="page" text:anchor-page-number="9" draw:z-index="2721" draw:name="Shape3436" draw:style-name="gr2" draw:text-style-name="P3" svg:width="3.1504in" svg:height="0.1283in" svg:x="0.363in" svg:y="6.6547in" svg:viewBox="0 0 8003 327" draw:points="0,0 8003,0 8003,327 0,327">
        <text:p/>
      </draw:polygon>
      <draw:polygon text:anchor-type="page" text:anchor-page-number="10" draw:z-index="2720" draw:name="Shape3668" draw:style-name="gr2" draw:text-style-name="P3" svg:width="0.6898in" svg:height="0.1917in" svg:x="2.7732in" svg:y="7.7898in" svg:viewBox="0 0 1753 488" draw:points="0,0 1753,0 1753,488 0,488">
        <text:p/>
      </draw:polygon>
      <draw:frame text:anchor-type="page" text:anchor-page-number="2" draw:z-index="2719" draw:name="Shape510" draw:style-name="gr1" draw:text-style-name="P2" svg:width="0.0433in" svg:height="0.1925in" svg:x="2.8654in" svg:y="6.098in">
        <draw:text-box>
          <text:p><text:span text:style-name="T2"><text:s/></text:span></text:p>
        </draw:text-box>
      </draw:frame>
      <draw:polygon text:anchor-type="page" text:anchor-page-number="5" draw:z-index="2718" draw:name="Shape1285" draw:style-name="gr2" draw:text-style-name="P3" svg:width="4.7252in" svg:height="0.335in" svg:x="2.7248in" svg:y="6.7681in" svg:viewBox="0 0 12003 852" draw:points="0,0 12003,0 12003,852 0,852">
        <text:p/>
      </draw:polygon>
      <draw:polygon text:anchor-type="page" text:anchor-page-number="1" draw:z-index="2717" draw:name="Shape188" draw:style-name="gr2" draw:text-style-name="P3" svg:width="2.7551in" svg:height="0.5118in" svg:x="0.363in" svg:y="4.978in" svg:viewBox="0 0 6999 1301" draw:points="0,0 6999,0 6999,1301 0,1301">
        <text:p/>
      </draw:polygon>
      <draw:polygon text:anchor-type="page" text:anchor-page-number="3" draw:z-index="2716" draw:name="Shape837" draw:style-name="gr2" draw:text-style-name="P3" svg:width="1.9685in" svg:height="0.5102in" svg:x="0.363in" svg:y="3.398in" svg:viewBox="0 0 5001 1297" draw:points="0,0 5001,0 5001,1297 0,1297">
        <text:p/>
      </draw:polygon>
      <draw:polygon text:anchor-type="page" text:anchor-page-number="13" draw:z-index="2715" draw:name="Shape4289" draw:style-name="gr3" draw:text-style-name="P4" svg:width="0.815in" svg:height="0.0083in" svg:x="0.363in" svg:y="8.4315in" svg:viewBox="0 0 2071 22" draw:points="0,0 2071,0 2071,22 0,22">
        <text:p/>
      </draw:polygon>
      <draw:frame text:anchor-type="page" text:anchor-page-number="11" draw:z-index="2714" draw:name="Shape3933" draw:style-name="gr1" draw:text-style-name="P2" svg:width="2.9406in" svg:height="0.1295in" svg:x="0.3634in" svg:y="6.0165in">
        <draw:text-box>
          <text:p><text:span text:style-name="T3">12.6. Proprietà di interferenza con il sistema endocrino </text:span></text:p>
        </draw:text-box>
      </draw:frame>
      <draw:frame text:anchor-type="page" text:anchor-page-number="3" draw:z-index="2713" draw:name="Shape830" draw:style-name="gr1" draw:text-style-name="P2" svg:width="0.0433in" svg:height="0.1925in" svg:x="3.3634in" svg:y="3.1445in">
        <draw:text-box>
          <text:p><text:span text:style-name="T2"><text:s/></text:span></text:p>
        </draw:text-box>
      </draw:frame>
      <draw:frame text:anchor-type="page" text:anchor-page-number="1" draw:z-index="2712" draw:name="Shape186" draw:style-name="gr1" draw:text-style-name="P2" svg:width="0.3933in" svg:height="0.1295in" svg:x="6.3165in" svg:y="4.852in">
        <draw:text-box>
          <text:p><text:span text:style-name="T1">LCS: C.</text:span></text:p>
        </draw:text-box>
      </draw:frame>
      <draw:frame text:anchor-type="page" text:anchor-page-number="13" draw:z-index="2711" draw:name="Shape4287" draw:style-name="gr1" draw:text-style-name="P2" svg:width="0.0433in" svg:height="0.1925in" svg:x="0.3634in" svg:y="8.128in">
        <draw:text-box>
          <text:p><text:span text:style-name="T2"><text:s/></text:span></text:p>
        </draw:text-box>
      </draw:frame>
      <draw:polygon text:anchor-type="page" text:anchor-page-number="6" draw:z-index="2710" draw:name="Shape1947" draw:style-name="gr2" draw:text-style-name="P3" svg:width="1.1815in" svg:height="0.1917in" svg:x="2.3315in" svg:y="2.3748in" svg:viewBox="0 0 3002 488" draw:points="0,0 3002,0 3002,488 0,488">
        <text:p/>
      </draw:polygon>
      <draw:frame text:anchor-type="page" text:anchor-page-number="9" draw:z-index="2709" draw:name="Shape3431" draw:style-name="gr1" draw:text-style-name="P2" svg:width="0.0433in" svg:height="0.1925in" svg:x="0.3634in" svg:y="6.3398in">
        <draw:text-box>
          <text:p><text:span text:style-name="T2"><text:s/></text:span></text:p>
        </draw:text-box>
      </draw:frame>
      <draw:frame text:anchor-type="page" text:anchor-page-number="14" draw:z-index="2708" draw:name="Shape4478" draw:style-name="gr1" draw:text-style-name="P2" svg:width="0.0433in" svg:height="0.1925in" svg:x="3.7516in" svg:y="3.9752in">
        <draw:text-box>
          <text:p><text:span text:style-name="T2"><text:s/></text:span></text:p>
        </draw:text-box>
      </draw:frame>
      <draw:polygon text:anchor-type="page" text:anchor-page-number="7" draw:z-index="2707" draw:name="Shape2902" draw:style-name="gr2" draw:text-style-name="P3" svg:width="1.4783in" svg:height="0.1268in" svg:x="2.7732in" svg:y="7.0232in" svg:viewBox="0 0 3756 323" draw:points="0,0 3756,0 3756,323 0,323">
        <text:p/>
      </draw:polygon>
      <draw:frame text:anchor-type="page" text:anchor-page-number="11" draw:z-index="2706" draw:name="Shape3932" draw:style-name="gr1" draw:text-style-name="P2" svg:width="0.0433in" svg:height="0.1925in" svg:x="0.3634in" svg:y="5.828in">
        <draw:text-box>
          <text:p><text:span text:style-name="T2"><text:s/></text:span></text:p>
        </draw:text-box>
      </draw:frame>
      <draw:frame text:anchor-type="page" text:anchor-page-number="5" draw:z-index="2705" draw:name="Shape1284" draw:style-name="gr1" draw:text-style-name="P2" svg:width="0.2913in" svg:height="0.113in" svg:x="1.198in" svg:y="6.7701in">
        <draw:text-box>
          <text:p><text:span text:style-name="T4">Polska</text:span></text:p>
        </draw:text-box>
      </draw:frame>
      <draw:polygon text:anchor-type="page" text:anchor-page-number="10" draw:z-index="2704" draw:name="Shape3667" draw:style-name="gr2" draw:text-style-name="P3" svg:width="0.7882in" svg:height="0.1917in" svg:x="2.7248in" svg:y="7.7898in" svg:viewBox="0 0 2003 488" draw:points="0,0 2003,0 2003,488 0,488">
        <text:p/>
      </draw:polygon>
      <draw:polygon text:anchor-type="page" text:anchor-page-number="2" draw:z-index="2703" draw:name="Shape517" draw:style-name="gr2" draw:text-style-name="P3" svg:width="0.4933in" svg:height="0.1268in" svg:x="4.348in" svg:y="6.1449in" svg:viewBox="0 0 1254 323" draw:points="0,0 1254,0 1254,323 0,323">
        <text:p/>
      </draw:polygon>
      <draw:frame text:anchor-type="page" text:anchor-page-number="9" draw:z-index="2702" draw:name="Shape3421" draw:style-name="gr1" draw:text-style-name="P2" svg:width="0.0433in" svg:height="0.1925in" svg:x="4.4382in" svg:y="6.1634in">
        <draw:text-box>
          <text:p><text:span text:style-name="T2"><text:s/></text:span></text:p>
        </draw:text-box>
      </draw:frame>
      <draw:frame text:anchor-type="page" text:anchor-page-number="5" draw:z-index="2701" draw:name="Shape1275" draw:style-name="gr1" draw:text-style-name="P2" svg:width="0.0433in" svg:height="0.1925in" svg:x="0.648in" svg:y="6.7098in">
        <draw:text-box>
          <text:p><text:span text:style-name="T2"><text:s/></text:span></text:p>
        </draw:text-box>
      </draw:frame>
      <draw:frame text:anchor-type="page" text:anchor-page-number="13" draw:z-index="2700" draw:name="Shape4286" draw:style-name="gr1" draw:text-style-name="P2" svg:width="0.474in" svg:height="0.1295in" svg:x="0.3634in" svg:y="7.9984in">
        <draw:text-box>
          <text:p><text:span text:style-name="T1">Nessuna </text:span></text:p>
        </draw:text-box>
      </draw:frame>
      <draw:frame text:anchor-type="page" text:anchor-page-number="11" draw:z-index="2699" draw:name="Shape3931" draw:style-name="gr1" draw:text-style-name="P2" svg:width="0.0433in" svg:height="0.1925in" svg:x="0.3634in" svg:y="5.6362in">
        <draw:text-box>
          <text:p><text:span text:style-name="T2"><text:s/></text:span></text:p>
        </draw:text-box>
      </draw:frame>
      <draw:polygon text:anchor-type="page" text:anchor-page-number="2" draw:z-index="2698" draw:name="Shape516" draw:style-name="gr2" draw:text-style-name="P3" svg:width="0.5898in" svg:height="0.1917in" svg:x="4.3in" svg:y="6.1449in" svg:viewBox="0 0 1499 488" draw:points="0,0 1499,0 1499,488 0,488">
        <text:p/>
      </draw:polygon>
      <draw:polygon text:anchor-type="page" text:anchor-page-number="14" draw:z-index="2697" draw:name="Shape4494" draw:style-name="gr2" draw:text-style-name="P3" svg:width="0.4933in" svg:height="0.1917in" svg:x="6.1197in" svg:y="4.0197in" svg:viewBox="0 0 1254 488" draw:points="0,0 1254,0 1254,488 0,488">
        <text:p/>
      </draw:polygon>
      <draw:frame text:anchor-type="page" text:anchor-page-number="6" draw:z-index="2696" draw:name="Shape1946" draw:style-name="gr1" draw:text-style-name="P2" svg:width="0.2051in" svg:height="0.113in" svg:x="1.5917in" svg:y="2.3772in">
        <draw:text-box>
          <text:p><text:span text:style-name="T4">DEU</text:span></text:p>
        </draw:text-box>
      </draw:frame>
      <draw:frame text:anchor-type="page" text:anchor-page-number="1" draw:z-index="2695" draw:name="Shape178" draw:style-name="gr1" draw:text-style-name="P2" svg:width="0.4059in" svg:height="0.1295in" svg:x="6.3165in" svg:y="4.7256in">
        <draw:text-box>
          <text:p><text:span text:style-name="T1">PC: 9a. </text:span></text:p>
        </draw:text-box>
      </draw:frame>
      <draw:frame text:anchor-type="page" text:anchor-page-number="10" draw:z-index="2694" draw:name="Shape3664" draw:style-name="gr1" draw:text-style-name="P2" svg:width="1.0453in" svg:height="0.1295in" svg:x="0.4535in" svg:y="7.7902in">
        <draw:text-box>
          <text:p><text:span text:style-name="T1">NOEC Cronica Pesci</text:span></text:p>
        </draw:text-box>
      </draw:frame>
      <draw:polygon text:anchor-type="page" text:anchor-page-number="7" draw:z-index="2693" draw:name="Shape2901" draw:style-name="gr2" draw:text-style-name="P3" svg:width="1.5752in" svg:height="0.1268in" svg:x="2.7248in" svg:y="7.0232in" svg:viewBox="0 0 4002 323" draw:points="0,0 4002,0 4002,323 0,323">
        <text:p/>
      </draw:polygon>
      <draw:polygon text:anchor-type="page" text:anchor-page-number="3" draw:z-index="2692" draw:name="Shape844" draw:style-name="gr2" draw:text-style-name="P3" svg:width="0.2965in" svg:height="0.1917in" svg:x="7.3016in" svg:y="3.1413in" svg:viewBox="0 0 754 488" draw:points="0,0 754,0 754,488 0,488">
        <text:p/>
      </draw:polygon>
      <draw:polygon text:anchor-type="page" text:anchor-page-number="14" draw:z-index="2691" draw:name="Shape4493" draw:style-name="gr2" draw:text-style-name="P3" svg:width="0.5898in" svg:height="0.1917in" svg:x="6.0717in" svg:y="4.0197in" svg:viewBox="0 0 1499 488" draw:points="0,0 1499,0 1499,488 0,488">
        <text:p/>
      </draw:polygon>
      <draw:frame text:anchor-type="page" text:anchor-page-number="10" draw:z-index="2690" draw:name="Shape3657" draw:style-name="gr1" draw:text-style-name="P2" svg:width="0.0433in" svg:height="0.1925in" svg:x="0.411in" svg:y="7.7429in">
        <draw:text-box>
          <text:p><text:span text:style-name="T2"><text:s/></text:span></text:p>
        </draw:text-box>
      </draw:frame>
      <draw:frame text:anchor-type="page" text:anchor-page-number="9" draw:z-index="2689" draw:name="Shape3430" draw:style-name="gr1" draw:text-style-name="P2" svg:width="0.8843in" svg:height="0.1295in" svg:x="3.561in" svg:y="6.2102in">
        <draw:text-box>
          <text:p><text:span text:style-name="T1">0.171 mg/l/4h Rat</text:span></text:p>
        </draw:text-box>
      </draw:frame>
      <draw:polygon text:anchor-type="page" text:anchor-page-number="1" draw:z-index="2688" draw:name="Shape185" draw:style-name="gr2" draw:text-style-name="P3" svg:width="1.4783in" svg:height="0.1264in" svg:x="6.3165in" svg:y="4.8516in" svg:viewBox="0 0 3756 322" draw:points="0,0 3756,0 3756,322 0,322">
        <text:p/>
      </draw:polygon>
      <draw:frame text:anchor-type="page" text:anchor-page-number="2" draw:z-index="2687" draw:name="Shape514" draw:style-name="gr1" draw:text-style-name="P2" svg:width="2.428in" svg:height="0.1295in" svg:x="0.4535in" svg:y="6.1453in">
        <draw:text-box>
          <text:p><text:span text:style-name="T1">VOC espressi in g/litro di prodotto pronto all'uso :</text:span></text:p>
        </draw:text-box>
      </draw:frame>
      <draw:polygon text:anchor-type="page" text:anchor-page-number="3" draw:z-index="2686" draw:name="Shape843" draw:style-name="gr2" draw:text-style-name="P3" svg:width="0.3933in" svg:height="0.2567in" svg:x="7.2531in" svg:y="3.1413in" svg:viewBox="0 0 1000 653" draw:points="0,0 1000,0 1000,653 0,653">
        <text:p/>
      </draw:polygon>
      <draw:polygon text:anchor-type="page" text:anchor-page-number="5" draw:z-index="2685" draw:name="Shape1283" draw:style-name="gr2" draw:text-style-name="P3" svg:width="1.4783in" svg:height="0.1118in" svg:x="1.198in" svg:y="6.7681in" svg:viewBox="0 0 3756 285" draw:points="0,0 3756,0 3756,285 0,285">
        <text:p/>
      </draw:polygon>
      <draw:frame text:anchor-type="page" text:anchor-page-number="7" draw:z-index="2684" draw:name="Shape2900" draw:style-name="gr1" draw:text-style-name="P2" svg:width="1.3441in" svg:height="0.1295in" svg:x="0.4535in" svg:y="7.0236in">
        <draw:text-box>
          <text:p><text:span text:style-name="T1">Punto di ebollizione iniziale</text:span></text:p>
        </draw:text-box>
      </draw:frame>
      <draw:frame text:anchor-type="page" text:anchor-page-number="6" draw:z-index="2683" draw:name="Shape1922" draw:style-name="gr1" draw:text-style-name="P2" svg:width="0.0433in" svg:height="0.1925in" svg:x="0.6634in" svg:y="2.3161in">
        <draw:text-box>
          <text:p><text:span text:style-name="T2"><text:s/></text:span></text:p>
        </draw:text-box>
      </draw:frame>
      <draw:frame text:anchor-type="page" text:anchor-page-number="11" draw:z-index="2682" draw:name="Shape3930" draw:style-name="gr1" draw:text-style-name="P2" svg:width="4.8217in" svg:height="0.1295in" svg:x="0.3634in" svg:y="5.5071in">
        <draw:text-box>
          <text:p><text:span text:style-name="T1">In base ai dati disponibili, il prodotto non contiene sostanze PBT o vPvB in percentuale ≥ a 0,1%. </text:span></text:p>
        </draw:text-box>
      </draw:frame>
      <draw:frame text:anchor-type="page" text:anchor-page-number="13" draw:z-index="2681" draw:name="Shape4285" draw:style-name="gr1" draw:text-style-name="P2" svg:width="0.0433in" svg:height="0.1925in" svg:x="0.3634in" svg:y="7.8075in">
        <draw:text-box>
          <text:p><text:span text:style-name="T2"><text:s/></text:span></text:p>
        </draw:text-box>
      </draw:frame>
      <draw:frame text:anchor-type="page" text:anchor-page-number="3" draw:z-index="2680" draw:name="Shape829" draw:style-name="gr1" draw:text-style-name="P2" svg:width="0.0433in" svg:height="0.1925in" svg:x="2.3799in" svg:y="3.1445in">
        <draw:text-box>
          <text:p><text:span text:style-name="T2"><text:s/></text:span></text:p>
        </draw:text-box>
      </draw:frame>
      <draw:frame text:anchor-type="page" text:anchor-page-number="10" draw:z-index="2679" draw:name="Shape3647" draw:style-name="gr1" draw:text-style-name="P2" svg:width="0.0433in" svg:height="0.1925in" svg:x="5.5193in" svg:y="7.5516in">
        <draw:text-box>
          <text:p><text:span text:style-name="T2"><text:s/></text:span></text:p>
        </draw:text-box>
      </draw:frame>
      <draw:frame text:anchor-type="page" text:anchor-page-number="14" draw:z-index="2678" draw:name="Shape4492" draw:style-name="gr1" draw:text-style-name="P2" svg:width="1.978in" svg:height="0.1295in" svg:x="1.7882in" svg:y="4.022in">
        <draw:text-box>
          <text:p><text:span text:style-name="T1">Sensibilizzazione cutanea, categoria 1A</text:span></text:p>
        </draw:text-box>
      </draw:frame>
      <draw:frame text:anchor-type="page" text:anchor-page-number="13" draw:z-index="2677" draw:name="Shape4283" draw:style-name="gr1" draw:text-style-name="P2" svg:width="2.5496in" svg:height="0.1295in" svg:x="0.3634in" svg:y="7.6783in">
        <draw:text-box>
          <text:p><text:span text:style-name="T1">Sostanze soggette alla Convenzione di Stoccolma: </text:span></text:p>
        </draw:text-box>
      </draw:frame>
      <draw:frame text:anchor-type="page" text:anchor-page-number="1" draw:z-index="2676" draw:name="Shape167" draw:style-name="gr1" draw:text-style-name="P2" svg:width="1.1248in" svg:height="0.1295in" svg:x="6.3165in" svg:y="4.5972in">
        <draw:text-box>
          <text:p><text:span text:style-name="T1">PROC: 10, 11, 13, 8a. </text:span></text:p>
        </draw:text-box>
      </draw:frame>
      <draw:frame text:anchor-type="page" text:anchor-page-number="7" draw:z-index="2675" draw:name="Shape2894" draw:style-name="gr1" draw:text-style-name="P2" svg:width="0.0433in" svg:height="0.1925in" svg:x="0.411in" svg:y="6.9764in">
        <draw:text-box>
          <text:p><text:span text:style-name="T2"><text:s/></text:span></text:p>
        </draw:text-box>
      </draw:frame>
      <draw:polygon text:anchor-type="page" text:anchor-page-number="6" draw:z-index="2674" draw:name="Shape1945" draw:style-name="gr2" draw:text-style-name="P3" svg:width="0.6917in" svg:height="0.1118in" svg:x="1.5913in" svg:y="2.3748in" svg:viewBox="0 0 1758 285" draw:points="0,0 1758,0 1758,285 0,285">
        <text:p/>
      </draw:polygon>
      <draw:frame text:anchor-type="page" text:anchor-page-number="9" draw:z-index="2673" draw:name="Shape3420" draw:style-name="gr1" draw:text-style-name="P2" svg:width="0.0433in" svg:height="0.1925in" svg:x="2.0835in" svg:y="6.1634in">
        <draw:text-box>
          <text:p><text:span text:style-name="T2"><text:s/></text:span></text:p>
        </draw:text-box>
      </draw:frame>
      <draw:frame text:anchor-type="page" text:anchor-page-number="2" draw:z-index="2672" draw:name="Shape509" draw:style-name="gr1" draw:text-style-name="P2" svg:width="0.0433in" svg:height="0.1925in" svg:x="0.411in" svg:y="6.098in">
        <draw:text-box>
          <text:p><text:span text:style-name="T2"><text:s/></text:span></text:p>
        </draw:text-box>
      </draw:frame>
      <draw:frame text:anchor-type="page" text:anchor-page-number="11" draw:z-index="2671" draw:name="Shape3929" draw:style-name="gr1" draw:text-style-name="P2" svg:width="0.0433in" svg:height="0.1925in" svg:x="0.3634in" svg:y="5.3161in">
        <draw:text-box>
          <text:p><text:span text:style-name="T2"><text:s/></text:span></text:p>
        </draw:text-box>
      </draw:frame>
      <draw:polygon text:anchor-type="page" text:anchor-page-number="5" draw:z-index="2670" draw:name="Shape1282" draw:style-name="gr2" draw:text-style-name="P3" svg:width="1.5752in" svg:height="0.335in" svg:x="1.15in" svg:y="6.7681in" svg:viewBox="0 0 4002 852" draw:points="0,0 4002,0 4002,852 0,852">
        <text:p/>
      </draw:polygon>
      <draw:frame text:anchor-type="page" text:anchor-page-number="2" draw:z-index="2669" draw:name="Shape508" draw:style-name="gr1" draw:text-style-name="P2" svg:width="0.0433in" svg:height="0.1925in" svg:x="0.3634in" svg:y="5.9563in">
        <draw:text-box>
          <text:p><text:span text:style-name="T2"><text:s/></text:span></text:p>
        </draw:text-box>
      </draw:frame>
      <draw:frame text:anchor-type="page" text:anchor-page-number="5" draw:z-index="2668" draw:name="Shape1281" draw:style-name="gr1" draw:text-style-name="P2" svg:width="0.1949in" svg:height="0.113in" svg:x="0.4535in" svg:y="6.7701in">
        <draw:text-box>
          <text:p><text:span text:style-name="T4">POL</text:span></text:p>
        </draw:text-box>
      </draw:frame>
      <draw:polygon text:anchor-type="page" text:anchor-page-number="1" draw:z-index="2667" draw:name="Shape177" draw:style-name="gr2" draw:text-style-name="P3" svg:width="1.5185in" svg:height="0.1283in" svg:x="6.2965in" svg:y="4.7232in" svg:viewBox="0 0 3858 327" draw:points="0,0 3858,0 3858,327 0,327">
        <text:p/>
      </draw:polygon>
      <draw:frame text:anchor-type="page" text:anchor-page-number="11" draw:z-index="2666" draw:name="Shape3928" draw:style-name="gr1" draw:text-style-name="P2" svg:width="2.3378in" svg:height="0.1295in" svg:x="0.3634in" svg:y="5.1866in">
        <draw:text-box>
          <text:p><text:span text:style-name="T3">12.5. Risultati della valutazione PBT e vPvB </text:span></text:p>
        </draw:text-box>
      </draw:frame>
      <draw:polygon text:anchor-type="page" text:anchor-page-number="9" draw:z-index="2665" draw:name="Shape3429" draw:style-name="gr2" draw:text-style-name="P3" svg:width="3.8402in" svg:height="0.1283in" svg:x="3.5614in" svg:y="6.2083in" svg:viewBox="0 0 9755 327" draw:points="0,0 9755,0 9755,327 0,327">
        <text:p/>
      </draw:polygon>
      <draw:polygon text:anchor-type="page" text:anchor-page-number="10" draw:z-index="2664" draw:name="Shape3663" draw:style-name="gr2" draw:text-style-name="P3" svg:width="2.265in" svg:height="0.1268in" svg:x="0.4114in" svg:y="7.7898in" svg:viewBox="0 0 5754 323" draw:points="0,0 5754,0 5754,323 0,323">
        <text:p/>
      </draw:polygon>
      <draw:polygon text:anchor-type="page" text:anchor-page-number="13" draw:z-index="2663" draw:name="Shape4284" draw:style-name="gr3" draw:text-style-name="P4" svg:width="2.502in" svg:height="0.0087in" svg:x="0.363in" svg:y="7.7913in" svg:viewBox="0 0 6356 23" draw:points="0,0 6356,0 6356,23 0,23">
        <text:p/>
      </draw:polygon>
      <draw:polygon text:anchor-type="page" text:anchor-page-number="6" draw:z-index="2662" draw:name="Shape1944" draw:style-name="gr2" draw:text-style-name="P3" svg:width="0.7882in" svg:height="0.1917in" svg:x="1.5433in" svg:y="2.3748in" svg:viewBox="0 0 2003 488" draw:points="0,0 2003,0 2003,488 0,488">
        <text:p/>
      </draw:polygon>
      <draw:polygon text:anchor-type="page" text:anchor-page-number="3" draw:z-index="2661" draw:name="Shape842" draw:style-name="gr2" draw:text-style-name="P3" svg:width="3.8417in" svg:height="0.1917in" svg:x="3.363in" svg:y="3.1413in" svg:viewBox="0 0 9759 488" draw:points="0,0 9759,0 9759,488 0,488">
        <text:p/>
      </draw:polygon>
      <draw:frame text:anchor-type="page" text:anchor-page-number="14" draw:z-index="2660" draw:name="Shape4472" draw:style-name="gr1" draw:text-style-name="P2" svg:width="0.0433in" svg:height="0.1925in" svg:x="1.0965in" svg:y="3.9598in">
        <draw:text-box>
          <text:p><text:span text:style-name="T2"><text:s/></text:span></text:p>
        </draw:text-box>
      </draw:frame>
      <draw:frame text:anchor-type="page" text:anchor-page-number="7" draw:z-index="2659" draw:name="Shape2893" draw:style-name="gr1" draw:text-style-name="P2" svg:width="0.0433in" svg:height="0.1925in" svg:x="4.348in" svg:y="6.8346in">
        <draw:text-box>
          <text:p><text:span text:style-name="T2"><text:s/></text:span></text:p>
        </draw:text-box>
      </draw:frame>
      <draw:frame text:anchor-type="page" text:anchor-page-number="13" draw:z-index="2658" draw:name="Shape4282" draw:style-name="gr1" draw:text-style-name="P2" svg:width="0.0433in" svg:height="0.1925in" svg:x="0.3634in" svg:y="7.4898in">
        <draw:text-box>
          <text:p><text:span text:style-name="T2"><text:s/></text:span></text:p>
        </draw:text-box>
      </draw:frame>
      <draw:frame text:anchor-type="page" text:anchor-page-number="6" draw:z-index="2657" draw:name="Shape1943" draw:style-name="gr1" draw:text-style-name="P2" svg:width="0.2106in" svg:height="0.113in" svg:x="0.4547in" svg:y="2.3772in">
        <draw:text-box>
          <text:p><text:span text:style-name="T4">MAK</text:span></text:p>
        </draw:text-box>
      </draw:frame>
      <draw:frame text:anchor-type="page" text:anchor-page-number="11" draw:z-index="2656" draw:name="Shape3927" draw:style-name="gr1" draw:text-style-name="P2" svg:width="0.0433in" svg:height="0.1925in" svg:x="0.3634in" svg:y="4.998in">
        <draw:text-box>
          <text:p><text:span text:style-name="T2"><text:s/></text:span></text:p>
        </draw:text-box>
      </draw:frame>
      <draw:polygon text:anchor-type="page" text:anchor-page-number="3" draw:z-index="2655" draw:name="Shape841" draw:style-name="gr2" draw:text-style-name="P3" svg:width="3.9382in" svg:height="0.2567in" svg:x="3.315in" svg:y="3.1413in" svg:viewBox="0 0 10004 653" draw:points="0,0 10004,0 10004,653 0,653">
        <text:p/>
      </draw:polygon>
      <draw:polygon text:anchor-type="page" text:anchor-page-number="2" draw:z-index="2654" draw:name="Shape513" draw:style-name="gr2" draw:text-style-name="P3" svg:width="3.8402in" svg:height="0.1268in" svg:x="0.4114in" svg:y="6.1449in" svg:viewBox="0 0 9755 323" draw:points="0,0 9755,0 9755,323 0,323">
        <text:p/>
      </draw:polygon>
      <draw:polygon text:anchor-type="page" text:anchor-page-number="7" draw:z-index="2653" draw:name="Shape2899" draw:style-name="gr2" draw:text-style-name="P3" svg:width="2.265in" svg:height="0.1268in" svg:x="0.4114in" svg:y="7.0232in" svg:viewBox="0 0 5754 323" draw:points="0,0 5754,0 5754,323 0,323">
        <text:p/>
      </draw:polygon>
      <draw:frame text:anchor-type="page" text:anchor-page-number="5" draw:z-index="2652" draw:name="Shape1274" draw:style-name="gr1" draw:text-style-name="P2" svg:width="0.0433in" svg:height="0.1925in" svg:x="0.411in" svg:y="6.7098in">
        <draw:text-box>
          <text:p><text:span text:style-name="T2"><text:s/></text:span></text:p>
        </draw:text-box>
      </draw:frame>
      <draw:frame text:anchor-type="page" text:anchor-page-number="1" draw:z-index="2651" draw:name="Shape160" draw:style-name="gr1" draw:text-style-name="P2" svg:width="0.6724in" svg:height="0.1295in" svg:x="6.3165in" svg:y="4.4689in">
        <draw:text-box>
          <text:p><text:span text:style-name="T1">ERC: 8a, 8d. </text:span></text:p>
        </draw:text-box>
      </draw:frame>
      <draw:polygon text:anchor-type="page" text:anchor-page-number="9" draw:z-index="2650" draw:name="Shape3428" draw:style-name="gr2" draw:text-style-name="P3" svg:width="3.937in" svg:height="0.1283in" svg:x="3.513in" svg:y="6.2083in" svg:viewBox="0 0 10001 327" draw:points="0,0 10001,0 10001,327 0,327">
        <text:p/>
      </draw:polygon>
      <draw:polygon text:anchor-type="page" text:anchor-page-number="14" draw:z-index="2649" draw:name="Shape4491" draw:style-name="gr2" draw:text-style-name="P3" svg:width="4.235in" svg:height="0.1283in" svg:x="1.7882in" svg:y="4.0197in" svg:viewBox="0 0 10758 327" draw:points="0,0 10758,0 10758,327 0,327">
        <text:p/>
      </draw:polygon>
      <draw:polygon text:anchor-type="page" text:anchor-page-number="10" draw:z-index="2648" draw:name="Shape3662" draw:style-name="gr2" draw:text-style-name="P3" svg:width="2.3618in" svg:height="0.1917in" svg:x="0.363in" svg:y="7.7898in" svg:viewBox="0 0 6000 488" draw:points="0,0 6000,0 6000,488 0,488">
        <text:p/>
      </draw:polygon>
      <draw:polygon text:anchor-type="page" text:anchor-page-number="1" draw:z-index="2647" draw:name="Shape166" draw:style-name="gr2" draw:text-style-name="P3" svg:width="1.5185in" svg:height="0.1283in" svg:x="6.2965in" svg:y="4.5949in" svg:viewBox="0 0 3858 327" draw:points="0,0 3858,0 3858,327 0,327">
        <text:p/>
      </draw:polygon>
      <draw:frame text:anchor-type="page" text:anchor-page-number="13" draw:z-index="2646" draw:name="Shape4281" draw:style-name="gr1" draw:text-style-name="P2" svg:width="0.474in" svg:height="0.1295in" svg:x="0.3634in" svg:y="7.3602in">
        <draw:text-box>
          <text:p><text:span text:style-name="T1">Nessuna </text:span></text:p>
        </draw:text-box>
      </draw:frame>
      <draw:polygon text:anchor-type="page" text:anchor-page-number="14" draw:z-index="2645" draw:name="Shape4490" draw:style-name="gr2" draw:text-style-name="P3" svg:width="4.3319in" svg:height="0.1917in" svg:x="1.7398in" svg:y="4.0197in" svg:viewBox="0 0 11004 488" draw:points="0,0 11004,0 11004,488 0,488">
        <text:p/>
      </draw:polygon>
      <draw:frame text:anchor-type="page" text:anchor-page-number="11" draw:z-index="2644" draw:name="Shape3926" draw:style-name="gr1" draw:text-style-name="P2" svg:width="0.0433in" svg:height="0.1925in" svg:x="0.3634in" svg:y="4.8063in">
        <draw:text-box>
          <text:p><text:span text:style-name="T2"><text:s/></text:span></text:p>
        </draw:text-box>
      </draw:frame>
      <draw:polygon text:anchor-type="page" text:anchor-page-number="7" draw:z-index="2643" draw:name="Shape2898" draw:style-name="gr2" draw:text-style-name="P3" svg:width="2.3618in" svg:height="0.1268in" svg:x="0.363in" svg:y="7.0232in" svg:viewBox="0 0 6000 323" draw:points="0,0 6000,0 6000,323 0,323">
        <text:p/>
      </draw:polygon>
      <draw:frame text:anchor-type="page" text:anchor-page-number="9" draw:z-index="2642" draw:name="Shape3427" draw:style-name="gr1" draw:text-style-name="P2" svg:width="1.6425in" svg:height="0.1295in" svg:x="0.4535in" svg:y="6.2102in">
        <draw:text-box>
          <text:p><text:span text:style-name="T1">LC50 (Inalazione nebbie/polveri):</text:span></text:p>
        </draw:text-box>
      </draw:frame>
      <draw:frame text:anchor-type="page" text:anchor-page-number="5" draw:z-index="2641" draw:name="Shape1273" draw:style-name="gr1" draw:text-style-name="P2" svg:width="0.0433in" svg:height="0.1925in" svg:x="5.4264in" svg:y="6.5965in">
        <draw:text-box>
          <text:p><text:span text:style-name="T2"><text:s/></text:span></text:p>
        </draw:text-box>
      </draw:frame>
      <draw:polygon text:anchor-type="page" text:anchor-page-number="2" draw:z-index="2640" draw:name="Shape512" draw:style-name="gr2" draw:text-style-name="P3" svg:width="3.937in" svg:height="0.1917in" svg:x="0.363in" svg:y="6.1449in" svg:viewBox="0 0 10001 488" draw:points="0,0 10001,0 10001,488 0,488">
        <text:p/>
      </draw:polygon>
      <draw:frame text:anchor-type="page" text:anchor-page-number="10" draw:z-index="2639" draw:name="Shape3655" draw:style-name="gr1" draw:text-style-name="P2" svg:width="1.9717in" svg:height="0.1295in" svg:x="3.561in" svg:y="7.5984in">
        <draw:text-box>
          <text:p><text:span text:style-name="T1">0.0052 mg/l/72h Skeletonema costatum</text:span></text:p>
        </draw:text-box>
      </draw:frame>
      <draw:frame text:anchor-type="page" text:anchor-page-number="6" draw:z-index="2638" draw:name="Shape1921" draw:style-name="gr1" draw:text-style-name="P2" svg:width="0.0433in" svg:height="0.1925in" svg:x="0.411in" svg:y="2.3161in">
        <draw:text-box>
          <text:p><text:span text:style-name="T2"><text:s/></text:span></text:p>
        </draw:text-box>
      </draw:frame>
      <draw:frame text:anchor-type="page" text:anchor-page-number="3" draw:z-index="2637" draw:name="Shape832" draw:style-name="gr1" draw:text-style-name="P2" svg:width="0.0433in" svg:height="0.1925in" svg:x="0.7083in" svg:y="3.2252in">
        <draw:text-box>
          <text:p><text:span text:style-name="T2"><text:s/></text:span></text:p>
        </draw:text-box>
      </draw:frame>
      <draw:polygon text:anchor-type="page" text:anchor-page-number="5" draw:z-index="2636" draw:name="Shape1280" draw:style-name="gr2" draw:text-style-name="P3" svg:width="0.6902in" svg:height="0.1118in" svg:x="0.4114in" svg:y="6.7681in" svg:viewBox="0 0 1754 285" draw:points="0,0 1754,0 1754,285 0,285">
        <text:p/>
      </draw:polygon>
      <draw:frame text:anchor-type="page" text:anchor-page-number="11" draw:z-index="2635" draw:name="Shape3925" draw:style-name="gr1" draw:text-style-name="P2" svg:width="1.3815in" svg:height="0.1295in" svg:x="0.3634in" svg:y="4.6772in">
        <draw:text-box>
          <text:p><text:span text:style-name="T1">Informazioni non disponibili </text:span></text:p>
        </draw:text-box>
      </draw:frame>
      <draw:frame text:anchor-type="page" text:anchor-page-number="13" draw:z-index="2634" draw:name="Shape4280" draw:style-name="gr1" draw:text-style-name="P2" svg:width="0.0433in" svg:height="0.1925in" svg:x="0.3634in" svg:y="7.1693in">
        <draw:text-box>
          <text:p><text:span text:style-name="T2"><text:s/></text:span></text:p>
        </draw:text-box>
      </draw:frame>
      <draw:polygon text:anchor-type="page" text:anchor-page-number="3" draw:z-index="2633" draw:name="Shape840" draw:style-name="gr2" draw:text-style-name="P3" svg:width="0.8866in" svg:height="0.1917in" svg:x="2.3799in" svg:y="3.1413in" svg:viewBox="0 0 2253 488" draw:points="0,0 2253,0 2253,488 0,488">
        <text:p/>
      </draw:polygon>
      <draw:frame text:anchor-type="page" text:anchor-page-number="10" draw:z-index="2632" draw:name="Shape3656" draw:style-name="gr1" draw:text-style-name="P2" svg:width="0.0433in" svg:height="0.1925in" svg:x="2.7728in" svg:y="7.6016in">
        <draw:text-box>
          <text:p><text:span text:style-name="T2"><text:s/></text:span></text:p>
        </draw:text-box>
      </draw:frame>
      <draw:frame text:anchor-type="page" text:anchor-page-number="9" draw:z-index="2631" draw:name="Shape3419" draw:style-name="gr1" draw:text-style-name="P2" svg:width="0.0433in" svg:height="0.1925in" svg:x="0.411in" svg:y="6.1634in">
        <draw:text-box>
          <text:p><text:span text:style-name="T2"><text:s/></text:span></text:p>
        </draw:text-box>
      </draw:frame>
      <draw:frame text:anchor-type="page" text:anchor-page-number="6" draw:z-index="2630" draw:name="Shape1920" draw:style-name="gr1" draw:text-style-name="P2" svg:width="0.0433in" svg:height="0.1925in" svg:x="6.7098in" svg:y="2.1764in">
        <draw:text-box>
          <text:p><text:span text:style-name="T2"><text:s/></text:span></text:p>
        </draw:text-box>
      </draw:frame>
      <draw:frame text:anchor-type="page" text:anchor-page-number="7" draw:z-index="2629" draw:name="Shape2880" draw:style-name="gr1" draw:text-style-name="P2" svg:width="0.0433in" svg:height="0.1925in" svg:x="3.5154in" svg:y="6.7862in">
        <draw:text-box>
          <text:p><text:span text:style-name="T2"><text:s/></text:span></text:p>
        </draw:text-box>
      </draw:frame>
      <draw:frame text:anchor-type="page" text:anchor-page-number="1" draw:z-index="2628" draw:name="Shape158" draw:style-name="gr1" draw:text-style-name="P2" svg:width="0.4059in" svg:height="0.1295in" svg:x="6.3165in" svg:y="4.3425in">
        <draw:text-box>
          <text:p><text:span text:style-name="T1">SU: 19. </text:span></text:p>
        </draw:text-box>
      </draw:frame>
      <draw:frame text:anchor-type="page" text:anchor-page-number="2" draw:z-index="2627" draw:name="Shape507" draw:style-name="gr1" draw:text-style-name="P2" svg:width="2.9394in" svg:height="0.1295in" svg:x="0.3634in" svg:y="5.8272in">
        <draw:text-box>
          <text:p><text:span text:style-name="T1">Pitture opache per pareti e soffitti interni (gloss &lt; 25@60°). </text:span></text:p>
        </draw:text-box>
      </draw:frame>
      <draw:frame text:anchor-type="page" text:anchor-page-number="14" draw:z-index="2626" draw:name="Shape4483" draw:style-name="gr1" draw:text-style-name="P2" svg:width="0.6398in" svg:height="0.113in" svg:x="0.4535in" svg:y="4.0201in">
        <draw:text-box>
          <text:p><text:span text:style-name="T5">Skin Sens. 1A</text:span></text:p>
        </draw:text-box>
      </draw:frame>
      <draw:polygon text:anchor-type="page" text:anchor-page-number="7" draw:z-index="2625" draw:name="Shape2892" draw:style-name="gr2" draw:text-style-name="P3" svg:width="2.265in" svg:height="0.1917in" svg:x="4.348in" svg:y="6.8315in" svg:viewBox="0 0 5754 488" draw:points="0,0 5754,0 5754,488 0,488">
        <text:p/>
      </draw:polygon>
      <draw:polygon text:anchor-type="page" text:anchor-page-number="1" draw:z-index="2624" draw:name="Shape164" draw:style-name="gr2" draw:text-style-name="P3" svg:width="1.5185in" svg:height="0.1268in" svg:x="6.2965in" svg:y="4.4681in" svg:viewBox="0 0 3858 323" draw:points="0,0 3858,0 3858,323 0,323">
        <text:p/>
      </draw:polygon>
      <draw:polygon text:anchor-type="page" text:anchor-page-number="5" draw:z-index="2623" draw:name="Shape1279" draw:style-name="gr2" draw:text-style-name="P3" svg:width="0.7866in" svg:height="0.335in" svg:x="0.363in" svg:y="6.7681in" svg:viewBox="0 0 1999 852" draw:points="0,0 1999,0 1999,852 0,852">
        <text:p/>
      </draw:polygon>
      <draw:frame text:anchor-type="page" text:anchor-page-number="2" draw:z-index="2622" draw:name="Shape506" draw:style-name="gr1" draw:text-style-name="P2" svg:width="0.0433in" svg:height="0.1925in" svg:x="0.3634in" svg:y="5.6362in">
        <draw:text-box>
          <text:p><text:span text:style-name="T2"><text:s/></text:span></text:p>
        </draw:text-box>
      </draw:frame>
      <draw:frame text:anchor-type="page" text:anchor-page-number="11" draw:z-index="2621" draw:name="Shape3924" draw:style-name="gr1" draw:text-style-name="P2" svg:width="0.0433in" svg:height="0.1925in" svg:x="0.3634in" svg:y="4.4862in">
        <draw:text-box>
          <text:p><text:span text:style-name="T2"><text:s/></text:span></text:p>
        </draw:text-box>
      </draw:frame>
      <draw:frame text:anchor-type="page" text:anchor-page-number="13" draw:z-index="2620" draw:name="Shape4278" draw:style-name="gr1" draw:text-style-name="P2" svg:width="2.5496in" svg:height="0.1295in" svg:x="0.3634in" svg:y="7.0402in">
        <draw:text-box>
          <text:p><text:span text:style-name="T1">Sostanze soggette alla Convenzione di Rotterdam: </text:span></text:p>
        </draw:text-box>
      </draw:frame>
      <draw:polygon text:anchor-type="page" text:anchor-page-number="3" draw:z-index="2619" draw:name="Shape839" draw:style-name="gr2" draw:text-style-name="P3" svg:width="0.9835in" svg:height="0.2567in" svg:x="2.3315in" svg:y="3.1413in" svg:viewBox="0 0 2499 653" draw:points="0,0 2499,0 2499,653 0,653">
        <text:p/>
      </draw:polygon>
      <draw:polygon text:anchor-type="page" text:anchor-page-number="6" draw:z-index="2618" draw:name="Shape1928" draw:style-name="gr2" draw:text-style-name="P3" svg:width="1.0835in" svg:height="0.1118in" svg:x="0.4114in" svg:y="2.3748in" svg:viewBox="0 0 2753 285" draw:points="0,0 2753,0 2753,285 0,285">
        <text:p/>
      </draw:polygon>
      <draw:frame text:anchor-type="page" text:anchor-page-number="14" draw:z-index="2617" draw:name="Shape4477" draw:style-name="gr1" draw:text-style-name="P2" svg:width="0.0433in" svg:height="0.1925in" svg:x="0.411in" svg:y="3.9598in">
        <draw:text-box>
          <text:p><text:span text:style-name="T2"><text:s/></text:span></text:p>
        </draw:text-box>
      </draw:frame>
      <draw:polygon text:anchor-type="page" text:anchor-page-number="10" draw:z-index="2616" draw:name="Shape3660" draw:style-name="gr2" draw:text-style-name="P3" svg:width="3.8402in" svg:height="0.1268in" svg:x="3.5614in" svg:y="7.598in" svg:viewBox="0 0 9755 323" draw:points="0,0 9755,0 9755,323 0,323">
        <text:p/>
      </draw:polygon>
      <draw:frame text:anchor-type="page" text:anchor-page-number="9" draw:z-index="2615" draw:name="Shape3413" draw:style-name="gr1" draw:text-style-name="P2" svg:width="0.0433in" svg:height="0.1925in" svg:x="4.2846in" svg:y="6.0346in">
        <draw:text-box>
          <text:p><text:span text:style-name="T2"><text:s/></text:span></text:p>
        </draw:text-box>
      </draw:frame>
      <draw:polygon text:anchor-type="page" text:anchor-page-number="13" draw:z-index="2614" draw:name="Shape4279" draw:style-name="gr3" draw:text-style-name="P4" svg:width="2.502in" svg:height="0.0083in" svg:x="0.363in" svg:y="7.1531in" svg:viewBox="0 0 6356 22" draw:points="0,0 6356,0 6356,22 0,22">
        <text:p/>
      </draw:polygon>
      <draw:polygon text:anchor-type="page" text:anchor-page-number="9" draw:z-index="2613" draw:name="Shape3426" draw:style-name="gr2" draw:text-style-name="P3" svg:width="3.0516in" svg:height="0.1283in" svg:x="0.4114in" svg:y="6.2083in" svg:viewBox="0 0 7752 327" draw:points="0,0 7752,0 7752,327 0,327">
        <text:p/>
      </draw:polygon>
      <draw:frame text:anchor-type="page" text:anchor-page-number="3" draw:z-index="2612" draw:name="Shape834" draw:style-name="gr1" draw:text-style-name="P2" svg:width="0.3004in" svg:height="0.1295in" svg:x="0.411in" svg:y="3.272in">
        <draw:text-box>
          <text:p><text:span text:style-name="T1">XXXX</text:span></text:p>
        </draw:text-box>
      </draw:frame>
      <draw:polygon text:anchor-type="page" text:anchor-page-number="6" draw:z-index="2611" draw:name="Shape1927" draw:style-name="gr2" draw:text-style-name="P3" svg:width="1.1803in" svg:height="0.1917in" svg:x="0.363in" svg:y="2.3748in" svg:viewBox="0 0 2999 488" draw:points="0,0 2999,0 2999,488 0,488">
        <text:p/>
      </draw:polygon>
      <draw:frame text:anchor-type="page" text:anchor-page-number="1" draw:z-index="2610" draw:name="Shape173" draw:style-name="gr1" draw:text-style-name="P2" svg:width="0.0433in" svg:height="0.1925in" svg:x="5.2299in" svg:y="4.8047in">
        <draw:text-box>
          <text:p><text:span text:style-name="T2"><text:s/></text:span></text:p>
        </draw:text-box>
      </draw:frame>
      <draw:frame text:anchor-type="page" text:anchor-page-number="2" draw:z-index="2609" draw:name="Shape504" draw:style-name="gr1" draw:text-style-name="P2" svg:width="1.4748in" svg:height="0.1295in" svg:x="0.3634in" svg:y="5.5071in">
        <draw:text-box>
          <text:p><text:span text:style-name="T1">VOC (Direttiva 2004/42/CE) : </text:span></text:p>
        </draw:text-box>
      </draw:frame>
      <draw:polygon text:anchor-type="page" text:anchor-page-number="10" draw:z-index="2608" draw:name="Shape3659" draw:style-name="gr2" draw:text-style-name="P3" svg:width="3.937in" svg:height="0.1917in" svg:x="3.513in" svg:y="7.598in" svg:viewBox="0 0 10001 488" draw:points="0,0 10001,0 10001,488 0,488">
        <text:p/>
      </draw:polygon>
      <draw:frame text:anchor-type="page" text:anchor-page-number="5" draw:z-index="2607" draw:name="Shape1278" draw:style-name="gr1" draw:text-style-name="P2" svg:width="2.6307in" svg:height="0.113in" svg:x="2.7728in" svg:y="6.6575in">
        <draw:text-box>
          <text:p><text:span text:style-name="T4">lid, en 4.16, eerste lid, van het Arbeidsomstandighedenbesluit</text:span></text:p>
        </draw:text-box>
      </draw:frame>
      <draw:frame text:anchor-type="page" text:anchor-page-number="14" draw:z-index="2606" draw:name="Shape4476" draw:style-name="gr1" draw:text-style-name="P2" svg:width="0.0433in" svg:height="0.1925in" svg:x="6.1193in" svg:y="3.8311in">
        <draw:text-box>
          <text:p><text:span text:style-name="T2"><text:s/></text:span></text:p>
        </draw:text-box>
      </draw:frame>
      <draw:polygon text:anchor-type="page" text:anchor-page-number="7" draw:z-index="2605" draw:name="Shape2891" draw:style-name="gr2" draw:text-style-name="P3" svg:width="2.363in" svg:height="0.1917in" svg:x="4.3in" svg:y="6.8315in" svg:viewBox="0 0 6003 488" draw:points="0,0 6003,0 6003,488 0,488">
        <text:p/>
      </draw:polygon>
      <draw:frame text:anchor-type="page" text:anchor-page-number="11" draw:z-index="2604" draw:name="Shape3923" draw:style-name="gr1" draw:text-style-name="P2" svg:width="1.2567in" svg:height="0.1295in" svg:x="0.3634in" svg:y="4.3555in">
        <draw:text-box>
          <text:p><text:span text:style-name="T3">12.4. Mobilità nel suolo </text:span></text:p>
        </draw:text-box>
      </draw:frame>
      <draw:polygon text:anchor-type="page" text:anchor-page-number="6" draw:z-index="2603" draw:name="Shape1894" draw:style-name="gr3" draw:text-style-name="P4" svg:width="1.1717in" svg:height="0.0102in" svg:x="6.6732in" svg:y="2.1614in" svg:viewBox="0 0 2977 27" draw:points="0,0 2977,0 2977,27 0,27">
        <text:p/>
      </draw:polygon>
      <draw:frame text:anchor-type="page" text:anchor-page-number="5" draw:z-index="2602" draw:name="Shape1272" draw:style-name="gr1" draw:text-style-name="P2" svg:width="4.4823in" svg:height="0.113in" svg:x="2.7728in" svg:y="6.5457in">
        <draw:text-box>
          <text:p><text:span text:style-name="T4">Arbeidsomstandighedenregeling. Lijst van wettelijke grenswaarden op grond van de artikelen 4.3, eerste </text:span></text:p>
        </draw:text-box>
      </draw:frame>
      <draw:polygon text:anchor-type="page" text:anchor-page-number="2" draw:z-index="2601" draw:name="Shape505" draw:style-name="gr3" draw:text-style-name="P4" svg:width="1.4335in" svg:height="0.0083in" svg:x="0.363in" svg:y="5.6197in" svg:viewBox="0 0 3642 22" draw:points="0,0 3642,0 3642,22 0,22">
        <text:p/>
      </draw:polygon>
      <draw:polygon text:anchor-type="page" text:anchor-page-number="14" draw:z-index="2600" draw:name="Shape4480" draw:style-name="gr2" draw:text-style-name="P3" svg:width="1.2799in" svg:height="0.1118in" svg:x="0.4114in" svg:y="4.0197in" svg:viewBox="0 0 3252 285" draw:points="0,0 3252,0 3252,285 0,285">
        <text:p/>
      </draw:polygon>
      <draw:frame text:anchor-type="page" text:anchor-page-number="7" draw:z-index="2599" draw:name="Shape2890" draw:style-name="gr1" draw:text-style-name="P2" svg:width="0.7476in" svg:height="0.1295in" svg:x="2.7728in" svg:y="6.8339in">
        <draw:text-box>
          <text:p><text:span text:style-name="T1">non disponibile</text:span></text:p>
        </draw:text-box>
      </draw:frame>
      <draw:frame text:anchor-type="page" text:anchor-page-number="13" draw:z-index="2598" draw:name="Shape4277" draw:style-name="gr1" draw:text-style-name="P2" svg:width="0.0433in" svg:height="0.1925in" svg:x="0.3634in" svg:y="6.8492in">
        <draw:text-box>
          <text:p><text:span text:style-name="T2"><text:s/></text:span></text:p>
        </draw:text-box>
      </draw:frame>
      <draw:polygon text:anchor-type="page" text:anchor-page-number="1" draw:z-index="2597" draw:name="Shape157" draw:style-name="gr2" draw:text-style-name="P3" svg:width="1.5185in" svg:height="0.1283in" svg:x="6.2965in" svg:y="4.3398in" svg:viewBox="0 0 3858 327" draw:points="0,0 3858,0 3858,327 0,327">
        <text:p/>
      </draw:polygon>
      <draw:frame text:anchor-type="page" text:anchor-page-number="10" draw:z-index="2596" draw:name="Shape3646" draw:style-name="gr1" draw:text-style-name="P2" svg:width="0.0433in" svg:height="0.1925in" svg:x="2.1035in" svg:y="7.5516in">
        <draw:text-box>
          <text:p><text:span text:style-name="T2"><text:s/></text:span></text:p>
        </draw:text-box>
      </draw:frame>
      <draw:frame text:anchor-type="page" text:anchor-page-number="3" draw:z-index="2595" draw:name="Shape828" draw:style-name="gr1" draw:text-style-name="P2" svg:width="1.7276in" svg:height="0.1295in" svg:x="0.4535in" svg:y="3.1437in">
        <draw:text-box>
          <text:p><text:span text:style-name="T1">Reg. REACH <text:s text:c="2"/>01-2119489379-17-</text:span></text:p>
        </draw:text-box>
      </draw:frame>
      <draw:frame text:anchor-type="page" text:anchor-page-number="11" draw:z-index="2594" draw:name="Shape3922" draw:style-name="gr1" draw:text-style-name="P2" svg:width="0.0433in" svg:height="0.1925in" svg:x="0.3634in" svg:y="4.1681in">
        <draw:text-box>
          <text:p><text:span text:style-name="T2"><text:s/></text:span></text:p>
        </draw:text-box>
      </draw:frame>
      <draw:polygon text:anchor-type="page" text:anchor-page-number="9" draw:z-index="2593" draw:name="Shape3422" draw:style-name="gr2" draw:text-style-name="P3" svg:width="3.1504in" svg:height="0.1283in" svg:x="0.363in" svg:y="6.2083in" svg:viewBox="0 0 8003 327" draw:points="0,0 8003,0 8003,327 0,327">
        <text:p/>
      </draw:polygon>
      <draw:polygon text:anchor-type="page" text:anchor-page-number="6" draw:z-index="2592" draw:name="Shape1893" draw:style-name="gr3" draw:text-style-name="P4" svg:width="0.0102in" svg:height="0.0102in" svg:x="6.663in" svg:y="2.1614in" svg:viewBox="0 0 27 27" draw:points="0,0 27,0 27,27 0,27">
        <text:p/>
      </draw:polygon>
      <draw:polygon text:anchor-type="page" text:anchor-page-number="1" draw:z-index="2591" draw:name="Shape184" draw:style-name="gr2" draw:text-style-name="P3" svg:width="1.5752in" svg:height="0.6382in" svg:x="6.2681in" svg:y="4.3398in" svg:viewBox="0 0 4002 1622" draw:points="0,0 4002,0 4002,1622 0,1622">
        <text:p/>
      </draw:polygon>
      <draw:frame text:anchor-type="page" text:anchor-page-number="9" draw:z-index="2590" draw:name="Shape3425" draw:style-name="gr1" draw:text-style-name="P2" svg:width="0.7287in" svg:height="0.1295in" svg:x="3.561in" svg:y="6.0819in">
        <draw:text-box>
          <text:p><text:span text:style-name="T1">457 mg/kg Rat</text:span></text:p>
        </draw:text-box>
      </draw:frame>
      <draw:polygon text:anchor-type="page" text:anchor-page-number="3" draw:z-index="2589" draw:name="Shape833" draw:style-name="gr2" draw:text-style-name="P3" svg:width="1.8717in" svg:height="0.1283in" svg:x="0.4114in" svg:y="3.2697in" svg:viewBox="0 0 4755 327" draw:points="0,0 4755,0 4755,327 0,327">
        <text:p/>
      </draw:polygon>
      <draw:frame text:anchor-type="page" text:anchor-page-number="7" draw:z-index="2588" draw:name="Shape2879" draw:style-name="gr1" draw:text-style-name="P2" svg:width="0.0433in" svg:height="0.1925in" svg:x="2.1898in" svg:y="6.7862in">
        <draw:text-box>
          <text:p><text:span text:style-name="T2"><text:s/></text:span></text:p>
        </draw:text-box>
      </draw:frame>
      <draw:frame text:anchor-type="page" text:anchor-page-number="2" draw:z-index="2587" draw:name="Shape497" draw:style-name="gr1" draw:text-style-name="P2" svg:width="0.0433in" svg:height="0.1925in" svg:x="1.861in" svg:y="5.3311in">
        <draw:text-box>
          <text:p><text:span text:style-name="T2"><text:s/></text:span></text:p>
        </draw:text-box>
      </draw:frame>
      <draw:polygon text:anchor-type="page" text:anchor-page-number="10" draw:z-index="2586" draw:name="Shape3654" draw:style-name="gr2" draw:text-style-name="P3" svg:width="0.6898in" svg:height="0.1917in" svg:x="2.7732in" svg:y="7.598in" svg:viewBox="0 0 1753 488" draw:points="0,0 1753,0 1753,488 0,488">
        <text:p/>
      </draw:polygon>
      <draw:polygon text:anchor-type="page" text:anchor-page-number="5" draw:z-index="2585" draw:name="Shape1277" draw:style-name="gr2" draw:text-style-name="P3" svg:width="4.6283in" svg:height="0.1134in" svg:x="2.7732in" svg:y="6.6547in" svg:viewBox="0 0 11757 289" draw:points="0,0 11757,0 11757,289 0,289">
        <text:p/>
      </draw:polygon>
      <draw:polygon text:anchor-type="page" text:anchor-page-number="14" draw:z-index="2584" draw:name="Shape4479" draw:style-name="gr2" draw:text-style-name="P3" svg:width="1.3768in" svg:height="0.1917in" svg:x="0.363in" svg:y="4.0197in" svg:viewBox="0 0 3498 488" draw:points="0,0 3498,0 3498,488 0,488">
        <text:p/>
      </draw:polygon>
      <draw:frame text:anchor-type="page" text:anchor-page-number="11" draw:z-index="2583" draw:name="Shape3912" draw:style-name="gr1" draw:text-style-name="P2" svg:width="0.0433in" svg:height="0.1925in" svg:x="3.811in" svg:y="3.9264in">
        <draw:text-box>
          <text:p><text:span text:style-name="T2"><text:s/></text:span></text:p>
        </draw:text-box>
      </draw:frame>
      <draw:frame text:anchor-type="page" text:anchor-page-number="13" draw:z-index="2582" draw:name="Shape4276" draw:style-name="gr1" draw:text-style-name="P2" svg:width="0.474in" svg:height="0.1295in" svg:x="0.3634in" svg:y="6.7201in">
        <draw:text-box>
          <text:p><text:span text:style-name="T1">Nessuna </text:span></text:p>
        </draw:text-box>
      </draw:frame>
      <draw:frame text:anchor-type="page" text:anchor-page-number="14" draw:z-index="2581" draw:name="Shape4463" draw:style-name="gr1" draw:text-style-name="P2" svg:width="0.0433in" svg:height="0.1925in" svg:x="3.3134in" svg:y="3.7835in">
        <draw:text-box>
          <text:p><text:span text:style-name="T2"><text:s/></text:span></text:p>
        </draw:text-box>
      </draw:frame>
      <draw:frame text:anchor-type="page" text:anchor-page-number="2" draw:z-index="2580" draw:name="Shape503" draw:style-name="gr1" draw:text-style-name="P2" svg:width="0.076in" svg:height="0.1295in" svg:x="1.7882in" svg:y="5.3783in">
        <draw:text-box>
          <text:p><text:span text:style-name="T1">--</text:span></text:p>
        </draw:text-box>
      </draw:frame>
      <draw:frame text:anchor-type="page" text:anchor-page-number="9" draw:z-index="2579" draw:name="Shape3411" draw:style-name="gr1" draw:text-style-name="P2" svg:width="0.0433in" svg:height="0.1925in" svg:x="1.1264in" svg:y="6.0346in">
        <draw:text-box>
          <text:p><text:span text:style-name="T2"><text:s/></text:span></text:p>
        </draw:text-box>
      </draw:frame>
      <draw:frame text:anchor-type="page" text:anchor-page-number="1" draw:z-index="2578" draw:name="Shape180" draw:style-name="gr1" draw:text-style-name="P2" svg:width="0.4862in" svg:height="0.1295in" svg:x="4.7417in" svg:y="4.852in">
        <draw:text-box>
          <text:p><text:span text:style-name="T1">LCS: PW.</text:span></text:p>
        </draw:text-box>
      </draw:frame>
      <draw:polygon text:anchor-type="page" text:anchor-page-number="6" draw:z-index="2577" draw:name="Shape1888" draw:style-name="gr3" draw:text-style-name="P4" svg:width="0.7783in" svg:height="0.0102in" svg:x="5.8846in" svg:y="2.1614in" svg:viewBox="0 0 1978 27" draw:points="0,0 1978,0 1978,27 0,27">
        <text:p/>
      </draw:polygon>
      <draw:frame text:anchor-type="page" text:anchor-page-number="3" draw:z-index="2576" draw:name="Shape823" draw:style-name="gr1" draw:text-style-name="P2" svg:width="0.0433in" svg:height="0.1925in" svg:x="0.411in" svg:y="3.0965in">
        <draw:text-box>
          <text:p><text:span text:style-name="T2"><text:s/></text:span></text:p>
        </draw:text-box>
      </draw:frame>
      <draw:polygon text:anchor-type="page" text:anchor-page-number="10" draw:z-index="2575" draw:name="Shape3653" draw:style-name="gr2" draw:text-style-name="P3" svg:width="0.7882in" svg:height="0.1917in" svg:x="2.7248in" svg:y="7.598in" svg:viewBox="0 0 2003 488" draw:points="0,0 2003,0 2003,488 0,488">
        <text:p/>
      </draw:polygon>
      <draw:frame text:anchor-type="page" text:anchor-page-number="5" draw:z-index="2574" draw:name="Shape1261" draw:style-name="gr1" draw:text-style-name="P2" svg:width="0.0433in" svg:height="0.1925in" svg:x="1.6465in" svg:y="6.4846in">
        <draw:text-box>
          <text:p><text:span text:style-name="T2"><text:s/></text:span></text:p>
        </draw:text-box>
      </draw:frame>
      <draw:frame text:anchor-type="page" text:anchor-page-number="13" draw:z-index="2573" draw:name="Shape4275" draw:style-name="gr1" draw:text-style-name="P2" svg:width="0.0433in" svg:height="0.1925in" svg:x="0.3634in" svg:y="6.5311in">
        <draw:text-box>
          <text:p><text:span text:style-name="T2"><text:s/></text:span></text:p>
        </draw:text-box>
      </draw:frame>
      <draw:frame text:anchor-type="page" text:anchor-page-number="11" draw:z-index="2572" draw:name="Shape3919" draw:style-name="gr1" draw:text-style-name="P2" svg:width="0.2539in" svg:height="0.1295in" svg:x="3.561in" svg:y="3.9736in">
        <draw:text-box>
          <text:p><text:span text:style-name="T1">&lt; 54 </text:span></text:p>
        </draw:text-box>
      </draw:frame>
      <draw:polygon text:anchor-type="page" text:anchor-page-number="7" draw:z-index="2571" draw:name="Shape2889" draw:style-name="gr2" draw:text-style-name="P3" svg:width="1.4783in" svg:height="0.1283in" svg:x="2.7732in" svg:y="6.8315in" svg:viewBox="0 0 3756 327" draw:points="0,0 3756,0 3756,327 0,327">
        <text:p/>
      </draw:polygon>
      <draw:polygon text:anchor-type="page" text:anchor-page-number="9" draw:z-index="2570" draw:name="Shape3424" draw:style-name="gr2" draw:text-style-name="P3" svg:width="3.8402in" svg:height="0.1283in" svg:x="3.5614in" svg:y="6.0799in" svg:viewBox="0 0 9755 327" draw:points="0,0 9755,0 9755,327 0,327">
        <text:p/>
      </draw:polygon>
      <draw:frame text:anchor-type="page" text:anchor-page-number="11" draw:z-index="2569" draw:name="Shape3920" draw:style-name="gr1" draw:text-style-name="P2" svg:width="0.0433in" svg:height="0.1925in" svg:x="2.7728in" svg:y="3.9764in">
        <draw:text-box>
          <text:p><text:span text:style-name="T2"><text:s/></text:span></text:p>
        </draw:text-box>
      </draw:frame>
      <draw:frame text:anchor-type="page" text:anchor-page-number="2" draw:z-index="2568" draw:name="Shape496" draw:style-name="gr1" draw:text-style-name="P2" svg:width="0.0433in" svg:height="0.1925in" svg:x="1.4917in" svg:y="5.3311in">
        <draw:text-box>
          <text:p><text:span text:style-name="T2"><text:s/></text:span></text:p>
        </draw:text-box>
      </draw:frame>
      <draw:frame text:anchor-type="page" text:anchor-page-number="1" draw:z-index="2567" draw:name="Shape169" draw:style-name="gr1" draw:text-style-name="P2" svg:width="0.4059in" svg:height="0.1295in" svg:x="4.7417in" svg:y="4.7256in">
        <draw:text-box>
          <text:p><text:span text:style-name="T1">PC: 9a. </text:span></text:p>
        </draw:text-box>
      </draw:frame>
      <draw:polygon text:anchor-type="page" text:anchor-page-number="6" draw:z-index="2566" draw:name="Shape1887" draw:style-name="gr3" draw:text-style-name="P4" svg:width="0.0098in" svg:height="0.0102in" svg:x="5.8748in" svg:y="2.1614in" svg:viewBox="0 0 26 27" draw:points="0,0 26,0 26,27 0,27">
        <text:p/>
      </draw:polygon>
      <draw:frame text:anchor-type="page" text:anchor-page-number="3" draw:z-index="2565" draw:name="Shape822" draw:style-name="gr1" draw:text-style-name="P2" svg:width="0.0433in" svg:height="0.1925in" svg:x="7.3016in" svg:y="2.9535in">
        <draw:text-box>
          <text:p><text:span text:style-name="T2"><text:s/></text:span></text:p>
        </draw:text-box>
      </draw:frame>
      <draw:frame text:anchor-type="page" text:anchor-page-number="10" draw:z-index="2564" draw:name="Shape3652" draw:style-name="gr1" draw:text-style-name="P2" svg:width="1.6488in" svg:height="0.1295in" svg:x="0.4535in" svg:y="7.5984in">
        <draw:text-box>
          <text:p><text:span text:style-name="T1">EC50 - Alghe / Piante Acquatiche</text:span></text:p>
        </draw:text-box>
      </draw:frame>
      <draw:polygon text:anchor-type="page" text:anchor-page-number="14" draw:z-index="2563" draw:name="Shape4482" draw:style-name="gr2" draw:text-style-name="P3" svg:width="0.4933in" svg:height="0.1917in" svg:x="6.1197in" svg:y="3.828in" svg:viewBox="0 0 1254 488" draw:points="0,0 1254,0 1254,488 0,488">
        <text:p/>
      </draw:polygon>
      <draw:polygon text:anchor-type="page" text:anchor-page-number="5" draw:z-index="2562" draw:name="Shape1271" draw:style-name="gr2" draw:text-style-name="P3" svg:width="4.6283in" svg:height="0.1114in" svg:x="2.7732in" svg:y="6.5433in" svg:viewBox="0 0 11757 284" draw:points="0,0 11757,0 11757,284 0,284">
        <text:p/>
      </draw:polygon>
      <draw:frame text:anchor-type="page" text:anchor-page-number="13" draw:z-index="2561" draw:name="Shape4273" draw:style-name="gr1" draw:text-style-name="P2" svg:width="4.2843in" svg:height="0.1295in" svg:x="0.3634in" svg:y="6.402in">
        <draw:text-box>
          <text:p><text:span text:style-name="T1">Sostanze soggette ad obbligo di notifica di esportazione Regolamento (UE) 649/2012: </text:span></text:p>
        </draw:text-box>
      </draw:frame>
      <draw:polygon text:anchor-type="page" text:anchor-page-number="7" draw:z-index="2560" draw:name="Shape2888" draw:style-name="gr2" draw:text-style-name="P3" svg:width="1.5752in" svg:height="0.1917in" svg:x="2.7248in" svg:y="6.8315in" svg:viewBox="0 0 4002 488" draw:points="0,0 4002,0 4002,488 0,488">
        <text:p/>
      </draw:polygon>
      <draw:polygon text:anchor-type="page" text:anchor-page-number="13" draw:z-index="2559" draw:name="Shape4274" draw:style-name="gr3" draw:text-style-name="P4" svg:width="4.2268in" svg:height="0.0083in" svg:x="0.363in" svg:y="6.515in" svg:viewBox="0 0 10737 22" draw:points="0,0 10737,0 10737,22 0,22">
        <text:p/>
      </draw:polygon>
      <draw:polygon text:anchor-type="page" text:anchor-page-number="6" draw:z-index="2558" draw:name="Shape1886" draw:style-name="gr3" draw:text-style-name="P4" svg:width="0.5799in" svg:height="0.0102in" svg:x="5.2949in" svg:y="2.1614in" svg:viewBox="0 0 1474 27" draw:points="0,0 1474,0 1474,27 0,27">
        <text:p/>
      </draw:polygon>
      <draw:polygon text:anchor-type="page" text:anchor-page-number="3" draw:z-index="2557" draw:name="Shape825" draw:style-name="gr2" draw:text-style-name="P3" svg:width="1.8717in" svg:height="0.1283in" svg:x="0.4114in" svg:y="3.1413in" svg:viewBox="0 0 4755 327" draw:points="0,0 4755,0 4755,327 0,327">
        <text:p/>
      </draw:polygon>
      <draw:polygon text:anchor-type="page" text:anchor-page-number="5" draw:z-index="2556" draw:name="Shape1270" draw:style-name="gr2" draw:text-style-name="P3" svg:width="4.7252in" svg:height="0.2248in" svg:x="2.7248in" svg:y="6.5433in" svg:viewBox="0 0 12003 572" draw:points="0,0 12003,0 12003,572 0,572">
        <text:p/>
      </draw:polygon>
      <draw:polygon text:anchor-type="page" text:anchor-page-number="1" draw:z-index="2555" draw:name="Shape176" draw:style-name="gr2" draw:text-style-name="P3" svg:width="1.4783in" svg:height="0.1264in" svg:x="4.7413in" svg:y="4.8516in" svg:viewBox="0 0 3756 322" draw:points="0,0 3756,0 3756,322 0,322">
        <text:p/>
      </draw:polygon>
      <draw:frame text:anchor-type="page" text:anchor-page-number="7" draw:z-index="2554" draw:name="Shape2887" draw:style-name="gr1" draw:text-style-name="P2" svg:width="1.748in" svg:height="0.1295in" svg:x="0.4535in" svg:y="6.8339in">
        <draw:text-box>
          <text:p><text:span text:style-name="T1">Punto di fusione o di congelamento</text:span></text:p>
        </draw:text-box>
      </draw:frame>
      <draw:polygon text:anchor-type="page" text:anchor-page-number="9" draw:z-index="2553" draw:name="Shape3423" draw:style-name="gr2" draw:text-style-name="P3" svg:width="3.937in" svg:height="0.1283in" svg:x="3.513in" svg:y="6.0799in" svg:viewBox="0 0 10001 327" draw:points="0,0 10001,0 10001,327 0,327">
        <text:p/>
      </draw:polygon>
      <draw:polygon text:anchor-type="page" text:anchor-page-number="11" draw:z-index="2552" draw:name="Shape3921" draw:style-name="gr2" draw:text-style-name="P3" svg:width="3.8402in" svg:height="0.1264in" svg:x="3.5614in" svg:y="3.9732in" svg:viewBox="0 0 9755 322" draw:points="0,0 9755,0 9755,322 0,322">
        <text:p/>
      </draw:polygon>
      <draw:polygon text:anchor-type="page" text:anchor-page-number="2" draw:z-index="2551" draw:name="Shape502" draw:style-name="gr2" draw:text-style-name="P3" svg:width="6.0067in" svg:height="0.1268in" svg:x="1.7882in" svg:y="5.378in" svg:viewBox="0 0 15258 323" draw:points="0,0 15258,0 15258,323 0,323">
        <text:p/>
      </draw:polygon>
      <draw:polygon text:anchor-type="page" text:anchor-page-number="14" draw:z-index="2550" draw:name="Shape4481" draw:style-name="gr2" draw:text-style-name="P3" svg:width="0.5898in" svg:height="0.1917in" svg:x="6.0717in" svg:y="3.828in" svg:viewBox="0 0 1499 488" draw:points="0,0 1499,0 1499,488 0,488">
        <text:p/>
      </draw:polygon>
      <draw:frame text:anchor-type="page" text:anchor-page-number="10" draw:z-index="2549" draw:name="Shape3645" draw:style-name="gr1" draw:text-style-name="P2" svg:width="0.0433in" svg:height="0.1925in" svg:x="0.411in" svg:y="7.5516in">
        <draw:text-box>
          <text:p><text:span text:style-name="T2"><text:s/></text:span></text:p>
        </draw:text-box>
      </draw:frame>
      <draw:polygon text:anchor-type="page" text:anchor-page-number="6" draw:z-index="2548" draw:name="Shape1885" draw:style-name="gr3" draw:text-style-name="P4" svg:width="0.0102in" svg:height="0.0102in" svg:x="5.2846in" svg:y="2.1614in" svg:viewBox="0 0 27 27" draw:points="0,0 27,0 27,27 0,27">
        <text:p/>
      </draw:polygon>
      <draw:frame text:anchor-type="page" text:anchor-page-number="1" draw:z-index="2547" draw:name="Shape165" draw:style-name="gr1" draw:text-style-name="P2" svg:width="1.1248in" svg:height="0.1295in" svg:x="4.7417in" svg:y="4.5972in">
        <draw:text-box>
          <text:p><text:span text:style-name="T1">PROC: 10, 11, 13, 8a. </text:span></text:p>
        </draw:text-box>
      </draw:frame>
      <draw:polygon text:anchor-type="page" text:anchor-page-number="2" draw:z-index="2546" draw:name="Shape501" draw:style-name="gr2" draw:text-style-name="P3" svg:width="6.1035in" svg:height="0.1268in" svg:x="1.7398in" svg:y="5.378in" svg:viewBox="0 0 15504 323" draw:points="0,0 15504,0 15504,323 0,323">
        <text:p/>
      </draw:polygon>
      <draw:polygon text:anchor-type="page" text:anchor-page-number="3" draw:z-index="2545" draw:name="Shape824" draw:style-name="gr2" draw:text-style-name="P3" svg:width="1.9685in" svg:height="0.2567in" svg:x="0.363in" svg:y="3.1413in" svg:viewBox="0 0 5001 653" draw:points="0,0 5001,0 5001,653 0,653">
        <text:p/>
      </draw:polygon>
      <draw:frame text:anchor-type="page" text:anchor-page-number="14" draw:z-index="2544" draw:name="Shape4475" draw:style-name="gr1" draw:text-style-name="P2" svg:width="1.537in" svg:height="0.1295in" svg:x="1.7882in" svg:y="3.8307in">
        <draw:text-box>
          <text:p><text:span text:style-name="T1">Irritazione cutanea, categoria 2</text:span></text:p>
        </draw:text-box>
      </draw:frame>
      <draw:frame text:anchor-type="page" text:anchor-page-number="5" draw:z-index="2543" draw:name="Shape1269" draw:style-name="gr1" draw:text-style-name="P2" svg:width="0.4469in" svg:height="0.113in" svg:x="1.198in" svg:y="6.5457in">
        <draw:text-box>
          <text:p><text:span text:style-name="T4">Nederland</text:span></text:p>
        </draw:text-box>
      </draw:frame>
      <draw:frame text:anchor-type="page" text:anchor-page-number="9" draw:z-index="2542" draw:name="Shape3418" draw:style-name="gr1" draw:text-style-name="P2" svg:width="0.6787in" svg:height="0.1295in" svg:x="0.4535in" svg:y="6.0819in">
        <draw:text-box>
          <text:p><text:span text:style-name="T1">LD50 (Orale):</text:span></text:p>
        </draw:text-box>
      </draw:frame>
      <draw:frame text:anchor-type="page" text:anchor-page-number="7" draw:z-index="2541" draw:name="Shape2884" draw:style-name="gr1" draw:text-style-name="P2" svg:width="0.0433in" svg:height="0.1925in" svg:x="0.411in" svg:y="6.7862in">
        <draw:text-box>
          <text:p><text:span text:style-name="T2"><text:s/></text:span></text:p>
        </draw:text-box>
      </draw:frame>
      <draw:frame text:anchor-type="page" text:anchor-page-number="10" draw:z-index="2540" draw:name="Shape3635" draw:style-name="gr1" draw:text-style-name="P2" svg:width="0.0433in" svg:height="0.1925in" svg:x="5.05in" svg:y="7.3598in">
        <draw:text-box>
          <text:p><text:span text:style-name="T2"><text:s/></text:span></text:p>
        </draw:text-box>
      </draw:frame>
      <draw:frame text:anchor-type="page" text:anchor-page-number="13" draw:z-index="2539" draw:name="Shape4272" draw:style-name="gr1" draw:text-style-name="P2" svg:width="0.0433in" svg:height="0.1925in" svg:x="0.3634in" svg:y="6.211in">
        <draw:text-box>
          <text:p><text:span text:style-name="T2"><text:s/></text:span></text:p>
        </draw:text-box>
      </draw:frame>
      <draw:polygon text:anchor-type="page" text:anchor-page-number="11" draw:z-index="2538" draw:name="Shape3918" draw:style-name="gr2" draw:text-style-name="P3" svg:width="3.937in" svg:height="0.1917in" svg:x="3.513in" svg:y="3.9732in" svg:viewBox="0 0 10001 488" draw:points="0,0 10001,0 10001,488 0,488">
        <text:p/>
      </draw:polygon>
      <draw:frame text:anchor-type="page" text:anchor-page-number="5" draw:z-index="2537" draw:name="Shape1260" draw:style-name="gr1" draw:text-style-name="P2" svg:width="0.0433in" svg:height="0.1925in" svg:x="0.648in" svg:y="6.4846in">
        <draw:text-box>
          <text:p><text:span text:style-name="T2"><text:s/></text:span></text:p>
        </draw:text-box>
      </draw:frame>
      <draw:frame text:anchor-type="page" text:anchor-page-number="11" draw:z-index="2536" draw:name="Shape3902" draw:style-name="gr1" draw:text-style-name="P2" svg:width="0.0433in" svg:height="0.1925in" svg:x="0.6752in" svg:y="3.9264in">
        <draw:text-box>
          <text:p><text:span text:style-name="T2"><text:s/></text:span></text:p>
        </draw:text-box>
      </draw:frame>
      <draw:frame text:anchor-type="page" text:anchor-page-number="7" draw:z-index="2535" draw:name="Shape2883" draw:style-name="gr1" draw:text-style-name="P2" svg:width="0.0433in" svg:height="0.1925in" svg:x="4.348in" svg:y="6.6429in">
        <draw:text-box>
          <text:p><text:span text:style-name="T2"><text:s/></text:span></text:p>
        </draw:text-box>
      </draw:frame>
      <draw:frame text:anchor-type="page" text:anchor-page-number="13" draw:z-index="2534" draw:name="Shape4271" draw:style-name="gr1" draw:text-style-name="P2" svg:width="0.474in" svg:height="0.1295in" svg:x="0.3634in" svg:y="6.0819in">
        <draw:text-box>
          <text:p><text:span text:style-name="T1">Nessuna </text:span></text:p>
        </draw:text-box>
      </draw:frame>
      <draw:polygon text:anchor-type="page" text:anchor-page-number="6" draw:z-index="2533" draw:name="Shape1884" draw:style-name="gr3" draw:text-style-name="P4" svg:width="1.1717in" svg:height="0.0102in" svg:x="4.113in" svg:y="2.1614in" svg:viewBox="0 0 2977 27" draw:points="0,0 2977,0 2977,27 0,27">
        <text:p/>
      </draw:polygon>
      <draw:polygon text:anchor-type="page" text:anchor-page-number="10" draw:z-index="2532" draw:name="Shape3649" draw:style-name="gr2" draw:text-style-name="P3" svg:width="2.265in" svg:height="0.1268in" svg:x="0.4114in" svg:y="7.598in" svg:viewBox="0 0 5754 323" draw:points="0,0 5754,0 5754,323 0,323">
        <text:p/>
      </draw:polygon>
      <draw:frame text:anchor-type="page" text:anchor-page-number="2" draw:z-index="2531" draw:name="Shape500" draw:style-name="gr1" draw:text-style-name="P2" svg:width="1.0461in" svg:height="0.1295in" svg:x="0.4535in" svg:y="5.3783in">
        <draw:text-box>
          <text:p><text:span text:style-name="T1">Consigli di prudenza:</text:span></text:p>
        </draw:text-box>
      </draw:frame>
      <draw:frame text:anchor-type="page" text:anchor-page-number="14" draw:z-index="2530" draw:name="Shape4462" draw:style-name="gr1" draw:text-style-name="P2" svg:width="0.0433in" svg:height="0.1925in" svg:x="0.9563in" svg:y="3.7681in">
        <draw:text-box>
          <text:p><text:span text:style-name="T2"><text:s/></text:span></text:p>
        </draw:text-box>
      </draw:frame>
      <draw:frame text:anchor-type="page" text:anchor-page-number="3" draw:z-index="2529" draw:name="Shape821" draw:style-name="gr1" draw:text-style-name="P2" svg:width="0.0433in" svg:height="0.1925in" svg:x="3.3634in" svg:y="2.9535in">
        <draw:text-box>
          <text:p><text:span text:style-name="T2"><text:s/></text:span></text:p>
        </draw:text-box>
      </draw:frame>
      <draw:frame text:anchor-type="page" text:anchor-page-number="9" draw:z-index="2528" draw:name="Shape3410" draw:style-name="gr1" draw:text-style-name="P2" svg:width="0.0433in" svg:height="0.1925in" svg:x="0.411in" svg:y="6.0346in">
        <draw:text-box>
          <text:p><text:span text:style-name="T2"><text:s/></text:span></text:p>
        </draw:text-box>
      </draw:frame>
      <draw:polygon text:anchor-type="page" text:anchor-page-number="1" draw:z-index="2527" draw:name="Shape172" draw:style-name="gr2" draw:text-style-name="P3" svg:width="1.5181in" svg:height="0.1283in" svg:x="4.7217in" svg:y="4.7232in" svg:viewBox="0 0 3857 327" draw:points="0,0 3857,0 3857,327 0,327">
        <text:p/>
      </draw:polygon>
      <draw:polygon text:anchor-type="page" text:anchor-page-number="11" draw:z-index="2526" draw:name="Shape3917" draw:style-name="gr2" draw:text-style-name="P3" svg:width="0.6898in" svg:height="0.1917in" svg:x="2.7732in" svg:y="3.9732in" svg:viewBox="0 0 1753 488" draw:points="0,0 1753,0 1753,488 0,488">
        <text:p/>
      </draw:polygon>
      <draw:frame text:anchor-type="page" text:anchor-page-number="13" draw:z-index="2525" draw:name="Shape4270" draw:style-name="gr1" draw:text-style-name="P2" svg:width="0.0433in" svg:height="0.1925in" svg:x="0.3634in" svg:y="5.8917in">
        <draw:text-box>
          <text:p><text:span text:style-name="T2"><text:s/></text:span></text:p>
        </draw:text-box>
      </draw:frame>
      <draw:polygon text:anchor-type="page" text:anchor-page-number="7" draw:z-index="2524" draw:name="Shape2886" draw:style-name="gr2" draw:text-style-name="P3" svg:width="2.265in" svg:height="0.1283in" svg:x="0.4114in" svg:y="6.8315in" svg:viewBox="0 0 5754 327" draw:points="0,0 5754,0 5754,327 0,327">
        <text:p/>
      </draw:polygon>
      <draw:polygon text:anchor-type="page" text:anchor-page-number="14" draw:z-index="2523" draw:name="Shape4474" draw:style-name="gr2" draw:text-style-name="P3" svg:width="4.235in" svg:height="0.128in" svg:x="1.7882in" svg:y="3.8283in" svg:viewBox="0 0 10758 326" draw:points="0,0 10758,0 10758,326 0,326">
        <text:p/>
      </draw:polygon>
      <draw:frame text:anchor-type="page" text:anchor-page-number="9" draw:z-index="2522" draw:name="Shape3406" draw:style-name="gr1" draw:text-style-name="P2" svg:width="0.0433in" svg:height="0.1925in" svg:x="4.5252in" svg:y="5.9063in">
        <draw:text-box>
          <text:p><text:span text:style-name="T2"><text:s/></text:span></text:p>
        </draw:text-box>
      </draw:frame>
      <draw:polygon text:anchor-type="page" text:anchor-page-number="3" draw:z-index="2521" draw:name="Shape827" draw:style-name="gr2" draw:text-style-name="P3" svg:width="0.2965in" svg:height="0.1917in" svg:x="7.3016in" svg:y="2.95in" svg:viewBox="0 0 754 488" draw:points="0,0 754,0 754,488 0,488">
        <text:p/>
      </draw:polygon>
      <draw:frame text:anchor-type="page" text:anchor-page-number="2" draw:z-index="2520" draw:name="Shape495" draw:style-name="gr1" draw:text-style-name="P2" svg:width="0.0433in" svg:height="0.1925in" svg:x="0.411in" svg:y="5.3311in">
        <draw:text-box>
          <text:p><text:span text:style-name="T2"><text:s/></text:span></text:p>
        </draw:text-box>
      </draw:frame>
      <draw:frame text:anchor-type="page" text:anchor-page-number="1" draw:z-index="2519" draw:name="Shape159" draw:style-name="gr1" draw:text-style-name="P2" svg:width="0.6724in" svg:height="0.1295in" svg:x="4.7417in" svg:y="4.4689in">
        <draw:text-box>
          <text:p><text:span text:style-name="T1">ERC: 8a, 8d. </text:span></text:p>
        </draw:text-box>
      </draw:frame>
      <draw:polygon text:anchor-type="page" text:anchor-page-number="6" draw:z-index="2518" draw:name="Shape1883" draw:style-name="gr3" draw:text-style-name="P4" svg:width="0.0098in" svg:height="0.0102in" svg:x="4.1031in" svg:y="2.1614in" svg:viewBox="0 0 26 27" draw:points="0,0 26,0 26,27 0,27">
        <text:p/>
      </draw:polygon>
      <draw:polygon text:anchor-type="page" text:anchor-page-number="5" draw:z-index="2517" draw:name="Shape1268" draw:style-name="gr2" draw:text-style-name="P3" svg:width="1.4783in" svg:height="0.1114in" svg:x="1.198in" svg:y="6.5433in" svg:viewBox="0 0 3756 284" draw:points="0,0 3756,0 3756,284 0,284">
        <text:p/>
      </draw:polygon>
      <draw:polygon text:anchor-type="page" text:anchor-page-number="10" draw:z-index="2516" draw:name="Shape3648" draw:style-name="gr2" draw:text-style-name="P3" svg:width="2.3618in" svg:height="0.1917in" svg:x="0.363in" svg:y="7.598in" svg:viewBox="0 0 6000 488" draw:points="0,0 6000,0 6000,488 0,488">
        <text:p/>
      </draw:polygon>
      <draw:polygon text:anchor-type="page" text:anchor-page-number="3" draw:z-index="2515" draw:name="Shape826" draw:style-name="gr2" draw:text-style-name="P3" svg:width="0.3933in" svg:height="0.1917in" svg:x="7.2531in" svg:y="2.95in" svg:viewBox="0 0 1000 488" draw:points="0,0 1000,0 1000,488 0,488">
        <text:p/>
      </draw:polygon>
      <draw:frame text:anchor-type="page" text:anchor-page-number="2" draw:z-index="2514" draw:name="Shape494" draw:style-name="gr1" draw:text-style-name="P2" svg:width="0.0433in" svg:height="0.1925in" svg:x="0.3634in" svg:y="5.1898in">
        <draw:text-box>
          <text:p><text:span text:style-name="T2"><text:s/></text:span></text:p>
        </draw:text-box>
      </draw:frame>
      <draw:polygon text:anchor-type="page" text:anchor-page-number="11" draw:z-index="2513" draw:name="Shape3916" draw:style-name="gr2" draw:text-style-name="P3" svg:width="0.7882in" svg:height="0.1917in" svg:x="2.7248in" svg:y="3.9732in" svg:viewBox="0 0 2003 488" draw:points="0,0 2003,0 2003,488 0,488">
        <text:p/>
      </draw:polygon>
      <draw:frame text:anchor-type="page" text:anchor-page-number="10" draw:z-index="2512" draw:name="Shape3643" draw:style-name="gr1" draw:text-style-name="P2" svg:width="1.4996in" svg:height="0.1295in" svg:x="3.561in" svg:y="7.4071in">
        <draw:text-box>
          <text:p><text:span text:style-name="T1">0.16 mg/l/48h Daphnia magna</text:span></text:p>
        </draw:text-box>
      </draw:frame>
      <draw:polygon text:anchor-type="page" text:anchor-page-number="9" draw:z-index="2511" draw:name="Shape3414" draw:style-name="gr2" draw:text-style-name="P3" svg:width="3.0516in" svg:height="0.1283in" svg:x="0.4114in" svg:y="6.0799in" svg:viewBox="0 0 7752 327" draw:points="0,0 7752,0 7752,327 0,327">
        <text:p/>
      </draw:polygon>
      <draw:polygon text:anchor-type="page" text:anchor-page-number="6" draw:z-index="2510" draw:name="Shape1882" draw:style-name="gr3" draw:text-style-name="P4" svg:width="0.5799in" svg:height="0.0102in" svg:x="3.5232in" svg:y="2.1614in" svg:viewBox="0 0 1474 27" draw:points="0,0 1474,0 1474,27 0,27">
        <text:p/>
      </draw:polygon>
      <draw:polygon text:anchor-type="page" text:anchor-page-number="5" draw:z-index="2509" draw:name="Shape1267" draw:style-name="gr2" draw:text-style-name="P3" svg:width="1.5752in" svg:height="0.2248in" svg:x="1.15in" svg:y="6.5433in" svg:viewBox="0 0 4002 572" draw:points="0,0 4002,0 4002,572 0,572">
        <text:p/>
      </draw:polygon>
      <draw:polygon text:anchor-type="page" text:anchor-page-number="1" draw:z-index="2508" draw:name="Shape163" draw:style-name="gr2" draw:text-style-name="P3" svg:width="1.5181in" svg:height="0.1283in" svg:x="4.7217in" svg:y="4.5949in" svg:viewBox="0 0 3857 327" draw:points="0,0 3857,0 3857,327 0,327">
        <text:p/>
      </draw:polygon>
      <draw:frame text:anchor-type="page" text:anchor-page-number="13" draw:z-index="2507" draw:name="Shape4268" draw:style-name="gr1" draw:text-style-name="P2" svg:width="3.0094in" svg:height="0.1295in" svg:x="0.3634in" svg:y="5.7626in">
        <draw:text-box>
          <text:p><text:span text:style-name="T1">Sostanze soggette ad autorizzazione (Allegato XIV REACH) </text:span></text:p>
        </draw:text-box>
      </draw:frame>
      <draw:polygon text:anchor-type="page" text:anchor-page-number="14" draw:z-index="2506" draw:name="Shape4473" draw:style-name="gr2" draw:text-style-name="P3" svg:width="4.3319in" svg:height="0.1917in" svg:x="1.7398in" svg:y="3.828in" svg:viewBox="0 0 11004 488" draw:points="0,0 11004,0 11004,488 0,488">
        <text:p/>
      </draw:polygon>
      <draw:polygon text:anchor-type="page" text:anchor-page-number="7" draw:z-index="2505" draw:name="Shape2885" draw:style-name="gr2" draw:text-style-name="P3" svg:width="2.3618in" svg:height="0.1917in" svg:x="0.363in" svg:y="6.8315in" svg:viewBox="0 0 6000 488" draw:points="0,0 6000,0 6000,488 0,488">
        <text:p/>
      </draw:polygon>
      <draw:frame text:anchor-type="page" text:anchor-page-number="1" draw:z-index="2504" draw:name="Shape152" draw:style-name="gr1" draw:text-style-name="P2" svg:width="0.4059in" svg:height="0.1295in" svg:x="4.7417in" svg:y="4.3425in">
        <draw:text-box>
          <text:p><text:span text:style-name="T1">SU: 19. </text:span></text:p>
        </draw:text-box>
      </draw:frame>
      <draw:polygon text:anchor-type="page" text:anchor-page-number="13" draw:z-index="2503" draw:name="Shape4269" draw:style-name="gr3" draw:text-style-name="P4" svg:width="2.9583in" svg:height="0.0083in" svg:x="0.363in" svg:y="5.8748in" svg:viewBox="0 0 7515 22" draw:points="0,0 7515,0 7515,22 0,22">
        <text:p/>
      </draw:polygon>
      <draw:frame text:anchor-type="page" text:anchor-page-number="11" draw:z-index="2502" draw:name="Shape3915" draw:style-name="gr1" draw:text-style-name="P2" svg:width="0.2252in" svg:height="0.1295in" svg:x="0.4535in" svg:y="3.9736in">
        <draw:text-box>
          <text:p><text:span text:style-name="T1">BCF</text:span></text:p>
        </draw:text-box>
      </draw:frame>
      <draw:frame text:anchor-type="page" text:anchor-page-number="10" draw:z-index="2501" draw:name="Shape3644" draw:style-name="gr1" draw:text-style-name="P2" svg:width="0.0433in" svg:height="0.1925in" svg:x="2.7728in" svg:y="7.4098in">
        <draw:text-box>
          <text:p><text:span text:style-name="T2"><text:s/></text:span></text:p>
        </draw:text-box>
      </draw:frame>
      <draw:frame text:anchor-type="page" text:anchor-page-number="14" draw:z-index="2500" draw:name="Shape4471" draw:style-name="gr1" draw:text-style-name="P2" svg:width="0.5004in" svg:height="0.113in" svg:x="0.4535in" svg:y="3.8291in">
        <draw:text-box>
          <text:p><text:span text:style-name="T5">Skin Irrit. 2</text:span></text:p>
        </draw:text-box>
      </draw:frame>
      <draw:polygon text:anchor-type="page" text:anchor-page-number="9" draw:z-index="2499" draw:name="Shape3417" draw:style-name="gr2" draw:text-style-name="P3" svg:width="3.1504in" svg:height="0.1283in" svg:x="0.363in" svg:y="6.0799in" svg:viewBox="0 0 8003 327" draw:points="0,0 8003,0 8003,327 0,327">
        <text:p/>
      </draw:polygon>
      <draw:frame text:anchor-type="page" text:anchor-page-number="5" draw:z-index="2498" draw:name="Shape1266" draw:style-name="gr1" draw:text-style-name="P2" svg:width="0.1949in" svg:height="0.113in" svg:x="0.4535in" svg:y="6.5457in">
        <draw:text-box>
          <text:p><text:span text:style-name="T4">NLD</text:span></text:p>
        </draw:text-box>
      </draw:frame>
      <draw:frame text:anchor-type="page" text:anchor-page-number="3" draw:z-index="2497" draw:name="Shape818" draw:style-name="gr1" draw:text-style-name="P2" svg:width="0.0433in" svg:height="0.1925in" svg:x="2.3799in" svg:y="2.9535in">
        <draw:text-box>
          <text:p><text:span text:style-name="T2"><text:s/></text:span></text:p>
        </draw:text-box>
      </draw:frame>
      <draw:polygon text:anchor-type="page" text:anchor-page-number="6" draw:z-index="2496" draw:name="Shape1881" draw:style-name="gr3" draw:text-style-name="P4" svg:width="0.0102in" svg:height="0.0102in" svg:x="3.513in" svg:y="2.1614in" svg:viewBox="0 0 27 27" draw:points="0,0 27,0 27,27 0,27">
        <text:p/>
      </draw:polygon>
      <draw:frame text:anchor-type="page" text:anchor-page-number="7" draw:z-index="2495" draw:name="Shape2867" draw:style-name="gr1" draw:text-style-name="P2" svg:width="0.0433in" svg:height="0.1925in" svg:x="3.0016in" svg:y="6.5945in">
        <draw:text-box>
          <text:p><text:span text:style-name="T2"><text:s/></text:span></text:p>
        </draw:text-box>
      </draw:frame>
      <draw:polygon text:anchor-type="page" text:anchor-page-number="2" draw:z-index="2494" draw:name="Shape499" draw:style-name="gr2" draw:text-style-name="P3" svg:width="1.2799in" svg:height="0.1268in" svg:x="0.4114in" svg:y="5.378in" svg:viewBox="0 0 3252 323" draw:points="0,0 3252,0 3252,323 0,323">
        <text:p/>
      </draw:polygon>
      <draw:frame text:anchor-type="page" text:anchor-page-number="5" draw:z-index="2493" draw:name="Shape1259" draw:style-name="gr1" draw:text-style-name="P2" svg:width="0.0433in" svg:height="0.1925in" svg:x="0.411in" svg:y="6.4846in">
        <draw:text-box>
          <text:p><text:span text:style-name="T2"><text:s/></text:span></text:p>
        </draw:text-box>
      </draw:frame>
      <draw:polygon text:anchor-type="page" text:anchor-page-number="1" draw:z-index="2492" draw:name="Shape156" draw:style-name="gr2" draw:text-style-name="P3" svg:width="1.5181in" svg:height="0.1268in" svg:x="4.7217in" svg:y="4.4681in" svg:viewBox="0 0 3857 323" draw:points="0,0 3857,0 3857,323 0,323">
        <text:p/>
      </draw:polygon>
      <draw:frame text:anchor-type="page" text:anchor-page-number="14" draw:z-index="2491" draw:name="Shape4461" draw:style-name="gr1" draw:text-style-name="P2" svg:width="0.0433in" svg:height="0.1925in" svg:x="0.411in" svg:y="3.7681in">
        <draw:text-box>
          <text:p><text:span text:style-name="T2"><text:s/></text:span></text:p>
        </draw:text-box>
      </draw:frame>
      <draw:polygon text:anchor-type="page" text:anchor-page-number="6" draw:z-index="2490" draw:name="Shape1880" draw:style-name="gr3" draw:text-style-name="P4" svg:width="1.1717in" svg:height="0.0102in" svg:x="2.3413in" svg:y="2.1614in" svg:viewBox="0 0 2977 27" draw:points="0,0 2977,0 2977,27 0,27">
        <text:p/>
      </draw:polygon>
      <draw:frame text:anchor-type="page" text:anchor-page-number="13" draw:z-index="2489" draw:name="Shape4267" draw:style-name="gr1" draw:text-style-name="P2" svg:width="0.0433in" svg:height="0.1925in" svg:x="0.3634in" svg:y="5.5728in">
        <draw:text-box>
          <text:p><text:span text:style-name="T2"><text:s/></text:span></text:p>
        </draw:text-box>
      </draw:frame>
      <draw:frame text:anchor-type="page" text:anchor-page-number="11" draw:z-index="2488" draw:name="Shape3901" draw:style-name="gr1" draw:text-style-name="P2" svg:width="0.0433in" svg:height="0.1925in" svg:x="0.411in" svg:y="3.9264in">
        <draw:text-box>
          <text:p><text:span text:style-name="T2"><text:s/></text:span></text:p>
        </draw:text-box>
      </draw:frame>
      <draw:polygon text:anchor-type="page" text:anchor-page-number="7" draw:z-index="2487" draw:name="Shape2882" draw:style-name="gr2" draw:text-style-name="P3" svg:width="2.265in" svg:height="0.1917in" svg:x="4.348in" svg:y="6.6398in" svg:viewBox="0 0 5754 488" draw:points="0,0 5754,0 5754,488 0,488">
        <text:p/>
      </draw:polygon>
      <draw:polygon text:anchor-type="page" text:anchor-page-number="10" draw:z-index="2486" draw:name="Shape3651" draw:style-name="gr2" draw:text-style-name="P3" svg:width="3.8402in" svg:height="0.1268in" svg:x="3.5614in" svg:y="7.4063in" svg:viewBox="0 0 9755 323" draw:points="0,0 9755,0 9755,323 0,323">
        <text:p/>
      </draw:polygon>
      <draw:frame text:anchor-type="page" text:anchor-page-number="9" draw:z-index="2485" draw:name="Shape3416" draw:style-name="gr1" draw:text-style-name="P2" svg:width="0.9713in" svg:height="0.1295in" svg:x="3.561in" svg:y="5.9543in">
        <draw:text-box>
          <text:p><text:span text:style-name="T1">87.12 mg/kg Rabbit</text:span></text:p>
        </draw:text-box>
      </draw:frame>
      <draw:polygon text:anchor-type="page" text:anchor-page-number="3" draw:z-index="2484" draw:name="Shape820" draw:style-name="gr2" draw:text-style-name="P3" svg:width="3.8417in" svg:height="0.1917in" svg:x="3.363in" svg:y="2.95in" svg:viewBox="0 0 9759 488" draw:points="0,0 9759,0 9759,488 0,488">
        <text:p/>
      </draw:polygon>
      <draw:polygon text:anchor-type="page" text:anchor-page-number="2" draw:z-index="2483" draw:name="Shape498" draw:style-name="gr2" draw:text-style-name="P3" svg:width="1.3768in" svg:height="0.1268in" svg:x="0.363in" svg:y="5.378in" svg:viewBox="0 0 3498 323" draw:points="0,0 3498,0 3498,323 0,323">
        <text:p/>
      </draw:polygon>
      <draw:frame text:anchor-type="page" text:anchor-page-number="2" draw:z-index="2482" draw:name="Shape487" draw:style-name="gr1" draw:text-style-name="P2" svg:width="0.0433in" svg:height="0.1925in" svg:x="3.6598in" svg:y="4.9492in">
        <draw:text-box>
          <text:p><text:span text:style-name="T2"><text:s/></text:span></text:p>
        </draw:text-box>
      </draw:frame>
      <draw:frame text:anchor-type="page" text:anchor-page-number="11" draw:z-index="2481" draw:name="Shape3897" draw:style-name="gr1" draw:text-style-name="P2" svg:width="0.0433in" svg:height="0.1925in" svg:x="3.8083in" svg:y="3.7346in">
        <draw:text-box>
          <text:p><text:span text:style-name="T2"><text:s/></text:span></text:p>
        </draw:text-box>
      </draw:frame>
      <draw:polygon text:anchor-type="page" text:anchor-page-number="10" draw:z-index="2480" draw:name="Shape3650" draw:style-name="gr2" draw:text-style-name="P3" svg:width="3.937in" svg:height="0.1917in" svg:x="3.513in" svg:y="7.4063in" svg:viewBox="0 0 10001 488" draw:points="0,0 10001,0 10001,488 0,488">
        <text:p/>
      </draw:polygon>
      <draw:frame text:anchor-type="page" text:anchor-page-number="9" draw:z-index="2479" draw:name="Shape3405" draw:style-name="gr1" draw:text-style-name="P2" svg:width="0.0433in" svg:height="0.1925in" svg:x="1.2752in" svg:y="5.9063in">
        <draw:text-box>
          <text:p><text:span text:style-name="T2"><text:s/></text:span></text:p>
        </draw:text-box>
      </draw:frame>
      <draw:frame text:anchor-type="page" text:anchor-page-number="1" draw:z-index="2478" draw:name="Shape170" draw:style-name="gr1" draw:text-style-name="P2" svg:width="0.0433in" svg:height="0.1925in" svg:x="3.5799in" svg:y="4.8047in">
        <draw:text-box>
          <text:p><text:span text:style-name="T2"><text:s/></text:span></text:p>
        </draw:text-box>
      </draw:frame>
      <draw:polygon text:anchor-type="page" text:anchor-page-number="3" draw:z-index="2477" draw:name="Shape819" draw:style-name="gr2" draw:text-style-name="P3" svg:width="3.9382in" svg:height="0.1917in" svg:x="3.315in" svg:y="2.95in" svg:viewBox="0 0 10004 488" draw:points="0,0 10004,0 10004,488 0,488">
        <text:p/>
      </draw:polygon>
      <draw:polygon text:anchor-type="page" text:anchor-page-number="6" draw:z-index="2476" draw:name="Shape1879" draw:style-name="gr3" draw:text-style-name="P4" svg:width="0.0098in" svg:height="0.0102in" svg:x="2.3315in" svg:y="2.1614in" svg:viewBox="0 0 26 27" draw:points="0,0 26,0 26,27 0,27">
        <text:p/>
      </draw:polygon>
      <draw:polygon text:anchor-type="page" text:anchor-page-number="7" draw:z-index="2475" draw:name="Shape2881" draw:style-name="gr2" draw:text-style-name="P3" svg:width="2.363in" svg:height="0.1917in" svg:x="4.3in" svg:y="6.6398in" svg:viewBox="0 0 6003 488" draw:points="0,0 6003,0 6003,488 0,488">
        <text:p/>
      </draw:polygon>
      <draw:frame text:anchor-type="page" text:anchor-page-number="5" draw:z-index="2474" draw:name="Shape1258" draw:style-name="gr1" draw:text-style-name="P2" svg:width="0.0433in" svg:height="0.1925in" svg:x="3.448in" svg:y="6.3728in">
        <draw:text-box>
          <text:p><text:span text:style-name="T2"><text:s/></text:span></text:p>
        </draw:text-box>
      </draw:frame>
      <draw:frame text:anchor-type="page" text:anchor-page-number="13" draw:z-index="2473" draw:name="Shape4266" draw:style-name="gr1" draw:text-style-name="P2" svg:width="4.5315in" svg:height="0.1295in" svg:x="0.3634in" svg:y="5.4437in">
        <draw:text-box>
          <text:p><text:span text:style-name="T1">In base ai dati disponibili, il prodotto non contiene sostanze SVHC in percentuale ≥ a 0,1%. </text:span></text:p>
        </draw:text-box>
      </draw:frame>
      <draw:frame text:anchor-type="page" text:anchor-page-number="14" draw:z-index="2472" draw:name="Shape4460" draw:style-name="gr1" draw:text-style-name="P2" svg:width="0.0433in" svg:height="0.1925in" svg:x="6.1193in" svg:y="3.6398in">
        <draw:text-box>
          <text:p><text:span text:style-name="T2"><text:s/></text:span></text:p>
        </draw:text-box>
      </draw:frame>
      <draw:polygon text:anchor-type="page" text:anchor-page-number="1" draw:z-index="2471" draw:name="Shape140" draw:style-name="gr2" draw:text-style-name="P3" svg:width="1.5181in" svg:height="0.1283in" svg:x="4.7217in" svg:y="4.3398in" svg:viewBox="0 0 3857 327" draw:points="0,0 3857,0 3857,327 0,327">
        <text:p/>
      </draw:polygon>
      <draw:polygon text:anchor-type="page" text:anchor-page-number="9" draw:z-index="2470" draw:name="Shape3415" draw:style-name="gr2" draw:text-style-name="P3" svg:width="3.8402in" svg:height="0.1268in" svg:x="3.5614in" svg:y="5.9531in" svg:viewBox="0 0 9755 323" draw:points="0,0 9755,0 9755,323 0,323">
        <text:p/>
      </draw:polygon>
      <draw:polygon text:anchor-type="page" text:anchor-page-number="6" draw:z-index="2469" draw:name="Shape1878" draw:style-name="gr3" draw:text-style-name="P4" svg:width="0.7768in" svg:height="0.0102in" svg:x="1.5547in" svg:y="2.1614in" svg:viewBox="0 0 1974 27" draw:points="0,0 1974,0 1974,27 0,27">
        <text:p/>
      </draw:polygon>
      <draw:frame text:anchor-type="page" text:anchor-page-number="10" draw:z-index="2468" draw:name="Shape3629" draw:style-name="gr1" draw:text-style-name="P2" svg:width="0.0433in" svg:height="0.1925in" svg:x="1.3in" svg:y="7.3598in">
        <draw:text-box>
          <text:p><text:span text:style-name="T2"><text:s/></text:span></text:p>
        </draw:text-box>
      </draw:frame>
      <draw:polygon text:anchor-type="page" text:anchor-page-number="5" draw:z-index="2467" draw:name="Shape1262" draw:style-name="gr2" draw:text-style-name="P3" svg:width="0.6902in" svg:height="0.1114in" svg:x="0.4114in" svg:y="6.5433in" svg:viewBox="0 0 1754 284" draw:points="0,0 1754,0 1754,284 0,284">
        <text:p/>
      </draw:polygon>
      <draw:frame text:anchor-type="page" text:anchor-page-number="7" draw:z-index="2466" draw:name="Shape2878" draw:style-name="gr1" draw:text-style-name="P2" svg:width="0.2315in" svg:height="0.1295in" svg:x="2.7728in" svg:y="6.6425in">
        <draw:text-box>
          <text:p><text:span text:style-name="T1">lieve</text:span></text:p>
        </draw:text-box>
      </draw:frame>
      <draw:polygon text:anchor-type="page" text:anchor-page-number="11" draw:z-index="2465" draw:name="Shape3914" draw:style-name="gr2" draw:text-style-name="P3" svg:width="2.265in" svg:height="0.1264in" svg:x="0.4114in" svg:y="3.9732in" svg:viewBox="0 0 5754 322" draw:points="0,0 5754,0 5754,322 0,322">
        <text:p/>
      </draw:polygon>
      <draw:polygon text:anchor-type="page" text:anchor-page-number="14" draw:z-index="2464" draw:name="Shape4465" draw:style-name="gr2" draw:text-style-name="P3" svg:width="1.2799in" svg:height="0.1118in" svg:x="0.4114in" svg:y="3.828in" svg:viewBox="0 0 3252 285" draw:points="0,0 3252,0 3252,285 0,285">
        <text:p/>
      </draw:polygon>
      <draw:frame text:anchor-type="page" text:anchor-page-number="2" draw:z-index="2463" draw:name="Shape490" draw:style-name="gr1" draw:text-style-name="P2" svg:width="1.885in" svg:height="0.1295in" svg:x="1.7882in" svg:y="4.9972in">
        <draw:text-box>
          <text:p><text:span text:style-name="T1">Può provocare una reazione allergica.</text:span></text:p>
        </draw:text-box>
      </draw:frame>
      <draw:frame text:anchor-type="page" text:anchor-page-number="3" draw:z-index="2462" draw:name="Shape792" draw:style-name="gr1" draw:text-style-name="P2" svg:width="0.0433in" svg:height="0.1925in" svg:x="1.3429in" svg:y="2.9047in">
        <draw:text-box>
          <text:p><text:span text:style-name="T2"><text:s/></text:span></text:p>
        </draw:text-box>
      </draw:frame>
      <draw:frame text:anchor-type="page" text:anchor-page-number="13" draw:z-index="2461" draw:name="Shape4265" draw:style-name="gr1" draw:text-style-name="P2" svg:width="0.0433in" svg:height="0.1925in" svg:x="0.3634in" svg:y="5.2535in">
        <draw:text-box>
          <text:p><text:span text:style-name="T2"><text:s/></text:span></text:p>
        </draw:text-box>
      </draw:frame>
      <draw:frame text:anchor-type="page" text:anchor-page-number="2" draw:z-index="2460" draw:name="Shape491" draw:style-name="gr1" draw:text-style-name="P2" svg:width="0.085in" svg:height="0.1925in" svg:x="0.411in" svg:y="4.998in">
        <draw:text-box>
          <text:p><text:span text:style-name="T2"><text:s text:c="2"/></text:span></text:p>
        </draw:text-box>
      </draw:frame>
      <draw:polygon text:anchor-type="page" text:anchor-page-number="11" draw:z-index="2459" draw:name="Shape3913" draw:style-name="gr2" draw:text-style-name="P3" svg:width="2.3618in" svg:height="0.1917in" svg:x="0.363in" svg:y="3.9732in" svg:viewBox="0 0 6000 488" draw:points="0,0 6000,0 6000,488 0,488">
        <text:p/>
      </draw:polygon>
      <draw:frame text:anchor-type="page" text:anchor-page-number="13" draw:z-index="2458" draw:name="Shape4263" draw:style-name="gr1" draw:text-style-name="P2" svg:width="2.2205in" svg:height="0.1295in" svg:x="0.3634in" svg:y="5.1236in">
        <draw:text-box>
          <text:p><text:span text:style-name="T1">Sostanze in Candidate List (Art. 59 REACH) </text:span></text:p>
        </draw:text-box>
      </draw:frame>
      <draw:polygon text:anchor-type="page" text:anchor-page-number="5" draw:z-index="2457" draw:name="Shape1265" draw:style-name="gr2" draw:text-style-name="P3" svg:width="0.7866in" svg:height="0.2248in" svg:x="0.363in" svg:y="6.5433in" svg:viewBox="0 0 1999 572" draw:points="0,0 1999,0 1999,572 0,572">
        <text:p/>
      </draw:polygon>
      <draw:polygon text:anchor-type="page" text:anchor-page-number="10" draw:z-index="2456" draw:name="Shape3642" draw:style-name="gr2" draw:text-style-name="P3" svg:width="0.6898in" svg:height="0.1917in" svg:x="2.7732in" svg:y="7.4063in" svg:viewBox="0 0 1753 488" draw:points="0,0 1753,0 1753,488 0,488">
        <text:p/>
      </draw:polygon>
      <draw:frame text:anchor-type="page" text:anchor-page-number="7" draw:z-index="2455" draw:name="Shape2872" draw:style-name="gr1" draw:text-style-name="P2" svg:width="0.0433in" svg:height="0.1925in" svg:x="0.761in" svg:y="6.5945in">
        <draw:text-box>
          <text:p><text:span text:style-name="T2"><text:s/></text:span></text:p>
        </draw:text-box>
      </draw:frame>
      <draw:polygon text:anchor-type="page" text:anchor-page-number="9" draw:z-index="2454" draw:name="Shape3412" draw:style-name="gr2" draw:text-style-name="P3" svg:width="3.937in" svg:height="0.1268in" svg:x="3.513in" svg:y="5.9531in" svg:viewBox="0 0 10001 323" draw:points="0,0 10001,0 10001,323 0,323">
        <text:p/>
      </draw:polygon>
      <draw:polygon text:anchor-type="page" text:anchor-page-number="1" draw:z-index="2453" draw:name="Shape175" draw:style-name="gr2" draw:text-style-name="P3" svg:width="1.5748in" svg:height="0.6382in" svg:x="4.6933in" svg:y="4.3398in" svg:viewBox="0 0 4001 1622" draw:points="0,0 4001,0 4001,1622 0,1622">
        <text:p/>
      </draw:polygon>
      <draw:frame text:anchor-type="page" text:anchor-page-number="15" draw:z-index="2452" draw:name="Shape5060" draw:style-name="gr1" draw:text-style-name="P2" svg:width="2.8921in" svg:height="0.1295in" svg:x="0.3634in" svg:y="10.0429in">
        <draw:text-box>
          <text:p><text:span text:style-name="T1">25. Regolamento delegato (UE) 2023/1435 (XX Atp. CLP) </text:span></text:p>
        </draw:text-box>
      </draw:frame>
      <draw:polygon text:anchor-type="page" text:anchor-page-number="3" draw:z-index="2451" draw:name="Shape817" draw:style-name="gr2" draw:text-style-name="P3" svg:width="0.8866in" svg:height="0.1917in" svg:x="2.3799in" svg:y="2.95in" svg:viewBox="0 0 2253 488" draw:points="0,0 2253,0 2253,488 0,488">
        <text:p/>
      </draw:polygon>
      <draw:polygon text:anchor-type="page" text:anchor-page-number="6" draw:z-index="2450" draw:name="Shape1877" draw:style-name="gr3" draw:text-style-name="P4" svg:width="0.0098in" svg:height="0.0102in" svg:x="1.5449in" svg:y="2.1614in" svg:viewBox="0 0 26 27" draw:points="0,0 26,0 26,27 0,27">
        <text:p/>
      </draw:polygon>
      <draw:polygon text:anchor-type="page" text:anchor-page-number="14" draw:z-index="2449" draw:name="Shape4464" draw:style-name="gr2" draw:text-style-name="P3" svg:width="1.3768in" svg:height="0.1917in" svg:x="0.363in" svg:y="3.828in" svg:viewBox="0 0 3498 488" draw:points="0,0 3498,0 3498,488 0,488">
        <text:p/>
      </draw:polygon>
      <draw:frame text:anchor-type="page" text:anchor-page-number="9" draw:z-index="2448" draw:name="Shape3409" draw:style-name="gr1" draw:text-style-name="P2" svg:width="0.828in" svg:height="0.1295in" svg:x="0.4535in" svg:y="5.9543in">
        <draw:text-box>
          <text:p><text:span text:style-name="T1">LD50 (Cutanea):</text:span></text:p>
        </draw:text-box>
      </draw:frame>
      <draw:polygon text:anchor-type="page" text:anchor-page-number="10" draw:z-index="2447" draw:name="Shape3641" draw:style-name="gr2" draw:text-style-name="P3" svg:width="0.7882in" svg:height="0.1917in" svg:x="2.7248in" svg:y="7.4063in" svg:viewBox="0 0 2003 488" draw:points="0,0 2003,0 2003,488 0,488">
        <text:p/>
      </draw:polygon>
      <draw:frame text:anchor-type="page" text:anchor-page-number="1" draw:z-index="2446" draw:name="Shape174" draw:style-name="gr1" draw:text-style-name="P2" svg:width="0.4185in" svg:height="0.1295in" svg:x="3.1665in" svg:y="4.852in">
        <draw:text-box>
          <text:p><text:span text:style-name="T1">LCS: IS.</text:span></text:p>
        </draw:text-box>
      </draw:frame>
      <draw:polygon text:anchor-type="page" text:anchor-page-number="7" draw:z-index="2445" draw:name="Shape2877" draw:style-name="gr2" draw:text-style-name="P3" svg:width="1.4783in" svg:height="0.1283in" svg:x="2.7732in" svg:y="6.6398in" svg:viewBox="0 0 3756 327" draw:points="0,0 3756,0 3756,327 0,327">
        <text:p/>
      </draw:polygon>
      <draw:frame text:anchor-type="page" text:anchor-page-number="15" draw:z-index="2444" draw:name="Shape5059" draw:style-name="gr1" draw:text-style-name="P2" svg:width="2.9224in" svg:height="0.1295in" svg:x="0.3634in" svg:y="9.9146in">
        <draw:text-box>
          <text:p><text:span text:style-name="T1">24. Regolamento delegato (UE) 2023/1434 (XIX Atp. CLP) </text:span></text:p>
        </draw:text-box>
      </draw:frame>
      <draw:frame text:anchor-type="page" text:anchor-page-number="5" draw:z-index="2443" draw:name="Shape1264" draw:style-name="gr1" draw:text-style-name="P2" svg:width="0.6724in" svg:height="0.113in" svg:x="2.7728in" svg:y="6.4339in">
        <draw:text-box>
          <text:p><text:span text:style-name="T4">décembre 2021</text:span></text:p>
        </draw:text-box>
      </draw:frame>
      <draw:frame text:anchor-type="page" text:anchor-page-number="11" draw:z-index="2442" draw:name="Shape3909" draw:style-name="gr1" draw:text-style-name="P2" svg:width="0.2504in" svg:height="0.1295in" svg:x="3.561in" svg:y="3.7819in">
        <draw:text-box>
          <text:p><text:span text:style-name="T1">0.75 </text:span></text:p>
        </draw:text-box>
      </draw:frame>
      <draw:polygon text:anchor-type="page" text:anchor-page-number="3" draw:z-index="2441" draw:name="Shape816" draw:style-name="gr2" draw:text-style-name="P3" svg:width="0.9835in" svg:height="0.1917in" svg:x="2.3315in" svg:y="2.95in" svg:viewBox="0 0 2499 488" draw:points="0,0 2499,0 2499,488 0,488">
        <text:p/>
      </draw:polygon>
      <draw:polygon text:anchor-type="page" text:anchor-page-number="13" draw:z-index="2440" draw:name="Shape4264" draw:style-name="gr3" draw:text-style-name="P4" svg:width="2.1736in" svg:height="0.0083in" svg:x="0.363in" svg:y="5.2366in" svg:viewBox="0 0 5522 22" draw:points="0,0 5522,0 5522,22 0,22">
        <text:p/>
      </draw:polygon>
      <draw:polygon text:anchor-type="page" text:anchor-page-number="2" draw:z-index="2439" draw:name="Shape493" draw:style-name="gr2" draw:text-style-name="P3" svg:width="6.0067in" svg:height="0.1283in" svg:x="1.7882in" svg:y="4.9949in" svg:viewBox="0 0 15258 327" draw:points="0,0 15258,0 15258,327 0,327">
        <text:p/>
      </draw:polygon>
      <draw:polygon text:anchor-type="page" text:anchor-page-number="6" draw:z-index="2438" draw:name="Shape1876" draw:style-name="gr3" draw:text-style-name="P4" svg:width="1.1819in" svg:height="0.0102in" svg:x="0.363in" svg:y="2.1614in" svg:viewBox="0 0 3003 27" draw:points="0,0 3003,0 3003,27 0,27">
        <text:p/>
      </draw:polygon>
      <draw:frame text:anchor-type="page" text:anchor-page-number="14" draw:z-index="2437" draw:name="Shape4454" draw:style-name="gr1" draw:text-style-name="P2" svg:width="0.0433in" svg:height="0.1925in" svg:x="3.2835in" svg:y="3.5917in">
        <draw:text-box>
          <text:p><text:span text:style-name="T2"><text:s/></text:span></text:p>
        </draw:text-box>
      </draw:frame>
      <draw:frame text:anchor-type="page" text:anchor-page-number="10" draw:z-index="2436" draw:name="Shape3640" draw:style-name="gr1" draw:text-style-name="P2" svg:width="0.8531in" svg:height="0.1295in" svg:x="0.4535in" svg:y="7.4071in">
        <draw:text-box>
          <text:p><text:span text:style-name="T1">EC50 - Crostacei</text:span></text:p>
        </draw:text-box>
      </draw:frame>
      <draw:polygon text:anchor-type="page" text:anchor-page-number="2" draw:z-index="2435" draw:name="Shape492" draw:style-name="gr2" draw:text-style-name="P3" svg:width="6.1035in" svg:height="0.1917in" svg:x="1.7398in" svg:y="4.9949in" svg:viewBox="0 0 15504 488" draw:points="0,0 15504,0 15504,488 0,488">
        <text:p/>
      </draw:polygon>
      <draw:polygon text:anchor-type="page" text:anchor-page-number="14" draw:z-index="2434" draw:name="Shape4470" draw:style-name="gr2" draw:text-style-name="P3" svg:width="0.4933in" svg:height="0.1913in" svg:x="6.1197in" svg:y="3.6366in" svg:viewBox="0 0 1254 487" draw:points="0,0 1254,0 1254,487 0,487">
        <text:p/>
      </draw:polygon>
      <draw:polygon text:anchor-type="page" text:anchor-page-number="7" draw:z-index="2433" draw:name="Shape2876" draw:style-name="gr2" draw:text-style-name="P3" svg:width="1.5752in" svg:height="0.1917in" svg:x="2.7248in" svg:y="6.6398in" svg:viewBox="0 0 4002 488" draw:points="0,0 4002,0 4002,488 0,488">
        <text:p/>
      </draw:polygon>
      <draw:frame text:anchor-type="page" text:anchor-page-number="1" draw:z-index="2432" draw:name="Shape168" draw:style-name="gr1" draw:text-style-name="P2" svg:width="0.4059in" svg:height="0.1295in" svg:x="3.1665in" svg:y="4.7256in">
        <draw:text-box>
          <text:p><text:span text:style-name="T1">PC: 9a. </text:span></text:p>
        </draw:text-box>
      </draw:frame>
      <draw:frame text:anchor-type="page" text:anchor-page-number="3" draw:z-index="2431" draw:name="Shape815" draw:style-name="gr1" draw:text-style-name="P2" svg:width="0.8969in" svg:height="0.1295in" svg:x="0.4535in" svg:y="2.952in">
        <draw:text-box>
          <text:p><text:span text:style-name="T1">CAS <text:s text:c="2"/>13463-67-7</text:span></text:p>
        </draw:text-box>
      </draw:frame>
      <draw:frame text:anchor-type="page" text:anchor-page-number="15" draw:z-index="2430" draw:name="Shape5058" draw:style-name="gr1" draw:text-style-name="P2" svg:width="2.1024in" svg:height="0.1295in" svg:x="0.3634in" svg:y="9.7862in">
        <draw:text-box>
          <text:p><text:span text:style-name="T1">23. Regolamento delegato (UE) 2023/707 </text:span></text:p>
        </draw:text-box>
      </draw:frame>
      <draw:frame text:anchor-type="page" text:anchor-page-number="5" draw:z-index="2429" draw:name="Shape1257" draw:style-name="gr1" draw:text-style-name="P2" svg:width="4.4406in" svg:height="0.113in" svg:x="2.7728in" svg:y="6.322in">
        <draw:text-box>
          <text:p><text:span text:style-name="T4">Valeurs limites d'exposition professionnelle aux agents chimiques en FranceDécret n° 2021-1849 du 28 </text:span></text:p>
        </draw:text-box>
      </draw:frame>
      <draw:frame text:anchor-type="page" text:anchor-page-number="9" draw:z-index="2428" draw:name="Shape3404" draw:style-name="gr1" draw:text-style-name="P2" svg:width="0.0433in" svg:height="0.1925in" svg:x="0.411in" svg:y="5.9063in">
        <draw:text-box>
          <text:p><text:span text:style-name="T2"><text:s/></text:span></text:p>
        </draw:text-box>
      </draw:frame>
      <draw:frame text:anchor-type="page" text:anchor-page-number="6" draw:z-index="2427" draw:name="Shape1916" draw:style-name="gr1" draw:text-style-name="P2" svg:width="0.0433in" svg:height="0.1925in" svg:x="5.9228in" svg:y="2.1764in">
        <draw:text-box>
          <text:p><text:span text:style-name="T2"><text:s/></text:span></text:p>
        </draw:text-box>
      </draw:frame>
      <draw:frame text:anchor-type="page" text:anchor-page-number="13" draw:z-index="2426" draw:name="Shape4262" draw:style-name="gr1" draw:text-style-name="P2" svg:width="0.0433in" svg:height="0.1925in" svg:x="0.3634in" svg:y="4.9346in">
        <draw:text-box>
          <text:p><text:span text:style-name="T2"><text:s/></text:span></text:p>
        </draw:text-box>
      </draw:frame>
      <draw:frame text:anchor-type="page" text:anchor-page-number="11" draw:z-index="2425" draw:name="Shape3910" draw:style-name="gr1" draw:text-style-name="P2" svg:width="0.0433in" svg:height="0.1925in" svg:x="2.7728in" svg:y="3.7846in">
        <draw:text-box>
          <text:p><text:span text:style-name="T2"><text:s/></text:span></text:p>
        </draw:text-box>
      </draw:frame>
      <draw:frame text:anchor-type="page" text:anchor-page-number="15" draw:z-index="2424" draw:name="Shape5057" draw:style-name="gr1" draw:text-style-name="P2" svg:width="2.9224in" svg:height="0.1295in" svg:x="0.3634in" svg:y="9.6598in">
        <draw:text-box>
          <text:p><text:span text:style-name="T1">22. Regolamento delegato (UE) 2022/692 (XVIII Atp. CLP) </text:span></text:p>
        </draw:text-box>
      </draw:frame>
      <draw:frame text:anchor-type="page" text:anchor-page-number="2" draw:z-index="2423" draw:name="Shape480" draw:style-name="gr1" draw:text-style-name="P2" svg:width="0.0433in" svg:height="0.1925in" svg:x="7.7516in" svg:y="4.8217in">
        <draw:text-box>
          <text:p><text:span text:style-name="T2"><text:s/></text:span></text:p>
        </draw:text-box>
      </draw:frame>
      <draw:polygon text:anchor-type="page" text:anchor-page-number="6" draw:z-index="2422" draw:name="Shape1919" draw:style-name="gr4" draw:text-style-name="P5" svg:width="1.085in" svg:height="0.1917in" svg:x="6.7098in" svg:y="2.1732in" svg:viewBox="0 0 2757 488" draw:points="0,0 2757,0 2757,488 0,488">
        <text:p/>
      </draw:polygon>
      <draw:frame text:anchor-type="page" text:anchor-page-number="13" draw:z-index="2421" draw:name="Shape4261" draw:style-name="gr1" draw:text-style-name="P2" svg:width="0.7787in" svg:height="0.1295in" svg:x="0.3634in" svg:y="4.8055in">
        <draw:text-box>
          <text:p><text:span text:style-name="T1">non applicabile </text:span></text:p>
        </draw:text-box>
      </draw:frame>
      <draw:polygon text:anchor-type="page" text:anchor-page-number="11" draw:z-index="2420" draw:name="Shape3911" draw:style-name="gr2" draw:text-style-name="P3" svg:width="3.8402in" svg:height="0.1268in" svg:x="3.5614in" svg:y="3.7815in" svg:viewBox="0 0 9755 323" draw:points="0,0 9755,0 9755,323 0,323">
        <text:p/>
      </draw:polygon>
      <draw:frame text:anchor-type="page" text:anchor-page-number="3" draw:z-index="2419" draw:name="Shape812" draw:style-name="gr1" draw:text-style-name="P2" svg:width="0.0433in" svg:height="0.1925in" svg:x="0.411in" svg:y="2.9047in">
        <draw:text-box>
          <text:p><text:span text:style-name="T2"><text:s/></text:span></text:p>
        </draw:text-box>
      </draw:frame>
      <draw:polygon text:anchor-type="page" text:anchor-page-number="14" draw:z-index="2418" draw:name="Shape4469" draw:style-name="gr2" draw:text-style-name="P3" svg:width="0.5898in" svg:height="0.1913in" svg:x="6.0717in" svg:y="3.6366in" svg:viewBox="0 0 1499 487" draw:points="0,0 1499,0 1499,487 0,487">
        <text:p/>
      </draw:polygon>
      <draw:frame text:anchor-type="page" text:anchor-page-number="10" draw:z-index="2417" draw:name="Shape3634" draw:style-name="gr1" draw:text-style-name="P2" svg:width="0.0433in" svg:height="0.1925in" svg:x="0.411in" svg:y="7.3598in">
        <draw:text-box>
          <text:p><text:span text:style-name="T2"><text:s/></text:span></text:p>
        </draw:text-box>
      </draw:frame>
      <draw:polygon text:anchor-type="page" text:anchor-page-number="1" draw:z-index="2416" draw:name="Shape171" draw:style-name="gr2" draw:text-style-name="P3" svg:width="1.4783in" svg:height="0.1264in" svg:x="3.1665in" svg:y="4.8516in" svg:viewBox="0 0 3756 322" draw:points="0,0 3756,0 3756,322 0,322">
        <text:p/>
      </draw:polygon>
      <draw:frame text:anchor-type="page" text:anchor-page-number="9" draw:z-index="2415" draw:name="Shape3403" draw:style-name="gr1" draw:text-style-name="P2" svg:width="5.5185in" svg:height="0.1295in" svg:x="0.3634in" svg:y="5.8272in">
        <draw:text-box>
          <text:p><text:span text:style-name="T1">MASSA DI REAZIONE DI 5-CLORO-2- METIL-2H-ISOTIAZOL-3-ONE E 2-METIL-2H-ISOTIAZOL-3-ONE (3:1) </text:span></text:p>
        </draw:text-box>
      </draw:frame>
      <draw:frame text:anchor-type="page" text:anchor-page-number="7" draw:z-index="2414" draw:name="Shape2875" draw:style-name="gr1" draw:text-style-name="P2" svg:width="0.3122in" svg:height="0.1295in" svg:x="0.4535in" svg:y="6.6425in">
        <draw:text-box>
          <text:p><text:span text:style-name="T1">Odore</text:span></text:p>
        </draw:text-box>
      </draw:frame>
      <draw:polygon text:anchor-type="page" text:anchor-page-number="5" draw:z-index="2413" draw:name="Shape1263" draw:style-name="gr2" draw:text-style-name="P3" svg:width="4.6283in" svg:height="0.1118in" svg:x="2.7732in" svg:y="6.4315in" svg:viewBox="0 0 11757 285" draw:points="0,0 11757,0 11757,285 0,285">
        <text:p/>
      </draw:polygon>
      <draw:frame text:anchor-type="page" text:anchor-page-number="5" draw:z-index="2412" draw:name="Shape1245" draw:style-name="gr1" draw:text-style-name="P2" svg:width="0.0433in" svg:height="0.1925in" svg:x="1.5016in" svg:y="6.261in">
        <draw:text-box>
          <text:p><text:span text:style-name="T2"><text:s/></text:span></text:p>
        </draw:text-box>
      </draw:frame>
      <draw:frame text:anchor-type="page" text:anchor-page-number="1" draw:z-index="2411" draw:name="Shape161" draw:style-name="gr1" draw:text-style-name="P2" svg:width="1.2488in" svg:height="0.1295in" svg:x="3.1665in" svg:y="4.5972in">
        <draw:text-box>
          <text:p><text:span text:style-name="T1">PROC: 10, 11, 13, 7, 8b. </text:span></text:p>
        </draw:text-box>
      </draw:frame>
      <draw:polygon text:anchor-type="page" text:anchor-page-number="6" draw:z-index="2410" draw:name="Shape1918" draw:style-name="gr4" draw:text-style-name="P5" svg:width="1.1819in" svg:height="0.1917in" svg:x="6.6614in" svg:y="2.1732in" svg:viewBox="0 0 3003 488" draw:points="0,0 3003,0 3003,488 0,488">
        <text:p/>
      </draw:polygon>
      <draw:polygon text:anchor-type="page" text:anchor-page-number="9" draw:z-index="2409" draw:name="Shape3408" draw:style-name="gr2" draw:text-style-name="P3" svg:width="3.0516in" svg:height="0.1268in" svg:x="0.4114in" svg:y="5.9531in" svg:viewBox="0 0 7752 323" draw:points="0,0 7752,0 7752,323 0,323">
        <text:p/>
      </draw:polygon>
      <draw:frame text:anchor-type="page" text:anchor-page-number="8" draw:z-index="2408" draw:name="Shape3246" draw:style-name="gr1" draw:text-style-name="P2" svg:width="0.0433in" svg:height="0.1925in" svg:x="3.561in" svg:y="9.9634in">
        <draw:text-box>
          <text:p><text:span text:style-name="T2"><text:s/></text:span></text:p>
        </draw:text-box>
      </draw:frame>
      <draw:frame text:anchor-type="page" text:anchor-page-number="10" draw:z-index="2407" draw:name="Shape3620" draw:style-name="gr1" draw:text-style-name="P2" svg:width="0.0433in" svg:height="0.1925in" svg:x="5.3535in" svg:y="7.1681in">
        <draw:text-box>
          <text:p><text:span text:style-name="T2"><text:s/></text:span></text:p>
        </draw:text-box>
      </draw:frame>
      <draw:frame text:anchor-type="page" text:anchor-page-number="7" draw:z-index="2406" draw:name="Shape2871" draw:style-name="gr1" draw:text-style-name="P2" svg:width="0.0433in" svg:height="0.1925in" svg:x="0.411in" svg:y="6.5945in">
        <draw:text-box>
          <text:p><text:span text:style-name="T2"><text:s/></text:span></text:p>
        </draw:text-box>
      </draw:frame>
      <draw:frame text:anchor-type="page" text:anchor-page-number="13" draw:z-index="2405" draw:name="Shape4260" draw:style-name="gr1" draw:text-style-name="P2" svg:width="0.0433in" svg:height="0.1925in" svg:x="0.3634in" svg:y="4.6146in">
        <draw:text-box>
          <text:p><text:span text:style-name="T2"><text:s/></text:span></text:p>
        </draw:text-box>
      </draw:frame>
      <draw:frame text:anchor-type="page" text:anchor-page-number="15" draw:z-index="2404" draw:name="Shape5056" draw:style-name="gr1" draw:text-style-name="P2" svg:width="2.8921in" svg:height="0.1295in" svg:x="0.3634in" svg:y="9.5311in">
        <draw:text-box>
          <text:p><text:span text:style-name="T1">21. Regolamento delegato (UE) 2021/849 (XVII Atp. CLP) </text:span></text:p>
        </draw:text-box>
      </draw:frame>
      <draw:polygon text:anchor-type="page" text:anchor-page-number="2" draw:z-index="2403" draw:name="Shape489" draw:style-name="gr2" draw:text-style-name="P3" svg:width="1.2799in" svg:height="0.1917in" svg:x="0.4114in" svg:y="4.9949in" svg:viewBox="0 0 3252 488" draw:points="0,0 3252,0 3252,488 0,488">
        <text:p/>
      </draw:polygon>
      <draw:polygon text:anchor-type="page" text:anchor-page-number="11" draw:z-index="2402" draw:name="Shape3908" draw:style-name="gr2" draw:text-style-name="P3" svg:width="3.937in" svg:height="0.1917in" svg:x="3.513in" svg:y="3.7815in" svg:viewBox="0 0 10001 488" draw:points="0,0 10001,0 10001,488 0,488">
        <text:p/>
      </draw:polygon>
      <draw:frame text:anchor-type="page" text:anchor-page-number="3" draw:z-index="2401" draw:name="Shape811" draw:style-name="gr1" draw:text-style-name="P2" svg:width="0.0433in" svg:height="0.1925in" svg:x="7.3016in" svg:y="2.761in">
        <draw:text-box>
          <text:p><text:span text:style-name="T2"><text:s/></text:span></text:p>
        </draw:text-box>
      </draw:frame>
      <draw:frame text:anchor-type="page" text:anchor-page-number="14" draw:z-index="2400" draw:name="Shape4468" draw:style-name="gr1" draw:text-style-name="P2" svg:width="1.5059in" svg:height="0.1295in" svg:x="1.7882in" svg:y="3.639in">
        <draw:text-box>
          <text:p><text:span text:style-name="T1">Irritazione oculare, categoria 2</text:span></text:p>
        </draw:text-box>
      </draw:frame>
      <draw:frame text:anchor-type="page" text:anchor-page-number="6" draw:z-index="2399" draw:name="Shape1875" draw:style-name="gr1" draw:text-style-name="P2" svg:width="0.0433in" svg:height="0.1925in" svg:x="5.5217in" svg:y="2.1146in">
        <draw:text-box>
          <text:p><text:span text:style-name="T2"><text:s/></text:span></text:p>
        </draw:text-box>
      </draw:frame>
      <draw:frame text:anchor-type="page" text:anchor-page-number="7" draw:z-index="2398" draw:name="Shape2870" draw:style-name="gr1" draw:text-style-name="P2" svg:width="0.0433in" svg:height="0.1925in" svg:x="4.348in" svg:y="6.4516in">
        <draw:text-box>
          <text:p><text:span text:style-name="T2"><text:s/></text:span></text:p>
        </draw:text-box>
      </draw:frame>
      <draw:polygon text:anchor-type="page" text:anchor-page-number="9" draw:z-index="2397" draw:name="Shape3407" draw:style-name="gr2" draw:text-style-name="P3" svg:width="3.1504in" svg:height="0.1268in" svg:x="0.363in" svg:y="5.9531in" svg:viewBox="0 0 8003 323" draw:points="0,0 8003,0 8003,323 0,323">
        <text:p/>
      </draw:polygon>
      <draw:polygon text:anchor-type="page" text:anchor-page-number="5" draw:z-index="2396" draw:name="Shape1256" draw:style-name="gr2" draw:text-style-name="P3" svg:width="4.6283in" svg:height="0.1118in" svg:x="2.7732in" svg:y="6.3197in" svg:viewBox="0 0 11757 285" draw:points="0,0 11757,0 11757,285 0,285">
        <text:p/>
      </draw:polygon>
      <draw:frame text:anchor-type="page" text:anchor-page-number="13" draw:z-index="2395" draw:name="Shape4258" draw:style-name="gr1" draw:text-style-name="P2" svg:width="4.9642in" svg:height="0.1295in" svg:x="0.3634in" svg:y="4.4854in">
        <draw:text-box>
          <text:p><text:span text:style-name="T1">Regolamento (UE) 2019/1148 - relativo all'immissione sul mercato e all'uso di precursori di esplosivi </text:span></text:p>
        </draw:text-box>
      </draw:frame>
      <draw:polygon text:anchor-type="page" text:anchor-page-number="3" draw:z-index="2394" draw:name="Shape814" draw:style-name="gr2" draw:text-style-name="P3" svg:width="1.8717in" svg:height="0.1283in" svg:x="0.4114in" svg:y="2.95in" svg:viewBox="0 0 4755 327" draw:points="0,0 4755,0 4755,327 0,327">
        <text:p/>
      </draw:polygon>
      <draw:polygon text:anchor-type="page" text:anchor-page-number="10" draw:z-index="2393" draw:name="Shape3637" draw:style-name="gr2" draw:text-style-name="P3" svg:width="2.265in" svg:height="0.1268in" svg:x="0.4114in" svg:y="7.4063in" svg:viewBox="0 0 5754 323" draw:points="0,0 5754,0 5754,323 0,323">
        <text:p/>
      </draw:polygon>
      <draw:polygon text:anchor-type="page" text:anchor-page-number="1" draw:z-index="2392" draw:name="Shape162" draw:style-name="gr2" draw:text-style-name="P3" svg:width="1.5185in" svg:height="0.1283in" svg:x="3.1465in" svg:y="4.7232in" svg:viewBox="0 0 3858 327" draw:points="0,0 3858,0 3858,327 0,327">
        <text:p/>
      </draw:polygon>
      <draw:frame text:anchor-type="page" text:anchor-page-number="14" draw:z-index="2391" draw:name="Shape4453" draw:style-name="gr1" draw:text-style-name="P2" svg:width="0.0433in" svg:height="0.1925in" svg:x="0.9228in" svg:y="3.5764in">
        <draw:text-box>
          <text:p><text:span text:style-name="T2"><text:s/></text:span></text:p>
        </draw:text-box>
      </draw:frame>
      <draw:polygon text:anchor-type="page" text:anchor-page-number="8" draw:z-index="2390" draw:name="Shape3248" draw:style-name="gr3" draw:text-style-name="P4" svg:width="3.1984in" svg:height="0.0083in" svg:x="0.363in" svg:y="10.1232in" svg:viewBox="0 0 8125 22" draw:points="0,0 8125,0 8125,22 0,22">
        <text:p/>
      </draw:polygon>
      <draw:polygon text:anchor-type="page" text:anchor-page-number="2" draw:z-index="2389" draw:name="Shape488" draw:style-name="gr2" draw:text-style-name="P3" svg:width="1.3768in" svg:height="0.1917in" svg:x="0.363in" svg:y="4.9949in" svg:viewBox="0 0 3498 488" draw:points="0,0 3498,0 3498,488 0,488">
        <text:p/>
      </draw:polygon>
      <draw:frame text:anchor-type="page" text:anchor-page-number="15" draw:z-index="2388" draw:name="Shape5055" draw:style-name="gr1" draw:text-style-name="P2" svg:width="2.8606in" svg:height="0.1295in" svg:x="0.3634in" svg:y="9.4035in">
        <draw:text-box>
          <text:p><text:span text:style-name="T1">20. Regolamento delegato (UE) 2021/643 (XVI Atp. CLP) </text:span></text:p>
        </draw:text-box>
      </draw:frame>
      <draw:frame text:anchor-type="page" text:anchor-page-number="11" draw:z-index="2387" draw:name="Shape3896" draw:style-name="gr1" draw:text-style-name="P2" svg:width="0.0433in" svg:height="0.1925in" svg:x="2.6217in" svg:y="3.7346in">
        <draw:text-box>
          <text:p><text:span text:style-name="T2"><text:s/></text:span></text:p>
        </draw:text-box>
      </draw:frame>
      <draw:polygon text:anchor-type="page" text:anchor-page-number="3" draw:z-index="2386" draw:name="Shape813" draw:style-name="gr2" draw:text-style-name="P3" svg:width="1.9685in" svg:height="0.1917in" svg:x="0.363in" svg:y="2.95in" svg:viewBox="0 0 5001 488" draw:points="0,0 5001,0 5001,488 0,488">
        <text:p/>
      </draw:polygon>
      <draw:frame text:anchor-type="page" text:anchor-page-number="9" draw:z-index="2385" draw:name="Shape3402" draw:style-name="gr1" draw:text-style-name="P2" svg:width="0.0433in" svg:height="0.1925in" svg:x="0.3634in" svg:y="5.6362in">
        <draw:text-box>
          <text:p><text:span text:style-name="T2"><text:s/></text:span></text:p>
        </draw:text-box>
      </draw:frame>
      <draw:polygon text:anchor-type="page" text:anchor-page-number="13" draw:z-index="2384" draw:name="Shape4259" draw:style-name="gr3" draw:text-style-name="P4" svg:width="4.9083in" svg:height="0.0083in" svg:x="0.363in" svg:y="4.598in" svg:viewBox="0 0 12468 22" draw:points="0,0 12468,0 12468,22 0,22">
        <text:p/>
      </draw:polygon>
      <draw:frame text:anchor-type="page" text:anchor-page-number="1" draw:z-index="2383" draw:name="Shape154" draw:style-name="gr1" draw:text-style-name="P2" svg:width="0.6724in" svg:height="0.1295in" svg:x="3.1665in" svg:y="4.4689in">
        <draw:text-box>
          <text:p><text:span text:style-name="T1">ERC: 8a, 8d. </text:span></text:p>
        </draw:text-box>
      </draw:frame>
      <draw:polygon text:anchor-type="page" text:anchor-page-number="6" draw:z-index="2382" draw:name="Shape1915" draw:style-name="gr4" draw:text-style-name="P5" svg:width="0.6898in" svg:height="0.1917in" svg:x="5.9232in" svg:y="2.1732in" svg:viewBox="0 0 1753 488" draw:points="0,0 1753,0 1753,488 0,488">
        <text:p/>
      </draw:polygon>
      <draw:frame text:anchor-type="page" text:anchor-page-number="15" draw:z-index="2381" draw:name="Shape5054" draw:style-name="gr1" draw:text-style-name="P2" svg:width="2.8835in" svg:height="0.1295in" svg:x="0.3634in" svg:y="9.2764in">
        <draw:text-box>
          <text:p><text:span text:style-name="T1">19. Regolamento delegato (UE) 2020/1182 (XV Atp. CLP) </text:span></text:p>
        </draw:text-box>
      </draw:frame>
      <draw:frame text:anchor-type="page" text:anchor-page-number="8" draw:z-index="2380" draw:name="Shape3247" draw:style-name="gr1" draw:text-style-name="P2" svg:width="3.2205in" svg:height="0.1295in" svg:x="0.3634in" svg:y="10.0102in">
        <draw:text-box>
          <text:p><text:span text:style-name="T1">Metabolismo, cinetica, meccanismo di azione e altre informazioni</text:span></text:p>
        </draw:text-box>
      </draw:frame>
      <draw:frame text:anchor-type="page" text:anchor-page-number="2" draw:z-index="2379" draw:name="Shape486" draw:style-name="gr1" draw:text-style-name="P2" svg:width="5.9969in" svg:height="0.1295in" svg:x="1.7882in" svg:y="4.8689in">
        <draw:text-box>
          <text:p><text:span text:style-name="T1">Contiene: MASSA DI REAZIONE DI 5-CLORO-2- METIL-2H-ISOTIAZOL-3-ONE E 2-METIL-2H-ISOTIAZOL-3-ONE (3:1)</text:span></text:p>
        </draw:text-box>
      </draw:frame>
      <draw:polygon text:anchor-type="page" text:anchor-page-number="10" draw:z-index="2378" draw:name="Shape3636" draw:style-name="gr2" draw:text-style-name="P3" svg:width="2.3618in" svg:height="0.1917in" svg:x="0.363in" svg:y="7.4063in" svg:viewBox="0 0 6000 488" draw:points="0,0 6000,0 6000,488 0,488">
        <text:p/>
      </draw:polygon>
      <draw:polygon text:anchor-type="page" text:anchor-page-number="11" draw:z-index="2377" draw:name="Shape3904" draw:style-name="gr2" draw:text-style-name="P3" svg:width="0.6898in" svg:height="0.1917in" svg:x="2.7732in" svg:y="3.7815in" svg:viewBox="0 0 1753 488" draw:points="0,0 1753,0 1753,488 0,488">
        <text:p/>
      </draw:polygon>
      <draw:polygon text:anchor-type="page" text:anchor-page-number="5" draw:z-index="2376" draw:name="Shape1255" draw:style-name="gr2" draw:text-style-name="P3" svg:width="4.7252in" svg:height="0.2236in" svg:x="2.7248in" svg:y="6.3197in" svg:viewBox="0 0 12003 569" draw:points="0,0 12003,0 12003,569 0,569">
        <text:p/>
      </draw:polygon>
      <draw:polygon text:anchor-type="page" text:anchor-page-number="7" draw:z-index="2375" draw:name="Shape2874" draw:style-name="gr2" draw:text-style-name="P3" svg:width="2.265in" svg:height="0.1283in" svg:x="0.4114in" svg:y="6.6398in" svg:viewBox="0 0 5754 327" draw:points="0,0 5754,0 5754,327 0,327">
        <text:p/>
      </draw:polygon>
      <draw:polygon text:anchor-type="page" text:anchor-page-number="14" draw:z-index="2374" draw:name="Shape4467" draw:style-name="gr2" draw:text-style-name="P3" svg:width="4.235in" svg:height="0.1283in" svg:x="1.7882in" svg:y="3.6366in" svg:viewBox="0 0 10758 327" draw:points="0,0 10758,0 10758,327 0,327">
        <text:p/>
      </draw:polygon>
      <draw:frame text:anchor-type="page" text:anchor-page-number="9" draw:z-index="2373" draw:name="Shape3395" draw:style-name="gr1" draw:text-style-name="P2" svg:width="0.0433in" svg:height="0.1925in" svg:x="4.5035in" svg:y="5.4598in">
        <draw:text-box>
          <text:p><text:span text:style-name="T2"><text:s/></text:span></text:p>
        </draw:text-box>
      </draw:frame>
      <draw:frame text:anchor-type="page" text:anchor-page-number="2" draw:z-index="2372" draw:name="Shape479" draw:style-name="gr1" draw:text-style-name="P2" svg:width="0.0433in" svg:height="0.1925in" svg:x="0.8728in" svg:y="4.8193in">
        <draw:text-box>
          <text:p><text:span text:style-name="T2"><text:s/></text:span></text:p>
        </draw:text-box>
      </draw:frame>
      <draw:polygon text:anchor-type="page" text:anchor-page-number="1" draw:z-index="2371" draw:name="Shape155" draw:style-name="gr2" draw:text-style-name="P3" svg:width="1.5185in" svg:height="0.1283in" svg:x="3.1465in" svg:y="4.5949in" svg:viewBox="0 0 3858 327" draw:points="0,0 3858,0 3858,327 0,327">
        <text:p/>
      </draw:polygon>
      <draw:polygon text:anchor-type="page" text:anchor-page-number="14" draw:z-index="2370" draw:name="Shape4466" draw:style-name="gr2" draw:text-style-name="P3" svg:width="4.3319in" svg:height="0.1913in" svg:x="1.7398in" svg:y="3.6366in" svg:viewBox="0 0 11004 487" draw:points="0,0 11004,0 11004,487 0,487">
        <text:p/>
      </draw:polygon>
      <draw:polygon text:anchor-type="page" text:anchor-page-number="7" draw:z-index="2369" draw:name="Shape2873" draw:style-name="gr2" draw:text-style-name="P3" svg:width="2.3618in" svg:height="0.1917in" svg:x="0.363in" svg:y="6.6398in" svg:viewBox="0 0 6000 488" draw:points="0,0 6000,0 6000,488 0,488">
        <text:p/>
      </draw:polygon>
      <draw:polygon text:anchor-type="page" text:anchor-page-number="11" draw:z-index="2368" draw:name="Shape3903" draw:style-name="gr2" draw:text-style-name="P3" svg:width="0.7882in" svg:height="0.1917in" svg:x="2.7248in" svg:y="3.7815in" svg:viewBox="0 0 2003 488" draw:points="0,0 2003,0 2003,488 0,488">
        <text:p/>
      </draw:polygon>
      <draw:frame text:anchor-type="page" text:anchor-page-number="15" draw:z-index="2367" draw:name="Shape5053" draw:style-name="gr1" draw:text-style-name="P2" svg:width="2.8606in" svg:height="0.1295in" svg:x="0.3634in" svg:y="9.148in">
        <draw:text-box>
          <text:p><text:span text:style-name="T1">18. Regolamento delegato (UE) 2020/217 (XIV Atp. CLP) </text:span></text:p>
        </draw:text-box>
      </draw:frame>
      <draw:frame text:anchor-type="page" text:anchor-page-number="10" draw:z-index="2366" draw:name="Shape3632" draw:style-name="gr1" draw:text-style-name="P2" svg:width="1.8039in" svg:height="0.1295in" svg:x="3.561in" svg:y="7.2154in">
        <draw:text-box>
          <text:p><text:span text:style-name="T1">0.19 mg/l/96h Oncorhynchus mykiss</text:span></text:p>
        </draw:text-box>
      </draw:frame>
      <draw:frame text:anchor-type="page" text:anchor-page-number="8" draw:z-index="2365" draw:name="Shape3245" draw:style-name="gr1" draw:text-style-name="P2" svg:width="0.0433in" svg:height="0.1925in" svg:x="0.3634in" svg:y="9.8217in">
        <draw:text-box>
          <text:p><text:span text:style-name="T2"><text:s/></text:span></text:p>
        </draw:text-box>
      </draw:frame>
      <draw:frame text:anchor-type="page" text:anchor-page-number="5" draw:z-index="2364" draw:name="Shape1254" draw:style-name="gr1" draw:text-style-name="P2" svg:width="0.3024in" svg:height="0.113in" svg:x="1.198in" svg:y="6.322in">
        <draw:text-box>
          <text:p><text:span text:style-name="T4">France</text:span></text:p>
        </draw:text-box>
      </draw:frame>
      <draw:polygon text:anchor-type="page" text:anchor-page-number="6" draw:z-index="2363" draw:name="Shape1914" draw:style-name="gr4" draw:text-style-name="P5" svg:width="0.7866in" svg:height="0.1917in" svg:x="5.8748in" svg:y="2.1732in" svg:viewBox="0 0 1999 488" draw:points="0,0 1999,0 1999,488 0,488">
        <text:p/>
      </draw:polygon>
      <draw:frame text:anchor-type="page" text:anchor-page-number="13" draw:z-index="2362" draw:name="Shape4257" draw:style-name="gr1" draw:text-style-name="P2" svg:width="0.0433in" svg:height="0.1925in" svg:x="0.3634in" svg:y="4.2945in">
        <draw:text-box>
          <text:p><text:span text:style-name="T2"><text:s/></text:span></text:p>
        </draw:text-box>
      </draw:frame>
      <draw:frame text:anchor-type="page" text:anchor-page-number="3" draw:z-index="2361" draw:name="Shape808" draw:style-name="gr1" draw:text-style-name="P2" svg:width="0.0433in" svg:height="0.1925in" svg:x="3.3634in" svg:y="2.761in">
        <draw:text-box>
          <text:p><text:span text:style-name="T2"><text:s/></text:span></text:p>
        </draw:text-box>
      </draw:frame>
      <draw:frame text:anchor-type="page" text:anchor-page-number="15" draw:z-index="2360" draw:name="Shape5052" draw:style-name="gr1" draw:text-style-name="P2" svg:width="1.6961in" svg:height="0.1295in" svg:x="0.3634in" svg:y="9.0193in">
        <draw:text-box>
          <text:p><text:span text:style-name="T1">17. Regolamento (UE) 2019/1148 </text:span></text:p>
        </draw:text-box>
      </draw:frame>
      <draw:frame text:anchor-type="page" text:anchor-page-number="14" draw:z-index="2359" draw:name="Shape4459" draw:style-name="gr1" draw:text-style-name="P2" svg:width="0.4685in" svg:height="0.113in" svg:x="0.4535in" svg:y="3.6374in">
        <draw:text-box>
          <text:p><text:span text:style-name="T5">Eye Irrit. 2</text:span></text:p>
        </draw:text-box>
      </draw:frame>
      <draw:frame text:anchor-type="page" text:anchor-page-number="7" draw:z-index="2358" draw:name="Shape2856" draw:style-name="gr1" draw:text-style-name="P2" svg:width="0.0433in" svg:height="0.1925in" svg:x="3.1in" svg:y="6.4035in">
        <draw:text-box>
          <text:p><text:span text:style-name="T2"><text:s/></text:span></text:p>
        </draw:text-box>
      </draw:frame>
      <draw:frame text:anchor-type="page" text:anchor-page-number="8" draw:z-index="2357" draw:name="Shape3244" draw:style-name="gr1" draw:text-style-name="P2" svg:width="4.5067in" svg:height="0.1295in" svg:x="0.3634in" svg:y="9.6902in">
        <draw:text-box>
          <text:p><text:span text:style-name="T3">11.1. Informazioni sulle classi di pericolo definite nel Regolamento (CE) n. 1272/2008 </text:span></text:p>
        </draw:text-box>
      </draw:frame>
      <draw:frame text:anchor-type="page" text:anchor-page-number="13" draw:z-index="2356" draw:name="Shape4254" draw:style-name="gr1" draw:text-style-name="P2" svg:width="0.0433in" svg:height="0.1925in" svg:x="3.8583in" svg:y="4.1181in">
        <draw:text-box>
          <text:p><text:span text:style-name="T2"><text:s/></text:span></text:p>
        </draw:text-box>
      </draw:frame>
      <draw:frame text:anchor-type="page" text:anchor-page-number="10" draw:z-index="2355" draw:name="Shape3633" draw:style-name="gr1" draw:text-style-name="P2" svg:width="0.0433in" svg:height="0.1925in" svg:x="2.7728in" svg:y="7.2181in">
        <draw:text-box>
          <text:p><text:span text:style-name="T2"><text:s/></text:span></text:p>
        </draw:text-box>
      </draw:frame>
      <draw:polygon text:anchor-type="page" text:anchor-page-number="2" draw:z-index="2354" draw:name="Shape485" draw:style-name="gr2" draw:text-style-name="P3" svg:width="6.0067in" svg:height="0.1283in" svg:x="1.7882in" svg:y="4.8665in" svg:viewBox="0 0 15258 327" draw:points="0,0 15258,0 15258,327 0,327">
        <text:p/>
      </draw:polygon>
      <draw:polygon text:anchor-type="page" text:anchor-page-number="3" draw:z-index="2353" draw:name="Shape810" draw:style-name="gr2" draw:text-style-name="P3" svg:width="0.2965in" svg:height="0.1913in" svg:x="7.3016in" svg:y="2.7583in" svg:viewBox="0 0 754 487" draw:points="0,0 754,0 754,487 0,487">
        <text:p/>
      </draw:polygon>
      <draw:frame text:anchor-type="page" text:anchor-page-number="1" draw:z-index="2352" draw:name="Shape151" draw:style-name="gr1" draw:text-style-name="P2" svg:width="0.4059in" svg:height="0.1295in" svg:x="3.1665in" svg:y="4.3425in">
        <draw:text-box>
          <text:p><text:span text:style-name="T1">SU: 19. </text:span></text:p>
        </draw:text-box>
      </draw:frame>
      <draw:frame text:anchor-type="page" text:anchor-page-number="9" draw:z-index="2351" draw:name="Shape3401" draw:style-name="gr1" draw:text-style-name="P2" svg:width="0.9496in" svg:height="0.1295in" svg:x="3.561in" svg:y="5.5071in">
        <draw:text-box>
          <text:p><text:span text:style-name="T1">&gt; 10000 mg/kg Rat</text:span></text:p>
        </draw:text-box>
      </draw:frame>
      <draw:frame text:anchor-type="page" text:anchor-page-number="5" draw:z-index="2350" draw:name="Shape1237" draw:style-name="gr1" draw:text-style-name="P2" svg:width="0.0433in" svg:height="0.1925in" svg:x="0.648in" svg:y="6.261in">
        <draw:text-box>
          <text:p><text:span text:style-name="T2"><text:s/></text:span></text:p>
        </draw:text-box>
      </draw:frame>
      <draw:frame text:anchor-type="page" text:anchor-page-number="11" draw:z-index="2349" draw:name="Shape3907" draw:style-name="gr1" draw:text-style-name="P2" svg:width="2.1807in" svg:height="0.1295in" svg:x="0.4535in" svg:y="3.7819in">
        <draw:text-box>
          <text:p><text:span text:style-name="T1">Coefficiente di ripartizione: n-ottanolo/acqua</text:span></text:p>
        </draw:text-box>
      </draw:frame>
      <draw:frame text:anchor-type="page" text:anchor-page-number="6" draw:z-index="2348" draw:name="Shape1913" draw:style-name="gr1" draw:text-style-name="P2" svg:width="0.1894in" svg:height="0.113in" svg:x="5.3335in" svg:y="2.1756in">
        <draw:text-box>
          <text:p><text:span text:style-name="T4">ppm</text:span></text:p>
        </draw:text-box>
      </draw:frame>
      <draw:frame text:anchor-type="page" text:anchor-page-number="14" draw:z-index="2347" draw:name="Shape4452" draw:style-name="gr1" draw:text-style-name="P2" svg:width="0.0433in" svg:height="0.1925in" svg:x="0.411in" svg:y="3.5764in">
        <draw:text-box>
          <text:p><text:span text:style-name="T2"><text:s/></text:span></text:p>
        </draw:text-box>
      </draw:frame>
      <draw:frame text:anchor-type="page" text:anchor-page-number="13" draw:z-index="2346" draw:name="Shape4256" draw:style-name="gr1" draw:text-style-name="P2" svg:width="0.3004in" svg:height="0.1295in" svg:x="3.561in" svg:y="4.1654in">
        <draw:text-box>
          <text:p><text:span text:style-name="T1">XXXX</text:span></text:p>
        </draw:text-box>
      </draw:frame>
      <draw:polygon text:anchor-type="page" text:anchor-page-number="3" draw:z-index="2345" draw:name="Shape809" draw:style-name="gr2" draw:text-style-name="P3" svg:width="0.3933in" svg:height="0.1913in" svg:x="7.2531in" svg:y="2.7583in" svg:viewBox="0 0 1000 487" draw:points="0,0 1000,0 1000,487 0,487">
        <text:p/>
      </draw:polygon>
      <draw:frame text:anchor-type="page" text:anchor-page-number="8" draw:z-index="2344" draw:name="Shape3243" draw:style-name="gr1" draw:text-style-name="P2" svg:width="0.0433in" svg:height="0.1925in" svg:x="0.3634in" svg:y="9.5016in">
        <draw:text-box>
          <text:p><text:span text:style-name="T2"><text:s/></text:span></text:p>
        </draw:text-box>
      </draw:frame>
      <draw:polygon text:anchor-type="page" text:anchor-page-number="2" draw:z-index="2343" draw:name="Shape484" draw:style-name="gr2" draw:text-style-name="P3" svg:width="6.1035in" svg:height="0.1283in" svg:x="1.7398in" svg:y="4.8665in" svg:viewBox="0 0 15504 327" draw:points="0,0 15504,0 15504,327 0,327">
        <text:p/>
      </draw:polygon>
      <draw:frame text:anchor-type="page" text:anchor-page-number="11" draw:z-index="2342" draw:name="Shape3895" draw:style-name="gr1" draw:text-style-name="P2" svg:width="0.0433in" svg:height="0.1925in" svg:x="0.411in" svg:y="3.7346in">
        <draw:text-box>
          <text:p><text:span text:style-name="T2"><text:s/></text:span></text:p>
        </draw:text-box>
      </draw:frame>
      <draw:frame text:anchor-type="page" text:anchor-page-number="15" draw:z-index="2341" draw:name="Shape5051" draw:style-name="gr1" draw:text-style-name="P2" svg:width="2.9106in" svg:height="0.1295in" svg:x="0.3634in" svg:y="8.8929in">
        <draw:text-box>
          <text:p><text:span text:style-name="T1">16. Regolamento delegato (UE) 2018/1480 (XIII Atp. CLP) </text:span></text:p>
        </draw:text-box>
      </draw:frame>
      <draw:polygon text:anchor-type="page" text:anchor-page-number="10" draw:z-index="2340" draw:name="Shape3639" draw:style-name="gr2" draw:text-style-name="P3" svg:width="3.8402in" svg:height="0.1264in" svg:x="3.5614in" svg:y="7.215in" svg:viewBox="0 0 9755 322" draw:points="0,0 9755,0 9755,322 0,322">
        <text:p/>
      </draw:polygon>
      <draw:polygon text:anchor-type="page" text:anchor-page-number="1" draw:z-index="2339" draw:name="Shape153" draw:style-name="gr2" draw:text-style-name="P3" svg:width="1.5185in" svg:height="0.1268in" svg:x="3.1465in" svg:y="4.4681in" svg:viewBox="0 0 3858 323" draw:points="0,0 3858,0 3858,323 0,323">
        <text:p/>
      </draw:polygon>
      <draw:polygon text:anchor-type="page" text:anchor-page-number="7" draw:z-index="2338" draw:name="Shape2869" draw:style-name="gr2" draw:text-style-name="P3" svg:width="2.265in" svg:height="0.1917in" svg:x="4.348in" svg:y="6.448in" svg:viewBox="0 0 5754 488" draw:points="0,0 5754,0 5754,488 0,488">
        <text:p/>
      </draw:polygon>
      <draw:polygon text:anchor-type="page" text:anchor-page-number="5" draw:z-index="2337" draw:name="Shape1253" draw:style-name="gr2" draw:text-style-name="P3" svg:width="1.4783in" svg:height="0.1118in" svg:x="1.198in" svg:y="6.3197in" svg:viewBox="0 0 3756 285" draw:points="0,0 3756,0 3756,285 0,285">
        <text:p/>
      </draw:polygon>
      <draw:frame text:anchor-type="page" text:anchor-page-number="9" draw:z-index="2336" draw:name="Shape3394" draw:style-name="gr1" draw:text-style-name="P2" svg:width="0.0433in" svg:height="0.1925in" svg:x="1.1264in" svg:y="5.4598in">
        <draw:text-box>
          <text:p><text:span text:style-name="T2"><text:s/></text:span></text:p>
        </draw:text-box>
      </draw:frame>
      <draw:frame text:anchor-type="page" text:anchor-page-number="6" draw:z-index="2335" draw:name="Shape1874" draw:style-name="gr1" draw:text-style-name="P2" svg:width="0.0433in" svg:height="0.1925in" svg:x="4.448in" svg:y="2.1146in">
        <draw:text-box>
          <text:p><text:span text:style-name="T2"><text:s/></text:span></text:p>
        </draw:text-box>
      </draw:frame>
      <draw:frame text:anchor-type="page" text:anchor-page-number="15" draw:z-index="2334" draw:name="Shape5050" draw:style-name="gr1" draw:text-style-name="P2" svg:width="2.3571in" svg:height="0.1295in" svg:x="0.3634in" svg:y="8.7654in">
        <draw:text-box>
          <text:p><text:span text:style-name="T1">15. Regolamento (UE) 2019/521 (XII Atp. CLP) </text:span></text:p>
        </draw:text-box>
      </draw:frame>
      <draw:polygon text:anchor-type="page" text:anchor-page-number="5" draw:z-index="2333" draw:name="Shape1252" draw:style-name="gr2" draw:text-style-name="P3" svg:width="1.5752in" svg:height="0.2236in" svg:x="1.15in" svg:y="6.3197in" svg:viewBox="0 0 4002 569" draw:points="0,0 4002,0 4002,569 0,569">
        <text:p/>
      </draw:polygon>
      <draw:frame text:anchor-type="page" text:anchor-page-number="1" draw:z-index="2332" draw:name="Shape135" draw:style-name="gr1" draw:text-style-name="P2" svg:width="0.0433in" svg:height="0.1925in" svg:x="2.1035in" svg:y="4.2945in">
        <draw:text-box>
          <text:p><text:span text:style-name="T2"><text:s/></text:span></text:p>
        </draw:text-box>
      </draw:frame>
      <draw:frame text:anchor-type="page" text:anchor-page-number="14" draw:z-index="2331" draw:name="Shape4451" draw:style-name="gr1" draw:text-style-name="P2" svg:width="0.0433in" svg:height="0.1925in" svg:x="6.1193in" svg:y="3.448in">
        <draw:text-box>
          <text:p><text:span text:style-name="T2"><text:s/></text:span></text:p>
        </draw:text-box>
      </draw:frame>
      <draw:frame text:anchor-type="page" text:anchor-page-number="8" draw:z-index="2330" draw:name="Shape3239" draw:style-name="gr1" draw:text-style-name="P2" svg:width="0.0433in" svg:height="0.1925in" svg:x="3.4417in" svg:y="9.3146in">
        <draw:text-box>
          <text:p><text:span text:style-name="T2"><text:s/></text:span></text:p>
        </draw:text-box>
      </draw:frame>
      <draw:polygon text:anchor-type="page" text:anchor-page-number="6" draw:z-index="2329" draw:name="Shape1912" draw:style-name="gr4" draw:text-style-name="P5" svg:width="0.4917in" svg:height="0.1114in" svg:x="5.3331in" svg:y="2.1732in" svg:viewBox="0 0 1250 284" draw:points="0,0 1250,0 1250,284 0,284">
        <text:p/>
      </draw:polygon>
      <draw:frame text:anchor-type="page" text:anchor-page-number="13" draw:z-index="2328" draw:name="Shape4253" draw:style-name="gr1" draw:text-style-name="P2" svg:width="1.6961in" svg:height="0.1295in" svg:x="3.561in" svg:y="4.039in">
        <draw:text-box>
          <text:p><text:span text:style-name="T1">Reg. REACH: 01-2119475104-44-</text:span></text:p>
        </draw:text-box>
      </draw:frame>
      <draw:polygon text:anchor-type="page" text:anchor-page-number="9" draw:z-index="2327" draw:name="Shape3400" draw:style-name="gr2" draw:text-style-name="P3" svg:width="3.8402in" svg:height="0.1283in" svg:x="3.5614in" svg:y="5.5047in" svg:viewBox="0 0 9755 327" draw:points="0,0 9755,0 9755,327 0,327">
        <text:p/>
      </draw:polygon>
      <draw:frame text:anchor-type="page" text:anchor-page-number="11" draw:z-index="2326" draw:name="Shape3888" draw:style-name="gr1" draw:text-style-name="P2" svg:width="0.0433in" svg:height="0.1925in" svg:x="3.561in" svg:y="3.4016in">
        <draw:text-box>
          <text:p><text:span text:style-name="T2"><text:s/></text:span></text:p>
        </draw:text-box>
      </draw:frame>
      <draw:frame text:anchor-type="page" text:anchor-page-number="2" draw:z-index="2325" draw:name="Shape483" draw:style-name="gr1" draw:text-style-name="P2" svg:width="0.4248in" svg:height="0.1295in" svg:x="0.4535in" svg:y="4.8665in">
        <draw:text-box>
          <text:p><text:span text:style-name="T3">EUH208</text:span></text:p>
        </draw:text-box>
      </draw:frame>
      <draw:polygon text:anchor-type="page" text:anchor-page-number="7" draw:z-index="2324" draw:name="Shape2868" draw:style-name="gr2" draw:text-style-name="P3" svg:width="2.363in" svg:height="0.1917in" svg:x="4.3in" svg:y="6.448in" svg:viewBox="0 0 6003 488" draw:points="0,0 6003,0 6003,488 0,488">
        <text:p/>
      </draw:polygon>
      <draw:polygon text:anchor-type="page" text:anchor-page-number="10" draw:z-index="2323" draw:name="Shape3638" draw:style-name="gr2" draw:text-style-name="P3" svg:width="3.937in" svg:height="0.1913in" svg:x="3.513in" svg:y="7.215in" svg:viewBox="0 0 10001 487" draw:points="0,0 10001,0 10001,487 0,487">
        <text:p/>
      </draw:polygon>
      <draw:frame text:anchor-type="page" text:anchor-page-number="3" draw:z-index="2322" draw:name="Shape805" draw:style-name="gr1" draw:text-style-name="P2" svg:width="0.0433in" svg:height="0.1925in" svg:x="2.3799in" svg:y="2.761in">
        <draw:text-box>
          <text:p><text:span text:style-name="T2"><text:s/></text:span></text:p>
        </draw:text-box>
      </draw:frame>
      <draw:polygon text:anchor-type="page" text:anchor-page-number="1" draw:z-index="2321" draw:name="Shape150" draw:style-name="gr2" draw:text-style-name="P3" svg:width="1.5185in" svg:height="0.1283in" svg:x="3.1465in" svg:y="4.3398in" svg:viewBox="0 0 3858 327" draw:points="0,0 3858,0 3858,327 0,327">
        <text:p/>
      </draw:polygon>
      <draw:polygon text:anchor-type="page" text:anchor-page-number="9" draw:z-index="2320" draw:name="Shape3399" draw:style-name="gr2" draw:text-style-name="P3" svg:width="3.937in" svg:height="0.1283in" svg:x="3.513in" svg:y="5.5047in" svg:viewBox="0 0 10001 327" draw:points="0,0 10001,0 10001,327 0,327">
        <text:p/>
      </draw:polygon>
      <draw:frame text:anchor-type="page" text:anchor-page-number="7" draw:z-index="2319" draw:name="Shape2866" draw:style-name="gr1" draw:text-style-name="P2" svg:width="0.3307in" svg:height="0.1295in" svg:x="2.7728in" svg:y="6.4508in">
        <draw:text-box>
          <text:p><text:span text:style-name="T1">bianco</text:span></text:p>
        </draw:text-box>
      </draw:frame>
      <draw:polygon text:anchor-type="page" text:anchor-page-number="11" draw:z-index="2318" draw:name="Shape3899" draw:style-name="gr2" draw:text-style-name="P3" svg:width="2.265in" svg:height="0.1268in" svg:x="0.4114in" svg:y="3.7815in" svg:viewBox="0 0 5754 323" draw:points="0,0 5754,0 5754,323 0,323">
        <text:p/>
      </draw:polygon>
      <draw:polygon text:anchor-type="page" text:anchor-page-number="13" draw:z-index="2317" draw:name="Shape4255" draw:style-name="gr2" draw:text-style-name="P3" svg:width="1.8717in" svg:height="0.1264in" svg:x="3.5614in" svg:y="4.165in" svg:viewBox="0 0 4755 322" draw:points="0,0 4755,0 4755,322 0,322">
        <text:p/>
      </draw:polygon>
      <draw:polygon text:anchor-type="page" text:anchor-page-number="14" draw:z-index="2316" draw:name="Shape4456" draw:style-name="gr2" draw:text-style-name="P3" svg:width="1.2799in" svg:height="0.1114in" svg:x="0.4114in" svg:y="3.6366in" svg:viewBox="0 0 3252 284" draw:points="0,0 3252,0 3252,284 0,284">
        <text:p/>
      </draw:polygon>
      <draw:frame text:anchor-type="page" text:anchor-page-number="15" draw:z-index="2315" draw:name="Shape5049" draw:style-name="gr1" draw:text-style-name="P2" svg:width="2.326in" svg:height="0.1295in" svg:x="0.3634in" svg:y="8.6366in">
        <draw:text-box>
          <text:p><text:span text:style-name="T1">14. Regolamento (UE) 2018/669 (XI Atp. CLP) </text:span></text:p>
        </draw:text-box>
      </draw:frame>
      <draw:polygon text:anchor-type="page" text:anchor-page-number="6" draw:z-index="2314" draw:name="Shape1911" draw:style-name="gr4" draw:text-style-name="P5" svg:width="0.5917in" svg:height="0.1917in" svg:x="5.2831in" svg:y="2.1732in" svg:viewBox="0 0 1504 488" draw:points="0,0 1504,0 1504,488 0,488">
        <text:p/>
      </draw:polygon>
      <draw:polygon text:anchor-type="page" text:anchor-page-number="3" draw:z-index="2313" draw:name="Shape807" draw:style-name="gr2" draw:text-style-name="P3" svg:width="3.8417in" svg:height="0.1913in" svg:x="3.363in" svg:y="2.7583in" svg:viewBox="0 0 9759 487" draw:points="0,0 9759,0 9759,487 0,487">
        <text:p/>
      </draw:polygon>
      <draw:frame text:anchor-type="page" text:anchor-page-number="10" draw:z-index="2312" draw:name="Shape3619" draw:style-name="gr1" draw:text-style-name="P2" svg:width="0.0433in" svg:height="0.1925in" svg:x="1.0898in" svg:y="7.1681in">
        <draw:text-box>
          <text:p><text:span text:style-name="T2"><text:s/></text:span></text:p>
        </draw:text-box>
      </draw:frame>
      <draw:frame text:anchor-type="page" text:anchor-page-number="2" draw:z-index="2311" draw:name="Shape478" draw:style-name="gr1" draw:text-style-name="P2" svg:width="0.0433in" svg:height="0.1925in" svg:x="0.411in" svg:y="4.8193in">
        <draw:text-box>
          <text:p><text:span text:style-name="T2"><text:s/></text:span></text:p>
        </draw:text-box>
      </draw:frame>
      <draw:frame text:anchor-type="page" text:anchor-page-number="5" draw:z-index="2310" draw:name="Shape1251" draw:style-name="gr1" draw:text-style-name="P2" svg:width="0.1949in" svg:height="0.113in" svg:x="0.4535in" svg:y="6.322in">
        <draw:text-box>
          <text:p><text:span text:style-name="T4">FRA</text:span></text:p>
        </draw:text-box>
      </draw:frame>
      <draw:frame text:anchor-type="page" text:anchor-page-number="8" draw:z-index="2309" draw:name="Shape3242" draw:style-name="gr1" draw:text-style-name="P2" svg:width="2.9949in" svg:height="0.1776in" svg:x="0.4535in" svg:y="9.3244in">
        <draw:text-box>
          <text:p><text:span text:style-name="T6">SEZIONE 11. Informazioni tossicologiche</text:span></text:p>
        </draw:text-box>
      </draw:frame>
      <draw:polygon text:anchor-type="page" text:anchor-page-number="1" draw:z-index="2308" draw:name="Shape149" draw:style-name="gr2" draw:text-style-name="P3" svg:width="1.5752in" svg:height="0.6382in" svg:x="3.1181in" svg:y="4.3398in" svg:viewBox="0 0 4002 1622" draw:points="0,0 4002,0 4002,1622 0,1622">
        <text:p/>
      </draw:polygon>
      <draw:polygon text:anchor-type="page" text:anchor-page-number="14" draw:z-index="2307" draw:name="Shape4455" draw:style-name="gr2" draw:text-style-name="P3" svg:width="1.3768in" svg:height="0.1913in" svg:x="0.363in" svg:y="3.6366in" svg:viewBox="0 0 3498 487" draw:points="0,0 3498,0 3498,487 0,487">
        <text:p/>
      </draw:polygon>
      <draw:frame text:anchor-type="page" text:anchor-page-number="8" draw:z-index="2306" draw:name="Shape3238" draw:style-name="gr1" draw:text-style-name="P2" svg:width="0.0433in" svg:height="0.1925in" svg:x="0.411in" svg:y="9.3146in">
        <draw:text-box>
          <text:p><text:span text:style-name="T2"><text:s/></text:span></text:p>
        </draw:text-box>
      </draw:frame>
      <draw:frame text:anchor-type="page" text:anchor-page-number="9" draw:z-index="2305" draw:name="Shape3398" draw:style-name="gr1" draw:text-style-name="P2" svg:width="0.6787in" svg:height="0.1295in" svg:x="0.4535in" svg:y="5.5071in">
        <draw:text-box>
          <text:p><text:span text:style-name="T1">LD50 (Orale):</text:span></text:p>
        </draw:text-box>
      </draw:frame>
      <draw:polygon text:anchor-type="page" text:anchor-page-number="10" draw:z-index="2304" draw:name="Shape3631" draw:style-name="gr2" draw:text-style-name="P3" svg:width="0.6898in" svg:height="0.1913in" svg:x="2.7732in" svg:y="7.215in" svg:viewBox="0 0 1753 487" draw:points="0,0 1753,0 1753,487 0,487">
        <text:p/>
      </draw:polygon>
      <draw:frame text:anchor-type="page" text:anchor-page-number="2" draw:z-index="2303" draw:name="Shape477" draw:style-name="gr1" draw:text-style-name="P2" svg:width="0.0433in" svg:height="0.1925in" svg:x="0.3634in" svg:y="4.678in">
        <draw:text-box>
          <text:p><text:span text:style-name="T2"><text:s/></text:span></text:p>
        </draw:text-box>
      </draw:frame>
      <draw:polygon text:anchor-type="page" text:anchor-page-number="11" draw:z-index="2302" draw:name="Shape3898" draw:style-name="gr2" draw:text-style-name="P3" svg:width="2.3618in" svg:height="0.1917in" svg:x="0.363in" svg:y="3.7815in" svg:viewBox="0 0 6000 488" draw:points="0,0 6000,0 6000,488 0,488">
        <text:p/>
      </draw:polygon>
      <draw:frame text:anchor-type="page" text:anchor-page-number="5" draw:z-index="2301" draw:name="Shape1236" draw:style-name="gr1" draw:text-style-name="P2" svg:width="0.0433in" svg:height="0.1925in" svg:x="0.411in" svg:y="6.261in">
        <draw:text-box>
          <text:p><text:span text:style-name="T2"><text:s/></text:span></text:p>
        </draw:text-box>
      </draw:frame>
      <draw:polygon text:anchor-type="page" text:anchor-page-number="3" draw:z-index="2300" draw:name="Shape806" draw:style-name="gr2" draw:text-style-name="P3" svg:width="3.9382in" svg:height="0.1913in" svg:x="3.315in" svg:y="2.7583in" svg:viewBox="0 0 10004 487" draw:points="0,0 10004,0 10004,487 0,487">
        <text:p/>
      </draw:polygon>
      <draw:frame text:anchor-type="page" text:anchor-page-number="7" draw:z-index="2299" draw:name="Shape2852" draw:style-name="gr1" draw:text-style-name="P2" svg:width="0.0433in" svg:height="0.1925in" svg:x="0.7799in" svg:y="6.4035in">
        <draw:text-box>
          <text:p><text:span text:style-name="T2"><text:s/></text:span></text:p>
        </draw:text-box>
      </draw:frame>
      <draw:frame text:anchor-type="page" text:anchor-page-number="15" draw:z-index="2298" draw:name="Shape5048" draw:style-name="gr1" draw:text-style-name="P2" svg:width="2.2949in" svg:height="0.1295in" svg:x="0.3634in" svg:y="8.5098in">
        <draw:text-box>
          <text:p><text:span text:style-name="T1">13. Regolamento (UE) 2017/776 (X Atp. CLP) </text:span></text:p>
        </draw:text-box>
      </draw:frame>
      <draw:frame text:anchor-type="page" text:anchor-page-number="13" draw:z-index="2297" draw:name="Shape4251" draw:style-name="gr1" draw:text-style-name="P2" svg:width="1.7287in" svg:height="0.1295in" svg:x="3.561in" svg:y="3.9102in">
        <draw:text-box>
          <text:p><text:span text:style-name="T1">2-(2-BUTOSSIETOSSI)ETANOLO </text:span></text:p>
        </draw:text-box>
      </draw:frame>
      <draw:frame text:anchor-type="page" text:anchor-page-number="6" draw:z-index="2296" draw:name="Shape1909" draw:style-name="gr1" draw:text-style-name="P2" svg:width="0.2969in" svg:height="0.113in" svg:x="4.1516in" svg:y="2.1756in">
        <draw:text-box>
          <text:p><text:span text:style-name="T4">mg/m3</text:span></text:p>
        </draw:text-box>
      </draw:frame>
      <draw:frame text:anchor-type="page" text:anchor-page-number="5" draw:z-index="2295" draw:name="Shape1234" draw:style-name="gr1" draw:text-style-name="P2" svg:width="0.0433in" svg:height="0.1925in" svg:x="5.9563in" svg:y="6.1492in">
        <draw:text-box>
          <text:p><text:span text:style-name="T2"><text:s/></text:span></text:p>
        </draw:text-box>
      </draw:frame>
      <draw:polygon text:anchor-type="page" text:anchor-page-number="10" draw:z-index="2294" draw:name="Shape3630" draw:style-name="gr2" draw:text-style-name="P3" svg:width="0.7882in" svg:height="0.1913in" svg:x="2.7248in" svg:y="7.215in" svg:viewBox="0 0 2003 487" draw:points="0,0 2003,0 2003,487 0,487">
        <text:p/>
      </draw:polygon>
      <draw:frame text:anchor-type="page" text:anchor-page-number="1" draw:z-index="2293" draw:name="Shape148" draw:style-name="gr1" draw:text-style-name="P2" svg:width="1.6614in" svg:height="0.1295in" svg:x="0.4535in" svg:y="4.3425in">
        <draw:text-box>
          <text:p><text:span text:style-name="T1">Applicazione Prodotto verniciante</text:span></text:p>
        </draw:text-box>
      </draw:frame>
      <draw:polygon text:anchor-type="page" text:anchor-page-number="13" draw:z-index="2292" draw:name="Shape4252" draw:style-name="gr2" draw:text-style-name="P3" svg:width="1.8717in" svg:height="0.1283in" svg:x="3.5614in" svg:y="4.0366in" svg:viewBox="0 0 4755 327" draw:points="0,0 4755,0 4755,327 0,327">
        <text:p/>
      </draw:polygon>
      <draw:frame text:anchor-type="page" text:anchor-page-number="11" draw:z-index="2291" draw:name="Shape3887" draw:style-name="gr1" draw:text-style-name="P2" svg:width="0.0433in" svg:height="0.1925in" svg:x="2.7728in" svg:y="3.4016in">
        <draw:text-box>
          <text:p><text:span text:style-name="T2"><text:s/></text:span></text:p>
        </draw:text-box>
      </draw:frame>
      <draw:frame text:anchor-type="page" text:anchor-page-number="9" draw:z-index="2290" draw:name="Shape3393" draw:style-name="gr1" draw:text-style-name="P2" svg:width="0.0433in" svg:height="0.1925in" svg:x="0.411in" svg:y="5.4598in">
        <draw:text-box>
          <text:p><text:span text:style-name="T2"><text:s/></text:span></text:p>
        </draw:text-box>
      </draw:frame>
      <draw:polygon text:anchor-type="page" text:anchor-page-number="7" draw:z-index="2289" draw:name="Shape2865" draw:style-name="gr2" draw:text-style-name="P3" svg:width="1.4783in" svg:height="0.1283in" svg:x="2.7732in" svg:y="6.448in" svg:viewBox="0 0 3756 327" draw:points="0,0 3756,0 3756,327 0,327">
        <text:p/>
      </draw:polygon>
      <draw:frame text:anchor-type="page" text:anchor-page-number="14" draw:z-index="2288" draw:name="Shape4439" draw:style-name="gr1" draw:text-style-name="P2" svg:width="0.0433in" svg:height="0.1925in" svg:x="3.3811in" svg:y="3.3992in">
        <draw:text-box>
          <text:p><text:span text:style-name="T2"><text:s/></text:span></text:p>
        </draw:text-box>
      </draw:frame>
      <draw:frame text:anchor-type="page" text:anchor-page-number="3" draw:z-index="2287" draw:name="Shape788" draw:style-name="gr1" draw:text-style-name="P2" svg:width="0.0433in" svg:height="0.1925in" svg:x="1.2063in" svg:y="2.7134in">
        <draw:text-box>
          <text:p><text:span text:style-name="T2"><text:s/></text:span></text:p>
        </draw:text-box>
      </draw:frame>
      <draw:frame text:anchor-type="page" text:anchor-page-number="8" draw:z-index="2286" draw:name="Shape3237" draw:style-name="gr1" draw:text-style-name="P2" svg:width="0.0433in" svg:height="0.1925in" svg:x="0.3634in" svg:y="9.1346in">
        <draw:text-box>
          <text:p><text:span text:style-name="T2"><text:s/></text:span></text:p>
        </draw:text-box>
      </draw:frame>
      <draw:frame text:anchor-type="page" text:anchor-page-number="15" draw:z-index="2285" draw:name="Shape5047" draw:style-name="gr1" draw:text-style-name="P2" svg:width="2.3803in" svg:height="0.1295in" svg:x="0.3634in" svg:y="8.3819in">
        <draw:text-box>
          <text:p><text:span text:style-name="T1">12. Regolamento (UE) 2016/1179 (IX Atp. CLP) </text:span></text:p>
        </draw:text-box>
      </draw:frame>
      <draw:frame text:anchor-type="page" text:anchor-page-number="6" draw:z-index="2284" draw:name="Shape1873" draw:style-name="gr1" draw:text-style-name="P2" svg:width="0.0433in" svg:height="0.1925in" svg:x="3.75in" svg:y="2.1146in">
        <draw:text-box>
          <text:p><text:span text:style-name="T2"><text:s/></text:span></text:p>
        </draw:text-box>
      </draw:frame>
      <draw:polygon text:anchor-type="page" text:anchor-page-number="2" draw:z-index="2283" draw:name="Shape482" draw:style-name="gr2" draw:text-style-name="P3" svg:width="1.2799in" svg:height="0.1283in" svg:x="0.4114in" svg:y="4.8665in" svg:viewBox="0 0 3252 327" draw:points="0,0 3252,0 3252,327 0,327">
        <text:p/>
      </draw:polygon>
      <draw:frame text:anchor-type="page" text:anchor-page-number="1" draw:z-index="2282" draw:name="Shape134" draw:style-name="gr1" draw:text-style-name="P2" svg:width="0.0433in" svg:height="0.1925in" svg:x="0.411in" svg:y="4.2945in">
        <draw:text-box>
          <text:p><text:span text:style-name="T2"><text:s/></text:span></text:p>
        </draw:text-box>
      </draw:frame>
      <draw:polygon text:anchor-type="page" text:anchor-page-number="11" draw:z-index="2281" draw:name="Shape3906" draw:style-name="gr2" draw:text-style-name="P3" svg:width="3.8402in" svg:height="0.1917in" svg:x="3.5614in" svg:y="3.398in" svg:viewBox="0 0 9755 488" draw:points="0,0 9755,0 9755,488 0,488">
        <text:p/>
      </draw:polygon>
      <draw:polygon text:anchor-type="page" text:anchor-page-number="2" draw:z-index="2280" draw:name="Shape481" draw:style-name="gr2" draw:text-style-name="P3" svg:width="1.3768in" svg:height="0.1283in" svg:x="0.363in" svg:y="4.8665in" svg:viewBox="0 0 3498 327" draw:points="0,0 3498,0 3498,327 0,327">
        <text:p/>
      </draw:polygon>
      <draw:frame text:anchor-type="page" text:anchor-page-number="13" draw:z-index="2279" draw:name="Shape4242" draw:style-name="gr1" draw:text-style-name="P2" svg:width="0.0433in" svg:height="0.1925in" svg:x="2.5035in" svg:y="3.8634in">
        <draw:text-box>
          <text:p><text:span text:style-name="T2"><text:s/></text:span></text:p>
        </draw:text-box>
      </draw:frame>
      <draw:frame text:anchor-type="page" text:anchor-page-number="15" draw:z-index="2278" draw:name="Shape5046" draw:style-name="gr1" draw:text-style-name="P2" svg:width="3.6169in" svg:height="0.1295in" svg:x="0.3634in" svg:y="8.2535in">
        <draw:text-box>
          <text:p><text:span text:style-name="T1">11. Regolamento (UE) 2016/918 del Parlamento Europeo (VIII Atp. CLP) </text:span></text:p>
        </draw:text-box>
      </draw:frame>
      <draw:polygon text:anchor-type="page" text:anchor-page-number="8" draw:z-index="2277" draw:name="Shape3241" draw:style-name="gr5" draw:text-style-name="P6" svg:width="7.3835in" svg:height="0.1748in" svg:x="0.4114in" svg:y="9.3232in" svg:viewBox="0 0 18755 445" draw:points="0,0 18755,0 18755,445 0,445">
        <text:p/>
      </draw:polygon>
      <draw:polygon text:anchor-type="page" text:anchor-page-number="6" draw:z-index="2276" draw:name="Shape1908" draw:style-name="gr4" draw:text-style-name="P5" svg:width="1.0831in" svg:height="0.1114in" svg:x="4.1516in" svg:y="2.1732in" svg:viewBox="0 0 2752 284" draw:points="0,0 2752,0 2752,284 0,284">
        <text:p/>
      </draw:polygon>
      <draw:polygon text:anchor-type="page" text:anchor-page-number="5" draw:z-index="2275" draw:name="Shape1247" draw:style-name="gr2" draw:text-style-name="P3" svg:width="0.6902in" svg:height="0.1118in" svg:x="0.4114in" svg:y="6.3197in" svg:viewBox="0 0 1754 285" draw:points="0,0 1754,0 1754,285 0,285">
        <text:p/>
      </draw:polygon>
      <draw:polygon text:anchor-type="page" text:anchor-page-number="3" draw:z-index="2274" draw:name="Shape794" draw:style-name="gr2" draw:text-style-name="P3" svg:width="0.8866in" svg:height="0.1913in" svg:x="2.3799in" svg:y="2.7583in" svg:viewBox="0 0 2253 487" draw:points="0,0 2253,0 2253,487 0,487">
        <text:p/>
      </draw:polygon>
      <draw:polygon text:anchor-type="page" text:anchor-page-number="7" draw:z-index="2273" draw:name="Shape2864" draw:style-name="gr2" draw:text-style-name="P3" svg:width="1.5752in" svg:height="0.1917in" svg:x="2.7248in" svg:y="6.448in" svg:viewBox="0 0 4002 488" draw:points="0,0 4002,0 4002,488 0,488">
        <text:p/>
      </draw:polygon>
      <draw:frame text:anchor-type="page" text:anchor-page-number="9" draw:z-index="2272" draw:name="Shape3392" draw:style-name="gr1" draw:text-style-name="P2" svg:width="5.0543in" svg:height="0.1295in" svg:x="0.3634in" svg:y="5.3783in">
        <draw:text-box>
          <text:p><text:span text:style-name="T1">BIOSSIDO DI TITANIO (in polvere contenente &lt; 1% di particelle con diametro aerodinamico ≤ 10 μm) </text:span></text:p>
        </draw:text-box>
      </draw:frame>
      <draw:frame text:anchor-type="page" text:anchor-page-number="10" draw:z-index="2271" draw:name="Shape3628" draw:style-name="gr1" draw:text-style-name="P2" svg:width="0.6421in" svg:height="0.1295in" svg:x="0.4535in" svg:y="7.2154in">
        <draw:text-box>
          <text:p><text:span text:style-name="T1">LC50 - Pesci</text:span></text:p>
        </draw:text-box>
      </draw:frame>
      <draw:polygon text:anchor-type="page" text:anchor-page-number="14" draw:z-index="2270" draw:name="Shape4458" draw:style-name="gr2" draw:text-style-name="P3" svg:width="0.4933in" svg:height="0.1917in" svg:x="6.1197in" svg:y="3.4449in" svg:viewBox="0 0 1254 488" draw:points="0,0 1254,0 1254,488 0,488">
        <text:p/>
      </draw:polygon>
      <draw:polygon text:anchor-type="page" text:anchor-page-number="8" draw:z-index="2269" draw:name="Shape3240" draw:style-name="gr5" draw:text-style-name="P6" svg:width="7.4803in" svg:height="0.1748in" svg:x="0.363in" svg:y="9.3232in" svg:viewBox="0 0 19001 445" draw:points="0,0 19001,0 19001,445 0,445">
        <text:p/>
      </draw:polygon>
      <draw:frame text:anchor-type="page" text:anchor-page-number="7" draw:z-index="2268" draw:name="Shape2863" draw:style-name="gr1" draw:text-style-name="P2" svg:width="0.3307in" svg:height="0.1295in" svg:x="0.4535in" svg:y="6.4508in">
        <draw:text-box>
          <text:p><text:span text:style-name="T1">Colore</text:span></text:p>
        </draw:text-box>
      </draw:frame>
      <draw:polygon text:anchor-type="page" text:anchor-page-number="3" draw:z-index="2267" draw:name="Shape793" draw:style-name="gr2" draw:text-style-name="P3" svg:width="0.9835in" svg:height="0.1913in" svg:x="2.3315in" svg:y="2.7583in" svg:viewBox="0 0 2499 487" draw:points="0,0 2499,0 2499,487 0,487">
        <text:p/>
      </draw:polygon>
      <draw:polygon text:anchor-type="page" text:anchor-page-number="9" draw:z-index="2266" draw:name="Shape3397" draw:style-name="gr2" draw:text-style-name="P3" svg:width="3.0516in" svg:height="0.1283in" svg:x="0.4114in" svg:y="5.5047in" svg:viewBox="0 0 7752 327" draw:points="0,0 7752,0 7752,327 0,327">
        <text:p/>
      </draw:polygon>
      <draw:frame text:anchor-type="page" text:anchor-page-number="15" draw:z-index="2265" draw:name="Shape5045" draw:style-name="gr1" draw:text-style-name="P2" svg:width="3.6559in" svg:height="0.1295in" svg:x="0.3634in" svg:y="8.1272in">
        <draw:text-box>
          <text:p><text:span text:style-name="T1">10. Regolamento (UE) 2015/1221 del Parlamento Europeo (VII Atp. CLP) </text:span></text:p>
        </draw:text-box>
      </draw:frame>
      <draw:frame text:anchor-type="page" text:anchor-page-number="10" draw:z-index="2264" draw:name="Shape3618" draw:style-name="gr1" draw:text-style-name="P2" svg:width="0.0433in" svg:height="0.1925in" svg:x="0.411in" svg:y="7.1681in">
        <draw:text-box>
          <text:p><text:span text:style-name="T2"><text:s/></text:span></text:p>
        </draw:text-box>
      </draw:frame>
      <draw:polygon text:anchor-type="page" text:anchor-page-number="13" draw:z-index="2263" draw:name="Shape4250" draw:style-name="gr2" draw:text-style-name="P3" svg:width="1.8717in" svg:height="0.1283in" svg:x="3.5614in" svg:y="3.9083in" svg:viewBox="0 0 4755 327" draw:points="0,0 4755,0 4755,327 0,327">
        <text:p/>
      </draw:polygon>
      <draw:polygon text:anchor-type="page" text:anchor-page-number="11" draw:z-index="2262" draw:name="Shape3905" draw:style-name="gr2" draw:text-style-name="P3" svg:width="3.937in" svg:height="0.3835in" svg:x="3.513in" svg:y="3.398in" svg:viewBox="0 0 10001 975" draw:points="0,0 10001,0 10001,975 0,975">
        <text:p/>
      </draw:polygon>
      <draw:frame text:anchor-type="page" text:anchor-page-number="2" draw:z-index="2261" draw:name="Shape474" draw:style-name="gr1" draw:text-style-name="P2" svg:width="0.0433in" svg:height="0.1925in" svg:x="2.1535in" svg:y="4.5016in">
        <draw:text-box>
          <text:p><text:span text:style-name="T2"><text:s/></text:span></text:p>
        </draw:text-box>
      </draw:frame>
      <draw:polygon text:anchor-type="page" text:anchor-page-number="14" draw:z-index="2260" draw:name="Shape4457" draw:style-name="gr2" draw:text-style-name="P3" svg:width="0.5898in" svg:height="0.1917in" svg:x="6.0717in" svg:y="3.4449in" svg:viewBox="0 0 1499 488" draw:points="0,0 1499,0 1499,488 0,488">
        <text:p/>
      </draw:polygon>
      <draw:frame text:anchor-type="page" text:anchor-page-number="1" draw:z-index="2259" draw:name="Shape130" draw:style-name="gr1" draw:text-style-name="P2" svg:width="0.0433in" svg:height="0.1925in" svg:x="6.7917in" svg:y="4.1661in">
        <draw:text-box>
          <text:p><text:span text:style-name="T2"><text:s/></text:span></text:p>
        </draw:text-box>
      </draw:frame>
      <draw:polygon text:anchor-type="page" text:anchor-page-number="6" draw:z-index="2258" draw:name="Shape1907" draw:style-name="gr4" draw:text-style-name="P5" svg:width="1.1799in" svg:height="0.1917in" svg:x="4.1031in" svg:y="2.1732in" svg:viewBox="0 0 2998 488" draw:points="0,0 2998,0 2998,488 0,488">
        <text:p/>
      </draw:polygon>
      <draw:polygon text:anchor-type="page" text:anchor-page-number="5" draw:z-index="2257" draw:name="Shape1246" draw:style-name="gr2" draw:text-style-name="P3" svg:width="0.7866in" svg:height="0.2236in" svg:x="0.363in" svg:y="6.3197in" svg:viewBox="0 0 1999 569" draw:points="0,0 1999,0 1999,569 0,569">
        <text:p/>
      </draw:polygon>
      <draw:frame text:anchor-type="page" text:anchor-page-number="11" draw:z-index="2256" draw:name="Shape3892" draw:style-name="gr1" draw:text-style-name="P2" svg:width="0.0433in" svg:height="0.1925in" svg:x="1.8063in" svg:y="3.6075in">
        <draw:text-box>
          <text:p><text:span text:style-name="T2"><text:s/></text:span></text:p>
        </draw:text-box>
      </draw:frame>
      <draw:polygon text:anchor-type="page" text:anchor-page-number="13" draw:z-index="2255" draw:name="Shape4249" draw:style-name="gr2" draw:text-style-name="P3" svg:width="1.9685in" svg:height="0.3831in" svg:x="3.513in" svg:y="3.9083in" svg:viewBox="0 0 5001 974" draw:points="0,0 5001,0 5001,974 0,974">
        <text:p/>
      </draw:polygon>
      <draw:frame text:anchor-type="page" text:anchor-page-number="14" draw:z-index="2254" draw:name="Shape4450" draw:style-name="gr1" draw:text-style-name="P2" svg:width="1.6051in" svg:height="0.1295in" svg:x="1.7882in" svg:y="3.4472in">
        <draw:text-box>
          <text:p><text:span text:style-name="T1">Lesioni oculari gravi, categoria 1</text:span></text:p>
        </draw:text-box>
      </draw:frame>
      <draw:frame text:anchor-type="page" text:anchor-page-number="5" draw:z-index="2253" draw:name="Shape1250" draw:style-name="gr1" draw:text-style-name="P2" svg:width="3.1622in" svg:height="0.113in" svg:x="2.7728in" svg:y="6.2102in">
        <draw:text-box>
          <text:p><text:span text:style-name="T4">Límites de exposición profesional para agentes químicos en España 2023</text:span></text:p>
        </draw:text-box>
      </draw:frame>
      <draw:frame text:anchor-type="page" text:anchor-page-number="10" draw:z-index="2252" draw:name="Shape3616" draw:style-name="gr1" draw:text-style-name="P2" svg:width="0.0433in" svg:height="0.1925in" svg:x="3.561in" svg:y="6.8346in">
        <draw:text-box>
          <text:p><text:span text:style-name="T2"><text:s/></text:span></text:p>
        </draw:text-box>
      </draw:frame>
      <draw:polygon text:anchor-type="page" text:anchor-page-number="9" draw:z-index="2251" draw:name="Shape3396" draw:style-name="gr2" draw:text-style-name="P3" svg:width="3.1504in" svg:height="0.1283in" svg:x="0.363in" svg:y="5.5047in" svg:viewBox="0 0 8003 327" draw:points="0,0 8003,0 8003,327 0,327">
        <text:p/>
      </draw:polygon>
      <draw:frame text:anchor-type="page" text:anchor-page-number="7" draw:z-index="2250" draw:name="Shape2860" draw:style-name="gr1" draw:text-style-name="P2" svg:width="0.0433in" svg:height="0.1925in" svg:x="0.411in" svg:y="6.4035in">
        <draw:text-box>
          <text:p><text:span text:style-name="T2"><text:s/></text:span></text:p>
        </draw:text-box>
      </draw:frame>
      <draw:frame text:anchor-type="page" text:anchor-page-number="8" draw:z-index="2249" draw:name="Shape3236" draw:style-name="gr1" draw:text-style-name="P2" svg:width="0.0433in" svg:height="0.1925in" svg:x="0.3634in" svg:y="8.9429in">
        <draw:text-box>
          <text:p><text:span text:style-name="T2"><text:s/></text:span></text:p>
        </draw:text-box>
      </draw:frame>
      <draw:frame text:anchor-type="page" text:anchor-page-number="3" draw:z-index="2248" draw:name="Shape804" draw:style-name="gr1" draw:text-style-name="P2" svg:width="0.7598in" svg:height="0.1295in" svg:x="0.4535in" svg:y="2.7602in">
        <draw:text-box>
          <text:p><text:span text:style-name="T1">CE <text:s text:c="2"/>236-675-5</text:span></text:p>
        </draw:text-box>
      </draw:frame>
      <draw:frame text:anchor-type="page" text:anchor-page-number="6" draw:z-index="2247" draw:name="Shape1906" draw:style-name="gr1" draw:text-style-name="P2" svg:width="0.1894in" svg:height="0.113in" svg:x="3.561in" svg:y="2.1756in">
        <draw:text-box>
          <text:p><text:span text:style-name="T4">ppm</text:span></text:p>
        </draw:text-box>
      </draw:frame>
      <draw:frame text:anchor-type="page" text:anchor-page-number="2" draw:z-index="2246" draw:name="Shape476" draw:style-name="gr1" draw:text-style-name="P2" svg:width="0.3685in" svg:height="0.1295in" svg:x="1.7882in" svg:y="4.5484in">
        <draw:text-box>
          <text:p><text:span text:style-name="T1">nebbie.</text:span></text:p>
        </draw:text-box>
      </draw:frame>
      <draw:polygon text:anchor-type="page" text:anchor-page-number="1" draw:z-index="2245" draw:name="Shape147" draw:style-name="gr2" draw:text-style-name="P3" svg:width="2.6583in" svg:height="0.1283in" svg:x="0.4114in" svg:y="4.3398in" svg:viewBox="0 0 6753 327" draw:points="0,0 6753,0 6753,327 0,327">
        <text:p/>
      </draw:polygon>
      <draw:frame text:anchor-type="page" text:anchor-page-number="15" draw:z-index="2244" draw:name="Shape5044" draw:style-name="gr1" draw:text-style-name="P2" svg:width="3.5012in" svg:height="0.1295in" svg:x="0.3634in" svg:y="7.9984in">
        <draw:text-box>
          <text:p><text:span text:style-name="T1">9. Regolamento (UE) 605/2014 del Parlamento Europeo (VI Atp. CLP) </text:span></text:p>
        </draw:text-box>
      </draw:frame>
      <draw:frame text:anchor-type="page" text:anchor-page-number="14" draw:z-index="2243" draw:name="Shape4438" draw:style-name="gr1" draw:text-style-name="P2" svg:width="0.0433in" svg:height="0.1925in" svg:x="0.9717in" svg:y="3.3846in">
        <draw:text-box>
          <text:p><text:span text:style-name="T2"><text:s/></text:span></text:p>
        </draw:text-box>
      </draw:frame>
      <draw:frame text:anchor-type="page" text:anchor-page-number="6" draw:z-index="2242" draw:name="Shape1872" draw:style-name="gr1" draw:text-style-name="P2" svg:width="0.0433in" svg:height="0.1925in" svg:x="2.6764in" svg:y="2.1146in">
        <draw:text-box>
          <text:p><text:span text:style-name="T2"><text:s/></text:span></text:p>
        </draw:text-box>
      </draw:frame>
      <draw:polygon text:anchor-type="page" text:anchor-page-number="1" draw:z-index="2241" draw:name="Shape146" draw:style-name="gr2" draw:text-style-name="P3" svg:width="2.7551in" svg:height="0.6382in" svg:x="0.363in" svg:y="4.3398in" svg:viewBox="0 0 6999 1622" draw:points="0,0 6999,0 6999,1622 0,1622">
        <text:p/>
      </draw:polygon>
      <draw:frame text:anchor-type="page" text:anchor-page-number="2" draw:z-index="2240" draw:name="Shape473" draw:style-name="gr1" draw:text-style-name="P2" svg:width="5.6878in" svg:height="0.1295in" svg:x="1.7882in" svg:y="4.422in">
        <draw:text-box>
          <text:p><text:span text:style-name="T1">Attenzione! In caso di vaporizzazione possono formarsi goccioline respirabili pericolose. Non respirare i vapori o le </text:span></text:p>
        </draw:text-box>
      </draw:frame>
      <draw:frame text:anchor-type="page" text:anchor-page-number="5" draw:z-index="2239" draw:name="Shape1233" draw:style-name="gr1" draw:text-style-name="P2" svg:width="0.0433in" svg:height="0.1925in" svg:x="1.528in" svg:y="6.1492in">
        <draw:text-box>
          <text:p><text:span text:style-name="T2"><text:s/></text:span></text:p>
        </draw:text-box>
      </draw:frame>
      <draw:frame text:anchor-type="page" text:anchor-page-number="4" draw:z-index="2238" draw:name="Shape1100" draw:style-name="gr1" draw:text-style-name="P2" svg:width="0.0433in" svg:height="0.1925in" svg:x="0.3634in" svg:y="10.0764in">
        <draw:text-box>
          <text:p><text:span text:style-name="T2"><text:s/></text:span></text:p>
        </draw:text-box>
      </draw:frame>
      <draw:polygon text:anchor-type="page" text:anchor-page-number="11" draw:z-index="2237" draw:name="Shape3891" draw:style-name="gr2" draw:text-style-name="P3" svg:width="0.6898in" svg:height="0.1917in" svg:x="2.7732in" svg:y="3.398in" svg:viewBox="0 0 1753 488" draw:points="0,0 1753,0 1753,488 0,488">
        <text:p/>
      </draw:polygon>
      <draw:frame text:anchor-type="page" text:anchor-page-number="13" draw:z-index="2236" draw:name="Shape4248" draw:style-name="gr1" draw:text-style-name="P2" svg:width="0.126in" svg:height="0.1295in" svg:x="2.3799in" svg:y="3.9102in">
        <draw:text-box>
          <text:p><text:span text:style-name="T1">75</text:span></text:p>
        </draw:text-box>
      </draw:frame>
      <draw:frame text:anchor-type="page" text:anchor-page-number="15" draw:z-index="2235" draw:name="Shape5043" draw:style-name="gr1" draw:text-style-name="P2" svg:width="3.4697in" svg:height="0.1295in" svg:x="0.3634in" svg:y="7.8701in">
        <draw:text-box>
          <text:p><text:span text:style-name="T1">8. Regolamento (UE) 944/2013 del Parlamento Europeo (V Atp. CLP) </text:span></text:p>
        </draw:text-box>
      </draw:frame>
      <draw:frame text:anchor-type="page" text:anchor-page-number="9" draw:z-index="2234" draw:name="Shape3391" draw:style-name="gr1" draw:text-style-name="P2" svg:width="0.0433in" svg:height="0.1925in" svg:x="0.3634in" svg:y="5.1898in">
        <draw:text-box>
          <text:p><text:span text:style-name="T2"><text:s/></text:span></text:p>
        </draw:text-box>
      </draw:frame>
      <draw:frame text:anchor-type="page" text:anchor-page-number="8" draw:z-index="2233" draw:name="Shape3235" draw:style-name="gr1" draw:text-style-name="P2" svg:width="2.4815in" svg:height="0.1295in" svg:x="0.3634in" svg:y="8.8138in">
        <draw:text-box>
          <text:p><text:span text:style-name="T1">Può sviluppare: ossidi di calcio,ossidi di carbonio. </text:span></text:p>
        </draw:text-box>
      </draw:frame>
      <draw:polygon text:anchor-type="page" text:anchor-page-number="10" draw:z-index="2232" draw:name="Shape3624" draw:style-name="gr2" draw:text-style-name="P3" svg:width="2.265in" svg:height="0.1264in" svg:x="0.4114in" svg:y="7.215in" svg:viewBox="0 0 5754 322" draw:points="0,0 5754,0 5754,322 0,322">
        <text:p/>
      </draw:polygon>
      <draw:frame text:anchor-type="page" text:anchor-page-number="3" draw:z-index="2231" draw:name="Shape799" draw:style-name="gr1" draw:text-style-name="P2" svg:width="0.0433in" svg:height="0.1925in" svg:x="0.411in" svg:y="2.7134in">
        <draw:text-box>
          <text:p><text:span text:style-name="T2"><text:s/></text:span></text:p>
        </draw:text-box>
      </draw:frame>
      <draw:frame text:anchor-type="page" text:anchor-page-number="7" draw:z-index="2230" draw:name="Shape2859" draw:style-name="gr1" draw:text-style-name="P2" svg:width="0.0433in" svg:height="0.1925in" svg:x="4.348in" svg:y="6.2598in">
        <draw:text-box>
          <text:p><text:span text:style-name="T2"><text:s/></text:span></text:p>
        </draw:text-box>
      </draw:frame>
      <draw:frame text:anchor-type="page" text:anchor-page-number="13" draw:z-index="2229" draw:name="Shape4241" draw:style-name="gr1" draw:text-style-name="P2" svg:width="0.0433in" svg:height="0.1925in" svg:x="0.7429in" svg:y="3.8634in">
        <draw:text-box>
          <text:p><text:span text:style-name="T2"><text:s/></text:span></text:p>
        </draw:text-box>
      </draw:frame>
      <draw:frame text:anchor-type="page" text:anchor-page-number="8" draw:z-index="2228" draw:name="Shape3234" draw:style-name="gr1" draw:text-style-name="P2" svg:width="0.0433in" svg:height="0.1925in" svg:x="0.3634in" svg:y="8.6228in">
        <draw:text-box>
          <text:p><text:span text:style-name="T2"><text:s/></text:span></text:p>
        </draw:text-box>
      </draw:frame>
      <draw:polygon text:anchor-type="page" text:anchor-page-number="11" draw:z-index="2227" draw:name="Shape3900" draw:style-name="gr2" draw:text-style-name="P3" svg:width="0.7882in" svg:height="0.3835in" svg:x="2.7248in" svg:y="3.398in" svg:viewBox="0 0 2003 975" draw:points="0,0 2003,0 2003,975 0,975">
        <text:p/>
      </draw:polygon>
      <draw:frame text:anchor-type="page" text:anchor-page-number="1" draw:z-index="2226" draw:name="Shape145" draw:style-name="gr1" draw:text-style-name="P2" svg:width="0.4803in" svg:height="0.1295in" svg:x="6.3165in" svg:y="4.2138in">
        <draw:text-box>
          <text:p><text:span text:style-name="T1">Consumo</text:span></text:p>
        </draw:text-box>
      </draw:frame>
      <draw:polygon text:anchor-type="page" text:anchor-page-number="14" draw:z-index="2225" draw:name="Shape4449" draw:style-name="gr2" draw:text-style-name="P3" svg:width="4.235in" svg:height="0.1283in" svg:x="1.7882in" svg:y="3.4449in" svg:viewBox="0 0 10758 327" draw:points="0,0 10758,0 10758,327 0,327">
        <text:p/>
      </draw:polygon>
      <draw:frame text:anchor-type="page" text:anchor-page-number="3" draw:z-index="2224" draw:name="Shape798" draw:style-name="gr1" draw:text-style-name="P2" svg:width="0.0433in" svg:height="0.1925in" svg:x="7.3016in" svg:y="2.5693in">
        <draw:text-box>
          <text:p><text:span text:style-name="T2"><text:s/></text:span></text:p>
        </draw:text-box>
      </draw:frame>
      <draw:frame text:anchor-type="page" text:anchor-page-number="4" draw:z-index="2223" draw:name="Shape1099" draw:style-name="gr1" draw:text-style-name="P2" svg:width="1.7098in" svg:height="0.1295in" svg:x="0.3634in" svg:y="9.9453in">
        <draw:text-box>
          <text:p><text:span text:style-name="T3">6.4. Riferimento ad altre sezioni </text:span></text:p>
        </draw:text-box>
      </draw:frame>
      <draw:polygon text:anchor-type="page" text:anchor-page-number="2" draw:z-index="2222" draw:name="Shape475" draw:style-name="gr2" draw:text-style-name="P3" svg:width="6.0067in" svg:height="0.1268in" svg:x="1.7882in" svg:y="4.548in" svg:viewBox="0 0 15258 323" draw:points="0,0 15258,0 15258,323 0,323">
        <text:p/>
      </draw:polygon>
      <draw:polygon text:anchor-type="page" text:anchor-page-number="10" draw:z-index="2221" draw:name="Shape3621" draw:style-name="gr2" draw:text-style-name="P3" svg:width="2.3618in" svg:height="0.1913in" svg:x="0.363in" svg:y="7.215in" svg:viewBox="0 0 6000 487" draw:points="0,0 6000,0 6000,487 0,487">
        <text:p/>
      </draw:polygon>
      <draw:polygon text:anchor-type="page" text:anchor-page-number="5" draw:z-index="2220" draw:name="Shape1249" draw:style-name="gr2" draw:text-style-name="P3" svg:width="4.6283in" svg:height="0.1114in" svg:x="2.7732in" svg:y="6.2083in" svg:viewBox="0 0 11757 284" draw:points="0,0 11757,0 11757,284 0,284">
        <text:p/>
      </draw:polygon>
      <draw:polygon text:anchor-type="page" text:anchor-page-number="7" draw:z-index="2219" draw:name="Shape2862" draw:style-name="gr2" draw:text-style-name="P3" svg:width="2.265in" svg:height="0.1283in" svg:x="0.4114in" svg:y="6.448in" svg:viewBox="0 0 5754 327" draw:points="0,0 5754,0 5754,327 0,327">
        <text:p/>
      </draw:polygon>
      <draw:frame text:anchor-type="page" text:anchor-page-number="15" draw:z-index="2218" draw:name="Shape5042" draw:style-name="gr1" draw:text-style-name="P2" svg:width="3.5012in" svg:height="0.1295in" svg:x="0.3634in" svg:y="7.7437in">
        <draw:text-box>
          <text:p><text:span text:style-name="T1">7. Regolamento (UE) 487/2013 del Parlamento Europeo (IV Atp. CLP) </text:span></text:p>
        </draw:text-box>
      </draw:frame>
      <draw:polygon text:anchor-type="page" text:anchor-page-number="6" draw:z-index="2217" draw:name="Shape1905" draw:style-name="gr4" draw:text-style-name="P5" svg:width="0.4933in" svg:height="0.1114in" svg:x="3.5614in" svg:y="2.1732in" svg:viewBox="0 0 1254 284" draw:points="0,0 1254,0 1254,284 0,284">
        <text:p/>
      </draw:polygon>
      <draw:frame text:anchor-type="page" text:anchor-page-number="9" draw:z-index="2216" draw:name="Shape3384" draw:style-name="gr1" draw:text-style-name="P2" svg:width="0.0433in" svg:height="0.1925in" svg:x="4.411in" svg:y="5.0134in">
        <draw:text-box>
          <text:p><text:span text:style-name="T2"><text:s/></text:span></text:p>
        </draw:text-box>
      </draw:frame>
      <draw:polygon text:anchor-type="page" text:anchor-page-number="14" draw:z-index="2215" draw:name="Shape4448" draw:style-name="gr2" draw:text-style-name="P3" svg:width="4.3319in" svg:height="0.1917in" svg:x="1.7398in" svg:y="3.4449in" svg:viewBox="0 0 11004 488" draw:points="0,0 11004,0 11004,488 0,488">
        <text:p/>
      </draw:polygon>
      <draw:polygon text:anchor-type="page" text:anchor-page-number="3" draw:z-index="2214" draw:name="Shape803" draw:style-name="gr2" draw:text-style-name="P3" svg:width="1.8717in" svg:height="0.1283in" svg:x="0.4114in" svg:y="2.7583in" svg:viewBox="0 0 4755 327" draw:points="0,0 4755,0 4755,327 0,327">
        <text:p/>
      </draw:polygon>
      <draw:polygon text:anchor-type="page" text:anchor-page-number="5" draw:z-index="2213" draw:name="Shape1248" draw:style-name="gr2" draw:text-style-name="P3" svg:width="4.7252in" svg:height="0.1114in" svg:x="2.7248in" svg:y="6.2083in" svg:viewBox="0 0 12003 284" draw:points="0,0 12003,0 12003,284 0,284">
        <text:p/>
      </draw:polygon>
      <draw:polygon text:anchor-type="page" text:anchor-page-number="6" draw:z-index="2212" draw:name="Shape1904" draw:style-name="gr4" draw:text-style-name="P5" svg:width="0.5902in" svg:height="0.1917in" svg:x="3.513in" svg:y="2.1732in" svg:viewBox="0 0 1500 488" draw:points="0,0 1500,0 1500,488 0,488">
        <text:p/>
      </draw:polygon>
      <draw:frame text:anchor-type="page" text:anchor-page-number="2" draw:z-index="2211" draw:name="Shape467" draw:style-name="gr1" draw:text-style-name="P2" svg:width="0.0433in" svg:height="0.1925in" svg:x="0.8728in" svg:y="4.3728in">
        <draw:text-box>
          <text:p><text:span text:style-name="T2"><text:s/></text:span></text:p>
        </draw:text-box>
      </draw:frame>
      <draw:polygon text:anchor-type="page" text:anchor-page-number="13" draw:z-index="2210" draw:name="Shape4247" draw:style-name="gr2" draw:text-style-name="P3" svg:width="1.0831in" svg:height="0.1283in" svg:x="2.3799in" svg:y="3.9083in" svg:viewBox="0 0 2752 327" draw:points="0,0 2752,0 2752,327 0,327">
        <text:p/>
      </draw:polygon>
      <draw:frame text:anchor-type="page" text:anchor-page-number="11" draw:z-index="2209" draw:name="Shape3894" draw:style-name="gr1" draw:text-style-name="P2" svg:width="1.4059in" svg:height="0.1295in" svg:x="0.411in" svg:y="3.6555in">
        <draw:text-box>
          <text:p><text:span text:style-name="T1">2H-ISOTIAZOL-3-ONE (3:1)</text:span></text:p>
        </draw:text-box>
      </draw:frame>
      <draw:frame text:anchor-type="page" text:anchor-page-number="8" draw:z-index="2208" draw:name="Shape3233" draw:style-name="gr1" draw:text-style-name="P2" svg:width="1.178in" svg:height="0.1295in" svg:x="0.3634in" svg:y="8.4937in">
        <draw:text-box>
          <text:p><text:span text:style-name="T1">CALCIO CARBONATO </text:span></text:p>
        </draw:text-box>
      </draw:frame>
      <draw:frame text:anchor-type="page" text:anchor-page-number="4" draw:z-index="2207" draw:name="Shape1098" draw:style-name="gr1" draw:text-style-name="P2" svg:width="0.0433in" svg:height="0.1925in" svg:x="0.3634in" svg:y="9.7563in">
        <draw:text-box>
          <text:p><text:span text:style-name="T2"><text:s/></text:span></text:p>
        </draw:text-box>
      </draw:frame>
      <draw:polygon text:anchor-type="page" text:anchor-page-number="7" draw:z-index="2206" draw:name="Shape2861" draw:style-name="gr2" draw:text-style-name="P3" svg:width="2.3618in" svg:height="0.1917in" svg:x="0.363in" svg:y="6.448in" svg:viewBox="0 0 6000 488" draw:points="0,0 6000,0 6000,488 0,488">
        <text:p/>
      </draw:polygon>
      <draw:frame text:anchor-type="page" text:anchor-page-number="10" draw:z-index="2205" draw:name="Shape3615" draw:style-name="gr1" draw:text-style-name="P2" svg:width="0.0433in" svg:height="0.1925in" svg:x="2.7728in" svg:y="6.8346in">
        <draw:text-box>
          <text:p><text:span text:style-name="T2"><text:s/></text:span></text:p>
        </draw:text-box>
      </draw:frame>
      <draw:frame text:anchor-type="page" text:anchor-page-number="15" draw:z-index="2204" draw:name="Shape5041" draw:style-name="gr1" draw:text-style-name="P2" svg:width="3.4886in" svg:height="0.1295in" svg:x="0.3634in" svg:y="7.6154in">
        <draw:text-box>
          <text:p><text:span text:style-name="T1">6. Regolamento (UE) 618/2012 del Parlamento Europeo (III Atp. CLP) </text:span></text:p>
        </draw:text-box>
      </draw:frame>
      <draw:frame text:anchor-type="page" text:anchor-page-number="9" draw:z-index="2203" draw:name="Shape3390" draw:style-name="gr1" draw:text-style-name="P2" svg:width="0.8567in" svg:height="0.1295in" svg:x="3.561in" svg:y="5.0602in">
        <draw:text-box>
          <text:p><text:span text:style-name="T1">&gt; 2.1 mg/l/4h Rat</text:span></text:p>
        </draw:text-box>
      </draw:frame>
      <draw:frame text:anchor-type="page" text:anchor-page-number="1" draw:z-index="2202" draw:name="Shape129" draw:style-name="gr1" draw:text-style-name="P2" svg:width="0.0433in" svg:height="0.1925in" svg:x="5.378in" svg:y="4.1661in">
        <draw:text-box>
          <text:p><text:span text:style-name="T2"><text:s/></text:span></text:p>
        </draw:text-box>
      </draw:frame>
      <draw:frame text:anchor-type="page" text:anchor-page-number="5" draw:z-index="2201" draw:name="Shape1244" draw:style-name="gr1" draw:text-style-name="P2" svg:width="0.3287in" svg:height="0.113in" svg:x="1.198in" svg:y="6.2102in">
        <draw:text-box>
          <text:p><text:span text:style-name="T4">España</text:span></text:p>
        </draw:text-box>
      </draw:frame>
      <draw:frame text:anchor-type="page" text:anchor-page-number="6" draw:z-index="2200" draw:name="Shape1902" draw:style-name="gr1" draw:text-style-name="P2" svg:width="0.2969in" svg:height="0.113in" svg:x="2.3799in" svg:y="2.1756in">
        <draw:text-box>
          <text:p><text:span text:style-name="T4">mg/m3</text:span></text:p>
        </draw:text-box>
      </draw:frame>
      <draw:frame text:anchor-type="page" text:anchor-page-number="7" draw:z-index="2199" draw:name="Shape2845" draw:style-name="gr1" draw:text-style-name="P2" svg:width="0.0433in" svg:height="0.1925in" svg:x="3.428in" svg:y="6.211in">
        <draw:text-box>
          <text:p><text:span text:style-name="T2"><text:s/></text:span></text:p>
        </draw:text-box>
      </draw:frame>
      <draw:polygon text:anchor-type="page" text:anchor-page-number="1" draw:z-index="2198" draw:name="Shape144" draw:style-name="gr5" draw:text-style-name="P6" svg:width="1.4783in" svg:height="0.1283in" svg:x="6.3165in" svg:y="4.2114in" svg:viewBox="0 0 3756 327" draw:points="0,0 3756,0 3756,327 0,327">
        <text:p/>
      </draw:polygon>
      <draw:frame text:anchor-type="page" text:anchor-page-number="15" draw:z-index="2197" draw:name="Shape5040" draw:style-name="gr1" draw:text-style-name="P2" svg:width="3.4488in" svg:height="0.1295in" svg:x="0.3634in" svg:y="7.4866in">
        <draw:text-box>
          <text:p><text:span text:style-name="T1">5. Regolamento (UE) 286/2011 del Parlamento Europeo (II Atp. CLP) </text:span></text:p>
        </draw:text-box>
      </draw:frame>
      <draw:frame text:anchor-type="page" text:anchor-page-number="4" draw:z-index="2196" draw:name="Shape1097" draw:style-name="gr1" draw:text-style-name="P2" svg:width="2.3012in" svg:height="0.1295in" svg:x="0.3634in" svg:y="9.6272in">
        <draw:text-box>
          <text:p><text:span text:style-name="T1">conformemente alle disposizioni del punto 13. </text:span></text:p>
        </draw:text-box>
      </draw:frame>
      <draw:frame text:anchor-type="page" text:anchor-page-number="9" draw:z-index="2195" draw:name="Shape3383" draw:style-name="gr1" draw:text-style-name="P2" svg:width="0.0433in" svg:height="0.1925in" svg:x="2.0835in" svg:y="5.0134in">
        <draw:text-box>
          <text:p><text:span text:style-name="T2"><text:s/></text:span></text:p>
        </draw:text-box>
      </draw:frame>
      <draw:frame text:anchor-type="page" text:anchor-page-number="11" draw:z-index="2194" draw:name="Shape3890" draw:style-name="gr1" draw:text-style-name="P2" svg:width="2.1134in" svg:height="0.1295in" svg:x="0.411in" svg:y="3.5272in">
        <draw:text-box>
          <text:p><text:span text:style-name="T1">METIL-2H-ISOTIAZOL-3-ONE E 2-METIL-</text:span></text:p>
        </draw:text-box>
      </draw:frame>
      <draw:polygon text:anchor-type="page" text:anchor-page-number="3" draw:z-index="2193" draw:name="Shape800" draw:style-name="gr2" draw:text-style-name="P3" svg:width="1.9685in" svg:height="0.1913in" svg:x="0.363in" svg:y="2.7583in" svg:viewBox="0 0 5001 487" draw:points="0,0 5001,0 5001,487 0,487">
        <text:p/>
      </draw:polygon>
      <draw:polygon text:anchor-type="page" text:anchor-page-number="10" draw:z-index="2192" draw:name="Shape3627" draw:style-name="gr2" draw:text-style-name="P3" svg:width="3.8402in" svg:height="0.1917in" svg:x="3.5614in" svg:y="6.8315in" svg:viewBox="0 0 9755 488" draw:points="0,0 9755,0 9755,488 0,488">
        <text:p/>
      </draw:polygon>
      <draw:polygon text:anchor-type="page" text:anchor-page-number="2" draw:z-index="2191" draw:name="Shape472" draw:style-name="gr2" draw:text-style-name="P3" svg:width="6.0067in" svg:height="0.1283in" svg:x="1.7882in" svg:y="4.4197in" svg:viewBox="0 0 15258 327" draw:points="0,0 15258,0 15258,327 0,327">
        <text:p/>
      </draw:polygon>
      <draw:polygon text:anchor-type="page" text:anchor-page-number="13" draw:z-index="2190" draw:name="Shape4246" draw:style-name="gr2" draw:text-style-name="P3" svg:width="1.1815in" svg:height="0.3831in" svg:x="2.3315in" svg:y="3.9083in" svg:viewBox="0 0 3002 974" draw:points="0,0 3002,0 3002,974 0,974">
        <text:p/>
      </draw:polygon>
      <draw:frame text:anchor-type="page" text:anchor-page-number="14" draw:z-index="2189" draw:name="Shape4447" draw:style-name="gr1" draw:text-style-name="P2" svg:width="0.5169in" svg:height="0.113in" svg:x="0.4535in" svg:y="3.4457in">
        <draw:text-box>
          <text:p><text:span text:style-name="T5">Eye Dam. 1</text:span></text:p>
        </draw:text-box>
      </draw:frame>
      <draw:frame text:anchor-type="page" text:anchor-page-number="8" draw:z-index="2188" draw:name="Shape3232" draw:style-name="gr1" draw:text-style-name="P2" svg:width="0.0433in" svg:height="0.1925in" svg:x="0.3634in" svg:y="8.3035in">
        <draw:text-box>
          <text:p><text:span text:style-name="T2"><text:s/></text:span></text:p>
        </draw:text-box>
      </draw:frame>
      <draw:frame text:anchor-type="page" text:anchor-page-number="6" draw:z-index="2187" draw:name="Shape1903" draw:style-name="gr1" draw:text-style-name="P2" svg:width="0.0433in" svg:height="0.1925in" svg:x="1.5917in" svg:y="2.1764in">
        <draw:text-box>
          <text:p><text:span text:style-name="T2"><text:s/></text:span></text:p>
        </draw:text-box>
      </draw:frame>
      <draw:polygon text:anchor-type="page" text:anchor-page-number="2" draw:z-index="2186" draw:name="Shape471" draw:style-name="gr2" draw:text-style-name="P3" svg:width="6.1035in" svg:height="0.2551in" svg:x="1.7398in" svg:y="4.4197in" svg:viewBox="0 0 15504 649" draw:points="0,0 15504,0 15504,649 0,649">
        <text:p/>
      </draw:polygon>
      <draw:frame text:anchor-type="page" text:anchor-page-number="15" draw:z-index="2185" draw:name="Shape5039" draw:style-name="gr1" draw:text-style-name="P2" svg:width="3.426in" svg:height="0.1295in" svg:x="0.3634in" svg:y="7.3602in">
        <draw:text-box>
          <text:p><text:span text:style-name="T1">4. Regolamento (CE) 790/2009 del Parlamento Europeo (I Atp. CLP) </text:span></text:p>
        </draw:text-box>
      </draw:frame>
      <draw:frame text:anchor-type="page" text:anchor-page-number="4" draw:z-index="2184" draw:name="Shape1096" draw:style-name="gr1" draw:text-style-name="P2" svg:width="7.5303in" svg:height="0.1295in" svg:x="0.3634in" svg:y="9.5008in">
        <draw:text-box>
          <text:p><text:span text:style-name="T1">Provvedere <text:s/>ad <text:s/>una <text:s/>sufficiente <text:s/>areazione <text:s/>del <text:s/>luogo <text:s/>interessato <text:s/>dalla <text:s/>perdita. <text:s/>Lo <text:s/>smaltimento <text:s/>del <text:s/>materiale <text:s/>contaminato <text:s/>deve <text:s/>essere <text:s/>effettuato </text:span></text:p>
        </draw:text-box>
      </draw:frame>
      <draw:frame text:anchor-type="page" text:anchor-page-number="14" draw:z-index="2183" draw:name="Shape4437" draw:style-name="gr1" draw:text-style-name="P2" svg:width="0.0433in" svg:height="0.1925in" svg:x="0.411in" svg:y="3.3846in">
        <draw:text-box>
          <text:p><text:span text:style-name="T2"><text:s/></text:span></text:p>
        </draw:text-box>
      </draw:frame>
      <draw:frame text:anchor-type="page" text:anchor-page-number="8" draw:z-index="2182" draw:name="Shape3231" draw:style-name="gr1" draw:text-style-name="P2" svg:width="2.3378in" svg:height="0.1295in" svg:x="0.3634in" svg:y="8.172in">
        <draw:text-box>
          <text:p><text:span text:style-name="T3">10.6. Prodotti di decomposizione pericolosi </text:span></text:p>
        </draw:text-box>
      </draw:frame>
      <draw:polygon text:anchor-type="page" text:anchor-page-number="10" draw:z-index="2181" draw:name="Shape3626" draw:style-name="gr2" draw:text-style-name="P3" svg:width="3.937in" svg:height="0.3835in" svg:x="3.513in" svg:y="6.8315in" svg:viewBox="0 0 10001 975" draw:points="0,0 10001,0 10001,975 0,975">
        <text:p/>
      </draw:polygon>
      <draw:polygon text:anchor-type="page" text:anchor-page-number="1" draw:z-index="2180" draw:name="Shape143" draw:style-name="gr5" draw:text-style-name="P6" svg:width="1.5752in" svg:height="0.1283in" svg:x="6.2681in" svg:y="4.2114in" svg:viewBox="0 0 4002 327" draw:points="0,0 4002,0 4002,327 0,327">
        <text:p/>
      </draw:polygon>
      <draw:frame text:anchor-type="page" text:anchor-page-number="5" draw:z-index="2179" draw:name="Shape1232" draw:style-name="gr1" draw:text-style-name="P2" svg:width="0.0433in" svg:height="0.1925in" svg:x="0.648in" svg:y="6.1492in">
        <draw:text-box>
          <text:p><text:span text:style-name="T2"><text:s/></text:span></text:p>
        </draw:text-box>
      </draw:frame>
      <draw:frame text:anchor-type="page" text:anchor-page-number="3" draw:z-index="2178" draw:name="Shape797" draw:style-name="gr1" draw:text-style-name="P2" svg:width="0.0433in" svg:height="0.1925in" svg:x="3.3634in" svg:y="2.5693in">
        <draw:text-box>
          <text:p><text:span text:style-name="T2"><text:s/></text:span></text:p>
        </draw:text-box>
      </draw:frame>
      <draw:polygon text:anchor-type="page" text:anchor-page-number="9" draw:z-index="2177" draw:name="Shape3389" draw:style-name="gr2" draw:text-style-name="P3" svg:width="3.8402in" svg:height="0.1283in" svg:x="3.5614in" svg:y="5.0583in" svg:viewBox="0 0 9755 327" draw:points="0,0 9755,0 9755,327 0,327">
        <text:p/>
      </draw:polygon>
      <draw:frame text:anchor-type="page" text:anchor-page-number="13" draw:z-index="2176" draw:name="Shape4245" draw:style-name="gr1" draw:text-style-name="P2" svg:width="0.2941in" svg:height="0.1295in" svg:x="0.4535in" svg:y="3.9102in">
        <draw:text-box>
          <text:p><text:span text:style-name="T1">Punto</text:span></text:p>
        </draw:text-box>
      </draw:frame>
      <draw:polygon text:anchor-type="page" text:anchor-page-number="7" draw:z-index="2175" draw:name="Shape2858" draw:style-name="gr2" draw:text-style-name="P3" svg:width="2.265in" svg:height="0.1917in" svg:x="4.348in" svg:y="6.2563in" svg:viewBox="0 0 5754 488" draw:points="0,0 5754,0 5754,488 0,488">
        <text:p/>
      </draw:polygon>
      <draw:polygon text:anchor-type="page" text:anchor-page-number="11" draw:z-index="2174" draw:name="Shape3893" draw:style-name="gr2" draw:text-style-name="P3" svg:width="2.265in" svg:height="0.1283in" svg:x="0.4114in" svg:y="3.6531in" svg:viewBox="0 0 5754 327" draw:points="0,0 5754,0 5754,327 0,327">
        <text:p/>
      </draw:polygon>
      <draw:polygon text:anchor-type="page" text:anchor-page-number="7" draw:z-index="2173" draw:name="Shape2857" draw:style-name="gr2" draw:text-style-name="P3" svg:width="2.363in" svg:height="0.1917in" svg:x="4.3in" svg:y="6.2563in" svg:viewBox="0 0 6003 488" draw:points="0,0 6003,0 6003,488 0,488">
        <text:p/>
      </draw:polygon>
      <draw:frame text:anchor-type="page" text:anchor-page-number="2" draw:z-index="2172" draw:name="Shape470" draw:style-name="gr1" draw:text-style-name="P2" svg:width="0.4185in" svg:height="0.1295in" svg:x="0.4535in" svg:y="4.4201in">
        <draw:text-box>
          <text:p><text:span text:style-name="T3">EUH211</text:span></text:p>
        </draw:text-box>
      </draw:frame>
      <draw:polygon text:anchor-type="page" text:anchor-page-number="6" draw:z-index="2171" draw:name="Shape1901" draw:style-name="gr4" draw:text-style-name="P5" svg:width="1.0831in" svg:height="0.1114in" svg:x="2.3799in" svg:y="2.1732in" svg:viewBox="0 0 2752 284" draw:points="0,0 2752,0 2752,284 0,284">
        <text:p/>
      </draw:polygon>
      <draw:frame text:anchor-type="page" text:anchor-page-number="11" draw:z-index="2170" draw:name="Shape3886" draw:style-name="gr1" draw:text-style-name="P2" svg:width="1.9713in" svg:height="0.1295in" svg:x="0.4535in" svg:y="3.3984in">
        <draw:text-box>
          <text:p><text:span text:style-name="T1">MASSA DI REAZIONE DI 5-CLORO-2- </text:span></text:p>
        </draw:text-box>
      </draw:frame>
      <draw:frame text:anchor-type="page" text:anchor-page-number="13" draw:z-index="2169" draw:name="Shape4240" draw:style-name="gr1" draw:text-style-name="P2" svg:width="0.0433in" svg:height="0.1925in" svg:x="0.411in" svg:y="3.8634in">
        <draw:text-box>
          <text:p><text:span text:style-name="T2"><text:s/></text:span></text:p>
        </draw:text-box>
      </draw:frame>
      <draw:frame text:anchor-type="page" text:anchor-page-number="8" draw:z-index="2168" draw:name="Shape3230" draw:style-name="gr1" draw:text-style-name="P2" svg:width="0.0433in" svg:height="0.1925in" svg:x="0.3634in" svg:y="7.9846in">
        <draw:text-box>
          <text:p><text:span text:style-name="T2"><text:s/></text:span></text:p>
        </draw:text-box>
      </draw:frame>
      <draw:polygon text:anchor-type="page" text:anchor-page-number="3" draw:z-index="2167" draw:name="Shape802" draw:style-name="gr2" draw:text-style-name="P3" svg:width="0.2965in" svg:height="0.1917in" svg:x="7.3016in" svg:y="2.5665in" svg:viewBox="0 0 754 488" draw:points="0,0 754,0 754,488 0,488">
        <text:p/>
      </draw:polygon>
      <draw:frame text:anchor-type="page" text:anchor-page-number="14" draw:z-index="2166" draw:name="Shape4436" draw:style-name="gr1" draw:text-style-name="P2" svg:width="0.0433in" svg:height="0.1925in" svg:x="6.1193in" svg:y="3.2563in">
        <draw:text-box>
          <text:p><text:span text:style-name="T2"><text:s/></text:span></text:p>
        </draw:text-box>
      </draw:frame>
      <draw:frame text:anchor-type="page" text:anchor-page-number="1" draw:z-index="2165" draw:name="Shape142" draw:style-name="gr1" draw:text-style-name="P2" svg:width="0.6421in" svg:height="0.1295in" svg:x="4.7417in" svg:y="4.2138in">
        <draw:text-box>
          <text:p><text:span text:style-name="T1">Professionali</text:span></text:p>
        </draw:text-box>
      </draw:frame>
      <draw:frame text:anchor-type="page" text:anchor-page-number="10" draw:z-index="2164" draw:name="Shape3617" draw:style-name="gr1" draw:text-style-name="P2" svg:width="0.0433in" svg:height="0.1925in" svg:x="1.8063in" svg:y="7.0417in">
        <draw:text-box>
          <text:p><text:span text:style-name="T2"><text:s/></text:span></text:p>
        </draw:text-box>
      </draw:frame>
      <draw:frame text:anchor-type="page" text:anchor-page-number="4" draw:z-index="2163" draw:name="Shape1095" draw:style-name="gr1" draw:text-style-name="P2" svg:width="2.7421in" svg:height="0.1295in" svg:x="0.3634in" svg:y="9.372in">
        <draw:text-box>
          <text:p><text:span text:style-name="T1">Assorbire il rimanente con materiale assorbente inerte. </text:span></text:p>
        </draw:text-box>
      </draw:frame>
      <draw:polygon text:anchor-type="page" text:anchor-page-number="9" draw:z-index="2162" draw:name="Shape3388" draw:style-name="gr2" draw:text-style-name="P3" svg:width="3.937in" svg:height="0.1283in" svg:x="3.513in" svg:y="5.0583in" svg:viewBox="0 0 10001 327" draw:points="0,0 10001,0 10001,327 0,327">
        <text:p/>
      </draw:polygon>
      <draw:frame text:anchor-type="page" text:anchor-page-number="15" draw:z-index="2161" draw:name="Shape5038" draw:style-name="gr1" draw:text-style-name="P2" svg:width="3.0531in" svg:height="0.1295in" svg:x="0.3634in" svg:y="7.2319in">
        <draw:text-box>
          <text:p><text:span text:style-name="T1">3. Regolamento (UE) 2020/878 (All. II Regolamento REACH) </text:span></text:p>
        </draw:text-box>
      </draw:frame>
      <draw:polygon text:anchor-type="page" text:anchor-page-number="5" draw:z-index="2160" draw:name="Shape1239" draw:style-name="gr2" draw:text-style-name="P3" svg:width="1.4783in" svg:height="0.1114in" svg:x="1.198in" svg:y="6.2083in" svg:viewBox="0 0 3756 284" draw:points="0,0 3756,0 3756,284 0,284">
        <text:p/>
      </draw:polygon>
      <draw:polygon text:anchor-type="page" text:anchor-page-number="10" draw:z-index="2159" draw:name="Shape3614" draw:style-name="gr2" draw:text-style-name="P3" svg:width="0.6898in" svg:height="0.1917in" svg:x="2.7732in" svg:y="6.8315in" svg:viewBox="0 0 1753 488" draw:points="0,0 1753,0 1753,488 0,488">
        <text:p/>
      </draw:polygon>
      <draw:frame text:anchor-type="page" text:anchor-page-number="13" draw:z-index="2158" draw:name="Shape4239" draw:style-name="gr1" draw:text-style-name="P2" svg:width="0.0433in" svg:height="0.1925in" svg:x="0.3634in" svg:y="3.7193in">
        <draw:text-box>
          <text:p><text:span text:style-name="T2"><text:s/></text:span></text:p>
        </draw:text-box>
      </draw:frame>
      <draw:polygon text:anchor-type="page" text:anchor-page-number="11" draw:z-index="2157" draw:name="Shape3889" draw:style-name="gr2" draw:text-style-name="P3" svg:width="2.265in" svg:height="0.1283in" svg:x="0.4114in" svg:y="3.5248in" svg:viewBox="0 0 5754 327" draw:points="0,0 5754,0 5754,327 0,327">
        <text:p/>
      </draw:polygon>
      <draw:frame text:anchor-type="page" text:anchor-page-number="8" draw:z-index="2156" draw:name="Shape3229" draw:style-name="gr1" draw:text-style-name="P2" svg:width="1.226in" svg:height="0.1295in" svg:x="0.3634in" svg:y="7.8555in">
        <draw:text-box>
          <text:p><text:span text:style-name="T1">Incompatibile con: acidi. </text:span></text:p>
        </draw:text-box>
      </draw:frame>
      <draw:frame text:anchor-type="page" text:anchor-page-number="9" draw:z-index="2155" draw:name="Shape3387" draw:style-name="gr1" draw:text-style-name="P2" svg:width="1.6425in" svg:height="0.1295in" svg:x="0.4535in" svg:y="5.0602in">
        <draw:text-box>
          <text:p><text:span text:style-name="T1">LC50 (Inalazione nebbie/polveri):</text:span></text:p>
        </draw:text-box>
      </draw:frame>
      <draw:polygon text:anchor-type="page" text:anchor-page-number="5" draw:z-index="2154" draw:name="Shape1238" draw:style-name="gr2" draw:text-style-name="P3" svg:width="1.5752in" svg:height="0.1114in" svg:x="1.15in" svg:y="6.2083in" svg:viewBox="0 0 4002 284" draw:points="0,0 4002,0 4002,284 0,284">
        <text:p/>
      </draw:polygon>
      <draw:polygon text:anchor-type="page" text:anchor-page-number="3" draw:z-index="2153" draw:name="Shape801" draw:style-name="gr2" draw:text-style-name="P3" svg:width="0.3933in" svg:height="0.1917in" svg:x="7.2531in" svg:y="2.5665in" svg:viewBox="0 0 1000 488" draw:points="0,0 1000,0 1000,488 0,488">
        <text:p/>
      </draw:polygon>
      <draw:frame text:anchor-type="page" text:anchor-page-number="4" draw:z-index="2152" draw:name="Shape1094" draw:style-name="gr1" draw:text-style-name="P2" svg:width="7.7559in" svg:height="0.1295in" svg:x="0.3634in" svg:y="9.2437in">
        <draw:text-box>
          <text:p><text:span text:style-name="T1">Aspirare <text:s/>il <text:s/>prodotto <text:s/>fuoriuscito <text:s/>in <text:s/>recipiente <text:s/>idoneo. <text:s/>Valutare <text:s/>la <text:s/>compatibilità <text:s/>del <text:s/>recipiente <text:s/>da <text:s/>utilizzare <text:s/>con <text:s/>il <text:s/>prodotto, <text:s/>verificando <text:s/>la <text:s/>sezione <text:s/>10. </text:span></text:p>
        </draw:text-box>
      </draw:frame>
      <draw:polygon text:anchor-type="page" text:anchor-page-number="14" draw:z-index="2151" draw:name="Shape4441" draw:style-name="gr2" draw:text-style-name="P3" svg:width="1.2799in" svg:height="0.1114in" svg:x="0.4114in" svg:y="3.4449in" svg:viewBox="0 0 3252 284" draw:points="0,0 3252,0 3252,284 0,284">
        <text:p/>
      </draw:polygon>
      <draw:frame text:anchor-type="page" text:anchor-page-number="2" draw:z-index="2150" draw:name="Shape466" draw:style-name="gr1" draw:text-style-name="P2" svg:width="0.0433in" svg:height="0.1925in" svg:x="0.411in" svg:y="4.3728in">
        <draw:text-box>
          <text:p><text:span text:style-name="T2"><text:s/></text:span></text:p>
        </draw:text-box>
      </draw:frame>
      <draw:frame text:anchor-type="page" text:anchor-page-number="15" draw:z-index="2149" draw:name="Shape5037" draw:style-name="gr1" draw:text-style-name="P2" svg:width="3.2024in" svg:height="0.1295in" svg:x="0.3634in" svg:y="7.1035in">
        <draw:text-box>
          <text:p><text:span text:style-name="T1">2. Regolamento (CE) 1272/2008 del Parlamento Europeo (CLP) </text:span></text:p>
        </draw:text-box>
      </draw:frame>
      <draw:polygon text:anchor-type="page" text:anchor-page-number="6" draw:z-index="2148" draw:name="Shape1900" draw:style-name="gr4" draw:text-style-name="P5" svg:width="1.1815in" svg:height="0.1917in" svg:x="2.3315in" svg:y="2.1732in" svg:viewBox="0 0 3002 488" draw:points="0,0 3002,0 3002,488 0,488">
        <text:p/>
      </draw:polygon>
      <draw:frame text:anchor-type="page" text:anchor-page-number="1" draw:z-index="2147" draw:name="Shape128" draw:style-name="gr1" draw:text-style-name="P2" svg:width="0.0433in" svg:height="0.1925in" svg:x="3.6417in" svg:y="4.1661in">
        <draw:text-box>
          <text:p><text:span text:style-name="T2"><text:s/></text:span></text:p>
        </draw:text-box>
      </draw:frame>
      <draw:frame text:anchor-type="page" text:anchor-page-number="12" draw:z-index="2146" draw:name="Shape4103" draw:style-name="gr1" draw:text-style-name="P2" svg:width="5.498in" svg:height="0.1295in" svg:x="0.3634in" svg:y="9.9638in">
        <draw:text-box>
          <text:p><text:span text:style-name="T1">Restrizioni relative al prodotto o alle sostanze contenute secondo l'Allegato XVII Regolamento (CE) 1907/2006 </text:span></text:p>
        </draw:text-box>
      </draw:frame>
      <draw:frame text:anchor-type="page" text:anchor-page-number="7" draw:z-index="2145" draw:name="Shape2855" draw:style-name="gr1" draw:text-style-name="P2" svg:width="0.6606in" svg:height="0.1295in" svg:x="2.7728in" svg:y="6.2583in">
        <draw:text-box>
          <text:p><text:span text:style-name="T1">liquido denso</text:span></text:p>
        </draw:text-box>
      </draw:frame>
      <draw:polygon text:anchor-type="page" text:anchor-page-number="14" draw:z-index="2144" draw:name="Shape4440" draw:style-name="gr2" draw:text-style-name="P3" svg:width="1.3768in" svg:height="0.1917in" svg:x="0.363in" svg:y="3.4449in" svg:viewBox="0 0 3498 488" draw:points="0,0 3498,0 3498,488 0,488">
        <text:p/>
      </draw:polygon>
      <draw:polygon text:anchor-type="page" text:anchor-page-number="1" draw:z-index="2143" draw:name="Shape141" draw:style-name="gr5" draw:text-style-name="P6" svg:width="1.4783in" svg:height="0.1283in" svg:x="4.7413in" svg:y="4.2114in" svg:viewBox="0 0 3756 327" draw:points="0,0 3756,0 3756,327 0,327">
        <text:p/>
      </draw:polygon>
      <draw:frame text:anchor-type="page" text:anchor-page-number="4" draw:z-index="2142" draw:name="Shape1093" draw:style-name="gr1" draw:text-style-name="P2" svg:width="0.0433in" svg:height="0.1925in" svg:x="0.3634in" svg:y="9.0547in">
        <draw:text-box>
          <text:p><text:span text:style-name="T2"><text:s/></text:span></text:p>
        </draw:text-box>
      </draw:frame>
      <draw:polygon text:anchor-type="page" text:anchor-page-number="12" draw:z-index="2141" draw:name="Shape4104" draw:style-name="gr3" draw:text-style-name="P4" svg:width="5.4319in" svg:height="0.0083in" svg:x="0.363in" svg:y="10.0764in" svg:viewBox="0 0 13798 22" draw:points="0,0 13798,0 13798,22 0,22">
        <text:p/>
      </draw:polygon>
      <draw:frame text:anchor-type="page" text:anchor-page-number="3" draw:z-index="2140" draw:name="Shape778" draw:style-name="gr1" draw:text-style-name="P2" svg:width="0.0433in" svg:height="0.1925in" svg:x="2.5965in" svg:y="2.5217in">
        <draw:text-box>
          <text:p><text:span text:style-name="T2"><text:s/></text:span></text:p>
        </draw:text-box>
      </draw:frame>
      <draw:frame text:anchor-type="page" text:anchor-page-number="11" draw:z-index="2139" draw:name="Shape3883" draw:style-name="gr1" draw:text-style-name="P2" svg:width="0.0433in" svg:height="0.1925in" svg:x="0.411in" svg:y="3.3516in">
        <draw:text-box>
          <text:p><text:span text:style-name="T2"><text:s/></text:span></text:p>
        </draw:text-box>
      </draw:frame>
      <draw:polygon text:anchor-type="page" text:anchor-page-number="13" draw:z-index="2138" draw:name="Shape4244" draw:style-name="gr2" draw:text-style-name="P3" svg:width="1.8717in" svg:height="0.1283in" svg:x="0.4114in" svg:y="3.9083in" svg:viewBox="0 0 4755 327" draw:points="0,0 4755,0 4755,327 0,327">
        <text:p/>
      </draw:polygon>
      <draw:frame text:anchor-type="page" text:anchor-page-number="7" draw:z-index="2137" draw:name="Shape2841" draw:style-name="gr1" draw:text-style-name="P2" svg:width="0.0433in" svg:height="0.1925in" svg:x="1.0335in" svg:y="6.211in">
        <draw:text-box>
          <text:p><text:span text:style-name="T2"><text:s/></text:span></text:p>
        </draw:text-box>
      </draw:frame>
      <draw:polygon text:anchor-type="page" text:anchor-page-number="10" draw:z-index="2136" draw:name="Shape3625" draw:style-name="gr2" draw:text-style-name="P3" svg:width="0.7882in" svg:height="0.3835in" svg:x="2.7248in" svg:y="6.8315in" svg:viewBox="0 0 2003 975" draw:points="0,0 2003,0 2003,975 0,975">
        <text:p/>
      </draw:polygon>
      <draw:frame text:anchor-type="page" text:anchor-page-number="8" draw:z-index="2135" draw:name="Shape3228" draw:style-name="gr1" draw:text-style-name="P2" svg:width="0.0433in" svg:height="0.1925in" svg:x="0.3634in" svg:y="7.6646in">
        <draw:text-box>
          <text:p><text:span text:style-name="T2"><text:s/></text:span></text:p>
        </draw:text-box>
      </draw:frame>
      <draw:frame text:anchor-type="page" text:anchor-page-number="9" draw:z-index="2134" draw:name="Shape3382" draw:style-name="gr1" draw:text-style-name="P2" svg:width="0.0433in" svg:height="0.1925in" svg:x="0.411in" svg:y="5.0134in">
        <draw:text-box>
          <text:p><text:span text:style-name="T2"><text:s/></text:span></text:p>
        </draw:text-box>
      </draw:frame>
      <draw:frame text:anchor-type="page" text:anchor-page-number="15" draw:z-index="2133" draw:name="Shape5036" draw:style-name="gr1" draw:text-style-name="P2" svg:width="3.376in" svg:height="0.1295in" svg:x="0.3634in" svg:y="6.9772in">
        <draw:text-box>
          <text:p><text:span text:style-name="T1">1. Regolamento (CE) 1907/2006 del Parlamento Europeo (REACH) </text:span></text:p>
        </draw:text-box>
      </draw:frame>
      <draw:frame text:anchor-type="page" text:anchor-page-number="6" draw:z-index="2132" draw:name="Shape1897" draw:style-name="gr1" draw:text-style-name="P2" svg:width="0.085in" svg:height="0.1925in" svg:x="0.411in" svg:y="2.1764in">
        <draw:text-box>
          <text:p><text:span text:style-name="T2"><text:s text:c="2"/></text:span></text:p>
        </draw:text-box>
      </draw:frame>
      <draw:frame text:anchor-type="page" text:anchor-page-number="2" draw:z-index="2131" draw:name="Shape465" draw:style-name="gr1" draw:text-style-name="P2" svg:width="0.0433in" svg:height="0.1925in" svg:x="0.3634in" svg:y="4.2311in">
        <draw:text-box>
          <text:p><text:span text:style-name="T2"><text:s/></text:span></text:p>
        </draw:text-box>
      </draw:frame>
      <draw:frame text:anchor-type="page" text:anchor-page-number="5" draw:z-index="2130" draw:name="Shape1243" draw:style-name="gr1" draw:text-style-name="P2" svg:width="0.1949in" svg:height="0.113in" svg:x="0.4535in" svg:y="6.2102in">
        <draw:text-box>
          <text:p><text:span text:style-name="T4">ESP</text:span></text:p>
        </draw:text-box>
      </draw:frame>
      <draw:polygon text:anchor-type="page" text:anchor-page-number="6" draw:z-index="2129" draw:name="Shape1899" draw:style-name="gr4" draw:text-style-name="P5" svg:width="0.6917in" svg:height="0.1917in" svg:x="1.5913in" svg:y="2.1732in" svg:viewBox="0 0 1758 488" draw:points="0,0 1758,0 1758,488 0,488">
        <text:p/>
      </draw:polygon>
      <draw:frame text:anchor-type="page" text:anchor-page-number="11" draw:z-index="2128" draw:name="Shape3882" draw:style-name="gr1" draw:text-style-name="P2" svg:width="0.0433in" svg:height="0.1925in" svg:x="0.3634in" svg:y="3.2098in">
        <draw:text-box>
          <text:p><text:span text:style-name="T2"><text:s/></text:span></text:p>
        </draw:text-box>
      </draw:frame>
      <draw:polygon text:anchor-type="page" text:anchor-page-number="1" draw:z-index="2127" draw:name="Shape139" draw:style-name="gr5" draw:text-style-name="P6" svg:width="1.5748in" svg:height="0.1283in" svg:x="4.6933in" svg:y="4.2114in" svg:viewBox="0 0 4001 327" draw:points="0,0 4001,0 4001,327 0,327">
        <text:p/>
      </draw:polygon>
      <draw:frame text:anchor-type="page" text:anchor-page-number="15" draw:z-index="2126" draw:name="Shape5035" draw:style-name="gr1" draw:text-style-name="P2" svg:width="1.4748in" svg:height="0.1295in" svg:x="0.3634in" svg:y="6.8484in">
        <draw:text-box>
          <text:p><text:span text:style-name="T1">BIBLIOGRAFIA GENERALE: </text:span></text:p>
        </draw:text-box>
      </draw:frame>
      <draw:polygon text:anchor-type="page" text:anchor-page-number="2" draw:z-index="2125" draw:name="Shape469" draw:style-name="gr2" draw:text-style-name="P3" svg:width="1.2799in" svg:height="0.1283in" svg:x="0.4114in" svg:y="4.4197in" svg:viewBox="0 0 3252 327" draw:points="0,0 3252,0 3252,327 0,327">
        <text:p/>
      </draw:polygon>
      <draw:frame text:anchor-type="page" text:anchor-page-number="4" draw:z-index="2124" draw:name="Shape1092" draw:style-name="gr1" draw:text-style-name="P2" svg:width="3.1394in" svg:height="0.1295in" svg:x="0.3634in" svg:y="8.9236in">
        <draw:text-box>
          <text:p><text:span text:style-name="T3">6.3. Metodi e materiali per il contenimento e per la bonifica </text:span></text:p>
        </draw:text-box>
      </draw:frame>
      <draw:polygon text:anchor-type="page" text:anchor-page-number="3" draw:z-index="2123" draw:name="Shape796" draw:style-name="gr2" draw:text-style-name="P3" svg:width="3.8417in" svg:height="0.1917in" svg:x="3.363in" svg:y="2.5665in" svg:viewBox="0 0 9759 488" draw:points="0,0 9759,0 9759,488 0,488">
        <text:p/>
      </draw:polygon>
      <draw:frame text:anchor-type="page" text:anchor-page-number="5" draw:z-index="2122" draw:name="Shape1231" draw:style-name="gr1" draw:text-style-name="P2" svg:width="0.0433in" svg:height="0.1925in" svg:x="0.411in" svg:y="6.1492in">
        <draw:text-box>
          <text:p><text:span text:style-name="T2"><text:s/></text:span></text:p>
        </draw:text-box>
      </draw:frame>
      <draw:frame text:anchor-type="page" text:anchor-page-number="12" draw:z-index="2121" draw:name="Shape4102" draw:style-name="gr1" draw:text-style-name="P2" svg:width="0.0433in" svg:height="0.1925in" svg:x="0.3634in" svg:y="9.7728in">
        <draw:text-box>
          <text:p><text:span text:style-name="T2"><text:s/></text:span></text:p>
        </draw:text-box>
      </draw:frame>
      <draw:polygon text:anchor-type="page" text:anchor-page-number="7" draw:z-index="2120" draw:name="Shape2854" draw:style-name="gr2" draw:text-style-name="P3" svg:width="1.4783in" svg:height="0.1283in" svg:x="2.7732in" svg:y="6.2563in" svg:viewBox="0 0 3756 327" draw:points="0,0 3756,0 3756,327 0,327">
        <text:p/>
      </draw:polygon>
      <draw:polygon text:anchor-type="page" text:anchor-page-number="13" draw:z-index="2119" draw:name="Shape4243" draw:style-name="gr2" draw:text-style-name="P3" svg:width="1.9685in" svg:height="0.3831in" svg:x="0.363in" svg:y="3.9083in" svg:viewBox="0 0 5001 974" draw:points="0,0 5001,0 5001,974 0,974">
        <text:p/>
      </draw:polygon>
      <draw:frame text:anchor-type="page" text:anchor-page-number="9" draw:z-index="2118" draw:name="Shape3381" draw:style-name="gr1" draw:text-style-name="P2" svg:width="0.3976in" svg:height="0.1295in" svg:x="0.3634in" svg:y="4.9319in">
        <draw:text-box>
          <text:p><text:span text:style-name="T1">TALCO </text:span></text:p>
        </draw:text-box>
      </draw:frame>
      <draw:frame text:anchor-type="page" text:anchor-page-number="14" draw:z-index="2117" draw:name="Shape4430" draw:style-name="gr1" draw:text-style-name="P2" svg:width="0.0433in" svg:height="0.1925in" svg:x="3.3693in" svg:y="3.2075in">
        <draw:text-box>
          <text:p><text:span text:style-name="T2"><text:s/></text:span></text:p>
        </draw:text-box>
      </draw:frame>
      <draw:frame text:anchor-type="page" text:anchor-page-number="8" draw:z-index="2116" draw:name="Shape3227" draw:style-name="gr1" draw:text-style-name="P2" svg:width="1.178in" svg:height="0.1295in" svg:x="0.3634in" svg:y="7.5354in">
        <draw:text-box>
          <text:p><text:span text:style-name="T1">CALCIO CARBONATO </text:span></text:p>
        </draw:text-box>
      </draw:frame>
      <draw:frame text:anchor-type="page" text:anchor-page-number="10" draw:z-index="2115" draw:name="Shape3623" draw:style-name="gr1" draw:text-style-name="P2" svg:width="1.4059in" svg:height="0.1295in" svg:x="0.411in" svg:y="7.089in">
        <draw:text-box>
          <text:p><text:span text:style-name="T1">2H-ISOTIAZOL-3-ONE (3:1)</text:span></text:p>
        </draw:text-box>
      </draw:frame>
      <draw:frame text:anchor-type="page" text:anchor-page-number="13" draw:z-index="2114" draw:name="Shape4229" draw:style-name="gr1" draw:text-style-name="P2" svg:width="0.0433in" svg:height="0.1925in" svg:x="4.7098in" svg:y="3.5429in">
        <draw:text-box>
          <text:p><text:span text:style-name="T2"><text:s/></text:span></text:p>
        </draw:text-box>
      </draw:frame>
      <draw:polygon text:anchor-type="page" text:anchor-page-number="2" draw:z-index="2113" draw:name="Shape468" draw:style-name="gr2" draw:text-style-name="P3" svg:width="1.3768in" svg:height="0.2551in" svg:x="0.363in" svg:y="4.4197in" svg:viewBox="0 0 3498 649" draw:points="0,0 3498,0 3498,649 0,649">
        <text:p/>
      </draw:polygon>
      <draw:frame text:anchor-type="page" text:anchor-page-number="12" draw:z-index="2112" draw:name="Shape4101" draw:style-name="gr1" draw:text-style-name="P2" svg:width="2.5559in" svg:height="0.1295in" svg:x="0.3634in" svg:y="9.6437in">
        <draw:text-box>
          <text:p><text:span text:style-name="T1">Categoria Seveso - Direttiva 2012/18/UE: Nessuna </text:span></text:p>
        </draw:text-box>
      </draw:frame>
      <draw:polygon text:anchor-type="page" text:anchor-page-number="9" draw:z-index="2111" draw:name="Shape3386" draw:style-name="gr2" draw:text-style-name="P3" svg:width="3.0516in" svg:height="0.1283in" svg:x="0.4114in" svg:y="5.0583in" svg:viewBox="0 0 7752 327" draw:points="0,0 7752,0 7752,327 0,327">
        <text:p/>
      </draw:polygon>
      <draw:polygon text:anchor-type="page" text:anchor-page-number="7" draw:z-index="2110" draw:name="Shape2853" draw:style-name="gr2" draw:text-style-name="P3" svg:width="1.5752in" svg:height="0.1917in" svg:x="2.7248in" svg:y="6.2563in" svg:viewBox="0 0 4002 488" draw:points="0,0 4002,0 4002,488 0,488">
        <text:p/>
      </draw:polygon>
      <draw:frame text:anchor-type="page" text:anchor-page-number="1" draw:z-index="2109" draw:name="Shape138" draw:style-name="gr1" draw:text-style-name="P2" svg:width="0.4803in" svg:height="0.1295in" svg:x="3.1665in" svg:y="4.2138in">
        <draw:text-box>
          <text:p><text:span text:style-name="T1">Industriali</text:span></text:p>
        </draw:text-box>
      </draw:frame>
      <draw:polygon text:anchor-type="page" text:anchor-page-number="6" draw:z-index="2108" draw:name="Shape1898" draw:style-name="gr4" draw:text-style-name="P5" svg:width="0.7882in" svg:height="0.1917in" svg:x="1.5433in" svg:y="2.1732in" svg:viewBox="0 0 2003 488" draw:points="0,0 2003,0 2003,488 0,488">
        <text:p/>
      </draw:polygon>
      <draw:frame text:anchor-type="page" text:anchor-page-number="10" draw:z-index="2107" draw:name="Shape3613" draw:style-name="gr1" draw:text-style-name="P2" svg:width="2.1134in" svg:height="0.1295in" svg:x="0.411in" svg:y="6.9602in">
        <draw:text-box>
          <text:p><text:span text:style-name="T1">METIL-2H-ISOTIAZOL-3-ONE E 2-METIL-</text:span></text:p>
        </draw:text-box>
      </draw:frame>
      <draw:frame text:anchor-type="page" text:anchor-page-number="5" draw:z-index="2106" draw:name="Shape1230" draw:style-name="gr1" draw:text-style-name="P2" svg:width="0.0433in" svg:height="0.1925in" svg:x="4.9346in" svg:y="6.0374in">
        <draw:text-box>
          <text:p><text:span text:style-name="T2"><text:s/></text:span></text:p>
        </draw:text-box>
      </draw:frame>
      <draw:frame text:anchor-type="page" text:anchor-page-number="8" draw:z-index="2105" draw:name="Shape3226" draw:style-name="gr1" draw:text-style-name="P2" svg:width="0.0433in" svg:height="0.1925in" svg:x="0.3634in" svg:y="7.3445in">
        <draw:text-box>
          <text:p><text:span text:style-name="T2"><text:s/></text:span></text:p>
        </draw:text-box>
      </draw:frame>
      <draw:polygon text:anchor-type="page" text:anchor-page-number="3" draw:z-index="2104" draw:name="Shape795" draw:style-name="gr2" draw:text-style-name="P3" svg:width="3.9382in" svg:height="0.1917in" svg:x="3.315in" svg:y="2.5665in" svg:viewBox="0 0 10004 488" draw:points="0,0 10004,0 10004,488 0,488">
        <text:p/>
      </draw:polygon>
      <draw:frame text:anchor-type="page" text:anchor-page-number="4" draw:z-index="2103" draw:name="Shape1091" draw:style-name="gr1" draw:text-style-name="P2" svg:width="0.0433in" svg:height="0.1925in" svg:x="0.3634in" svg:y="8.7346in">
        <draw:text-box>
          <text:p><text:span text:style-name="T2"><text:s/></text:span></text:p>
        </draw:text-box>
      </draw:frame>
      <draw:polygon text:anchor-type="page" text:anchor-page-number="14" draw:z-index="2102" draw:name="Shape4446" draw:style-name="gr2" draw:text-style-name="P3" svg:width="0.4933in" svg:height="0.1917in" svg:x="6.1197in" svg:y="3.2531in" svg:viewBox="0 0 1254 488" draw:points="0,0 1254,0 1254,488 0,488">
        <text:p/>
      </draw:polygon>
      <draw:polygon text:anchor-type="page" text:anchor-page-number="11" draw:z-index="2101" draw:name="Shape3885" draw:style-name="gr2" draw:text-style-name="P3" svg:width="2.265in" svg:height="0.1268in" svg:x="0.4114in" svg:y="3.398in" svg:viewBox="0 0 5754 323" draw:points="0,0 5754,0 5754,323 0,323">
        <text:p/>
      </draw:polygon>
      <draw:frame text:anchor-type="page" text:anchor-page-number="15" draw:z-index="2100" draw:name="Shape5034" draw:style-name="gr1" draw:text-style-name="P2" svg:width="0.0433in" svg:height="0.1925in" svg:x="0.3634in" svg:y="6.6575in">
        <draw:text-box>
          <text:p><text:span text:style-name="T2"><text:s/></text:span></text:p>
        </draw:text-box>
      </draw:frame>
      <draw:frame text:anchor-type="page" text:anchor-page-number="4" draw:z-index="2099" draw:name="Shape1090" draw:style-name="gr1" draw:text-style-name="P2" svg:width="4.6012in" svg:height="0.1295in" svg:x="0.3634in" svg:y="8.6055in">
        <draw:text-box>
          <text:p><text:span text:style-name="T1">Impedire che il prodotto penetri nelle fognature, nelle acque superficiali, nelle falde freatiche. </text:span></text:p>
        </draw:text-box>
      </draw:frame>
      <draw:polygon text:anchor-type="page" text:anchor-page-number="5" draw:z-index="2098" draw:name="Shape1235" draw:style-name="gr2" draw:text-style-name="P3" svg:width="0.6902in" svg:height="0.1114in" svg:x="0.4114in" svg:y="6.2083in" svg:viewBox="0 0 1754 284" draw:points="0,0 1754,0 1754,284 0,284">
        <text:p/>
      </draw:polygon>
      <draw:frame text:anchor-type="page" text:anchor-page-number="6" draw:z-index="2097" draw:name="Shape1870" draw:style-name="gr1" draw:text-style-name="P2" svg:width="0.0433in" svg:height="0.1925in" svg:x="6.7098in" svg:y="1.9417in">
        <draw:text-box>
          <text:p><text:span text:style-name="T2"><text:s/></text:span></text:p>
        </draw:text-box>
      </draw:frame>
      <draw:frame text:anchor-type="page" text:anchor-page-number="1" draw:z-index="2096" draw:name="Shape127" draw:style-name="gr1" draw:text-style-name="P2" svg:width="0.0433in" svg:height="0.1925in" svg:x="1.1453in" svg:y="4.1661in">
        <draw:text-box>
          <text:p><text:span text:style-name="T2"><text:s/></text:span></text:p>
        </draw:text-box>
      </draw:frame>
      <draw:polygon text:anchor-type="page" text:anchor-page-number="9" draw:z-index="2095" draw:name="Shape3385" draw:style-name="gr2" draw:text-style-name="P3" svg:width="3.1504in" svg:height="0.1283in" svg:x="0.363in" svg:y="5.0583in" svg:viewBox="0 0 8003 327" draw:points="0,0 8003,0 8003,327 0,327">
        <text:p/>
      </draw:polygon>
      <draw:polygon text:anchor-type="page" text:anchor-page-number="10" draw:z-index="2094" draw:name="Shape3622" draw:style-name="gr2" draw:text-style-name="P3" svg:width="2.265in" svg:height="0.1283in" svg:x="0.4114in" svg:y="7.0866in" svg:viewBox="0 0 5754 327" draw:points="0,0 5754,0 5754,327 0,327">
        <text:p/>
      </draw:polygon>
      <draw:frame text:anchor-type="page" text:anchor-page-number="7" draw:z-index="2093" draw:name="Shape2851" draw:style-name="gr1" draw:text-style-name="P2" svg:width="0.5858in" svg:height="0.1295in" svg:x="0.4535in" svg:y="6.2583in">
        <draw:text-box>
          <text:p><text:span text:style-name="T1">Stato Fisico</text:span></text:p>
        </draw:text-box>
      </draw:frame>
      <draw:frame text:anchor-type="page" text:anchor-page-number="2" draw:z-index="2092" draw:name="Shape456" draw:style-name="gr1" draw:text-style-name="P2" svg:width="0.0433in" svg:height="0.1925in" svg:x="4.1717in" svg:y="4.0547in">
        <draw:text-box>
          <text:p><text:span text:style-name="T2"><text:s/></text:span></text:p>
        </draw:text-box>
      </draw:frame>
      <draw:frame text:anchor-type="page" text:anchor-page-number="12" draw:z-index="2091" draw:name="Shape4100" draw:style-name="gr1" draw:text-style-name="P2" svg:width="0.0433in" svg:height="0.1925in" svg:x="0.3634in" svg:y="9.4535in">
        <draw:text-box>
          <text:p><text:span text:style-name="T2"><text:s/></text:span></text:p>
        </draw:text-box>
      </draw:frame>
      <draw:polygon text:anchor-type="page" text:anchor-page-number="11" draw:z-index="2090" draw:name="Shape3884" draw:style-name="gr2" draw:text-style-name="P3" svg:width="2.3618in" svg:height="0.3835in" svg:x="0.363in" svg:y="3.398in" svg:viewBox="0 0 6000 975" draw:points="0,0 6000,0 6000,975 0,975">
        <text:p/>
      </draw:polygon>
      <draw:frame text:anchor-type="page" text:anchor-page-number="13" draw:z-index="2089" draw:name="Shape4238" draw:style-name="gr1" draw:text-style-name="P2" svg:width="1.1469in" svg:height="0.1295in" svg:x="3.561in" svg:y="3.5902in">
        <draw:text-box>
          <text:p><text:span text:style-name="T1">CALCIO CARBONATO</text:span></text:p>
        </draw:text-box>
      </draw:frame>
      <draw:frame text:anchor-type="page" text:anchor-page-number="15" draw:z-index="2088" draw:name="Shape5033" draw:style-name="gr1" draw:text-style-name="P2" svg:width="0.0433in" svg:height="0.1925in" svg:x="0.3634in" svg:y="6.4661in">
        <draw:text-box>
          <text:p><text:span text:style-name="T2"><text:s/></text:span></text:p>
        </draw:text-box>
      </draw:frame>
      <draw:frame text:anchor-type="page" text:anchor-page-number="8" draw:z-index="2087" draw:name="Shape3225" draw:style-name="gr1" draw:text-style-name="P2" svg:width="1.4862in" svg:height="0.1295in" svg:x="0.3634in" svg:y="7.2138in">
        <draw:text-box>
          <text:p><text:span text:style-name="T3">10.5. Materiali incompatibili </text:span></text:p>
        </draw:text-box>
      </draw:frame>
      <draw:frame text:anchor-type="page" text:anchor-page-number="3" draw:z-index="2086" draw:name="Shape791" draw:style-name="gr1" draw:text-style-name="P2" svg:width="0.2189in" svg:height="0.1295in" svg:x="2.3799in" svg:y="2.5689in">
        <draw:text-box>
          <text:p><text:span text:style-name="T1">2.82</text:span></text:p>
        </draw:text-box>
      </draw:frame>
      <draw:polygon text:anchor-type="page" text:anchor-page-number="14" draw:z-index="2085" draw:name="Shape4445" draw:style-name="gr2" draw:text-style-name="P3" svg:width="0.5898in" svg:height="0.1917in" svg:x="6.0717in" svg:y="3.2531in" svg:viewBox="0 0 1499 488" draw:points="0,0 1499,0 1499,488 0,488">
        <text:p/>
      </draw:polygon>
      <draw:frame text:anchor-type="page" text:anchor-page-number="10" draw:z-index="2084" draw:name="Shape3611" draw:style-name="gr1" draw:text-style-name="P2" svg:width="1.9713in" svg:height="0.1295in" svg:x="0.4535in" svg:y="6.8339in">
        <draw:text-box>
          <text:p><text:span text:style-name="T1">MASSA DI REAZIONE DI 5-CLORO-2- </text:span></text:p>
        </draw:text-box>
      </draw:frame>
      <draw:frame text:anchor-type="page" text:anchor-page-number="12" draw:z-index="2083" draw:name="Shape4096" draw:style-name="gr1" draw:text-style-name="P2" svg:width="0.0433in" svg:height="0.1925in" svg:x="6.5681in" svg:y="9.2752in">
        <draw:text-box>
          <text:p><text:span text:style-name="T2"><text:s/></text:span></text:p>
        </draw:text-box>
      </draw:frame>
      <draw:frame text:anchor-type="page" text:anchor-page-number="11" draw:z-index="2082" draw:name="Shape3881" draw:style-name="gr1" draw:text-style-name="P2" svg:width="1.7161in" svg:height="0.1295in" svg:x="0.3634in" svg:y="3.0783in">
        <draw:text-box>
          <text:p><text:span text:style-name="T3">12.3. Potenziale di bioaccumulo </text:span></text:p>
        </draw:text-box>
      </draw:frame>
      <draw:frame text:anchor-type="page" text:anchor-page-number="4" draw:z-index="2081" draw:name="Shape1089" draw:style-name="gr1" draw:text-style-name="P2" svg:width="0.0433in" svg:height="0.1925in" svg:x="0.3634in" svg:y="8.4161in">
        <draw:text-box>
          <text:p><text:span text:style-name="T2"><text:s/></text:span></text:p>
        </draw:text-box>
      </draw:frame>
      <draw:polygon text:anchor-type="page" text:anchor-page-number="6" draw:z-index="2080" draw:name="Shape1896" draw:style-name="gr4" draw:text-style-name="P5" svg:width="1.0835in" svg:height="0.1917in" svg:x="0.4114in" svg:y="2.1732in" svg:viewBox="0 0 2753 488" draw:points="0,0 2753,0 2753,488 0,488">
        <text:p/>
      </draw:polygon>
      <draw:frame text:anchor-type="page" text:anchor-page-number="8" draw:z-index="2079" draw:name="Shape3224" draw:style-name="gr1" draw:text-style-name="P2" svg:width="0.0433in" svg:height="0.1925in" svg:x="0.3634in" svg:y="7.0264in">
        <draw:text-box>
          <text:p><text:span text:style-name="T2"><text:s/></text:span></text:p>
        </draw:text-box>
      </draw:frame>
      <draw:frame text:anchor-type="page" text:anchor-page-number="14" draw:z-index="2078" draw:name="Shape4444" draw:style-name="gr1" draw:text-style-name="P2" svg:width="1.5925in" svg:height="0.1295in" svg:x="1.7882in" svg:y="3.2555in">
        <draw:text-box>
          <text:p><text:span text:style-name="T1">Corrosione cutanea, categoria 1</text:span></text:p>
        </draw:text-box>
      </draw:frame>
      <draw:frame text:anchor-type="page" text:anchor-page-number="7" draw:z-index="2077" draw:name="Shape2840" draw:style-name="gr1" draw:text-style-name="P2" svg:width="0.0433in" svg:height="0.1925in" svg:x="0.411in" svg:y="6.211in">
        <draw:text-box>
          <text:p><text:span text:style-name="T2"><text:s/></text:span></text:p>
        </draw:text-box>
      </draw:frame>
      <draw:polygon text:anchor-type="page" text:anchor-page-number="1" draw:z-index="2076" draw:name="Shape137" draw:style-name="gr5" draw:text-style-name="P6" svg:width="1.4783in" svg:height="0.1283in" svg:x="3.1665in" svg:y="4.2114in" svg:viewBox="0 0 3756 327" draw:points="0,0 3756,0 3756,327 0,327">
        <text:p/>
      </draw:polygon>
      <draw:polygon text:anchor-type="page" text:anchor-page-number="5" draw:z-index="2075" draw:name="Shape1242" draw:style-name="gr2" draw:text-style-name="P3" svg:width="0.7866in" svg:height="0.1114in" svg:x="0.363in" svg:y="6.2083in" svg:viewBox="0 0 1999 284" draw:points="0,0 1999,0 1999,284 0,284">
        <text:p/>
      </draw:polygon>
      <draw:frame text:anchor-type="page" text:anchor-page-number="13" draw:z-index="2074" draw:name="Shape4228" draw:style-name="gr1" draw:text-style-name="P2" svg:width="0.0433in" svg:height="0.1925in" svg:x="2.5035in" svg:y="3.5429in">
        <draw:text-box>
          <text:p><text:span text:style-name="T2"><text:s/></text:span></text:p>
        </draw:text-box>
      </draw:frame>
      <draw:frame text:anchor-type="page" text:anchor-page-number="9" draw:z-index="2073" draw:name="Shape3380" draw:style-name="gr1" draw:text-style-name="P2" svg:width="0.0433in" svg:height="0.1925in" svg:x="0.3634in" svg:y="4.7429in">
        <draw:text-box>
          <text:p><text:span text:style-name="T2"><text:s/></text:span></text:p>
        </draw:text-box>
      </draw:frame>
      <draw:frame text:anchor-type="page" text:anchor-page-number="2" draw:z-index="2072" draw:name="Shape464" draw:style-name="gr1" draw:text-style-name="P2" svg:width="2.4004in" svg:height="0.1295in" svg:x="1.7882in" svg:y="4.102in">
        <draw:text-box>
          <text:p><text:span text:style-name="T1">Scheda dati di sicurezza disponibile su richiesta.</text:span></text:p>
        </draw:text-box>
      </draw:frame>
      <draw:frame text:anchor-type="page" text:anchor-page-number="15" draw:z-index="2071" draw:name="Shape5032" draw:style-name="gr1" draw:text-style-name="P2" svg:width="2.624in" svg:height="0.1295in" svg:x="0.3634in" svg:y="6.3362in">
        <draw:text-box>
          <text:p><text:span text:style-name="T1">- WGK: Classe di pericolosità acquatica (Germania). </text:span></text:p>
        </draw:text-box>
      </draw:frame>
      <draw:frame text:anchor-type="page" text:anchor-page-number="3" draw:z-index="2070" draw:name="Shape776" draw:style-name="gr1" draw:text-style-name="P2" svg:width="0.0433in" svg:height="0.1925in" svg:x="0.9228in" svg:y="2.5217in">
        <draw:text-box>
          <text:p><text:span text:style-name="T2"><text:s/></text:span></text:p>
        </draw:text-box>
      </draw:frame>
      <draw:frame text:anchor-type="page" text:anchor-page-number="5" draw:z-index="2069" draw:name="Shape1241" draw:style-name="gr1" draw:text-style-name="P2" svg:width="2.1406in" svg:height="0.113in" svg:x="2.7728in" svg:y="6.0984in">
        <draw:text-box>
          <text:p><text:span text:style-name="T4">gesundheitsschädlicher Arbeitsstoffe Mitteilung 58</text:span></text:p>
        </draw:text-box>
      </draw:frame>
      <draw:frame text:anchor-type="page" text:anchor-page-number="7" draw:z-index="2068" draw:name="Shape2836" draw:style-name="gr1" draw:text-style-name="P2" svg:width="0.0433in" svg:height="0.1925in" svg:x="5.0083in" svg:y="6.0811in">
        <draw:text-box>
          <text:p><text:span text:style-name="T2"><text:s/></text:span></text:p>
        </draw:text-box>
      </draw:frame>
      <draw:polygon text:anchor-type="page" text:anchor-page-number="1" draw:z-index="2067" draw:name="Shape136" draw:style-name="gr5" draw:text-style-name="P6" svg:width="1.5752in" svg:height="0.1283in" svg:x="3.1181in" svg:y="4.2114in" svg:viewBox="0 0 4002 327" draw:points="0,0 4002,0 4002,327 0,327">
        <text:p/>
      </draw:polygon>
      <draw:frame text:anchor-type="page" text:anchor-page-number="4" draw:z-index="2066" draw:name="Shape1088" draw:style-name="gr1" draw:text-style-name="P2" svg:width="1.4622in" svg:height="0.1295in" svg:x="0.3634in" svg:y="8.2854in">
        <draw:text-box>
          <text:p><text:span text:style-name="T3">6.2. Precauzioni ambientali </text:span></text:p>
        </draw:text-box>
      </draw:frame>
      <draw:frame text:anchor-type="page" text:anchor-page-number="11" draw:z-index="2065" draw:name="Shape3869" draw:style-name="gr1" draw:text-style-name="P2" svg:width="0.0433in" svg:height="0.1925in" svg:x="4.2417in" svg:y="2.8417in">
        <draw:text-box>
          <text:p><text:span text:style-name="T2"><text:s/></text:span></text:p>
        </draw:text-box>
      </draw:frame>
      <draw:polygon text:anchor-type="page" text:anchor-page-number="10" draw:z-index="2064" draw:name="Shape3612" draw:style-name="gr2" draw:text-style-name="P3" svg:width="2.265in" svg:height="0.1268in" svg:x="0.4114in" svg:y="6.9598in" svg:viewBox="0 0 5754 323" draw:points="0,0 5754,0 5754,323 0,323">
        <text:p/>
      </draw:polygon>
      <draw:polygon text:anchor-type="page" text:anchor-page-number="6" draw:z-index="2063" draw:name="Shape1895" draw:style-name="gr4" draw:text-style-name="P5" svg:width="1.1803in" svg:height="0.1917in" svg:x="0.363in" svg:y="2.1732in" svg:viewBox="0 0 2999 488" draw:points="0,0 2999,0 2999,488 0,488">
        <text:p/>
      </draw:polygon>
      <draw:frame text:anchor-type="page" text:anchor-page-number="8" draw:z-index="2062" draw:name="Shape3223" draw:style-name="gr1" draw:text-style-name="P2" svg:width="4.5823in" svg:height="0.1295in" svg:x="0.3634in" svg:y="6.8972in">
        <draw:text-box>
          <text:p><text:span text:style-name="T1">Nessuna in particolare. Attenersi tuttavia alle usuali cautele nei confronti dei prodotti chimici. </text:span></text:p>
        </draw:text-box>
      </draw:frame>
      <draw:polygon text:anchor-type="page" text:anchor-page-number="3" draw:z-index="2061" draw:name="Shape790" draw:style-name="gr2" draw:text-style-name="P3" svg:width="0.8866in" svg:height="0.1283in" svg:x="2.3799in" svg:y="2.5665in" svg:viewBox="0 0 2253 327" draw:points="0,0 2253,0 2253,327 0,327">
        <text:p/>
      </draw:polygon>
      <draw:frame text:anchor-type="page" text:anchor-page-number="14" draw:z-index="2060" draw:name="Shape4424" draw:style-name="gr1" draw:text-style-name="P2" svg:width="0.0433in" svg:height="0.1925in" svg:x="0.998in" svg:y="3.1929in">
        <draw:text-box>
          <text:p><text:span text:style-name="T2"><text:s/></text:span></text:p>
        </draw:text-box>
      </draw:frame>
      <draw:polygon text:anchor-type="page" text:anchor-page-number="13" draw:z-index="2059" draw:name="Shape4237" draw:style-name="gr2" draw:text-style-name="P3" svg:width="1.8717in" svg:height="0.1268in" svg:x="3.5614in" svg:y="3.5898in" svg:viewBox="0 0 4755 323" draw:points="0,0 4755,0 4755,323 0,323">
        <text:p/>
      </draw:polygon>
      <draw:frame text:anchor-type="page" text:anchor-page-number="9" draw:z-index="2058" draw:name="Shape3373" draw:style-name="gr1" draw:text-style-name="P2" svg:width="0.0433in" svg:height="0.1925in" svg:x="5.8953in" svg:y="4.5661in">
        <draw:text-box>
          <text:p><text:span text:style-name="T2"><text:s/></text:span></text:p>
        </draw:text-box>
      </draw:frame>
      <draw:frame text:anchor-type="page" text:anchor-page-number="12" draw:z-index="2057" draw:name="Shape4097" draw:style-name="gr1" draw:text-style-name="P2" svg:width="6.1539in" svg:height="0.1295in" svg:x="0.4535in" svg:y="9.322in">
        <draw:text-box>
          <text:p><text:span text:style-name="T3">15.1. Disposizioni legislative e regolamentari su salute, sicurezza e ambiente specifiche per la sostanza o la miscela</text:span></text:p>
        </draw:text-box>
      </draw:frame>
      <draw:frame text:anchor-type="page" text:anchor-page-number="2" draw:z-index="2056" draw:name="Shape455" draw:style-name="gr1" draw:text-style-name="P2" svg:width="0.0433in" svg:height="0.1925in" svg:x="0.8728in" svg:y="4.0535in">
        <draw:text-box>
          <text:p><text:span text:style-name="T2"><text:s/></text:span></text:p>
        </draw:text-box>
      </draw:frame>
      <draw:frame text:anchor-type="page" text:anchor-page-number="15" draw:z-index="2055" draw:name="Shape5031" draw:style-name="gr1" draw:text-style-name="P2" svg:width="2.0524in" svg:height="0.1295in" svg:x="0.3634in" svg:y="6.2098in">
        <draw:text-box>
          <text:p><text:span text:style-name="T1">- vPvM: Molto persistente e molto mobile </text:span></text:p>
        </draw:text-box>
      </draw:frame>
      <draw:frame text:anchor-type="page" text:anchor-page-number="15" draw:z-index="2054" draw:name="Shape5030" draw:style-name="gr1" draw:text-style-name="P2" svg:width="2.5059in" svg:height="0.1295in" svg:x="0.3634in" svg:y="6.0811in">
        <draw:text-box>
          <text:p><text:span text:style-name="T1">- vPvB: Molto persistente e molto bioaccumulabile </text:span></text:p>
        </draw:text-box>
      </draw:frame>
      <draw:polygon text:anchor-type="page" text:anchor-page-number="14" draw:z-index="2053" draw:name="Shape4443" draw:style-name="gr2" draw:text-style-name="P3" svg:width="4.235in" svg:height="0.1283in" svg:x="1.7882in" svg:y="3.2531in" svg:viewBox="0 0 10758 327" draw:points="0,0 10758,0 10758,327 0,327">
        <text:p/>
      </draw:polygon>
      <draw:frame text:anchor-type="page" text:anchor-page-number="1" draw:z-index="2052" draw:name="Shape133" draw:style-name="gr1" draw:text-style-name="P2" svg:width="0.6976in" svg:height="0.1295in" svg:x="0.4535in" svg:y="4.2138in">
        <draw:text-box>
          <text:p><text:span text:style-name="T1">Usi Identificati</text:span></text:p>
        </draw:text-box>
      </draw:frame>
      <draw:polygon text:anchor-type="page" text:anchor-page-number="13" draw:z-index="2051" draw:name="Shape4236" draw:style-name="gr2" draw:text-style-name="P3" svg:width="1.9685in" svg:height="0.1268in" svg:x="3.513in" svg:y="3.5898in" svg:viewBox="0 0 5001 323" draw:points="0,0 5001,0 5001,323 0,323">
        <text:p/>
      </draw:polygon>
      <draw:frame text:anchor-type="page" text:anchor-page-number="5" draw:z-index="2050" draw:name="Shape1229" draw:style-name="gr1" draw:text-style-name="P2" svg:width="4.3012in" svg:height="0.113in" svg:x="2.7728in" svg:y="5.9874in">
        <draw:text-box>
          <text:p><text:span text:style-name="T4">Forschungsgemeinschaft MAK- und BAT-Werte-Liste 2022 Ständige Senatskommission zur Prüfung </text:span></text:p>
        </draw:text-box>
      </draw:frame>
      <draw:polygon text:anchor-type="page" text:anchor-page-number="6" draw:z-index="2049" draw:name="Shape1843" draw:style-name="gr3" draw:text-style-name="P4" svg:width="1.1717in" svg:height="0.0102in" svg:x="6.6732in" svg:y="1.928in" svg:viewBox="0 0 2977 27" draw:points="0,0 2977,0 2977,27 0,27">
        <text:p/>
      </draw:polygon>
      <draw:polygon text:anchor-type="page" text:anchor-page-number="2" draw:z-index="2048" draw:name="Shape463" draw:style-name="gr2" draw:text-style-name="P3" svg:width="6.0067in" svg:height="0.1283in" svg:x="1.7882in" svg:y="4.1in" svg:viewBox="0 0 15258 327" draw:points="0,0 15258,0 15258,327 0,327">
        <text:p/>
      </draw:polygon>
      <draw:frame text:anchor-type="page" text:anchor-page-number="11" draw:z-index="2047" draw:name="Shape3879" draw:style-name="gr1" draw:text-style-name="P2" svg:width="0.685in" svg:height="0.1295in" svg:x="3.561in" svg:y="2.889in">
        <draw:text-box>
          <text:p><text:span text:style-name="T1">0,1 - 100 mg/l</text:span></text:p>
        </draw:text-box>
      </draw:frame>
      <draw:frame text:anchor-type="page" text:anchor-page-number="12" draw:z-index="2046" draw:name="Shape4095" draw:style-name="gr1" draw:text-style-name="P2" svg:width="0.0433in" svg:height="0.1925in" svg:x="0.411in" svg:y="9.2752in">
        <draw:text-box>
          <text:p><text:span text:style-name="T2"><text:s/></text:span></text:p>
        </draw:text-box>
      </draw:frame>
      <draw:frame text:anchor-type="page" text:anchor-page-number="4" draw:z-index="2045" draw:name="Shape1087" draw:style-name="gr1" draw:text-style-name="P2" svg:width="0.0433in" svg:height="0.1925in" svg:x="0.3634in" svg:y="8.0965in">
        <draw:text-box>
          <text:p><text:span text:style-name="T2"><text:s/></text:span></text:p>
        </draw:text-box>
      </draw:frame>
      <draw:polygon text:anchor-type="page" text:anchor-page-number="3" draw:z-index="2044" draw:name="Shape789" draw:style-name="gr2" draw:text-style-name="P3" svg:width="0.9835in" svg:height="0.1917in" svg:x="2.3315in" svg:y="2.5665in" svg:viewBox="0 0 2499 488" draw:points="0,0 2499,0 2499,488 0,488">
        <text:p/>
      </draw:polygon>
      <draw:frame text:anchor-type="page" text:anchor-page-number="8" draw:z-index="2043" draw:name="Shape3222" draw:style-name="gr1" draw:text-style-name="P2" svg:width="0.0433in" svg:height="0.1925in" svg:x="0.3634in" svg:y="6.7063in">
        <draw:text-box>
          <text:p><text:span text:style-name="T2"><text:s/></text:span></text:p>
        </draw:text-box>
      </draw:frame>
      <draw:polygon text:anchor-type="page" text:anchor-page-number="7" draw:z-index="2042" draw:name="Shape2847" draw:style-name="gr2" draw:text-style-name="P3" svg:width="2.265in" svg:height="0.1283in" svg:x="0.4114in" svg:y="6.2563in" svg:viewBox="0 0 5754 327" draw:points="0,0 5754,0 5754,327 0,327">
        <text:p/>
      </draw:polygon>
      <draw:frame text:anchor-type="page" text:anchor-page-number="10" draw:z-index="2041" draw:name="Shape3608" draw:style-name="gr1" draw:text-style-name="P2" svg:width="0.0433in" svg:height="0.1925in" svg:x="0.411in" svg:y="6.7862in">
        <draw:text-box>
          <text:p><text:span text:style-name="T2"><text:s/></text:span></text:p>
        </draw:text-box>
      </draw:frame>
      <draw:frame text:anchor-type="page" text:anchor-page-number="9" draw:z-index="2040" draw:name="Shape3379" draw:style-name="gr1" draw:text-style-name="P2" svg:width="2.3512in" svg:height="0.1295in" svg:x="3.561in" svg:y="4.6138in">
        <draw:text-box>
          <text:p><text:span text:style-name="T1">Non classificato (nessun componente rilevante)</text:span></text:p>
        </draw:text-box>
      </draw:frame>
      <draw:frame text:anchor-type="page" text:anchor-page-number="12" draw:z-index="2039" draw:name="Shape4094" draw:style-name="gr1" draw:text-style-name="P2" svg:width="0.0433in" svg:height="0.1925in" svg:x="0.3634in" svg:y="9.1346in">
        <draw:text-box>
          <text:p><text:span text:style-name="T2"><text:s/></text:span></text:p>
        </draw:text-box>
      </draw:frame>
      <draw:frame text:anchor-type="page" text:anchor-page-number="15" draw:z-index="2038" draw:name="Shape5029" draw:style-name="gr1" draw:text-style-name="P2" svg:width="1.7539in" svg:height="0.1295in" svg:x="0.3634in" svg:y="5.9528in">
        <draw:text-box>
          <text:p><text:span text:style-name="T1">- VOC: Composto organico volatile </text:span></text:p>
        </draw:text-box>
      </draw:frame>
      <draw:frame text:anchor-type="page" text:anchor-page-number="8" draw:z-index="2037" draw:name="Shape3221" draw:style-name="gr1" draw:text-style-name="P2" svg:width="1.437in" svg:height="0.1295in" svg:x="0.3634in" svg:y="6.5756in">
        <draw:text-box>
          <text:p><text:span text:style-name="T3">10.4. Condizioni da evitare </text:span></text:p>
        </draw:text-box>
      </draw:frame>
      <draw:polygon text:anchor-type="page" text:anchor-page-number="14" draw:z-index="2036" draw:name="Shape4442" draw:style-name="gr2" draw:text-style-name="P3" svg:width="4.3319in" svg:height="0.1917in" svg:x="1.7398in" svg:y="3.2531in" svg:viewBox="0 0 11004 488" draw:points="0,0 11004,0 11004,488 0,488">
        <text:p/>
      </draw:polygon>
      <draw:polygon text:anchor-type="page" text:anchor-page-number="7" draw:z-index="2035" draw:name="Shape2846" draw:style-name="gr2" draw:text-style-name="P3" svg:width="2.3618in" svg:height="0.1917in" svg:x="0.363in" svg:y="6.2563in" svg:viewBox="0 0 6000 488" draw:points="0,0 6000,0 6000,488 0,488">
        <text:p/>
      </draw:polygon>
      <draw:frame text:anchor-type="page" text:anchor-page-number="9" draw:z-index="2034" draw:name="Shape3368" draw:style-name="gr1" draw:text-style-name="P2" svg:width="0.0433in" svg:height="0.1925in" svg:x="1.898in" svg:y="4.5661in">
        <draw:text-box>
          <text:p><text:span text:style-name="T2"><text:s/></text:span></text:p>
        </draw:text-box>
      </draw:frame>
      <draw:frame text:anchor-type="page" text:anchor-page-number="1" draw:z-index="2033" draw:name="Shape126" draw:style-name="gr1" draw:text-style-name="P2" svg:width="0.0433in" svg:height="0.1925in" svg:x="0.411in" svg:y="4.1661in">
        <draw:text-box>
          <text:p><text:span text:style-name="T2"><text:s/></text:span></text:p>
        </draw:text-box>
      </draw:frame>
      <draw:frame text:anchor-type="page" text:anchor-page-number="3" draw:z-index="2032" draw:name="Shape787" draw:style-name="gr1" draw:text-style-name="P2" svg:width="0.474in" svg:height="0.1295in" svg:x="0.4535in" svg:y="2.5689in">
        <draw:text-box>
          <text:p><text:span text:style-name="T1">INDEX <text:s text:c="2"/>-</text:span></text:p>
        </draw:text-box>
      </draw:frame>
      <draw:frame text:anchor-type="page" text:anchor-page-number="10" draw:z-index="2031" draw:name="Shape3607" draw:style-name="gr1" draw:text-style-name="P2" svg:width="0.0433in" svg:height="0.1925in" svg:x="0.3634in" svg:y="6.6429in">
        <draw:text-box>
          <text:p><text:span text:style-name="T2"><text:s/></text:span></text:p>
        </draw:text-box>
      </draw:frame>
      <draw:polygon text:anchor-type="page" text:anchor-page-number="5" draw:z-index="2030" draw:name="Shape1240" draw:style-name="gr2" draw:text-style-name="P3" svg:width="4.6283in" svg:height="0.1118in" svg:x="2.7732in" svg:y="6.0965in" svg:viewBox="0 0 11757 285" draw:points="0,0 11757,0 11757,285 0,285">
        <text:p/>
      </draw:polygon>
      <draw:frame text:anchor-type="page" text:anchor-page-number="13" draw:z-index="2029" draw:name="Shape4235" draw:style-name="gr1" draw:text-style-name="P2" svg:width="0.126in" svg:height="0.1295in" svg:x="2.3799in" svg:y="3.5902in">
        <draw:text-box>
          <text:p><text:span text:style-name="T1">75</text:span></text:p>
        </draw:text-box>
      </draw:frame>
      <draw:frame text:anchor-type="page" text:anchor-page-number="4" draw:z-index="2028" draw:name="Shape1086" draw:style-name="gr1" draw:text-style-name="P2" svg:width="1.226in" svg:height="0.1295in" svg:x="0.3634in" svg:y="7.9665in">
        <draw:text-box>
          <text:p><text:span text:style-name="T1">interventi in emergenza. </text:span></text:p>
        </draw:text-box>
      </draw:frame>
      <draw:polygon text:anchor-type="page" text:anchor-page-number="2" draw:z-index="2027" draw:name="Shape460" draw:style-name="gr2" draw:text-style-name="P3" svg:width="6.1035in" svg:height="0.1283in" svg:x="1.7398in" svg:y="4.1in" svg:viewBox="0 0 15504 327" draw:points="0,0 15504,0 15504,327 0,327">
        <text:p/>
      </draw:polygon>
      <draw:frame text:anchor-type="page" text:anchor-page-number="11" draw:z-index="2026" draw:name="Shape3880" draw:style-name="gr1" draw:text-style-name="P2" svg:width="0.0433in" svg:height="0.1925in" svg:x="2.7728in" svg:y="2.8898in">
        <draw:text-box>
          <text:p><text:span text:style-name="T2"><text:s/></text:span></text:p>
        </draw:text-box>
      </draw:frame>
      <draw:polygon text:anchor-type="page" text:anchor-page-number="6" draw:z-index="2025" draw:name="Shape1842" draw:style-name="gr3" draw:text-style-name="P4" svg:width="0.0102in" svg:height="0.0102in" svg:x="6.663in" svg:y="1.928in" svg:viewBox="0 0 27 27" draw:points="0,0 27,0 27,27 0,27">
        <text:p/>
      </draw:polygon>
      <draw:polygon text:anchor-type="page" text:anchor-page-number="12" draw:z-index="2024" draw:name="Shape4099" draw:style-name="gr2" draw:text-style-name="P3" svg:width="7.3835in" svg:height="0.1264in" svg:x="0.4114in" svg:y="9.3232in" svg:viewBox="0 0 18755 322" draw:points="0,0 18755,0 18755,322 0,322">
        <text:p/>
      </draw:polygon>
      <draw:frame text:anchor-type="page" text:anchor-page-number="15" draw:z-index="2023" draw:name="Shape5028" draw:style-name="gr1" draw:text-style-name="P2" svg:width="2.5559in" svg:height="0.1295in" svg:x="0.3634in" svg:y="5.8264in">
        <draw:text-box>
          <text:p><text:span text:style-name="T1">- TWA STEL: Limite di esposizione a breve termine </text:span></text:p>
        </draw:text-box>
      </draw:frame>
      <draw:frame text:anchor-type="page" text:anchor-page-number="4" draw:z-index="2022" draw:name="Shape1085" draw:style-name="gr1" draw:text-style-name="P2" svg:width="7.528in" svg:height="0.1295in" svg:x="0.3634in" svg:y="7.839in">
        <draw:text-box>
          <text:p><text:span text:style-name="T1">prevenire contaminazioni della pelle, degli occhi e degli indumenti personali. Queste indicazioni sono valide sia per gli addetti alle lavorazioni che per gli </text:span></text:p>
        </draw:text-box>
      </draw:frame>
      <draw:frame text:anchor-type="page" text:anchor-page-number="13" draw:z-index="2021" draw:name="Shape4227" draw:style-name="gr1" draw:text-style-name="P2" svg:width="0.0433in" svg:height="0.1925in" svg:x="0.7429in" svg:y="3.5429in">
        <draw:text-box>
          <text:p><text:span text:style-name="T2"><text:s/></text:span></text:p>
        </draw:text-box>
      </draw:frame>
      <draw:frame text:anchor-type="page" text:anchor-page-number="5" draw:z-index="2020" draw:name="Shape1220" draw:style-name="gr1" draw:text-style-name="P2" svg:width="0.0433in" svg:height="0.1925in" svg:x="1.7382in" svg:y="5.9264in">
        <draw:text-box>
          <text:p><text:span text:style-name="T2"><text:s/></text:span></text:p>
        </draw:text-box>
      </draw:frame>
      <draw:frame text:anchor-type="page" text:anchor-page-number="8" draw:z-index="2019" draw:name="Shape3220" draw:style-name="gr1" draw:text-style-name="P2" svg:width="0.0433in" svg:height="0.1925in" svg:x="0.3634in" svg:y="6.3874in">
        <draw:text-box>
          <text:p><text:span text:style-name="T2"><text:s/></text:span></text:p>
        </draw:text-box>
      </draw:frame>
      <draw:frame text:anchor-type="page" text:anchor-page-number="3" draw:z-index="2018" draw:name="Shape784" draw:style-name="gr1" draw:text-style-name="P2" svg:width="0.0433in" svg:height="0.1925in" svg:x="0.411in" svg:y="2.5217in">
        <draw:text-box>
          <text:p><text:span text:style-name="T2"><text:s/></text:span></text:p>
        </draw:text-box>
      </draw:frame>
      <draw:frame text:anchor-type="page" text:anchor-page-number="7" draw:z-index="2017" draw:name="Shape2850" draw:style-name="gr1" draw:text-style-name="P2" svg:width="0.6661in" svg:height="0.1295in" svg:x="4.348in" svg:y="6.1283in">
        <draw:text-box>
          <text:p><text:span text:style-name="T3">Informazioni</text:span></text:p>
        </draw:text-box>
      </draw:frame>
      <draw:polygon text:anchor-type="page" text:anchor-page-number="9" draw:z-index="2016" draw:name="Shape3378" draw:style-name="gr2" draw:text-style-name="P3" svg:width="3.8402in" svg:height="0.1283in" svg:x="3.5614in" svg:y="4.6114in" svg:viewBox="0 0 9755 327" draw:points="0,0 9755,0 9755,327 0,327">
        <text:p/>
      </draw:polygon>
      <draw:polygon text:anchor-type="page" text:anchor-page-number="11" draw:z-index="2015" draw:name="Shape3878" draw:style-name="gr2" draw:text-style-name="P3" svg:width="3.8402in" svg:height="0.1283in" svg:x="3.5614in" svg:y="2.8866in" svg:viewBox="0 0 9755 327" draw:points="0,0 9755,0 9755,327 0,327">
        <text:p/>
      </draw:polygon>
      <draw:frame text:anchor-type="page" text:anchor-page-number="14" draw:z-index="2014" draw:name="Shape4435" draw:style-name="gr1" draw:text-style-name="P2" svg:width="0.5386in" svg:height="0.113in" svg:x="0.4535in" svg:y="3.2543in">
        <draw:text-box>
          <text:p><text:span text:style-name="T5">Skin Corr. 1</text:span></text:p>
        </draw:text-box>
      </draw:frame>
      <draw:frame text:anchor-type="page" text:anchor-page-number="1" draw:z-index="2013" draw:name="Shape125" draw:style-name="gr1" draw:text-style-name="P2" svg:width="0.0433in" svg:height="0.1925in" svg:x="4.1335in" svg:y="4.0228in">
        <draw:text-box>
          <text:p><text:span text:style-name="T2"><text:s/></text:span></text:p>
        </draw:text-box>
      </draw:frame>
      <draw:polygon text:anchor-type="page" text:anchor-page-number="6" draw:z-index="2012" draw:name="Shape1860" draw:style-name="gr3" draw:text-style-name="P4" svg:width="0.7783in" svg:height="0.0102in" svg:x="5.8846in" svg:y="1.928in" svg:viewBox="0 0 1978 27" draw:points="0,0 1978,0 1978,27 0,27">
        <text:p/>
      </draw:polygon>
      <draw:frame text:anchor-type="page" text:anchor-page-number="2" draw:z-index="2011" draw:name="Shape462" draw:style-name="gr1" draw:text-style-name="P2" svg:width="0.4248in" svg:height="0.1295in" svg:x="0.4535in" svg:y="4.1008in">
        <draw:text-box>
          <text:p><text:span text:style-name="T3">EUH210</text:span></text:p>
        </draw:text-box>
      </draw:frame>
      <draw:polygon text:anchor-type="page" text:anchor-page-number="10" draw:z-index="2010" draw:name="Shape3610" draw:style-name="gr2" draw:text-style-name="P3" svg:width="2.265in" svg:height="0.1283in" svg:x="0.4114in" svg:y="6.8315in" svg:viewBox="0 0 5754 327" draw:points="0,0 5754,0 5754,327 0,327">
        <text:p/>
      </draw:polygon>
      <draw:frame text:anchor-type="page" text:anchor-page-number="3" draw:z-index="2009" draw:name="Shape783" draw:style-name="gr1" draw:text-style-name="P2" svg:width="0.0433in" svg:height="0.1925in" svg:x="7.3016in" svg:y="2.1862in">
        <draw:text-box>
          <text:p><text:span text:style-name="T2"><text:s/></text:span></text:p>
        </draw:text-box>
      </draw:frame>
      <draw:polygon text:anchor-type="page" text:anchor-page-number="9" draw:z-index="2008" draw:name="Shape3377" draw:style-name="gr2" draw:text-style-name="P3" svg:width="3.937in" svg:height="0.1283in" svg:x="3.513in" svg:y="4.6114in" svg:viewBox="0 0 10001 327" draw:points="0,0 10001,0 10001,327 0,327">
        <text:p/>
      </draw:polygon>
      <draw:frame text:anchor-type="page" text:anchor-page-number="14" draw:z-index="2007" draw:name="Shape4429" draw:style-name="gr1" draw:text-style-name="P2" svg:width="0.0433in" svg:height="0.1925in" svg:x="0.411in" svg:y="3.1929in">
        <draw:text-box>
          <text:p><text:span text:style-name="T2"><text:s/></text:span></text:p>
        </draw:text-box>
      </draw:frame>
      <draw:polygon text:anchor-type="page" text:anchor-page-number="13" draw:z-index="2006" draw:name="Shape4234" draw:style-name="gr2" draw:text-style-name="P3" svg:width="1.0831in" svg:height="0.1268in" svg:x="2.3799in" svg:y="3.5898in" svg:viewBox="0 0 2752 323" draw:points="0,0 2752,0 2752,323 0,323">
        <text:p/>
      </draw:polygon>
      <draw:polygon text:anchor-type="page" text:anchor-page-number="12" draw:z-index="2005" draw:name="Shape4098" draw:style-name="gr2" draw:text-style-name="P3" svg:width="7.4803in" svg:height="0.1264in" svg:x="0.363in" svg:y="9.3232in" svg:viewBox="0 0 19001 322" draw:points="0,0 19001,0 19001,322 0,322">
        <text:p/>
      </draw:polygon>
      <draw:frame text:anchor-type="page" text:anchor-page-number="4" draw:z-index="2004" draw:name="Shape1084" draw:style-name="gr1" draw:text-style-name="P2" svg:width="7.8386in" svg:height="0.1295in" svg:x="0.3634in" svg:y="7.7126in">
        <draw:text-box>
          <text:p><text:span text:style-name="T1">Indossare <text:s/>adeguati <text:s/>dispositivi <text:s/>di protezione <text:s/>(compresi <text:s/>i <text:s/>dispositivi di <text:s/>protezione <text:s/>individuale <text:s/>di cui <text:s/>alla <text:s/>sezione <text:s/>8 <text:s/>della <text:s/>scheda <text:s/>dati <text:s/>di sicurezza) <text:s/>onde </text:span></text:p>
        </draw:text-box>
      </draw:frame>
      <draw:polygon text:anchor-type="page" text:anchor-page-number="11" draw:z-index="2003" draw:name="Shape3877" draw:style-name="gr2" draw:text-style-name="P3" svg:width="3.937in" svg:height="0.1913in" svg:x="3.513in" svg:y="2.8866in" svg:viewBox="0 0 10001 487" draw:points="0,0 10001,0 10001,487 0,487">
        <text:p/>
      </draw:polygon>
      <draw:polygon text:anchor-type="page" text:anchor-page-number="5" draw:z-index="2002" draw:name="Shape1228" draw:style-name="gr2" draw:text-style-name="P3" svg:width="4.6283in" svg:height="0.1118in" svg:x="2.7732in" svg:y="5.9846in" svg:viewBox="0 0 11757 285" draw:points="0,0 11757,0 11757,285 0,285">
        <text:p/>
      </draw:polygon>
      <draw:polygon text:anchor-type="page" text:anchor-page-number="6" draw:z-index="2001" draw:name="Shape1859" draw:style-name="gr3" draw:text-style-name="P4" svg:width="0.0098in" svg:height="0.0102in" svg:x="5.8748in" svg:y="1.928in" svg:viewBox="0 0 26 27" draw:points="0,0 26,0 26,27 0,27">
        <text:p/>
      </draw:polygon>
      <draw:frame text:anchor-type="page" text:anchor-page-number="2" draw:z-index="2000" draw:name="Shape454" draw:style-name="gr1" draw:text-style-name="P2" svg:width="0.0433in" svg:height="0.1925in" svg:x="0.411in" svg:y="4.0535in">
        <draw:text-box>
          <text:p><text:span text:style-name="T2"><text:s/></text:span></text:p>
        </draw:text-box>
      </draw:frame>
      <draw:polygon text:anchor-type="page" text:anchor-page-number="1" draw:z-index="1999" draw:name="Shape132" draw:style-name="gr5" draw:text-style-name="P6" svg:width="2.6583in" svg:height="0.1283in" svg:x="0.4114in" svg:y="4.2114in" svg:viewBox="0 0 6753 327" draw:points="0,0 6753,0 6753,327 0,327">
        <text:p/>
      </draw:polygon>
      <draw:frame text:anchor-type="page" text:anchor-page-number="7" draw:z-index="1998" draw:name="Shape2835" draw:style-name="gr1" draw:text-style-name="P2" svg:width="0.0433in" svg:height="0.1925in" svg:x="3.1134in" svg:y="6.0811in">
        <draw:text-box>
          <text:p><text:span text:style-name="T2"><text:s/></text:span></text:p>
        </draw:text-box>
      </draw:frame>
      <draw:frame text:anchor-type="page" text:anchor-page-number="8" draw:z-index="1997" draw:name="Shape3219" draw:style-name="gr1" draw:text-style-name="P2" svg:width="4.0598in" svg:height="0.1295in" svg:x="0.3634in" svg:y="6.2583in">
        <draw:text-box>
          <text:p><text:span text:style-name="T1">In condizioni di uso e stoccaggio normali non sono prevedibili reazioni pericolose. </text:span></text:p>
        </draw:text-box>
      </draw:frame>
      <draw:frame text:anchor-type="page" text:anchor-page-number="15" draw:z-index="1996" draw:name="Shape5027" draw:style-name="gr1" draw:text-style-name="P2" svg:width="2.1453in" svg:height="0.1295in" svg:x="0.3634in" svg:y="5.698in">
        <draw:text-box>
          <text:p><text:span text:style-name="T1">- TWA: Limite di esposizione medio pesato </text:span></text:p>
        </draw:text-box>
      </draw:frame>
      <draw:polygon text:anchor-type="page" text:anchor-page-number="10" draw:z-index="1995" draw:name="Shape3609" draw:style-name="gr2" draw:text-style-name="P3" svg:width="2.3618in" svg:height="0.3835in" svg:x="0.363in" svg:y="6.8315in" svg:viewBox="0 0 6000 975" draw:points="0,0 6000,0 6000,975 0,975">
        <text:p/>
      </draw:polygon>
      <draw:polygon text:anchor-type="page" text:anchor-page-number="7" draw:z-index="1994" draw:name="Shape2849" draw:style-name="gr2" draw:text-style-name="P3" svg:width="2.265in" svg:height="0.128in" svg:x="4.348in" svg:y="6.1283in" svg:viewBox="0 0 5754 326" draw:points="0,0 5754,0 5754,326 0,326">
        <text:p/>
      </draw:polygon>
      <draw:frame text:anchor-type="page" text:anchor-page-number="14" draw:z-index="1993" draw:name="Shape4428" draw:style-name="gr1" draw:text-style-name="P2" svg:width="0.0433in" svg:height="0.1925in" svg:x="6.1193in" svg:y="3.0646in">
        <draw:text-box>
          <text:p><text:span text:style-name="T2"><text:s/></text:span></text:p>
        </draw:text-box>
      </draw:frame>
      <draw:polygon text:anchor-type="page" text:anchor-page-number="1" draw:z-index="1992" draw:name="Shape131" draw:style-name="gr5" draw:text-style-name="P6" svg:width="2.7551in" svg:height="0.1283in" svg:x="0.363in" svg:y="4.2114in" svg:viewBox="0 0 6999 327" draw:points="0,0 6999,0 6999,327 0,327">
        <text:p/>
      </draw:polygon>
      <draw:frame text:anchor-type="page" text:anchor-page-number="8" draw:z-index="1991" draw:name="Shape3218" draw:style-name="gr1" draw:text-style-name="P2" svg:width="0.0433in" svg:height="0.1925in" svg:x="0.3634in" svg:y="6.0681in">
        <draw:text-box>
          <text:p><text:span text:style-name="T2"><text:s/></text:span></text:p>
        </draw:text-box>
      </draw:frame>
      <draw:polygon text:anchor-type="page" text:anchor-page-number="6" draw:z-index="1990" draw:name="Shape1858" draw:style-name="gr3" draw:text-style-name="P4" svg:width="0.5799in" svg:height="0.0102in" svg:x="5.2949in" svg:y="1.928in" svg:viewBox="0 0 1474 27" draw:points="0,0 1474,0 1474,27 0,27">
        <text:p/>
      </draw:polygon>
      <draw:polygon text:anchor-type="page" text:anchor-page-number="3" draw:z-index="1989" draw:name="Shape786" draw:style-name="gr2" draw:text-style-name="P3" svg:width="1.8717in" svg:height="0.1283in" svg:x="0.4114in" svg:y="2.5665in" svg:viewBox="0 0 4755 327" draw:points="0,0 4755,0 4755,327 0,327">
        <text:p/>
      </draw:polygon>
      <draw:polygon text:anchor-type="page" text:anchor-page-number="5" draw:z-index="1988" draw:name="Shape1227" draw:style-name="gr2" draw:text-style-name="P3" svg:width="4.7252in" svg:height="0.2236in" svg:x="2.7248in" svg:y="5.9846in" svg:viewBox="0 0 12003 569" draw:points="0,0 12003,0 12003,569 0,569">
        <text:p/>
      </draw:polygon>
      <draw:polygon text:anchor-type="page" text:anchor-page-number="13" draw:z-index="1987" draw:name="Shape4233" draw:style-name="gr2" draw:text-style-name="P3" svg:width="1.1815in" svg:height="0.1268in" svg:x="2.3315in" svg:y="3.5898in" svg:viewBox="0 0 3002 323" draw:points="0,0 3002,0 3002,323 0,323">
        <text:p/>
      </draw:polygon>
      <draw:frame text:anchor-type="page" text:anchor-page-number="9" draw:z-index="1986" draw:name="Shape3376" draw:style-name="gr1" draw:text-style-name="P2" svg:width="1.4476in" svg:height="0.1295in" svg:x="0.4535in" svg:y="4.6138in">
        <draw:text-box>
          <text:p><text:span text:style-name="T1">ATE (Cutanea) della miscela:</text:span></text:p>
        </draw:text-box>
      </draw:frame>
      <draw:frame text:anchor-type="page" text:anchor-page-number="4" draw:z-index="1985" draw:name="Shape1083" draw:style-name="gr1" draw:text-style-name="P2" svg:width="1.9496in" svg:height="0.1295in" svg:x="0.3634in" svg:y="7.5839in">
        <draw:text-box>
          <text:p><text:span text:style-name="T1">Bloccare la perdita se non c'è pericolo. </text:span></text:p>
        </draw:text-box>
      </draw:frame>
      <draw:frame text:anchor-type="page" text:anchor-page-number="15" draw:z-index="1984" draw:name="Shape5026" draw:style-name="gr1" draw:text-style-name="P2" svg:width="5.9016in" svg:height="0.1295in" svg:x="0.3634in" svg:y="5.5693in">
        <draw:text-box>
          <text:p><text:span text:style-name="T1">- TLV CEILING: Concentrazione che non deve essere superata durante qualsiasi momento dell`esposizione lavorativa. </text:span></text:p>
        </draw:text-box>
      </draw:frame>
      <draw:frame text:anchor-type="page" text:anchor-page-number="12" draw:z-index="1983" draw:name="Shape4090" draw:style-name="gr1" draw:text-style-name="P2" svg:width="0.0433in" svg:height="0.1925in" svg:x="4.061in" svg:y="8.9465in">
        <draw:text-box>
          <text:p><text:span text:style-name="T2"><text:s/></text:span></text:p>
        </draw:text-box>
      </draw:frame>
      <draw:frame text:anchor-type="page" text:anchor-page-number="10" draw:z-index="1982" draw:name="Shape3606" draw:style-name="gr1" draw:text-style-name="P2" svg:width="0.7894in" svg:height="0.1295in" svg:x="0.3634in" svg:y="6.5126in">
        <draw:text-box>
          <text:p><text:span text:style-name="T3">12.1. Tossicità </text:span></text:p>
        </draw:text-box>
      </draw:frame>
      <draw:frame text:anchor-type="page" text:anchor-page-number="2" draw:z-index="1981" draw:name="Shape453" draw:style-name="gr1" draw:text-style-name="P2" svg:width="0.0433in" svg:height="0.1925in" svg:x="1.7882in" svg:y="3.911in">
        <draw:text-box>
          <text:p><text:span text:style-name="T2"><text:s/></text:span></text:p>
        </draw:text-box>
      </draw:frame>
      <draw:frame text:anchor-type="page" text:anchor-page-number="11" draw:z-index="1980" draw:name="Shape3868" draw:style-name="gr1" draw:text-style-name="P2" svg:width="0.0433in" svg:height="0.1925in" svg:x="1.3547in" svg:y="2.8417in">
        <draw:text-box>
          <text:p><text:span text:style-name="T2"><text:s/></text:span></text:p>
        </draw:text-box>
      </draw:frame>
      <draw:polygon text:anchor-type="page" text:anchor-page-number="14" draw:z-index="1979" draw:name="Shape4432" draw:style-name="gr2" draw:text-style-name="P3" svg:width="1.2799in" svg:height="0.1118in" svg:x="0.4114in" svg:y="3.2531in" svg:viewBox="0 0 3252 285" draw:points="0,0 3252,0 3252,285 0,285">
        <text:p/>
      </draw:polygon>
      <draw:frame text:anchor-type="page" text:anchor-page-number="10" draw:z-index="1978" draw:name="Shape3605" draw:style-name="gr1" draw:text-style-name="P2" svg:width="0.0433in" svg:height="0.1925in" svg:x="0.3634in" svg:y="6.3228in">
        <draw:text-box>
          <text:p><text:span text:style-name="T2"><text:s/></text:span></text:p>
        </draw:text-box>
      </draw:frame>
      <draw:frame text:anchor-type="page" text:anchor-page-number="5" draw:z-index="1977" draw:name="Shape1226" draw:style-name="gr1" draw:text-style-name="P2" svg:width="0.5386in" svg:height="0.113in" svg:x="1.198in" svg:y="5.9874in">
        <draw:text-box>
          <text:p><text:span text:style-name="T4">Deutschland</text:span></text:p>
        </draw:text-box>
      </draw:frame>
      <draw:polygon text:anchor-type="page" text:anchor-page-number="3" draw:z-index="1976" draw:name="Shape785" draw:style-name="gr2" draw:text-style-name="P3" svg:width="1.9685in" svg:height="0.1917in" svg:x="0.363in" svg:y="2.5665in" svg:viewBox="0 0 5001 488" draw:points="0,0 5001,0 5001,488 0,488">
        <text:p/>
      </draw:polygon>
      <draw:polygon text:anchor-type="page" text:anchor-page-number="11" draw:z-index="1975" draw:name="Shape3876" draw:style-name="gr2" draw:text-style-name="P3" svg:width="0.6898in" svg:height="0.1913in" svg:x="2.7732in" svg:y="2.8866in" svg:viewBox="0 0 1753 487" draw:points="0,0 1753,0 1753,487 0,487">
        <text:p/>
      </draw:polygon>
      <draw:frame text:anchor-type="page" text:anchor-page-number="9" draw:z-index="1974" draw:name="Shape3372" draw:style-name="gr1" draw:text-style-name="P2" svg:width="0.0433in" svg:height="0.1925in" svg:x="0.411in" svg:y="4.5661in">
        <draw:text-box>
          <text:p><text:span text:style-name="T2"><text:s/></text:span></text:p>
        </draw:text-box>
      </draw:frame>
      <draw:polygon text:anchor-type="page" text:anchor-page-number="2" draw:z-index="1973" draw:name="Shape458" draw:style-name="gr2" draw:text-style-name="P3" svg:width="1.2799in" svg:height="0.1283in" svg:x="0.4114in" svg:y="4.1in" svg:viewBox="0 0 3252 327" draw:points="0,0 3252,0 3252,327 0,327">
        <text:p/>
      </draw:polygon>
      <draw:frame text:anchor-type="page" text:anchor-page-number="13" draw:z-index="1972" draw:name="Shape4232" draw:style-name="gr1" draw:text-style-name="P2" svg:width="0.2941in" svg:height="0.1295in" svg:x="0.4535in" svg:y="3.5902in">
        <draw:text-box>
          <text:p><text:span text:style-name="T1">Punto</text:span></text:p>
        </draw:text-box>
      </draw:frame>
      <draw:frame text:anchor-type="page" text:anchor-page-number="15" draw:z-index="1971" draw:name="Shape5025" draw:style-name="gr1" draw:text-style-name="P2" svg:width="1.4331in" svg:height="0.1295in" svg:x="0.3634in" svg:y="5.4429in">
        <draw:text-box>
          <text:p><text:span text:style-name="T1">- TLV: Valore limite di soglia <text:s/></text:span></text:p>
        </draw:text-box>
      </draw:frame>
      <draw:frame text:anchor-type="page" text:anchor-page-number="12" draw:z-index="1970" draw:name="Shape4093" draw:style-name="gr1" draw:text-style-name="P2" svg:width="3.626in" svg:height="0.1776in" svg:x="0.4535in" svg:y="8.9563in">
        <draw:text-box>
          <text:p><text:span text:style-name="T6">SEZIONE 15. Informazioni sulla regolamentazione</text:span></text:p>
        </draw:text-box>
      </draw:frame>
      <draw:polygon text:anchor-type="page" text:anchor-page-number="7" draw:z-index="1969" draw:name="Shape2848" draw:style-name="gr2" draw:text-style-name="P3" svg:width="2.363in" svg:height="0.1283in" svg:x="4.3in" svg:y="6.128in" svg:viewBox="0 0 6003 327" draw:points="0,0 6003,0 6003,327 0,327">
        <text:p/>
      </draw:polygon>
      <draw:frame text:anchor-type="page" text:anchor-page-number="4" draw:z-index="1968" draw:name="Shape1082" draw:style-name="gr1" draw:text-style-name="P2" svg:width="0.0433in" svg:height="0.1925in" svg:x="0.3634in" svg:y="7.3929in">
        <draw:text-box>
          <text:p><text:span text:style-name="T2"><text:s/></text:span></text:p>
        </draw:text-box>
      </draw:frame>
      <draw:frame text:anchor-type="page" text:anchor-page-number="8" draw:z-index="1967" draw:name="Shape3217" draw:style-name="gr1" draw:text-style-name="P2" svg:width="2.0461in" svg:height="0.1295in" svg:x="0.3634in" svg:y="5.9366in">
        <draw:text-box>
          <text:p><text:span text:style-name="T3">10.3. Possibilità di reazioni pericolose </text:span></text:p>
        </draw:text-box>
      </draw:frame>
      <draw:frame text:anchor-type="page" text:anchor-page-number="1" draw:z-index="1966" draw:name="Shape116" draw:style-name="gr1" draw:text-style-name="P2" svg:width="0.0433in" svg:height="0.1925in" svg:x="3.7217in" svg:y="3.8445in">
        <draw:text-box>
          <text:p><text:span text:style-name="T2"><text:s/></text:span></text:p>
        </draw:text-box>
      </draw:frame>
      <draw:polygon text:anchor-type="page" text:anchor-page-number="6" draw:z-index="1965" draw:name="Shape1857" draw:style-name="gr3" draw:text-style-name="P4" svg:width="0.0102in" svg:height="0.0102in" svg:x="5.2846in" svg:y="1.928in" svg:viewBox="0 0 27 27" draw:points="0,0 27,0 27,27 0,27">
        <text:p/>
      </draw:polygon>
      <draw:polygon text:anchor-type="page" text:anchor-page-number="6" draw:z-index="1964" draw:name="Shape1856" draw:style-name="gr3" draw:text-style-name="P4" svg:width="1.1717in" svg:height="0.0102in" svg:x="4.113in" svg:y="1.928in" svg:viewBox="0 0 2977 27" draw:points="0,0 2977,0 2977,27 0,27">
        <text:p/>
      </draw:polygon>
      <draw:polygon text:anchor-type="page" text:anchor-page-number="14" draw:z-index="1963" draw:name="Shape4431" draw:style-name="gr2" draw:text-style-name="P3" svg:width="1.3768in" svg:height="0.1917in" svg:x="0.363in" svg:y="3.2531in" svg:viewBox="0 0 3498 488" draw:points="0,0 3498,0 3498,488 0,488">
        <text:p/>
      </draw:polygon>
      <draw:frame text:anchor-type="page" text:anchor-page-number="1" draw:z-index="1962" draw:name="Shape119" draw:style-name="gr1" draw:text-style-name="P2" svg:width="1.7476in" svg:height="0.1295in" svg:x="1.9866in" svg:y="3.8925in">
        <draw:text-box>
          <text:p><text:span text:style-name="T3">Idropittura traspirante per interni</text:span></text:p>
        </draw:text-box>
      </draw:frame>
      <draw:frame text:anchor-type="page" text:anchor-page-number="4" draw:z-index="1961" draw:name="Shape1081" draw:style-name="gr1" draw:text-style-name="P2" svg:width="4.5807in" svg:height="0.1295in" svg:x="0.3634in" svg:y="7.2626in">
        <draw:text-box>
          <text:p><text:span text:style-name="T3">6.1. Precauzioni personali, dispositivi di protezione e procedure in caso di emergenza </text:span></text:p>
        </draw:text-box>
      </draw:frame>
      <draw:frame text:anchor-type="page" text:anchor-page-number="9" draw:z-index="1960" draw:name="Shape3364" draw:style-name="gr1" draw:text-style-name="P2" svg:width="0.0433in" svg:height="0.1925in" svg:x="5.8953in" svg:y="4.4374in">
        <draw:text-box>
          <text:p><text:span text:style-name="T2"><text:s/></text:span></text:p>
        </draw:text-box>
      </draw:frame>
      <draw:frame text:anchor-type="page" text:anchor-page-number="3" draw:z-index="1959" draw:name="Shape769" draw:style-name="gr1" draw:text-style-name="P2" svg:width="0.0433in" svg:height="0.1925in" svg:x="3.3634in" svg:y="2.1862in">
        <draw:text-box>
          <text:p><text:span text:style-name="T2"><text:s/></text:span></text:p>
        </draw:text-box>
      </draw:frame>
      <draw:frame text:anchor-type="page" text:anchor-page-number="10" draw:z-index="1958" draw:name="Shape3604" draw:style-name="gr1" draw:text-style-name="P2" svg:width="3.4787in" svg:height="0.1295in" svg:x="0.3634in" svg:y="6.1937in">
        <draw:text-box>
          <text:p><text:span text:style-name="T1">raggiunto corsi d'acqua o se ha contaminato il suolo o la vegetazione. </text:span></text:p>
        </draw:text-box>
      </draw:frame>
      <draw:polygon text:anchor-type="page" text:anchor-page-number="11" draw:z-index="1957" draw:name="Shape3875" draw:style-name="gr2" draw:text-style-name="P3" svg:width="0.7882in" svg:height="0.1913in" svg:x="2.7248in" svg:y="2.8866in" svg:viewBox="0 0 2003 487" draw:points="0,0 2003,0 2003,487 0,487">
        <text:p/>
      </draw:polygon>
      <draw:frame text:anchor-type="page" text:anchor-page-number="15" draw:z-index="1956" draw:name="Shape5024" draw:style-name="gr1" draw:text-style-name="P2" svg:width="3.8921in" svg:height="0.1295in" svg:x="0.3634in" svg:y="5.3146in">
        <draw:text-box>
          <text:p><text:span text:style-name="T1">- RID: Regolamento per il trasporto internazionale di merci pericolose su treno </text:span></text:p>
        </draw:text-box>
      </draw:frame>
      <draw:frame text:anchor-type="page" text:anchor-page-number="8" draw:z-index="1955" draw:name="Shape3216" draw:style-name="gr1" draw:text-style-name="P2" svg:width="0.0433in" svg:height="0.1925in" svg:x="0.3634in" svg:y="5.748in">
        <draw:text-box>
          <text:p><text:span text:style-name="T2"><text:s/></text:span></text:p>
        </draw:text-box>
      </draw:frame>
      <draw:frame text:anchor-type="page" text:anchor-page-number="7" draw:z-index="1954" draw:name="Shape2844" draw:style-name="gr1" draw:text-style-name="P2" svg:width="0.337in" svg:height="0.1295in" svg:x="2.7728in" svg:y="6.1283in">
        <draw:text-box>
          <text:p><text:span text:style-name="T3">Valore</text:span></text:p>
        </draw:text-box>
      </draw:frame>
      <draw:frame text:anchor-type="page" text:anchor-page-number="13" draw:z-index="1953" draw:name="Shape4226" draw:style-name="gr1" draw:text-style-name="P2" svg:width="0.0433in" svg:height="0.1925in" svg:x="0.411in" svg:y="3.5429in">
        <draw:text-box>
          <text:p><text:span text:style-name="T2"><text:s/></text:span></text:p>
        </draw:text-box>
      </draw:frame>
      <draw:polygon text:anchor-type="page" text:anchor-page-number="2" draw:z-index="1952" draw:name="Shape457" draw:style-name="gr2" draw:text-style-name="P3" svg:width="1.3768in" svg:height="0.1283in" svg:x="0.363in" svg:y="4.1in" svg:viewBox="0 0 3498 327" draw:points="0,0 3498,0 3498,327 0,327">
        <text:p/>
      </draw:polygon>
      <draw:frame text:anchor-type="page" text:anchor-page-number="12" draw:z-index="1951" draw:name="Shape4089" draw:style-name="gr1" draw:text-style-name="P2" svg:width="0.0433in" svg:height="0.1925in" svg:x="0.411in" svg:y="8.9465in">
        <draw:text-box>
          <text:p><text:span text:style-name="T2"><text:s/></text:span></text:p>
        </draw:text-box>
      </draw:frame>
      <draw:frame text:anchor-type="page" text:anchor-page-number="5" draw:z-index="1950" draw:name="Shape1219" draw:style-name="gr1" draw:text-style-name="P2" svg:width="0.0433in" svg:height="0.1925in" svg:x="0.6583in" svg:y="5.9264in">
        <draw:text-box>
          <text:p><text:span text:style-name="T2"><text:s/></text:span></text:p>
        </draw:text-box>
      </draw:frame>
      <draw:frame text:anchor-type="page" text:anchor-page-number="10" draw:z-index="1949" draw:name="Shape3603" draw:style-name="gr1" draw:text-style-name="P2" svg:width="7.715in" svg:height="0.1295in" svg:x="0.3634in" svg:y="6.0665in">
        <draw:text-box>
          <text:p><text:span text:style-name="T1">Utilizzare <text:s/>secondo <text:s/>le <text:s/>buone <text:s/>pratiche <text:s/>lavorative, <text:s/>evitando <text:s/>di <text:s/>disperdere <text:s/>il <text:s/>prodotto <text:s/>nell'ambiente. <text:s/>Avvisare <text:s/>le <text:s/>autorità <text:s/>competenti <text:s/>se <text:s/>il <text:s/>prodotto <text:s/>ha </text:span></text:p>
        </draw:text-box>
      </draw:frame>
      <draw:frame text:anchor-type="page" text:anchor-page-number="7" draw:z-index="1948" draw:name="Shape2834" draw:style-name="gr1" draw:text-style-name="P2" svg:width="0.0433in" svg:height="0.1925in" svg:x="0.9417in" svg:y="6.0811in">
        <draw:text-box>
          <text:p><text:span text:style-name="T2"><text:s/></text:span></text:p>
        </draw:text-box>
      </draw:frame>
      <draw:frame text:anchor-type="page" text:anchor-page-number="8" draw:z-index="1947" draw:name="Shape3215" draw:style-name="gr1" draw:text-style-name="P2" svg:width="3.5189in" svg:height="0.1295in" svg:x="0.3634in" svg:y="5.6189in">
        <draw:text-box>
          <text:p><text:span text:style-name="T1">Il prodotto è stabile nelle normali condizioni di impiego e di stoccaggio. </text:span></text:p>
        </draw:text-box>
      </draw:frame>
      <draw:frame text:anchor-type="page" text:anchor-page-number="15" draw:z-index="1946" draw:name="Shape5023" draw:style-name="gr1" draw:text-style-name="P2" svg:width="2.0398in" svg:height="0.1295in" svg:x="0.3634in" svg:y="5.1882in">
        <draw:text-box>
          <text:p><text:span text:style-name="T1">- REACH: Regolamento (CE) 1907/2006 </text:span></text:p>
        </draw:text-box>
      </draw:frame>
      <draw:polygon text:anchor-type="page" text:anchor-page-number="3" draw:z-index="1945" draw:name="Shape782" draw:style-name="gr2" draw:text-style-name="P3" svg:width="0.2965in" svg:height="0.1917in" svg:x="7.3016in" svg:y="2.1831in" svg:viewBox="0 0 754 488" draw:points="0,0 754,0 754,488 0,488">
        <text:p/>
      </draw:polygon>
      <draw:frame text:anchor-type="page" text:anchor-page-number="12" draw:z-index="1944" draw:name="Shape4088" draw:style-name="gr1" draw:text-style-name="P2" svg:width="0.0433in" svg:height="0.1925in" svg:x="0.3634in" svg:y="8.7661in">
        <draw:text-box>
          <text:p><text:span text:style-name="T2"><text:s/></text:span></text:p>
        </draw:text-box>
      </draw:frame>
      <draw:frame text:anchor-type="page" text:anchor-page-number="1" draw:z-index="1943" draw:name="Shape118" draw:style-name="gr1" draw:text-style-name="P2" svg:width="0.0433in" svg:height="0.1925in" svg:x="1.4228in" svg:y="3.8465in">
        <draw:text-box>
          <text:p><text:span text:style-name="T2"><text:s/></text:span></text:p>
        </draw:text-box>
      </draw:frame>
      <draw:frame text:anchor-type="page" text:anchor-page-number="4" draw:z-index="1942" draw:name="Shape1080" draw:style-name="gr1" draw:text-style-name="P2" svg:width="0.0433in" svg:height="0.1925in" svg:x="0.3634in" svg:y="7.0752in">
        <draw:text-box>
          <text:p><text:span text:style-name="T2"><text:s/></text:span></text:p>
        </draw:text-box>
      </draw:frame>
      <draw:polygon text:anchor-type="page" text:anchor-page-number="9" draw:z-index="1941" draw:name="Shape3375" draw:style-name="gr2" draw:text-style-name="P3" svg:width="3.0516in" svg:height="0.1283in" svg:x="0.4114in" svg:y="4.6114in" svg:viewBox="0 0 7752 327" draw:points="0,0 7752,0 7752,327 0,327">
        <text:p/>
      </draw:polygon>
      <draw:frame text:anchor-type="page" text:anchor-page-number="11" draw:z-index="1940" draw:name="Shape3874" draw:style-name="gr1" draw:text-style-name="P2" svg:width="0.9094in" svg:height="0.1295in" svg:x="0.4535in" svg:y="2.889in">
        <draw:text-box>
          <text:p><text:span text:style-name="T1">Solubilità in acqua</text:span></text:p>
        </draw:text-box>
      </draw:frame>
      <draw:frame text:anchor-type="page" text:anchor-page-number="13" draw:z-index="1939" draw:name="Shape4225" draw:style-name="gr1" draw:text-style-name="P2" svg:width="0.0433in" svg:height="0.1925in" svg:x="0.3634in" svg:y="3.4016in">
        <draw:text-box>
          <text:p><text:span text:style-name="T2"><text:s/></text:span></text:p>
        </draw:text-box>
      </draw:frame>
      <draw:polygon text:anchor-type="page" text:anchor-page-number="5" draw:z-index="1938" draw:name="Shape1225" draw:style-name="gr2" draw:text-style-name="P3" svg:width="1.4783in" svg:height="0.1118in" svg:x="1.198in" svg:y="5.9846in" svg:viewBox="0 0 3756 285" draw:points="0,0 3756,0 3756,285 0,285">
        <text:p/>
      </draw:polygon>
      <draw:frame text:anchor-type="page" text:anchor-page-number="14" draw:z-index="1937" draw:name="Shape4415" draw:style-name="gr1" draw:text-style-name="P2" svg:width="0.0433in" svg:height="0.1925in" svg:x="3.45in" svg:y="3.0161in">
        <draw:text-box>
          <text:p><text:span text:style-name="T2"><text:s/></text:span></text:p>
        </draw:text-box>
      </draw:frame>
      <draw:polygon text:anchor-type="page" text:anchor-page-number="6" draw:z-index="1936" draw:name="Shape1854" draw:style-name="gr3" draw:text-style-name="P4" svg:width="0.0098in" svg:height="0.0102in" svg:x="4.1031in" svg:y="1.928in" svg:viewBox="0 0 26 27" draw:points="0,0 26,0 26,27 0,27">
        <text:p/>
      </draw:polygon>
      <draw:frame text:anchor-type="page" text:anchor-page-number="2" draw:z-index="1935" draw:name="Shape449" draw:style-name="gr1" draw:text-style-name="P2" svg:width="0.0433in" svg:height="0.1925in" svg:x="1.5465in" svg:y="3.8634in">
        <draw:text-box>
          <text:p><text:span text:style-name="T2"><text:s/></text:span></text:p>
        </draw:text-box>
      </draw:frame>
      <draw:polygon text:anchor-type="page" text:anchor-page-number="2" draw:z-index="1934" draw:name="Shape461" draw:style-name="gr2" draw:text-style-name="P3" svg:width="6.0067in" svg:height="0.1913in" svg:x="1.7882in" svg:y="3.9083in" svg:viewBox="0 0 15258 487" draw:points="0,0 15258,0 15258,487 0,487">
        <text:p/>
      </draw:polygon>
      <draw:frame text:anchor-type="page" text:anchor-page-number="15" draw:z-index="1933" draw:name="Shape5022" draw:style-name="gr1" draw:text-style-name="P2" svg:width="2.5224in" svg:height="0.1295in" svg:x="0.3634in" svg:y="5.0598in">
        <draw:text-box>
          <text:p><text:span text:style-name="T1">- PNEC: Concentrazione prevedibile priva di effetti </text:span></text:p>
        </draw:text-box>
      </draw:frame>
      <draw:polygon text:anchor-type="page" text:anchor-page-number="12" draw:z-index="1932" draw:name="Shape4092" draw:style-name="gr5" draw:text-style-name="P6" svg:width="7.3835in" svg:height="0.1768in" svg:x="0.4114in" svg:y="8.9547in" svg:viewBox="0 0 18755 450" draw:points="0,0 18755,0 18755,450 0,450">
        <text:p/>
      </draw:polygon>
      <draw:frame text:anchor-type="page" text:anchor-page-number="10" draw:z-index="1931" draw:name="Shape3602" draw:style-name="gr1" draw:text-style-name="P2" svg:width="0.0433in" svg:height="0.1925in" svg:x="0.3634in" svg:y="5.8764in">
        <draw:text-box>
          <text:p><text:span text:style-name="T2"><text:s/></text:span></text:p>
        </draw:text-box>
      </draw:frame>
      <draw:polygon text:anchor-type="page" text:anchor-page-number="9" draw:z-index="1930" draw:name="Shape3374" draw:style-name="gr2" draw:text-style-name="P3" svg:width="3.1504in" svg:height="0.1283in" svg:x="0.363in" svg:y="4.6114in" svg:viewBox="0 0 8003 327" draw:points="0,0 8003,0 8003,327 0,327">
        <text:p/>
      </draw:polygon>
      <draw:polygon text:anchor-type="page" text:anchor-page-number="13" draw:z-index="1929" draw:name="Shape4231" draw:style-name="gr2" draw:text-style-name="P3" svg:width="1.8717in" svg:height="0.1268in" svg:x="0.4114in" svg:y="3.5898in" svg:viewBox="0 0 4755 323" draw:points="0,0 4755,0 4755,323 0,323">
        <text:p/>
      </draw:polygon>
      <draw:polygon text:anchor-type="page" text:anchor-page-number="1" draw:z-index="1928" draw:name="Shape124" draw:style-name="gr2" draw:text-style-name="P3" svg:width="5.8083in" svg:height="0.1264in" svg:x="1.9866in" svg:y="3.8933in" svg:viewBox="0 0 14754 322" draw:points="0,0 14754,0 14754,322 0,322">
        <text:p/>
      </draw:polygon>
      <draw:polygon text:anchor-type="page" text:anchor-page-number="5" draw:z-index="1927" draw:name="Shape1224" draw:style-name="gr2" draw:text-style-name="P3" svg:width="1.5752in" svg:height="0.2236in" svg:x="1.15in" svg:y="5.9846in" svg:viewBox="0 0 4002 569" draw:points="0,0 4002,0 4002,569 0,569">
        <text:p/>
      </draw:polygon>
      <draw:frame text:anchor-type="page" text:anchor-page-number="4" draw:z-index="1926" draw:name="Shape1076" draw:style-name="gr1" draw:text-style-name="P2" svg:width="0.0433in" svg:height="0.1925in" svg:x="4.028in" svg:y="6.8862in">
        <draw:text-box>
          <text:p><text:span text:style-name="T2"><text:s/></text:span></text:p>
        </draw:text-box>
      </draw:frame>
      <draw:polygon text:anchor-type="page" text:anchor-page-number="6" draw:z-index="1925" draw:name="Shape1852" draw:style-name="gr3" draw:text-style-name="P4" svg:width="0.5799in" svg:height="0.0102in" svg:x="3.5232in" svg:y="1.928in" svg:viewBox="0 0 1474 27" draw:points="0,0 1474,0 1474,27 0,27">
        <text:p/>
      </draw:polygon>
      <draw:frame text:anchor-type="page" text:anchor-page-number="8" draw:z-index="1924" draw:name="Shape3214" draw:style-name="gr1" draw:text-style-name="P2" svg:width="0.0433in" svg:height="0.1925in" svg:x="0.3634in" svg:y="5.4299in">
        <draw:text-box>
          <text:p><text:span text:style-name="T2"><text:s/></text:span></text:p>
        </draw:text-box>
      </draw:frame>
      <draw:frame text:anchor-type="page" text:anchor-page-number="11" draw:z-index="1923" draw:name="Shape3867" draw:style-name="gr1" draw:text-style-name="P2" svg:width="0.0433in" svg:height="0.1925in" svg:x="0.411in" svg:y="2.8417in">
        <draw:text-box>
          <text:p><text:span text:style-name="T2"><text:s/></text:span></text:p>
        </draw:text-box>
      </draw:frame>
      <draw:polygon text:anchor-type="page" text:anchor-page-number="3" draw:z-index="1922" draw:name="Shape781" draw:style-name="gr2" draw:text-style-name="P3" svg:width="0.3933in" svg:height="0.3835in" svg:x="7.2531in" svg:y="2.1831in" svg:viewBox="0 0 1000 975" draw:points="0,0 1000,0 1000,975 0,975">
        <text:p/>
      </draw:polygon>
      <draw:polygon text:anchor-type="page" text:anchor-page-number="7" draw:z-index="1921" draw:name="Shape2843" draw:style-name="gr2" draw:text-style-name="P3" svg:width="1.4783in" svg:height="0.128in" svg:x="2.7732in" svg:y="6.1283in" svg:viewBox="0 0 3756 326" draw:points="0,0 3756,0 3756,326 0,326">
        <text:p/>
      </draw:polygon>
      <draw:polygon text:anchor-type="page" text:anchor-page-number="14" draw:z-index="1920" draw:name="Shape4434" draw:style-name="gr2" draw:text-style-name="P3" svg:width="0.4933in" svg:height="0.1917in" svg:x="6.1197in" svg:y="3.0614in" svg:viewBox="0 0 1254 488" draw:points="0,0 1254,0 1254,488 0,488">
        <text:p/>
      </draw:polygon>
      <draw:polygon text:anchor-type="page" text:anchor-page-number="12" draw:z-index="1919" draw:name="Shape4091" draw:style-name="gr5" draw:text-style-name="P6" svg:width="7.4803in" svg:height="0.1768in" svg:x="0.363in" svg:y="8.9547in" svg:viewBox="0 0 19001 450" draw:points="0,0 19001,0 19001,450 0,450">
        <text:p/>
      </draw:polygon>
      <draw:polygon text:anchor-type="page" text:anchor-page-number="13" draw:z-index="1918" draw:name="Shape4230" draw:style-name="gr2" draw:text-style-name="P3" svg:width="1.9685in" svg:height="0.1268in" svg:x="0.363in" svg:y="3.5898in" svg:viewBox="0 0 5001 323" draw:points="0,0 5001,0 5001,323 0,323">
        <text:p/>
      </draw:polygon>
      <draw:polygon text:anchor-type="page" text:anchor-page-number="7" draw:z-index="1917" draw:name="Shape2842" draw:style-name="gr2" draw:text-style-name="P3" svg:width="1.5752in" svg:height="0.1283in" svg:x="2.7248in" svg:y="6.128in" svg:viewBox="0 0 4002 327" draw:points="0,0 4002,0 4002,327 0,327">
        <text:p/>
      </draw:polygon>
      <draw:frame text:anchor-type="page" text:anchor-page-number="5" draw:z-index="1916" draw:name="Shape1223" draw:style-name="gr1" draw:text-style-name="P2" svg:width="0.2051in" svg:height="0.113in" svg:x="0.4535in" svg:y="5.9874in">
        <draw:text-box>
          <text:p><text:span text:style-name="T4">DEU</text:span></text:p>
        </draw:text-box>
      </draw:frame>
      <draw:polygon text:anchor-type="page" text:anchor-page-number="6" draw:z-index="1915" draw:name="Shape1841" draw:style-name="gr3" draw:text-style-name="P4" svg:width="0.0102in" svg:height="0.0102in" svg:x="3.513in" svg:y="1.928in" svg:viewBox="0 0 27 27" draw:points="0,0 27,0 27,27 0,27">
        <text:p/>
      </draw:polygon>
      <draw:frame text:anchor-type="page" text:anchor-page-number="10" draw:z-index="1914" draw:name="Shape3598" draw:style-name="gr1" draw:text-style-name="P2" svg:width="0.0433in" svg:height="0.1925in" svg:x="3.1693in" svg:y="5.6874in">
        <draw:text-box>
          <text:p><text:span text:style-name="T2"><text:s/></text:span></text:p>
        </draw:text-box>
      </draw:frame>
      <draw:polygon text:anchor-type="page" text:anchor-page-number="2" draw:z-index="1913" draw:name="Shape459" draw:style-name="gr2" draw:text-style-name="P3" svg:width="6.1035in" svg:height="0.1913in" svg:x="1.7398in" svg:y="3.9083in" svg:viewBox="0 0 15504 487" draw:points="0,0 15504,0 15504,487 0,487">
        <text:p/>
      </draw:polygon>
      <draw:frame text:anchor-type="page" text:anchor-page-number="15" draw:z-index="1912" draw:name="Shape5021" draw:style-name="gr1" draw:text-style-name="P2" svg:width="1.8098in" svg:height="0.1295in" svg:x="0.3634in" svg:y="4.9311in">
        <draw:text-box>
          <text:p><text:span text:style-name="T1">- PMT: Persistente, mobile e tossico </text:span></text:p>
        </draw:text-box>
      </draw:frame>
      <draw:frame text:anchor-type="page" text:anchor-page-number="9" draw:z-index="1911" draw:name="Shape3371" draw:style-name="gr1" draw:text-style-name="P2" svg:width="2.3512in" svg:height="0.1295in" svg:x="3.561in" svg:y="4.4854in">
        <draw:text-box>
          <text:p><text:span text:style-name="T1">Non classificato (nessun componente rilevante)</text:span></text:p>
        </draw:text-box>
      </draw:frame>
      <draw:polygon text:anchor-type="page" text:anchor-page-number="1" draw:z-index="1910" draw:name="Shape123" draw:style-name="gr2" draw:text-style-name="P3" svg:width="5.9051in" svg:height="0.1264in" svg:x="1.9382in" svg:y="3.8933in" svg:viewBox="0 0 15000 322" draw:points="0,0 15000,0 15000,322 0,322">
        <text:p/>
      </draw:polygon>
      <draw:frame text:anchor-type="page" text:anchor-page-number="3" draw:z-index="1909" draw:name="Shape768" draw:style-name="gr1" draw:text-style-name="P2" svg:width="0.0433in" svg:height="0.1925in" svg:x="2.3799in" svg:y="2.1862in">
        <draw:text-box>
          <text:p><text:span text:style-name="T2"><text:s/></text:span></text:p>
        </draw:text-box>
      </draw:frame>
      <draw:frame text:anchor-type="page" text:anchor-page-number="11" draw:z-index="1908" draw:name="Shape3866" draw:style-name="gr1" draw:text-style-name="P2" svg:width="0.0433in" svg:height="0.1925in" svg:x="3.561in" svg:y="2.698in">
        <draw:text-box>
          <text:p><text:span text:style-name="T2"><text:s/></text:span></text:p>
        </draw:text-box>
      </draw:frame>
      <draw:polygon text:anchor-type="page" text:anchor-page-number="14" draw:z-index="1907" draw:name="Shape4433" draw:style-name="gr2" draw:text-style-name="P3" svg:width="0.5898in" svg:height="0.1917in" svg:x="6.0717in" svg:y="3.0614in" svg:viewBox="0 0 1499 488" draw:points="0,0 1499,0 1499,488 0,488">
        <text:p/>
      </draw:polygon>
      <draw:frame text:anchor-type="page" text:anchor-page-number="4" draw:z-index="1906" draw:name="Shape1079" draw:style-name="gr1" draw:text-style-name="P2" svg:width="3.5925in" svg:height="0.1776in" svg:x="0.4535in" svg:y="6.8957in">
        <draw:text-box>
          <text:p><text:span text:style-name="T6">SEZIONE 6. Misure in caso di rilascio accidentale</text:span></text:p>
        </draw:text-box>
      </draw:frame>
      <draw:frame text:anchor-type="page" text:anchor-page-number="8" draw:z-index="1905" draw:name="Shape3213" draw:style-name="gr1" draw:text-style-name="P2" svg:width="1.1949in" svg:height="0.1295in" svg:x="0.3634in" svg:y="5.2984in">
        <draw:text-box>
          <text:p><text:span text:style-name="T3">10.2. Stabilità chimica </text:span></text:p>
        </draw:text-box>
      </draw:frame>
      <draw:frame text:anchor-type="page" text:anchor-page-number="7" draw:z-index="1904" draw:name="Shape2839" draw:style-name="gr1" draw:text-style-name="P2" svg:width="0.4925in" svg:height="0.1295in" svg:x="0.4535in" svg:y="6.1283in">
        <draw:text-box>
          <text:p><text:span text:style-name="T3">Proprietà</text:span></text:p>
        </draw:text-box>
      </draw:frame>
      <draw:frame text:anchor-type="page" text:anchor-page-number="10" draw:z-index="1903" draw:name="Shape3601" draw:style-name="gr1" draw:text-style-name="P2" svg:width="2.7307in" svg:height="0.1776in" svg:x="0.4535in" svg:y="5.698in">
        <draw:text-box>
          <text:p><text:span text:style-name="T6">SEZIONE 12. Informazioni ecologiche</text:span></text:p>
        </draw:text-box>
      </draw:frame>
      <draw:frame text:anchor-type="page" text:anchor-page-number="1" draw:z-index="1902" draw:name="Shape122" draw:style-name="gr1" draw:text-style-name="P2" svg:width="0.9776in" svg:height="0.1295in" svg:x="0.4535in" svg:y="3.8937in">
        <draw:text-box>
          <text:p><text:span text:style-name="T1">Descrizione/Utilizzo</text:span></text:p>
        </draw:text-box>
      </draw:frame>
      <draw:frame text:anchor-type="page" text:anchor-page-number="4" draw:z-index="1901" draw:name="Shape1075" draw:style-name="gr1" draw:text-style-name="P2" svg:width="0.0433in" svg:height="0.1925in" svg:x="0.411in" svg:y="6.8862in">
        <draw:text-box>
          <text:p><text:span text:style-name="T2"><text:s/></text:span></text:p>
        </draw:text-box>
      </draw:frame>
      <draw:polygon text:anchor-type="page" text:anchor-page-number="6" draw:z-index="1900" draw:name="Shape1840" draw:style-name="gr3" draw:text-style-name="P4" svg:width="1.1717in" svg:height="0.0102in" svg:x="2.3413in" svg:y="1.928in" svg:viewBox="0 0 2977 27" draw:points="0,0 2977,0 2977,27 0,27">
        <text:p/>
      </draw:polygon>
      <draw:frame text:anchor-type="page" text:anchor-page-number="5" draw:z-index="1899" draw:name="Shape1218" draw:style-name="gr1" draw:text-style-name="P2" svg:width="0.0433in" svg:height="0.1925in" svg:x="0.411in" svg:y="5.9264in">
        <draw:text-box>
          <text:p><text:span text:style-name="T2"><text:s/></text:span></text:p>
        </draw:text-box>
      </draw:frame>
      <draw:polygon text:anchor-type="page" text:anchor-page-number="11" draw:z-index="1898" draw:name="Shape3871" draw:style-name="gr2" draw:text-style-name="P3" svg:width="2.265in" svg:height="0.1283in" svg:x="0.4114in" svg:y="2.8866in" svg:viewBox="0 0 5754 327" draw:points="0,0 5754,0 5754,327 0,327">
        <text:p/>
      </draw:polygon>
      <draw:frame text:anchor-type="page" text:anchor-page-number="2" draw:z-index="1897" draw:name="Shape452" draw:style-name="gr1" draw:text-style-name="P2" svg:width="1.1016in" svg:height="0.1295in" svg:x="0.4535in" svg:y="3.9102in">
        <draw:text-box>
          <text:p><text:span text:style-name="T1">Indicazioni di pericolo:</text:span></text:p>
        </draw:text-box>
      </draw:frame>
      <draw:frame text:anchor-type="page" text:anchor-page-number="14" draw:z-index="1896" draw:name="Shape4427" draw:style-name="gr1" draw:text-style-name="P2" svg:width="1.6732in" svg:height="0.1295in" svg:x="1.7882in" svg:y="3.0638in">
        <draw:text-box>
          <text:p><text:span text:style-name="T1">Corrosione cutanea, categoria 1C</text:span></text:p>
        </draw:text-box>
      </draw:frame>
      <draw:frame text:anchor-type="page" text:anchor-page-number="8" draw:z-index="1895" draw:name="Shape3212" draw:style-name="gr1" draw:text-style-name="P2" svg:width="0.0433in" svg:height="0.1925in" svg:x="0.3634in" svg:y="5.1098in">
        <draw:text-box>
          <text:p><text:span text:style-name="T2"><text:s/></text:span></text:p>
        </draw:text-box>
      </draw:frame>
      <draw:frame text:anchor-type="page" text:anchor-page-number="13" draw:z-index="1894" draw:name="Shape4222" draw:style-name="gr1" draw:text-style-name="P2" svg:width="0.0433in" svg:height="0.1925in" svg:x="5.3193in" svg:y="3.2252in">
        <draw:text-box>
          <text:p><text:span text:style-name="T2"><text:s/></text:span></text:p>
        </draw:text-box>
      </draw:frame>
      <draw:frame text:anchor-type="page" text:anchor-page-number="9" draw:z-index="1893" draw:name="Shape3360" draw:style-name="gr1" draw:text-style-name="P2" svg:width="0.0433in" svg:height="0.1925in" svg:x="1.75in" svg:y="4.4374in">
        <draw:text-box>
          <text:p><text:span text:style-name="T2"><text:s/></text:span></text:p>
        </draw:text-box>
      </draw:frame>
      <draw:frame text:anchor-type="page" text:anchor-page-number="12" draw:z-index="1892" draw:name="Shape4087" draw:style-name="gr1" draw:text-style-name="P2" svg:width="1.4252in" svg:height="0.1295in" svg:x="0.3634in" svg:y="8.6366in">
        <draw:text-box>
          <text:p><text:span text:style-name="T1">Informazione non pertinente </text:span></text:p>
        </draw:text-box>
      </draw:frame>
      <draw:frame text:anchor-type="page" text:anchor-page-number="15" draw:z-index="1891" draw:name="Shape5020" draw:style-name="gr1" draw:text-style-name="P2" svg:width="2.0031in" svg:height="0.1295in" svg:x="0.3634in" svg:y="4.8047in">
        <draw:text-box>
          <text:p><text:span text:style-name="T1">- PEL: Livello prevedibile di esposizione </text:span></text:p>
        </draw:text-box>
      </draw:frame>
      <draw:polygon text:anchor-type="page" text:anchor-page-number="3" draw:z-index="1890" draw:name="Shape780" draw:style-name="gr2" draw:text-style-name="P3" svg:width="3.8417in" svg:height="0.1917in" svg:x="3.363in" svg:y="2.1831in" svg:viewBox="0 0 9759 488" draw:points="0,0 9759,0 9759,488 0,488">
        <text:p/>
      </draw:polygon>
      <draw:frame text:anchor-type="page" text:anchor-page-number="4" draw:z-index="1889" draw:name="Shape1074" draw:style-name="gr1" draw:text-style-name="P2" svg:width="0.0433in" svg:height="0.1925in" svg:x="0.3634in" svg:y="6.7063in">
        <draw:text-box>
          <text:p><text:span text:style-name="T2"><text:s/></text:span></text:p>
        </draw:text-box>
      </draw:frame>
      <draw:polygon text:anchor-type="page" text:anchor-page-number="3" draw:z-index="1888" draw:name="Shape779" draw:style-name="gr2" draw:text-style-name="P3" svg:width="3.9382in" svg:height="0.3835in" svg:x="3.315in" svg:y="2.1831in" svg:viewBox="0 0 10004 975" draw:points="0,0 10004,0 10004,975 0,975">
        <text:p/>
      </draw:polygon>
      <draw:frame text:anchor-type="page" text:anchor-page-number="1" draw:z-index="1887" draw:name="Shape117" draw:style-name="gr1" draw:text-style-name="P2" svg:width="0.0433in" svg:height="0.1925in" svg:x="0.411in" svg:y="3.8465in">
        <draw:text-box>
          <text:p><text:span text:style-name="T2"><text:s/></text:span></text:p>
        </draw:text-box>
      </draw:frame>
      <draw:frame text:anchor-type="page" text:anchor-page-number="10" draw:z-index="1886" draw:name="Shape3597" draw:style-name="gr1" draw:text-style-name="P2" svg:width="0.0433in" svg:height="0.1925in" svg:x="0.411in" svg:y="5.6874in">
        <draw:text-box>
          <text:p><text:span text:style-name="T2"><text:s/></text:span></text:p>
        </draw:text-box>
      </draw:frame>
      <draw:frame text:anchor-type="page" text:anchor-page-number="14" draw:z-index="1885" draw:name="Shape4414" draw:style-name="gr1" draw:text-style-name="P2" svg:width="0.0433in" svg:height="0.1925in" svg:x="1.0693in" svg:y="3.0016in">
        <draw:text-box>
          <text:p><text:span text:style-name="T2"><text:s/></text:span></text:p>
        </draw:text-box>
      </draw:frame>
      <draw:frame text:anchor-type="page" text:anchor-page-number="7" draw:z-index="1884" draw:name="Shape2833" draw:style-name="gr1" draw:text-style-name="P2" svg:width="0.0433in" svg:height="0.1925in" svg:x="0.411in" svg:y="6.0811in">
        <draw:text-box>
          <text:p><text:span text:style-name="T2"><text:s/></text:span></text:p>
        </draw:text-box>
      </draw:frame>
      <draw:frame text:anchor-type="page" text:anchor-page-number="15" draw:z-index="1883" draw:name="Shape5019" draw:style-name="gr1" draw:text-style-name="P2" svg:width="2.326in" svg:height="0.1295in" svg:x="0.3634in" svg:y="4.6764in">
        <draw:text-box>
          <text:p><text:span text:style-name="T1">- PEC: Concentrazione ambientale prevedibile </text:span></text:p>
        </draw:text-box>
      </draw:frame>
      <draw:polygon text:anchor-type="page" text:anchor-page-number="9" draw:z-index="1882" draw:name="Shape3370" draw:style-name="gr2" draw:text-style-name="P3" svg:width="3.8402in" svg:height="0.1283in" svg:x="3.5614in" svg:y="4.4831in" svg:viewBox="0 0 9755 327" draw:points="0,0 9755,0 9755,327 0,327">
        <text:p/>
      </draw:polygon>
      <draw:polygon text:anchor-type="page" text:anchor-page-number="6" draw:z-index="1881" draw:name="Shape1839" draw:style-name="gr3" draw:text-style-name="P4" svg:width="0.0098in" svg:height="0.0102in" svg:x="2.3315in" svg:y="1.928in" svg:viewBox="0 0 26 27" draw:points="0,0 26,0 26,27 0,27">
        <text:p/>
      </draw:polygon>
      <draw:frame text:anchor-type="page" text:anchor-page-number="12" draw:z-index="1880" draw:name="Shape4086" draw:style-name="gr1" draw:text-style-name="P2" svg:width="0.0433in" svg:height="0.1925in" svg:x="0.3634in" svg:y="8.448in">
        <draw:text-box>
          <text:p><text:span text:style-name="T2"><text:s/></text:span></text:p>
        </draw:text-box>
      </draw:frame>
      <draw:frame text:anchor-type="page" text:anchor-page-number="5" draw:z-index="1879" draw:name="Shape1217" draw:style-name="gr1" draw:text-style-name="P2" svg:width="0.0433in" svg:height="0.1925in" svg:x="0.3634in" svg:y="5.7965in">
        <draw:text-box>
          <text:p><text:span text:style-name="T2"><text:s/></text:span></text:p>
        </draw:text-box>
      </draw:frame>
      <draw:frame text:anchor-type="page" text:anchor-page-number="2" draw:z-index="1878" draw:name="Shape448" draw:style-name="gr1" draw:text-style-name="P2" svg:width="0.0433in" svg:height="0.1925in" svg:x="0.411in" svg:y="3.8634in">
        <draw:text-box>
          <text:p><text:span text:style-name="T2"><text:s/></text:span></text:p>
        </draw:text-box>
      </draw:frame>
      <draw:polygon text:anchor-type="page" text:anchor-page-number="11" draw:z-index="1877" draw:name="Shape3870" draw:style-name="gr2" draw:text-style-name="P3" svg:width="2.3618in" svg:height="0.1913in" svg:x="0.363in" svg:y="2.8866in" svg:viewBox="0 0 6000 487" draw:points="0,0 6000,0 6000,487 0,487">
        <text:p/>
      </draw:polygon>
      <draw:frame text:anchor-type="page" text:anchor-page-number="8" draw:z-index="1876" draw:name="Shape3211" draw:style-name="gr1" draw:text-style-name="P2" svg:width="2.7823in" svg:height="0.1295in" svg:x="0.3634in" svg:y="4.9807in">
        <draw:text-box>
          <text:p><text:span text:style-name="T1">Si decompone a temperature superiori a 800°C/1472°F. </text:span></text:p>
        </draw:text-box>
      </draw:frame>
      <draw:frame text:anchor-type="page" text:anchor-page-number="13" draw:z-index="1875" draw:name="Shape4224" draw:style-name="gr1" draw:text-style-name="P2" svg:width="1.7724in" svg:height="0.1295in" svg:x="3.561in" svg:y="3.272in">
        <draw:text-box>
          <text:p><text:span text:style-name="T1">METIL-2H-ISOTIAZOL-3-ONE (3:1)</text:span></text:p>
        </draw:text-box>
      </draw:frame>
      <draw:polygon text:anchor-type="page" text:anchor-page-number="6" draw:z-index="1874" draw:name="Shape1838" draw:style-name="gr3" draw:text-style-name="P4" svg:width="0.7768in" svg:height="0.0102in" svg:x="1.5547in" svg:y="1.928in" svg:viewBox="0 0 1974 27" draw:points="0,0 1974,0 1974,27 0,27">
        <text:p/>
      </draw:polygon>
      <draw:polygon text:anchor-type="page" text:anchor-page-number="9" draw:z-index="1873" draw:name="Shape3369" draw:style-name="gr2" draw:text-style-name="P3" svg:width="3.937in" svg:height="0.1283in" svg:x="3.513in" svg:y="4.4831in" svg:viewBox="0 0 10001 327" draw:points="0,0 10001,0 10001,327 0,327">
        <text:p/>
      </draw:polygon>
      <draw:polygon text:anchor-type="page" text:anchor-page-number="5" draw:z-index="1872" draw:name="Shape1222" draw:style-name="gr2" draw:text-style-name="P3" svg:width="0.6902in" svg:height="0.1118in" svg:x="0.4114in" svg:y="5.9846in" svg:viewBox="0 0 1754 285" draw:points="0,0 1754,0 1754,285 0,285">
        <text:p/>
      </draw:polygon>
      <draw:frame text:anchor-type="page" text:anchor-page-number="13" draw:z-index="1871" draw:name="Shape4221" draw:style-name="gr1" draw:text-style-name="P2" svg:width="1.878in" svg:height="0.1295in" svg:x="3.561in" svg:y="3.1437in">
        <draw:text-box>
          <text:p><text:span text:style-name="T1">2- METIL-2H-ISOTIAZOL-3-ONE E 2-</text:span></text:p>
        </draw:text-box>
      </draw:frame>
      <draw:polygon text:anchor-type="page" text:anchor-page-number="4" draw:z-index="1870" draw:name="Shape1078" draw:style-name="gr5" draw:text-style-name="P6" svg:width="7.3835in" svg:height="0.1768in" svg:x="0.4114in" svg:y="6.8949in" svg:viewBox="0 0 18755 450" draw:points="0,0 18755,0 18755,450 0,450">
        <text:p/>
      </draw:polygon>
      <draw:polygon text:anchor-type="page" text:anchor-page-number="14" draw:z-index="1869" draw:name="Shape4426" draw:style-name="gr2" draw:text-style-name="P3" svg:width="4.235in" svg:height="0.1283in" svg:x="1.7882in" svg:y="3.0614in" svg:viewBox="0 0 10758 327" draw:points="0,0 10758,0 10758,327 0,327">
        <text:p/>
      </draw:polygon>
      <draw:frame text:anchor-type="page" text:anchor-page-number="2" draw:z-index="1868" draw:name="Shape447" draw:style-name="gr1" draw:text-style-name="P2" svg:width="0.0433in" svg:height="0.1925in" svg:x="0.3634in" svg:y="3.7193in">
        <draw:text-box>
          <text:p><text:span text:style-name="T2"><text:s/></text:span></text:p>
        </draw:text-box>
      </draw:frame>
      <draw:frame text:anchor-type="page" text:anchor-page-number="11" draw:z-index="1867" draw:name="Shape3865" draw:style-name="gr1" draw:text-style-name="P2" svg:width="0.0433in" svg:height="0.1925in" svg:x="2.7728in" svg:y="2.698in">
        <draw:text-box>
          <text:p><text:span text:style-name="T2"><text:s/></text:span></text:p>
        </draw:text-box>
      </draw:frame>
      <draw:frame text:anchor-type="page" text:anchor-page-number="3" draw:z-index="1866" draw:name="Shape773" draw:style-name="gr1" draw:text-style-name="P2" svg:width="0.0433in" svg:height="0.1925in" svg:x="2.1154in" svg:y="2.3917in">
        <draw:text-box>
          <text:p><text:span text:style-name="T2"><text:s/></text:span></text:p>
        </draw:text-box>
      </draw:frame>
      <draw:frame text:anchor-type="page" text:anchor-page-number="8" draw:z-index="1865" draw:name="Shape3210" draw:style-name="gr1" draw:text-style-name="P2" svg:width="0.0433in" svg:height="0.1925in" svg:x="0.3634in" svg:y="4.7898in">
        <draw:text-box>
          <text:p><text:span text:style-name="T2"><text:s/></text:span></text:p>
        </draw:text-box>
      </draw:frame>
      <draw:frame text:anchor-type="page" text:anchor-page-number="1" draw:z-index="1864" draw:name="Shape112" draw:style-name="gr1" draw:text-style-name="P2" svg:width="0.0433in" svg:height="0.1925in" svg:x="4.5047in" svg:y="3.7181in">
        <draw:text-box>
          <text:p><text:span text:style-name="T2"><text:s/></text:span></text:p>
        </draw:text-box>
      </draw:frame>
      <draw:frame text:anchor-type="page" text:anchor-page-number="15" draw:z-index="1863" draw:name="Shape5018" draw:style-name="gr1" draw:text-style-name="P2" svg:width="2.2449in" svg:height="0.1295in" svg:x="0.3634in" svg:y="4.548in">
        <draw:text-box>
          <text:p><text:span text:style-name="T1">- PBT: Persistente, bioaccumulante e tossico </text:span></text:p>
        </draw:text-box>
      </draw:frame>
      <draw:frame text:anchor-type="page" text:anchor-page-number="7" draw:z-index="1862" draw:name="Shape2832" draw:style-name="gr1" draw:text-style-name="P2" svg:width="0.0433in" svg:height="0.1925in" svg:x="0.3634in" svg:y="5.9398in">
        <draw:text-box>
          <text:p><text:span text:style-name="T2"><text:s/></text:span></text:p>
        </draw:text-box>
      </draw:frame>
      <draw:frame text:anchor-type="page" text:anchor-page-number="12" draw:z-index="1861" draw:name="Shape4085" draw:style-name="gr1" draw:text-style-name="P2" svg:width="0.0433in" svg:height="0.1925in" svg:x="0.3634in" svg:y="8.2563in">
        <draw:text-box>
          <text:p><text:span text:style-name="T2"><text:s/></text:span></text:p>
        </draw:text-box>
      </draw:frame>
      <draw:frame text:anchor-type="page" text:anchor-page-number="10" draw:z-index="1860" draw:name="Shape3596" draw:style-name="gr1" draw:text-style-name="P2" svg:width="0.0433in" svg:height="0.1925in" svg:x="0.3634in" svg:y="5.5075in">
        <draw:text-box>
          <text:p><text:span text:style-name="T2"><text:s/></text:span></text:p>
        </draw:text-box>
      </draw:frame>
      <draw:polygon text:anchor-type="page" text:anchor-page-number="13" draw:z-index="1859" draw:name="Shape4223" draw:style-name="gr2" draw:text-style-name="P3" svg:width="1.8717in" svg:height="0.1283in" svg:x="3.5614in" svg:y="3.2697in" svg:viewBox="0 0 4755 327" draw:points="0,0 4755,0 4755,327 0,327">
        <text:p/>
      </draw:polygon>
      <draw:polygon text:anchor-type="page" text:anchor-page-number="10" draw:z-index="1858" draw:name="Shape3600" draw:style-name="gr5" draw:text-style-name="P6" svg:width="7.3835in" svg:height="0.1768in" svg:x="0.4114in" svg:y="5.6965in" svg:viewBox="0 0 18755 450" draw:points="0,0 18755,0 18755,450 0,450">
        <text:p/>
      </draw:polygon>
      <draw:polygon text:anchor-type="page" text:anchor-page-number="6" draw:z-index="1857" draw:name="Shape1837" draw:style-name="gr3" draw:text-style-name="P4" svg:width="0.0098in" svg:height="0.0102in" svg:x="1.5449in" svg:y="1.928in" svg:viewBox="0 0 26 27" draw:points="0,0 26,0 26,27 0,27">
        <text:p/>
      </draw:polygon>
      <draw:frame text:anchor-type="page" text:anchor-page-number="9" draw:z-index="1856" draw:name="Shape3367" draw:style-name="gr1" draw:text-style-name="P2" svg:width="1.298in" svg:height="0.1295in" svg:x="0.4535in" svg:y="4.4854in">
        <draw:text-box>
          <text:p><text:span text:style-name="T1">ATE (Orale) della miscela:</text:span></text:p>
        </draw:text-box>
      </draw:frame>
      <draw:frame text:anchor-type="page" text:anchor-page-number="15" draw:z-index="1855" draw:name="Shape5017" draw:style-name="gr1" draw:text-style-name="P2" svg:width="2.1894in" svg:height="0.1295in" svg:x="0.3634in" svg:y="4.4217in">
        <draw:text-box>
          <text:p><text:span text:style-name="T1">- OEL: Livello di esposizione occupazionale </text:span></text:p>
        </draw:text-box>
      </draw:frame>
      <draw:polygon text:anchor-type="page" text:anchor-page-number="5" draw:z-index="1854" draw:name="Shape1221" draw:style-name="gr2" draw:text-style-name="P3" svg:width="0.7866in" svg:height="0.2236in" svg:x="0.363in" svg:y="5.9846in" svg:viewBox="0 0 1999 569" draw:points="0,0 1999,0 1999,569 0,569">
        <text:p/>
      </draw:polygon>
      <draw:frame text:anchor-type="page" text:anchor-page-number="12" draw:z-index="1853" draw:name="Shape4084" draw:style-name="gr1" draw:text-style-name="P2" svg:width="3.7543in" svg:height="0.1295in" svg:x="0.3634in" svg:y="8.1256in">
        <draw:text-box>
          <text:p><text:span text:style-name="T3">14.7. Trasporto marittimo alla rinfusa conformemente agli atti dell`IMO </text:span></text:p>
        </draw:text-box>
      </draw:frame>
      <draw:polygon text:anchor-type="page" text:anchor-page-number="4" draw:z-index="1852" draw:name="Shape1077" draw:style-name="gr5" draw:text-style-name="P6" svg:width="7.4803in" svg:height="0.1768in" svg:x="0.363in" svg:y="6.8949in" svg:viewBox="0 0 19001 450" draw:points="0,0 19001,0 19001,450 0,450">
        <text:p/>
      </draw:polygon>
      <draw:polygon text:anchor-type="page" text:anchor-page-number="14" draw:z-index="1851" draw:name="Shape4425" draw:style-name="gr2" draw:text-style-name="P3" svg:width="4.3319in" svg:height="0.1917in" svg:x="1.7398in" svg:y="3.0614in" svg:viewBox="0 0 11004 488" draw:points="0,0 11004,0 11004,488 0,488">
        <text:p/>
      </draw:polygon>
      <draw:polygon text:anchor-type="page" text:anchor-page-number="1" draw:z-index="1850" draw:name="Shape121" draw:style-name="gr2" draw:text-style-name="P3" svg:width="1.4768in" svg:height="0.1264in" svg:x="0.4114in" svg:y="3.8933in" svg:viewBox="0 0 3752 322" draw:points="0,0 3752,0 3752,322 0,322">
        <text:p/>
      </draw:polygon>
      <draw:polygon text:anchor-type="page" text:anchor-page-number="11" draw:z-index="1849" draw:name="Shape3873" draw:style-name="gr2" draw:text-style-name="P3" svg:width="3.8402in" svg:height="0.1917in" svg:x="3.5614in" svg:y="2.6949in" svg:viewBox="0 0 9755 488" draw:points="0,0 9755,0 9755,488 0,488">
        <text:p/>
      </draw:polygon>
      <draw:polygon text:anchor-type="page" text:anchor-page-number="3" draw:z-index="1848" draw:name="Shape772" draw:style-name="gr2" draw:text-style-name="P3" svg:width="0.8866in" svg:height="0.1917in" svg:x="2.3799in" svg:y="2.1831in" svg:viewBox="0 0 2253 488" draw:points="0,0 2253,0 2253,488 0,488">
        <text:p/>
      </draw:polygon>
      <draw:polygon text:anchor-type="page" text:anchor-page-number="2" draw:z-index="1847" draw:name="Shape451" draw:style-name="gr2" draw:text-style-name="P3" svg:width="1.2799in" svg:height="0.1283in" svg:x="0.4114in" svg:y="3.9083in" svg:viewBox="0 0 3252 327" draw:points="0,0 3252,0 3252,327 0,327">
        <text:p/>
      </draw:polygon>
      <draw:frame text:anchor-type="page" text:anchor-page-number="8" draw:z-index="1846" draw:name="Shape3209" draw:style-name="gr1" draw:text-style-name="P2" svg:width="1.178in" svg:height="0.1295in" svg:x="0.3634in" svg:y="4.6602in">
        <draw:text-box>
          <text:p><text:span text:style-name="T1">CALCIO CARBONATO </text:span></text:p>
        </draw:text-box>
      </draw:frame>
      <draw:polygon text:anchor-type="page" text:anchor-page-number="7" draw:z-index="1845" draw:name="Shape2838" draw:style-name="gr2" draw:text-style-name="P3" svg:width="2.265in" svg:height="0.128in" svg:x="0.4114in" svg:y="6.1283in" svg:viewBox="0 0 5754 326" draw:points="0,0 5754,0 5754,326 0,326">
        <text:p/>
      </draw:polygon>
      <draw:frame text:anchor-type="page" text:anchor-page-number="13" draw:z-index="1844" draw:name="Shape4219" draw:style-name="gr1" draw:text-style-name="P2" svg:width="1.8406in" svg:height="0.1295in" svg:x="3.561in" svg:y="3.0154in">
        <draw:text-box>
          <text:p><text:span text:style-name="T1">MASSA DI REAZIONE DI 5-CLORO-</text:span></text:p>
        </draw:text-box>
      </draw:frame>
      <draw:frame text:anchor-type="page" text:anchor-page-number="5" draw:z-index="1843" draw:name="Shape1216" draw:style-name="gr1" draw:text-style-name="P2" svg:width="1.0831in" svg:height="0.1295in" svg:x="0.3634in" svg:y="5.6665in">
        <draw:text-box>
          <text:p><text:span text:style-name="T1">Riferimenti normativi: </text:span></text:p>
        </draw:text-box>
      </draw:frame>
      <draw:polygon text:anchor-type="page" text:anchor-page-number="6" draw:z-index="1842" draw:name="Shape1834" draw:style-name="gr3" draw:text-style-name="P4" svg:width="1.1819in" svg:height="0.0102in" svg:x="0.363in" svg:y="1.928in" svg:viewBox="0 0 3003 27" draw:points="0,0 3003,0 3003,27 0,27">
        <text:p/>
      </draw:polygon>
      <draw:frame text:anchor-type="page" text:anchor-page-number="12" draw:z-index="1841" draw:name="Shape4083" draw:style-name="gr1" draw:text-style-name="P2" svg:width="0.0433in" svg:height="0.1925in" svg:x="0.3634in" svg:y="7.9362in">
        <draw:text-box>
          <text:p><text:span text:style-name="T2"><text:s/></text:span></text:p>
        </draw:text-box>
      </draw:frame>
      <draw:frame text:anchor-type="page" text:anchor-page-number="8" draw:z-index="1840" draw:name="Shape3208" draw:style-name="gr1" draw:text-style-name="P2" svg:width="0.0433in" svg:height="0.1925in" svg:x="0.3634in" svg:y="4.4717in">
        <draw:text-box>
          <text:p><text:span text:style-name="T2"><text:s/></text:span></text:p>
        </draw:text-box>
      </draw:frame>
      <draw:polygon text:anchor-type="page" text:anchor-page-number="2" draw:z-index="1839" draw:name="Shape450" draw:style-name="gr2" draw:text-style-name="P3" svg:width="1.3768in" svg:height="0.1913in" svg:x="0.363in" svg:y="3.9083in" svg:viewBox="0 0 3498 487" draw:points="0,0 3498,0 3498,487 0,487">
        <text:p/>
      </draw:polygon>
      <draw:polygon text:anchor-type="page" text:anchor-page-number="11" draw:z-index="1838" draw:name="Shape3872" draw:style-name="gr2" draw:text-style-name="P3" svg:width="3.937in" svg:height="0.1917in" svg:x="3.513in" svg:y="2.6949in" svg:viewBox="0 0 10001 488" draw:points="0,0 10001,0 10001,488 0,488">
        <text:p/>
      </draw:polygon>
      <draw:polygon text:anchor-type="page" text:anchor-page-number="10" draw:z-index="1837" draw:name="Shape3599" draw:style-name="gr5" draw:text-style-name="P6" svg:width="7.4803in" svg:height="0.1768in" svg:x="0.363in" svg:y="5.6965in" svg:viewBox="0 0 19001 450" draw:points="0,0 19001,0 19001,450 0,450">
        <text:p/>
      </draw:polygon>
      <draw:frame text:anchor-type="page" text:anchor-page-number="4" draw:z-index="1836" draw:name="Shape1073" draw:style-name="gr1" draw:text-style-name="P2" svg:width="0.0433in" svg:height="0.1925in" svg:x="0.3634in" svg:y="6.5146in">
        <draw:text-box>
          <text:p><text:span text:style-name="T2"><text:s/></text:span></text:p>
        </draw:text-box>
      </draw:frame>
      <draw:polygon text:anchor-type="page" text:anchor-page-number="1" draw:z-index="1835" draw:name="Shape120" draw:style-name="gr2" draw:text-style-name="P3" svg:width="1.5752in" svg:height="0.1264in" svg:x="0.363in" svg:y="3.8933in" svg:viewBox="0 0 4002 322" draw:points="0,0 4002,0 4002,322 0,322">
        <text:p/>
      </draw:polygon>
      <draw:frame text:anchor-type="page" text:anchor-page-number="9" draw:z-index="1834" draw:name="Shape3359" draw:style-name="gr1" draw:text-style-name="P2" svg:width="0.0433in" svg:height="0.1925in" svg:x="0.411in" svg:y="4.4374in">
        <draw:text-box>
          <text:p><text:span text:style-name="T2"><text:s/></text:span></text:p>
        </draw:text-box>
      </draw:frame>
      <draw:frame text:anchor-type="page" text:anchor-page-number="14" draw:z-index="1833" draw:name="Shape4423" draw:style-name="gr1" draw:text-style-name="P2" svg:width="0.6079in" svg:height="0.113in" svg:x="0.4535in" svg:y="3.0626in">
        <draw:text-box>
          <text:p><text:span text:style-name="T5">Skin Corr. 1C</text:span></text:p>
        </draw:text-box>
      </draw:frame>
      <draw:polygon text:anchor-type="page" text:anchor-page-number="7" draw:z-index="1832" draw:name="Shape2837" draw:style-name="gr2" draw:text-style-name="P3" svg:width="2.3618in" svg:height="0.1283in" svg:x="0.363in" svg:y="6.128in" svg:viewBox="0 0 6000 327" draw:points="0,0 6000,0 6000,327 0,327">
        <text:p/>
      </draw:polygon>
      <draw:polygon text:anchor-type="page" text:anchor-page-number="3" draw:z-index="1831" draw:name="Shape777" draw:style-name="gr2" draw:text-style-name="P3" svg:width="0.9835in" svg:height="0.3835in" svg:x="2.3315in" svg:y="2.1831in" svg:viewBox="0 0 2499 975" draw:points="0,0 2499,0 2499,975 0,975">
        <text:p/>
      </draw:polygon>
      <draw:frame text:anchor-type="page" text:anchor-page-number="15" draw:z-index="1830" draw:name="Shape5016" draw:style-name="gr1" draw:text-style-name="P2" svg:width="1.2449in" svg:height="0.1295in" svg:x="0.3634in" svg:y="4.2929in">
        <draw:text-box>
          <text:p><text:span text:style-name="T1">- LD50: Dose letale 50% </text:span></text:p>
        </draw:text-box>
      </draw:frame>
      <draw:frame text:anchor-type="page" text:anchor-page-number="4" draw:z-index="1829" draw:name="Shape1072" draw:style-name="gr1" draw:text-style-name="P2" svg:width="3.5732in" svg:height="0.1295in" svg:x="0.3634in" svg:y="6.3846in">
        <draw:text-box>
          <text:p><text:span text:style-name="T1">antifiamma (EN 659) e stivali per Vigili del Fuoco (HO A29 oppure A30). </text:span></text:p>
        </draw:text-box>
      </draw:frame>
      <draw:frame text:anchor-type="page" text:anchor-page-number="12" draw:z-index="1828" draw:name="Shape4082" draw:style-name="gr1" draw:text-style-name="P2" svg:width="0.0433in" svg:height="0.1925in" svg:x="0.3634in" svg:y="7.7445in">
        <draw:text-box>
          <text:p><text:span text:style-name="T2"><text:s/></text:span></text:p>
        </draw:text-box>
      </draw:frame>
      <draw:frame text:anchor-type="page" text:anchor-page-number="7" draw:z-index="1827" draw:name="Shape2828" draw:style-name="gr1" draw:text-style-name="P2" svg:width="0.0433in" svg:height="0.1925in" svg:x="3.8366in" svg:y="5.761in">
        <draw:text-box>
          <text:p><text:span text:style-name="T2"><text:s/></text:span></text:p>
        </draw:text-box>
      </draw:frame>
      <draw:frame text:anchor-type="page" text:anchor-page-number="9" draw:z-index="1826" draw:name="Shape3354" draw:style-name="gr1" draw:text-style-name="P2" svg:width="0.0433in" svg:height="0.1925in" svg:x="5.8953in" svg:y="4.3098in">
        <draw:text-box>
          <text:p><text:span text:style-name="T2"><text:s/></text:span></text:p>
        </draw:text-box>
      </draw:frame>
      <draw:frame text:anchor-type="page" text:anchor-page-number="11" draw:z-index="1825" draw:name="Shape3859" draw:style-name="gr1" draw:text-style-name="P2" svg:width="0.0433in" svg:height="0.1925in" svg:x="1.6016in" svg:y="2.6492in">
        <draw:text-box>
          <text:p><text:span text:style-name="T2"><text:s/></text:span></text:p>
        </draw:text-box>
      </draw:frame>
      <draw:frame text:anchor-type="page" text:anchor-page-number="6" draw:z-index="1824" draw:name="Shape1871" draw:style-name="gr1" draw:text-style-name="P2" svg:width="0.0433in" svg:height="0.1925in" svg:x="6.4846in" svg:y="1.9917in">
        <draw:text-box>
          <text:p><text:span text:style-name="T2"><text:s/></text:span></text:p>
        </draw:text-box>
      </draw:frame>
      <draw:frame text:anchor-type="page" text:anchor-page-number="8" draw:z-index="1823" draw:name="Shape3207" draw:style-name="gr1" draw:text-style-name="P2" svg:width="4.8059in" svg:height="0.1295in" svg:x="0.3634in" svg:y="4.3425in">
        <draw:text-box>
          <text:p><text:span text:style-name="T1">Non vi sono particolari pericoli di reazione con altre sostanze nelle normali condizioni di impiego. </text:span></text:p>
        </draw:text-box>
      </draw:frame>
      <draw:frame text:anchor-type="page" text:anchor-page-number="2" draw:z-index="1822" draw:name="Shape440" draw:style-name="gr1" draw:text-style-name="P2" svg:width="0.0433in" svg:height="0.1925in" svg:x="1.861in" svg:y="3.5429in">
        <draw:text-box>
          <text:p><text:span text:style-name="T2"><text:s/></text:span></text:p>
        </draw:text-box>
      </draw:frame>
      <draw:frame text:anchor-type="page" text:anchor-page-number="5" draw:z-index="1821" draw:name="Shape1215" draw:style-name="gr1" draw:text-style-name="P2" svg:width="0.0433in" svg:height="0.1925in" svg:x="0.3634in" svg:y="5.4764in">
        <draw:text-box>
          <text:p><text:span text:style-name="T2"><text:s/></text:span></text:p>
        </draw:text-box>
      </draw:frame>
      <draw:frame text:anchor-type="page" text:anchor-page-number="3" draw:z-index="1820" draw:name="Shape774" draw:style-name="gr1" draw:text-style-name="P2" svg:width="1.7157in" svg:height="0.1295in" svg:x="0.411in" svg:y="2.439in">
        <draw:text-box>
          <text:p><text:span text:style-name="T3">diametro aerodinamico ≤ 10 μm)</text:span></text:p>
        </draw:text-box>
      </draw:frame>
      <draw:frame text:anchor-type="page" text:anchor-page-number="10" draw:z-index="1819" draw:name="Shape3595" draw:style-name="gr1" draw:text-style-name="P2" svg:width="2.115in" svg:height="0.1295in" svg:x="0.3634in" svg:y="5.3783in">
        <draw:text-box>
          <text:p><text:span text:style-name="T1">sulla salute umana oggetto di valutazione. </text:span></text:p>
        </draw:text-box>
      </draw:frame>
      <draw:frame text:anchor-type="page" text:anchor-page-number="14" draw:z-index="1818" draw:name="Shape4413" draw:style-name="gr1" draw:text-style-name="P2" svg:width="0.0433in" svg:height="0.1925in" svg:x="0.411in" svg:y="3.0016in">
        <draw:text-box>
          <text:p><text:span text:style-name="T2"><text:s/></text:span></text:p>
        </draw:text-box>
      </draw:frame>
      <draw:polygon text:anchor-type="page" text:anchor-page-number="13" draw:z-index="1817" draw:name="Shape4220" draw:style-name="gr2" draw:text-style-name="P3" svg:width="1.8717in" svg:height="0.1283in" svg:x="3.5614in" svg:y="3.1413in" svg:viewBox="0 0 4755 327" draw:points="0,0 4755,0 4755,327 0,327">
        <text:p/>
      </draw:polygon>
      <draw:frame text:anchor-type="page" text:anchor-page-number="15" draw:z-index="1816" draw:name="Shape5015" draw:style-name="gr1" draw:text-style-name="P2" svg:width="1.7669in" svg:height="0.1295in" svg:x="0.3634in" svg:y="4.1654in">
        <draw:text-box>
          <text:p><text:span text:style-name="T1">- LC50: Concentrazione letale 50% </text:span></text:p>
        </draw:text-box>
      </draw:frame>
      <draw:frame text:anchor-type="page" text:anchor-page-number="1" draw:z-index="1815" draw:name="Shape115" draw:style-name="gr1" draw:text-style-name="P2" svg:width="4.0776in" svg:height="0.1295in" svg:x="0.4535in" svg:y="3.7654in">
        <draw:text-box>
          <text:p><text:span text:style-name="T3">1.2. Usi identificati pertinenti della sostanza o della miscela e usi sconsigliati</text:span></text:p>
        </draw:text-box>
      </draw:frame>
      <draw:frame text:anchor-type="page" text:anchor-page-number="5" draw:z-index="1814" draw:name="Shape1211" draw:style-name="gr1" draw:text-style-name="P2" svg:width="0.0433in" svg:height="0.1925in" svg:x="1.8181in" svg:y="5.298in">
        <draw:text-box>
          <text:p><text:span text:style-name="T2"><text:s/></text:span></text:p>
        </draw:text-box>
      </draw:frame>
      <draw:frame text:anchor-type="page" text:anchor-page-number="3" draw:z-index="1813" draw:name="Shape771" draw:style-name="gr1" draw:text-style-name="P2" svg:width="1.8004in" svg:height="0.1295in" svg:x="0.411in" svg:y="2.3126in">
        <draw:text-box>
          <text:p><text:span text:style-name="T3">contenente &lt; 1% di particelle con </text:span></text:p>
        </draw:text-box>
      </draw:frame>
      <draw:frame text:anchor-type="page" text:anchor-page-number="10" draw:z-index="1812" draw:name="Shape3594" draw:style-name="gr1" draw:text-style-name="P2" svg:width="7.5079in" svg:height="0.1295in" svg:x="0.3634in" svg:y="5.252in">
        <draw:text-box>
          <text:p><text:span text:style-name="T1">In base ai dati disponibili, il prodotto non contiene sostanze elencate nelle principali liste europee di potenziali o sospetti interferenti endocrini con effetti </text:span></text:p>
        </draw:text-box>
      </draw:frame>
      <draw:frame text:anchor-type="page" text:anchor-page-number="7" draw:z-index="1811" draw:name="Shape2829" draw:style-name="gr1" draw:text-style-name="P2" svg:width="3.4067in" svg:height="0.1295in" svg:x="0.4535in" svg:y="5.8083in">
        <draw:text-box>
          <text:p><text:span text:style-name="T3">9.1. Informazioni sulle proprietà fisiche e chimiche fondamentali</text:span></text:p>
        </draw:text-box>
      </draw:frame>
      <draw:polygon text:anchor-type="page" text:anchor-page-number="11" draw:z-index="1810" draw:name="Shape3864" draw:style-name="gr2" draw:text-style-name="P3" svg:width="0.6898in" svg:height="0.1917in" svg:x="2.7732in" svg:y="2.6949in" svg:viewBox="0 0 1753 488" draw:points="0,0 1753,0 1753,488 0,488">
        <text:p/>
      </draw:polygon>
      <draw:frame text:anchor-type="page" text:anchor-page-number="12" draw:z-index="1809" draw:name="Shape4081" draw:style-name="gr1" draw:text-style-name="P2" svg:width="0.7787in" svg:height="0.1295in" svg:x="0.3634in" svg:y="7.6154in">
        <draw:text-box>
          <text:p><text:span text:style-name="T1">non applicabile </text:span></text:p>
        </draw:text-box>
      </draw:frame>
      <draw:frame text:anchor-type="page" text:anchor-page-number="2" draw:z-index="1808" draw:name="Shape446" draw:style-name="gr1" draw:text-style-name="P2" svg:width="0.076in" svg:height="0.1295in" svg:x="1.7882in" svg:y="3.5902in">
        <draw:text-box>
          <text:p><text:span text:style-name="T1">--</text:span></text:p>
        </draw:text-box>
      </draw:frame>
      <draw:frame text:anchor-type="page" text:anchor-page-number="13" draw:z-index="1807" draw:name="Shape4210" draw:style-name="gr1" draw:text-style-name="P2" svg:width="0.0433in" svg:height="0.1925in" svg:x="2.5035in" svg:y="2.9681in">
        <draw:text-box>
          <text:p><text:span text:style-name="T2"><text:s/></text:span></text:p>
        </draw:text-box>
      </draw:frame>
      <draw:frame text:anchor-type="page" text:anchor-page-number="4" draw:z-index="1806" draw:name="Shape1071" draw:style-name="gr1" draw:text-style-name="P2" svg:width="7.335in" svg:height="0.1295in" svg:x="0.3634in" svg:y="6.2583in">
        <draw:text-box>
          <text:p><text:span text:style-name="T1">Indumenti normali per la lotta al fuoco, come un autorespiratore ad aria compressa a circuito aperto (EN 137), completo antifiamma (EN469), guanti </text:span></text:p>
        </draw:text-box>
      </draw:frame>
      <draw:frame text:anchor-type="page" text:anchor-page-number="14" draw:z-index="1805" draw:name="Shape4412" draw:style-name="gr1" draw:text-style-name="P2" svg:width="0.0433in" svg:height="0.1925in" svg:x="6.1193in" svg:y="2.8728in">
        <draw:text-box>
          <text:p><text:span text:style-name="T2"><text:s/></text:span></text:p>
        </draw:text-box>
      </draw:frame>
      <draw:polygon text:anchor-type="page" text:anchor-page-number="6" draw:z-index="1804" draw:name="Shape1892" draw:style-name="gr4" draw:text-style-name="P5" svg:width="1.085in" svg:height="0.1917in" svg:x="6.7098in" svg:y="1.9382in" svg:viewBox="0 0 2757 488" draw:points="0,0 2757,0 2757,488 0,488">
        <text:p/>
      </draw:polygon>
      <draw:frame text:anchor-type="page" text:anchor-page-number="1" draw:z-index="1803" draw:name="Shape111" draw:style-name="gr1" draw:text-style-name="P2" svg:width="0.0433in" svg:height="0.1925in" svg:x="0.411in" svg:y="3.7181in">
        <draw:text-box>
          <text:p><text:span text:style-name="T2"><text:s/></text:span></text:p>
        </draw:text-box>
      </draw:frame>
      <draw:frame text:anchor-type="page" text:anchor-page-number="15" draw:z-index="1802" draw:name="Shape5014" draw:style-name="gr1" draw:text-style-name="P2" svg:width="2.7587in" svg:height="0.1295in" svg:x="0.3634in" svg:y="4.0382in">
        <draw:text-box>
          <text:p><text:span text:style-name="T1">- INDEX: Numero identificativo nell`Allegato VI del CLP </text:span></text:p>
        </draw:text-box>
      </draw:frame>
      <draw:polygon text:anchor-type="page" text:anchor-page-number="9" draw:z-index="1801" draw:name="Shape3366" draw:style-name="gr2" draw:text-style-name="P3" svg:width="3.0516in" svg:height="0.1283in" svg:x="0.4114in" svg:y="4.4831in" svg:viewBox="0 0 7752 327" draw:points="0,0 7752,0 7752,327 0,327">
        <text:p/>
      </draw:polygon>
      <draw:frame text:anchor-type="page" text:anchor-page-number="8" draw:z-index="1800" draw:name="Shape3206" draw:style-name="gr1" draw:text-style-name="P2" svg:width="0.0433in" svg:height="0.1925in" svg:x="0.3634in" svg:y="4.1516in">
        <draw:text-box>
          <text:p><text:span text:style-name="T2"><text:s/></text:span></text:p>
        </draw:text-box>
      </draw:frame>
      <draw:frame text:anchor-type="page" text:anchor-page-number="4" draw:z-index="1799" draw:name="Shape1070" draw:style-name="gr1" draw:text-style-name="P2" svg:width="1.128in" svg:height="0.1295in" svg:x="0.3634in" svg:y="6.1307in">
        <draw:text-box>
          <text:p><text:span text:style-name="T1">EQUIPAGGIAMENTO </text:span></text:p>
        </draw:text-box>
      </draw:frame>
      <draw:frame text:anchor-type="page" text:anchor-page-number="7" draw:z-index="1798" draw:name="Shape2827" draw:style-name="gr1" draw:text-style-name="P2" svg:width="0.0433in" svg:height="0.1925in" svg:x="0.411in" svg:y="5.761in">
        <draw:text-box>
          <text:p><text:span text:style-name="T2"><text:s/></text:span></text:p>
        </draw:text-box>
      </draw:frame>
      <draw:frame text:anchor-type="page" text:anchor-page-number="5" draw:z-index="1797" draw:name="Shape1212" draw:style-name="gr1" draw:text-style-name="P2" svg:width="1.3748in" svg:height="0.1295in" svg:x="0.4535in" svg:y="5.3453in">
        <draw:text-box>
          <text:p><text:span text:style-name="T3">8.1. Parametri di controllo</text:span></text:p>
        </draw:text-box>
      </draw:frame>
      <draw:frame text:anchor-type="page" text:anchor-page-number="8" draw:z-index="1796" draw:name="Shape3205" draw:style-name="gr1" draw:text-style-name="P2" svg:width="0.8157in" svg:height="0.1295in" svg:x="0.3634in" svg:y="4.0201in">
        <draw:text-box>
          <text:p><text:span text:style-name="T3">10.1. Reattività </text:span></text:p>
        </draw:text-box>
      </draw:frame>
      <draw:polygon text:anchor-type="page" text:anchor-page-number="9" draw:z-index="1795" draw:name="Shape3365" draw:style-name="gr2" draw:text-style-name="P3" svg:width="3.1504in" svg:height="0.1283in" svg:x="0.363in" svg:y="4.4831in" svg:viewBox="0 0 8003 327" draw:points="0,0 8003,0 8003,327 0,327">
        <text:p/>
      </draw:polygon>
      <draw:polygon text:anchor-type="page" text:anchor-page-number="3" draw:z-index="1794" draw:name="Shape775" draw:style-name="gr2" draw:text-style-name="P3" svg:width="1.8717in" svg:height="0.1268in" svg:x="0.4114in" svg:y="2.4398in" svg:viewBox="0 0 4755 323" draw:points="0,0 4755,0 4755,323 0,323">
        <text:p/>
      </draw:polygon>
      <draw:frame text:anchor-type="page" text:anchor-page-number="10" draw:z-index="1793" draw:name="Shape3593" draw:style-name="gr1" draw:text-style-name="P2" svg:width="0.0433in" svg:height="0.1925in" svg:x="0.3634in" svg:y="5.061in">
        <draw:text-box>
          <text:p><text:span text:style-name="T2"><text:s/></text:span></text:p>
        </draw:text-box>
      </draw:frame>
      <draw:polygon text:anchor-type="page" text:anchor-page-number="11" draw:z-index="1792" draw:name="Shape3863" draw:style-name="gr2" draw:text-style-name="P3" svg:width="0.7882in" svg:height="0.1917in" svg:x="2.7248in" svg:y="2.6949in" svg:viewBox="0 0 2003 488" draw:points="0,0 2003,0 2003,488 0,488">
        <text:p/>
      </draw:polygon>
      <draw:frame text:anchor-type="page" text:anchor-page-number="12" draw:z-index="1791" draw:name="Shape4080" draw:style-name="gr1" draw:text-style-name="P2" svg:width="0.0433in" svg:height="0.1925in" svg:x="0.3634in" svg:y="7.4252in">
        <draw:text-box>
          <text:p><text:span text:style-name="T2"><text:s/></text:span></text:p>
        </draw:text-box>
      </draw:frame>
      <draw:frame text:anchor-type="page" text:anchor-page-number="2" draw:z-index="1790" draw:name="Shape439" draw:style-name="gr1" draw:text-style-name="P2" svg:width="0.0433in" svg:height="0.1925in" svg:x="1.0398in" svg:y="3.5429in">
        <draw:text-box>
          <text:p><text:span text:style-name="T2"><text:s/></text:span></text:p>
        </draw:text-box>
      </draw:frame>
      <draw:polygon text:anchor-type="page" text:anchor-page-number="13" draw:z-index="1789" draw:name="Shape4218" draw:style-name="gr2" draw:text-style-name="P3" svg:width="1.8717in" svg:height="0.1264in" svg:x="3.5614in" svg:y="3.015in" svg:viewBox="0 0 4755 322" draw:points="0,0 4755,0 4755,322 0,322">
        <text:p/>
      </draw:polygon>
      <draw:polygon text:anchor-type="page" text:anchor-page-number="14" draw:z-index="1788" draw:name="Shape4417" draw:style-name="gr2" draw:text-style-name="P3" svg:width="1.2799in" svg:height="0.1118in" svg:x="0.4114in" svg:y="3.0614in" svg:viewBox="0 0 3252 285" draw:points="0,0 3252,0 3252,285 0,285">
        <text:p/>
      </draw:polygon>
      <draw:frame text:anchor-type="page" text:anchor-page-number="1" draw:z-index="1787" draw:name="Shape110" draw:style-name="gr1" draw:text-style-name="P2" svg:width="0.0433in" svg:height="0.1925in" svg:x="4.1335in" svg:y="3.5764in">
        <draw:text-box>
          <text:p><text:span text:style-name="T2"><text:s/></text:span></text:p>
        </draw:text-box>
      </draw:frame>
      <draw:polygon text:anchor-type="page" text:anchor-page-number="6" draw:z-index="1786" draw:name="Shape1891" draw:style-name="gr4" draw:text-style-name="P5" svg:width="1.1819in" svg:height="0.2232in" svg:x="6.6614in" svg:y="1.9382in" svg:viewBox="0 0 3003 568" draw:points="0,0 3003,0 3003,568 0,568">
        <text:p/>
      </draw:polygon>
      <draw:frame text:anchor-type="page" text:anchor-page-number="15" draw:z-index="1785" draw:name="Shape5013" draw:style-name="gr1" draw:text-style-name="P2" svg:width="2.1142in" svg:height="0.1295in" svg:x="0.3634in" svg:y="3.9098in">
        <draw:text-box>
          <text:p><text:span text:style-name="T1">- IMO: International Maritime Organization </text:span></text:p>
        </draw:text-box>
      </draw:frame>
      <draw:polygon text:anchor-type="page" text:anchor-page-number="2" draw:z-index="1784" draw:name="Shape445" draw:style-name="gr2" draw:text-style-name="P3" svg:width="6.0067in" svg:height="0.1268in" svg:x="1.7882in" svg:y="3.5898in" svg:viewBox="0 0 15258 323" draw:points="0,0 15258,0 15258,323 0,323">
        <text:p/>
      </draw:polygon>
      <draw:frame text:anchor-type="page" text:anchor-page-number="9" draw:z-index="1783" draw:name="Shape3363" draw:style-name="gr1" draw:text-style-name="P2" svg:width="2.3512in" svg:height="0.1295in" svg:x="3.561in" svg:y="4.3571in">
        <draw:text-box>
          <text:p><text:span text:style-name="T1">Non classificato (nessun componente rilevante)</text:span></text:p>
        </draw:text-box>
      </draw:frame>
      <draw:frame text:anchor-type="page" text:anchor-page-number="12" draw:z-index="1782" draw:name="Shape4079" draw:style-name="gr1" draw:text-style-name="P2" svg:width="0.0433in" svg:height="0.1925in" svg:x="0.3634in" svg:y="7.2335in">
        <draw:text-box>
          <text:p><text:span text:style-name="T2"><text:s/></text:span></text:p>
        </draw:text-box>
      </draw:frame>
      <draw:polygon text:anchor-type="page" text:anchor-page-number="1" draw:z-index="1781" draw:name="Shape114" draw:style-name="gr2" draw:text-style-name="P3" svg:width="7.3835in" svg:height="0.1283in" svg:x="0.4114in" svg:y="3.765in" svg:viewBox="0 0 18755 327" draw:points="0,0 18755,0 18755,327 0,327">
        <text:p/>
      </draw:polygon>
      <draw:frame text:anchor-type="page" text:anchor-page-number="15" draw:z-index="1780" draw:name="Shape5012" draw:style-name="gr1" draw:text-style-name="P2" svg:width="3.8787in" svg:height="0.1295in" svg:x="0.3634in" svg:y="3.7819in">
        <draw:text-box>
          <text:p><text:span text:style-name="T1">- IMDG: Codice marittimo internazionale per il trasporto delle merci pericolose </text:span></text:p>
        </draw:text-box>
      </draw:frame>
      <draw:frame text:anchor-type="page" text:anchor-page-number="4" draw:z-index="1779" draw:name="Shape1069" draw:style-name="gr1" draw:text-style-name="P2" svg:width="5.6594in" svg:height="0.1295in" svg:x="0.3634in" svg:y="6.002in">
        <draw:text-box>
          <text:p><text:span text:style-name="T1">fognature. Smaltire l'acqua contaminata usata per l'estinzione ed il residuo dell'incendio secondo le norme vigenti. </text:span></text:p>
        </draw:text-box>
      </draw:frame>
      <draw:frame text:anchor-type="page" text:anchor-page-number="8" draw:z-index="1778" draw:name="Shape3204" draw:style-name="gr1" draw:text-style-name="P2" svg:width="0.0433in" svg:height="0.1925in" svg:x="0.3634in" svg:y="3.8311in">
        <draw:text-box>
          <text:p><text:span text:style-name="T2"><text:s/></text:span></text:p>
        </draw:text-box>
      </draw:frame>
      <draw:frame text:anchor-type="page" text:anchor-page-number="10" draw:z-index="1777" draw:name="Shape3592" draw:style-name="gr1" draw:text-style-name="P2" svg:width="1.7976in" svg:height="0.1295in" svg:x="0.3634in" svg:y="4.9307in">
        <draw:text-box>
          <text:p><text:span text:style-name="T3">11.2. Informazioni su altri pericoli </text:span></text:p>
        </draw:text-box>
      </draw:frame>
      <draw:frame text:anchor-type="page" text:anchor-page-number="5" draw:z-index="1776" draw:name="Shape1210" draw:style-name="gr1" draw:text-style-name="P2" svg:width="0.0433in" svg:height="0.1925in" svg:x="0.411in" svg:y="5.298in">
        <draw:text-box>
          <text:p><text:span text:style-name="T2"><text:s/></text:span></text:p>
        </draw:text-box>
      </draw:frame>
      <draw:frame text:anchor-type="page" text:anchor-page-number="6" draw:z-index="1775" draw:name="Shape1890" draw:style-name="gr1" draw:text-style-name="P2" svg:width="0.5594in" svg:height="0.113in" svg:x="5.9228in" svg:y="2.052in">
        <draw:text-box>
          <text:p><text:span text:style-name="T4">Osservazioni</text:span></text:p>
        </draw:text-box>
      </draw:frame>
      <draw:frame text:anchor-type="page" text:anchor-page-number="3" draw:z-index="1774" draw:name="Shape767" draw:style-name="gr1" draw:text-style-name="P2" svg:width="1.7886in" svg:height="0.1295in" svg:x="0.4535in" svg:y="2.1839in">
        <draw:text-box>
          <text:p><text:span text:style-name="T3">BIOSSIDO DI TITANIO (in polvere </text:span></text:p>
        </draw:text-box>
      </draw:frame>
      <draw:polygon text:anchor-type="page" text:anchor-page-number="13" draw:z-index="1773" draw:name="Shape4217" draw:style-name="gr2" draw:text-style-name="P3" svg:width="1.9685in" svg:height="0.3831in" svg:x="3.513in" svg:y="3.015in" svg:viewBox="0 0 5001 974" draw:points="0,0 5001,0 5001,974 0,974">
        <text:p/>
      </draw:polygon>
      <draw:frame text:anchor-type="page" text:anchor-page-number="11" draw:z-index="1772" draw:name="Shape3862" draw:style-name="gr1" draw:text-style-name="P2" svg:width="1.1469in" svg:height="0.1295in" svg:x="0.4535in" svg:y="2.6972in">
        <draw:text-box>
          <text:p><text:span text:style-name="T1">CALCIO CARBONATO</text:span></text:p>
        </draw:text-box>
      </draw:frame>
      <draw:frame text:anchor-type="page" text:anchor-page-number="7" draw:z-index="1771" draw:name="Shape2826" draw:style-name="gr1" draw:text-style-name="P2" svg:width="0.0433in" svg:height="0.1925in" svg:x="0.3634in" svg:y="5.6217in">
        <draw:text-box>
          <text:p><text:span text:style-name="T2"><text:s/></text:span></text:p>
        </draw:text-box>
      </draw:frame>
      <draw:polygon text:anchor-type="page" text:anchor-page-number="14" draw:z-index="1770" draw:name="Shape4416" draw:style-name="gr2" draw:text-style-name="P3" svg:width="1.3768in" svg:height="0.1917in" svg:x="0.363in" svg:y="3.0614in" svg:viewBox="0 0 3498 488" draw:points="0,0 3498,0 3498,488 0,488">
        <text:p/>
      </draw:polygon>
      <draw:frame text:anchor-type="page" text:anchor-page-number="12" draw:z-index="1769" draw:name="Shape4078" draw:style-name="gr1" draw:text-style-name="P2" svg:width="2.3315in" svg:height="0.1295in" svg:x="0.3634in" svg:y="7.102in">
        <draw:text-box>
          <text:p><text:span text:style-name="T3">14.6. Precauzioni speciali per gli utilizzatori </text:span></text:p>
        </draw:text-box>
      </draw:frame>
      <draw:frame text:anchor-type="page" text:anchor-page-number="10" draw:z-index="1768" draw:name="Shape3591" draw:style-name="gr1" draw:text-style-name="P2" svg:width="0.0433in" svg:height="0.1925in" svg:x="0.3634in" svg:y="4.7429in">
        <draw:text-box>
          <text:p><text:span text:style-name="T2"><text:s/></text:span></text:p>
        </draw:text-box>
      </draw:frame>
      <draw:polygon text:anchor-type="page" text:anchor-page-number="2" draw:z-index="1767" draw:name="Shape444" draw:style-name="gr2" draw:text-style-name="P3" svg:width="6.1035in" svg:height="0.1268in" svg:x="1.7398in" svg:y="3.5898in" svg:viewBox="0 0 15504 323" draw:points="0,0 15504,0 15504,323 0,323">
        <text:p/>
      </draw:polygon>
      <draw:frame text:anchor-type="page" text:anchor-page-number="9" draw:z-index="1766" draw:name="Shape3353" draw:style-name="gr1" draw:text-style-name="P2" svg:width="0.0433in" svg:height="0.1925in" svg:x="1.9846in" svg:y="4.3098in">
        <draw:text-box>
          <text:p><text:span text:style-name="T2"><text:s/></text:span></text:p>
        </draw:text-box>
      </draw:frame>
      <draw:frame text:anchor-type="page" text:anchor-page-number="4" draw:z-index="1765" draw:name="Shape1068" draw:style-name="gr1" draw:text-style-name="P2" svg:width="7.4567in" svg:height="0.1295in" svg:x="0.3634in" svg:y="5.8752in">
        <draw:text-box>
          <text:p><text:span text:style-name="T1">Indossare sempre l'equipaggiamento completo di protezione antincendio. Raccogliere le acque di spegnimento che non devono essere scaricate nelle </text:span></text:p>
        </draw:text-box>
      </draw:frame>
      <draw:frame text:anchor-type="page" text:anchor-page-number="8" draw:z-index="1764" draw:name="Shape3200" draw:style-name="gr1" draw:text-style-name="P2" svg:width="0.0433in" svg:height="0.1925in" svg:x="2.8228in" svg:y="3.6445in">
        <draw:text-box>
          <text:p><text:span text:style-name="T2"><text:s/></text:span></text:p>
        </draw:text-box>
      </draw:frame>
      <draw:polygon text:anchor-type="page" text:anchor-page-number="1" draw:z-index="1763" draw:name="Shape113" draw:style-name="gr2" draw:text-style-name="P3" svg:width="7.4803in" svg:height="0.1283in" svg:x="0.363in" svg:y="3.765in" svg:viewBox="0 0 19001 327" draw:points="0,0 19001,0 19001,327 0,327">
        <text:p/>
      </draw:polygon>
      <draw:frame text:anchor-type="page" text:anchor-page-number="6" draw:z-index="1762" draw:name="Shape1868" draw:style-name="gr1" draw:text-style-name="P2" svg:width="0.2858in" svg:height="0.113in" svg:x="5.9228in" svg:y="1.9402in">
        <draw:text-box>
          <text:p><text:span text:style-name="T4">Note / </text:span></text:p>
        </draw:text-box>
      </draw:frame>
      <draw:frame text:anchor-type="page" text:anchor-page-number="15" draw:z-index="1761" draw:name="Shape5011" draw:style-name="gr1" draw:text-style-name="P2" svg:width="4.2835in" svg:height="0.1295in" svg:x="0.3634in" svg:y="3.6547in">
        <draw:text-box>
          <text:p><text:span text:style-name="T1">- IC50: Concentrazione di immobilizzazione del 50% della popolazione soggetta a test </text:span></text:p>
        </draw:text-box>
      </draw:frame>
      <draw:frame text:anchor-type="page" text:anchor-page-number="13" draw:z-index="1760" draw:name="Shape4216" draw:style-name="gr1" draw:text-style-name="P2" svg:width="0.126in" svg:height="0.1295in" svg:x="2.3799in" svg:y="3.0154in">
        <draw:text-box>
          <text:p><text:span text:style-name="T1">75</text:span></text:p>
        </draw:text-box>
      </draw:frame>
      <draw:frame text:anchor-type="page" text:anchor-page-number="5" draw:z-index="1759" draw:name="Shape1209" draw:style-name="gr1" draw:text-style-name="P2" svg:width="0.0433in" svg:height="0.1925in" svg:x="0.3634in" svg:y="5.1575in">
        <draw:text-box>
          <text:p><text:span text:style-name="T2"><text:s/></text:span></text:p>
        </draw:text-box>
      </draw:frame>
      <draw:frame text:anchor-type="page" text:anchor-page-number="14" draw:z-index="1758" draw:name="Shape4406" draw:style-name="gr1" draw:text-style-name="P2" svg:width="0.0433in" svg:height="0.1925in" svg:x="3.1417in" svg:y="2.8252in">
        <draw:text-box>
          <text:p><text:span text:style-name="T2"><text:s/></text:span></text:p>
        </draw:text-box>
      </draw:frame>
      <draw:polygon text:anchor-type="page" text:anchor-page-number="3" draw:z-index="1757" draw:name="Shape770" draw:style-name="gr2" draw:text-style-name="P3" svg:width="1.8717in" svg:height="0.1283in" svg:x="0.4114in" svg:y="2.3114in" svg:viewBox="0 0 4755 327" draw:points="0,0 4755,0 4755,327 0,327">
        <text:p/>
      </draw:polygon>
      <draw:frame text:anchor-type="page" text:anchor-page-number="11" draw:z-index="1756" draw:name="Shape3858" draw:style-name="gr1" draw:text-style-name="P2" svg:width="0.0433in" svg:height="0.1925in" svg:x="0.411in" svg:y="2.6492in">
        <draw:text-box>
          <text:p><text:span text:style-name="T2"><text:s/></text:span></text:p>
        </draw:text-box>
      </draw:frame>
      <draw:polygon text:anchor-type="page" text:anchor-page-number="7" draw:z-index="1755" draw:name="Shape2831" draw:style-name="gr2" draw:text-style-name="P3" svg:width="7.3835in" svg:height="0.1268in" svg:x="0.4114in" svg:y="5.8098in" svg:viewBox="0 0 18755 323" draw:points="0,0 18755,0 18755,323 0,323">
        <text:p/>
      </draw:polygon>
      <draw:polygon text:anchor-type="page" text:anchor-page-number="6" draw:z-index="1754" draw:name="Shape1889" draw:style-name="gr4" draw:text-style-name="P5" svg:width="0.6898in" svg:height="0.1118in" svg:x="5.9232in" svg:y="2.05in" svg:viewBox="0 0 1753 285" draw:points="0,0 1753,0 1753,285 0,285">
        <text:p/>
      </draw:polygon>
      <draw:frame text:anchor-type="page" text:anchor-page-number="11" draw:z-index="1753" draw:name="Shape3857" draw:style-name="gr1" draw:text-style-name="P2" svg:width="0.0433in" svg:height="0.1925in" svg:x="0.3634in" svg:y="2.5063in">
        <draw:text-box>
          <text:p><text:span text:style-name="T2"><text:s/></text:span></text:p>
        </draw:text-box>
      </draw:frame>
      <draw:polygon text:anchor-type="page" text:anchor-page-number="14" draw:z-index="1752" draw:name="Shape4422" draw:style-name="gr2" draw:text-style-name="P3" svg:width="0.4933in" svg:height="0.1917in" svg:x="6.1197in" svg:y="2.8697in" svg:viewBox="0 0 1254 488" draw:points="0,0 1254,0 1254,488 0,488">
        <text:p/>
      </draw:polygon>
      <draw:frame text:anchor-type="page" text:anchor-page-number="3" draw:z-index="1751" draw:name="Shape763" draw:style-name="gr1" draw:text-style-name="P2" svg:width="0.0433in" svg:height="0.1925in" svg:x="0.411in" svg:y="2.1362in">
        <draw:text-box>
          <text:p><text:span text:style-name="T2"><text:s/></text:span></text:p>
        </draw:text-box>
      </draw:frame>
      <draw:polygon text:anchor-type="page" text:anchor-page-number="9" draw:z-index="1750" draw:name="Shape3362" draw:style-name="gr2" draw:text-style-name="P3" svg:width="3.8402in" svg:height="0.1268in" svg:x="3.5614in" svg:y="4.3563in" svg:viewBox="0 0 9755 323" draw:points="0,0 9755,0 9755,323 0,323">
        <text:p/>
      </draw:polygon>
      <draw:frame text:anchor-type="page" text:anchor-page-number="4" draw:z-index="1749" draw:name="Shape1067" draw:style-name="gr1" draw:text-style-name="P2" svg:width="7.4858in" svg:height="0.1295in" svg:x="0.3634in" svg:y="5.7472in">
        <draw:text-box>
          <text:p><text:span text:style-name="T1">Raffreddare con getti d'acqua i contenitori per evitare la decomposizione del prodotto e lo sviluppo di sostanze potenzialmente pericolose per la salute. </text:span></text:p>
        </draw:text-box>
      </draw:frame>
      <draw:frame text:anchor-type="page" text:anchor-page-number="12" draw:z-index="1748" draw:name="Shape4077" draw:style-name="gr1" draw:text-style-name="P2" svg:width="0.0433in" svg:height="0.1925in" svg:x="0.3634in" svg:y="6.9146in">
        <draw:text-box>
          <text:p><text:span text:style-name="T2"><text:s/></text:span></text:p>
        </draw:text-box>
      </draw:frame>
      <draw:frame text:anchor-type="page" text:anchor-page-number="1" draw:z-index="1747" draw:name="Shape109" draw:style-name="gr1" draw:text-style-name="P2" svg:width="0.0433in" svg:height="0.1925in" svg:x="5.4799in" svg:y="3.3846in">
        <draw:text-box>
          <text:p><text:span text:style-name="T2"><text:s/></text:span></text:p>
        </draw:text-box>
      </draw:frame>
      <draw:polygon text:anchor-type="page" text:anchor-page-number="5" draw:z-index="1746" draw:name="Shape1214" draw:style-name="gr2" draw:text-style-name="P3" svg:width="7.3835in" svg:height="0.1268in" svg:x="0.4114in" svg:y="5.3465in" svg:viewBox="0 0 18755 323" draw:points="0,0 18755,0 18755,323 0,323">
        <text:p/>
      </draw:polygon>
      <draw:polygon text:anchor-type="page" text:anchor-page-number="7" draw:z-index="1745" draw:name="Shape2830" draw:style-name="gr2" draw:text-style-name="P3" svg:width="7.4803in" svg:height="0.1268in" svg:x="0.363in" svg:y="5.8098in" svg:viewBox="0 0 19001 323" draw:points="0,0 19001,0 19001,323 0,323">
        <text:p/>
      </draw:polygon>
      <draw:frame text:anchor-type="page" text:anchor-page-number="15" draw:z-index="1744" draw:name="Shape5010" draw:style-name="gr1" draw:text-style-name="P2" svg:width="5.6898in" svg:height="0.1295in" svg:x="0.3634in" svg:y="3.5272in">
        <draw:text-box>
          <text:p><text:span text:style-name="T1">- IATA DGR: Regolamento per il trasporto di merci pericolose della Associazione internazionale del trasporto aereo </text:span></text:p>
        </draw:text-box>
      </draw:frame>
      <draw:frame text:anchor-type="page" text:anchor-page-number="8" draw:z-index="1743" draw:name="Shape3203" draw:style-name="gr1" draw:text-style-name="P2" svg:width="2.3815in" svg:height="0.1776in" svg:x="0.4535in" svg:y="3.6543in">
        <draw:text-box>
          <text:p><text:span text:style-name="T6">SEZIONE 10. Stabilità e reattività</text:span></text:p>
        </draw:text-box>
      </draw:frame>
      <draw:frame text:anchor-type="page" text:anchor-page-number="2" draw:z-index="1742" draw:name="Shape443" draw:style-name="gr1" draw:text-style-name="P2" svg:width="0.5898in" svg:height="0.1295in" svg:x="0.4535in" svg:y="3.5902in">
        <draw:text-box>
          <text:p><text:span text:style-name="T1">Avvertenze:</text:span></text:p>
        </draw:text-box>
      </draw:frame>
      <draw:frame text:anchor-type="page" text:anchor-page-number="10" draw:z-index="1741" draw:name="Shape3589" draw:style-name="gr1" draw:text-style-name="P2" svg:width="0.0433in" svg:height="0.1925in" svg:x="3.748in" svg:y="4.5661in">
        <draw:text-box>
          <text:p><text:span text:style-name="T2"><text:s/></text:span></text:p>
        </draw:text-box>
      </draw:frame>
      <draw:frame text:anchor-type="page" text:anchor-page-number="13" draw:z-index="1740" draw:name="Shape4209" draw:style-name="gr1" draw:text-style-name="P2" svg:width="0.0433in" svg:height="0.1925in" svg:x="0.7429in" svg:y="2.9681in">
        <draw:text-box>
          <text:p><text:span text:style-name="T2"><text:s/></text:span></text:p>
        </draw:text-box>
      </draw:frame>
      <draw:polygon text:anchor-type="page" text:anchor-page-number="11" draw:z-index="1739" draw:name="Shape3861" draw:style-name="gr2" draw:text-style-name="P3" svg:width="2.265in" svg:height="0.1283in" svg:x="0.4114in" svg:y="2.6949in" svg:viewBox="0 0 5754 327" draw:points="0,0 5754,0 5754,327 0,327">
        <text:p/>
      </draw:polygon>
      <draw:frame text:anchor-type="page" text:anchor-page-number="1" draw:z-index="1738" draw:name="Shape106" draw:style-name="gr1" draw:text-style-name="P2" svg:width="0.085in" svg:height="0.1925in" svg:x="1.7398in" svg:y="3.3846in">
        <draw:text-box>
          <text:p><text:span text:style-name="T2"><text:s text:c="2"/></text:span></text:p>
        </draw:text-box>
      </draw:frame>
      <draw:polygon text:anchor-type="page" text:anchor-page-number="5" draw:z-index="1737" draw:name="Shape1213" draw:style-name="gr2" draw:text-style-name="P3" svg:width="7.4803in" svg:height="0.1268in" svg:x="0.363in" svg:y="5.3465in" svg:viewBox="0 0 19001 323" draw:points="0,0 19001,0 19001,323 0,323">
        <text:p/>
      </draw:polygon>
      <draw:frame text:anchor-type="page" text:anchor-page-number="3" draw:z-index="1736" draw:name="Shape762" draw:style-name="gr1" draw:text-style-name="P2" svg:width="0.0433in" svg:height="0.1925in" svg:x="7.3016in" svg:y="1.9945in">
        <draw:text-box>
          <text:p><text:span text:style-name="T2"><text:s/></text:span></text:p>
        </draw:text-box>
      </draw:frame>
      <draw:frame text:anchor-type="page" text:anchor-page-number="12" draw:z-index="1735" draw:name="Shape4076" draw:style-name="gr1" draw:text-style-name="P2" svg:width="0.0433in" svg:height="0.1925in" svg:x="0.3634in" svg:y="6.7228in">
        <draw:text-box>
          <text:p><text:span text:style-name="T2"><text:s/></text:span></text:p>
        </draw:text-box>
      </draw:frame>
      <draw:frame text:anchor-type="page" text:anchor-page-number="8" draw:z-index="1734" draw:name="Shape3199" draw:style-name="gr1" draw:text-style-name="P2" svg:width="0.0433in" svg:height="0.1925in" svg:x="0.411in" svg:y="3.6445in">
        <draw:text-box>
          <text:p><text:span text:style-name="T2"><text:s/></text:span></text:p>
        </draw:text-box>
      </draw:frame>
      <draw:polygon text:anchor-type="page" text:anchor-page-number="9" draw:z-index="1733" draw:name="Shape3361" draw:style-name="gr2" draw:text-style-name="P3" svg:width="3.937in" svg:height="0.1268in" svg:x="3.513in" svg:y="4.3563in" svg:viewBox="0 0 10001 323" draw:points="0,0 10001,0 10001,323 0,323">
        <text:p/>
      </draw:polygon>
      <draw:frame text:anchor-type="page" text:anchor-page-number="4" draw:z-index="1732" draw:name="Shape1066" draw:style-name="gr1" draw:text-style-name="P2" svg:width="1.4425in" svg:height="0.1295in" svg:x="0.3634in" svg:y="5.6189in">
        <draw:text-box>
          <text:p><text:span text:style-name="T1">INFORMAZIONI GENERALI </text:span></text:p>
        </draw:text-box>
      </draw:frame>
      <draw:frame text:anchor-type="page" text:anchor-page-number="7" draw:z-index="1731" draw:name="Shape2822" draw:style-name="gr1" draw:text-style-name="P2" svg:width="0.0433in" svg:height="0.1925in" svg:x="3.3654in" svg:y="5.4335in">
        <draw:text-box>
          <text:p><text:span text:style-name="T2"><text:s/></text:span></text:p>
        </draw:text-box>
      </draw:frame>
      <draw:frame text:anchor-type="page" text:anchor-page-number="2" draw:z-index="1730" draw:name="Shape438" draw:style-name="gr1" draw:text-style-name="P2" svg:width="0.0433in" svg:height="0.1925in" svg:x="0.411in" svg:y="3.5429in">
        <draw:text-box>
          <text:p><text:span text:style-name="T2"><text:s/></text:span></text:p>
        </draw:text-box>
      </draw:frame>
      <draw:polygon text:anchor-type="page" text:anchor-page-number="14" draw:z-index="1729" draw:name="Shape4421" draw:style-name="gr2" draw:text-style-name="P3" svg:width="0.5898in" svg:height="0.1917in" svg:x="6.0717in" svg:y="2.8697in" svg:viewBox="0 0 1499 488" draw:points="0,0 1499,0 1499,488 0,488">
        <text:p/>
      </draw:polygon>
      <draw:polygon text:anchor-type="page" text:anchor-page-number="13" draw:z-index="1728" draw:name="Shape4215" draw:style-name="gr2" draw:text-style-name="P3" svg:width="1.0831in" svg:height="0.1264in" svg:x="2.3799in" svg:y="3.015in" svg:viewBox="0 0 2752 322" draw:points="0,0 2752,0 2752,322 0,322">
        <text:p/>
      </draw:polygon>
      <draw:frame text:anchor-type="page" text:anchor-page-number="10" draw:z-index="1727" draw:name="Shape3590" draw:style-name="gr1" draw:text-style-name="P2" svg:width="3.4071in" svg:height="0.1295in" svg:x="0.3634in" svg:y="4.6138in">
        <draw:text-box>
          <text:p><text:span text:style-name="T1">Non risponde ai criteri di classificazione per questa classe di pericolo</text:span></text:p>
        </draw:text-box>
      </draw:frame>
      <draw:frame text:anchor-type="page" text:anchor-page-number="6" draw:z-index="1726" draw:name="Shape1869" draw:style-name="gr1" draw:text-style-name="P2" svg:width="0.0433in" svg:height="0.1925in" svg:x="5.3335in" svg:y="1.9417in">
        <draw:text-box>
          <text:p><text:span text:style-name="T2"><text:s/></text:span></text:p>
        </draw:text-box>
      </draw:frame>
      <draw:frame text:anchor-type="page" text:anchor-page-number="15" draw:z-index="1725" draw:name="Shape5009" draw:style-name="gr1" draw:text-style-name="P2" svg:width="4.7185in" svg:height="0.1295in" svg:x="0.3634in" svg:y="3.3984in">
        <draw:text-box>
          <text:p><text:span text:style-name="T1">- GHS: Sistema armonizzato globale per la classificazione e la etichettatura dei prodotti chimici </text:span></text:p>
        </draw:text-box>
      </draw:frame>
      <draw:frame text:anchor-type="page" text:anchor-page-number="9" draw:z-index="1724" draw:name="Shape3358" draw:style-name="gr1" draw:text-style-name="P2" svg:width="1.5343in" svg:height="0.1295in" svg:x="0.4535in" svg:y="4.3571in">
        <draw:text-box>
          <text:p><text:span text:style-name="T1">ATE (Inalazione) della miscela:</text:span></text:p>
        </draw:text-box>
      </draw:frame>
      <draw:frame text:anchor-type="page" text:anchor-page-number="7" draw:z-index="1723" draw:name="Shape2825" draw:style-name="gr1" draw:text-style-name="P2" svg:width="2.9276in" svg:height="0.1776in" svg:x="0.4535in" svg:y="5.4425in">
        <draw:text-box>
          <text:p><text:span text:style-name="T6">SEZIONE 9. Proprietà fisiche e chimiche</text:span></text:p>
        </draw:text-box>
      </draw:frame>
      <draw:polygon text:anchor-type="page" text:anchor-page-number="13" draw:z-index="1722" draw:name="Shape4214" draw:style-name="gr2" draw:text-style-name="P3" svg:width="1.1815in" svg:height="0.3831in" svg:x="2.3315in" svg:y="3.015in" svg:viewBox="0 0 3002 974" draw:points="0,0 3002,0 3002,974 0,974">
        <text:p/>
      </draw:polygon>
      <draw:polygon text:anchor-type="page" text:anchor-page-number="11" draw:z-index="1721" draw:name="Shape3860" draw:style-name="gr2" draw:text-style-name="P3" svg:width="2.3618in" svg:height="0.1917in" svg:x="0.363in" svg:y="2.6949in" svg:viewBox="0 0 6000 488" draw:points="0,0 6000,0 6000,488 0,488">
        <text:p/>
      </draw:polygon>
      <draw:frame text:anchor-type="page" text:anchor-page-number="8" draw:z-index="1720" draw:name="Shape3198" draw:style-name="gr1" draw:text-style-name="P2" svg:width="0.0433in" svg:height="0.1925in" svg:x="0.3634in" svg:y="3.4646in">
        <draw:text-box>
          <text:p><text:span text:style-name="T2"><text:s/></text:span></text:p>
        </draw:text-box>
      </draw:frame>
      <draw:frame text:anchor-type="page" text:anchor-page-number="12" draw:z-index="1719" draw:name="Shape4075" draw:style-name="gr1" draw:text-style-name="P2" svg:width="0.7787in" svg:height="0.1295in" svg:x="0.3634in" svg:y="6.5937in">
        <draw:text-box>
          <text:p><text:span text:style-name="T1">non applicabile </text:span></text:p>
        </draw:text-box>
      </draw:frame>
      <draw:frame text:anchor-type="page" text:anchor-page-number="14" draw:z-index="1718" draw:name="Shape4420" draw:style-name="gr1" draw:text-style-name="P2" svg:width="1.3504in" svg:height="0.1295in" svg:x="1.7882in" svg:y="2.872in">
        <draw:text-box>
          <text:p><text:span text:style-name="T1">Tossicità acuta, categoria 3</text:span></text:p>
        </draw:text-box>
      </draw:frame>
      <draw:frame text:anchor-type="page" text:anchor-page-number="2" draw:z-index="1717" draw:name="Shape437" draw:style-name="gr1" draw:text-style-name="P2" svg:width="0.0433in" svg:height="0.1925in" svg:x="0.3634in" svg:y="3.4016in">
        <draw:text-box>
          <text:p><text:span text:style-name="T2"><text:s/></text:span></text:p>
        </draw:text-box>
      </draw:frame>
      <draw:frame text:anchor-type="page" text:anchor-page-number="15" draw:z-index="1716" draw:name="Shape5008" draw:style-name="gr1" draw:text-style-name="P2" svg:width="1.4685in" svg:height="0.1295in" svg:x="0.3634in" svg:y="3.2717in">
        <draw:text-box>
          <text:p><text:span text:style-name="T1">- EmS: Emergency Schedule </text:span></text:p>
        </draw:text-box>
      </draw:frame>
      <draw:polygon text:anchor-type="page" text:anchor-page-number="6" draw:z-index="1715" draw:name="Shape1867" draw:style-name="gr4" draw:text-style-name="P5" svg:width="0.6898in" svg:height="0.1114in" svg:x="5.9232in" svg:y="1.9382in" svg:viewBox="0 0 1753 284" draw:points="0,0 1753,0 1753,284 0,284">
        <text:p/>
      </draw:polygon>
      <draw:frame text:anchor-type="page" text:anchor-page-number="4" draw:z-index="1714" draw:name="Shape1065" draw:style-name="gr1" draw:text-style-name="P2" svg:width="0.0433in" svg:height="0.1925in" svg:x="0.3634in" svg:y="5.4299in">
        <draw:text-box>
          <text:p><text:span text:style-name="T2"><text:s/></text:span></text:p>
        </draw:text-box>
      </draw:frame>
      <draw:frame text:anchor-type="page" text:anchor-page-number="5" draw:z-index="1713" draw:name="Shape1205" draw:style-name="gr1" draw:text-style-name="P2" svg:width="0.0433in" svg:height="0.1925in" svg:x="5.2264in" svg:y="4.9693in">
        <draw:text-box>
          <text:p><text:span text:style-name="T2"><text:s/></text:span></text:p>
        </draw:text-box>
      </draw:frame>
      <draw:polygon text:anchor-type="page" text:anchor-page-number="1" draw:z-index="1712" draw:name="Shape108" draw:style-name="gr2" draw:text-style-name="P3" svg:width="4.6283in" svg:height="0.1917in" svg:x="3.1665in" svg:y="3.3815in" svg:viewBox="0 0 11757 488" draw:points="0,0 11757,0 11757,488 0,488">
        <text:p/>
      </draw:polygon>
      <draw:frame text:anchor-type="page" text:anchor-page-number="10" draw:z-index="1711" draw:name="Shape3588" draw:style-name="gr1" draw:text-style-name="P2" svg:width="0.0433in" svg:height="0.1925in" svg:x="0.3634in" svg:y="4.4228in">
        <draw:text-box>
          <text:p><text:span text:style-name="T2"><text:s/></text:span></text:p>
        </draw:text-box>
      </draw:frame>
      <draw:polygon text:anchor-type="page" text:anchor-page-number="3" draw:z-index="1710" draw:name="Shape766" draw:style-name="gr2" draw:text-style-name="P3" svg:width="1.8717in" svg:height="0.1283in" svg:x="0.4114in" svg:y="2.1831in" svg:viewBox="0 0 4755 327" draw:points="0,0 4755,0 4755,327 0,327">
        <text:p/>
      </draw:polygon>
      <draw:polygon text:anchor-type="page" text:anchor-page-number="2" draw:z-index="1709" draw:name="Shape442" draw:style-name="gr2" draw:text-style-name="P3" svg:width="1.2799in" svg:height="0.1268in" svg:x="0.4114in" svg:y="3.5898in" svg:viewBox="0 0 3252 323" draw:points="0,0 3252,0 3252,323 0,323">
        <text:p/>
      </draw:polygon>
      <draw:polygon text:anchor-type="page" text:anchor-page-number="8" draw:z-index="1708" draw:name="Shape3202" draw:style-name="gr5" draw:text-style-name="P6" svg:width="7.3835in" svg:height="0.1748in" svg:x="0.4114in" svg:y="3.6531in" svg:viewBox="0 0 18755 445" draw:points="0,0 18755,0 18755,445 0,445">
        <text:p/>
      </draw:polygon>
      <draw:frame text:anchor-type="page" text:anchor-page-number="9" draw:z-index="1707" draw:name="Shape3352" draw:style-name="gr1" draw:text-style-name="P2" svg:width="0.0433in" svg:height="0.1925in" svg:x="0.411in" svg:y="4.3098in">
        <draw:text-box>
          <text:p><text:span text:style-name="T2"><text:s/></text:span></text:p>
        </draw:text-box>
      </draw:frame>
      <draw:frame text:anchor-type="page" text:anchor-page-number="7" draw:z-index="1706" draw:name="Shape2821" draw:style-name="gr1" draw:text-style-name="P2" svg:width="0.0433in" svg:height="0.1925in" svg:x="0.411in" svg:y="5.4335in">
        <draw:text-box>
          <text:p><text:span text:style-name="T2"><text:s/></text:span></text:p>
        </draw:text-box>
      </draw:frame>
      <draw:polygon text:anchor-type="page" text:anchor-page-number="6" draw:z-index="1705" draw:name="Shape1866" draw:style-name="gr4" draw:text-style-name="P5" svg:width="0.7866in" svg:height="0.2232in" svg:x="5.8748in" svg:y="1.9382in" svg:viewBox="0 0 1999 568" draw:points="0,0 1999,0 1999,568 0,568">
        <text:p/>
      </draw:polygon>
      <draw:frame text:anchor-type="page" text:anchor-page-number="15" draw:z-index="1704" draw:name="Shape5007" draw:style-name="gr1" draw:text-style-name="P2" svg:width="3.9713in" svg:height="0.1295in" svg:x="0.3634in" svg:y="3.1437in">
        <draw:text-box>
          <text:p><text:span text:style-name="T1">- EC50: Concentrazione che dà effetto al 50% della popolazione soggetta a test </text:span></text:p>
        </draw:text-box>
      </draw:frame>
      <draw:frame text:anchor-type="page" text:anchor-page-number="12" draw:z-index="1703" draw:name="Shape4074" draw:style-name="gr1" draw:text-style-name="P2" svg:width="0.0433in" svg:height="0.1925in" svg:x="0.3634in" svg:y="6.4035in">
        <draw:text-box>
          <text:p><text:span text:style-name="T2"><text:s/></text:span></text:p>
        </draw:text-box>
      </draw:frame>
      <draw:frame text:anchor-type="page" text:anchor-page-number="13" draw:z-index="1702" draw:name="Shape4213" draw:style-name="gr1" draw:text-style-name="P2" svg:width="0.2941in" svg:height="0.1295in" svg:x="0.4535in" svg:y="3.0154in">
        <draw:text-box>
          <text:p><text:span text:style-name="T1">Punto</text:span></text:p>
        </draw:text-box>
      </draw:frame>
      <draw:frame text:anchor-type="page" text:anchor-page-number="4" draw:z-index="1701" draw:name="Shape1064" draw:style-name="gr1" draw:text-style-name="P2" svg:width="3.4185in" svg:height="0.1295in" svg:x="0.3634in" svg:y="5.2984in">
        <draw:text-box>
          <text:p><text:span text:style-name="T3">5.3. Raccomandazioni per gli addetti all`estinzione degli incendi </text:span></text:p>
        </draw:text-box>
      </draw:frame>
      <draw:frame text:anchor-type="page" text:anchor-page-number="14" draw:z-index="1700" draw:name="Shape4405" draw:style-name="gr1" draw:text-style-name="P2" svg:width="0.0433in" svg:height="0.1925in" svg:x="1.0311in" svg:y="2.8098in">
        <draw:text-box>
          <text:p><text:span text:style-name="T2"><text:s/></text:span></text:p>
        </draw:text-box>
      </draw:frame>
      <draw:frame text:anchor-type="page" text:anchor-page-number="5" draw:z-index="1699" draw:name="Shape1208" draw:style-name="gr1" draw:text-style-name="P2" svg:width="4.7969in" svg:height="0.1776in" svg:x="0.4535in" svg:y="4.9799in">
        <draw:text-box>
          <text:p><text:span text:style-name="T6">SEZIONE 8. Controlli dell'esposizione/della protezione individuale</text:span></text:p>
        </draw:text-box>
      </draw:frame>
      <draw:frame text:anchor-type="page" text:anchor-page-number="11" draw:z-index="1698" draw:name="Shape3856" draw:style-name="gr1" draw:text-style-name="P2" svg:width="1.6425in" svg:height="0.1295in" svg:x="0.3634in" svg:y="2.3772in">
        <draw:text-box>
          <text:p><text:span text:style-name="T1"><text:s text:c="3"/>NON rapidamente degradabile </text:span></text:p>
        </draw:text-box>
      </draw:frame>
      <draw:frame text:anchor-type="page" text:anchor-page-number="10" draw:z-index="1697" draw:name="Shape3585" draw:style-name="gr1" draw:text-style-name="P2" svg:width="0.0433in" svg:height="0.1925in" svg:x="2.3453in" svg:y="4.2465in">
        <draw:text-box>
          <text:p><text:span text:style-name="T2"><text:s/></text:span></text:p>
        </draw:text-box>
      </draw:frame>
      <draw:polygon text:anchor-type="page" text:anchor-page-number="3" draw:z-index="1696" draw:name="Shape764" draw:style-name="gr2" draw:text-style-name="P3" svg:width="1.9685in" svg:height="0.3835in" svg:x="0.363in" svg:y="2.1831in" svg:viewBox="0 0 5001 975" draw:points="0,0 5001,0 5001,975 0,975">
        <text:p/>
      </draw:polygon>
      <draw:polygon text:anchor-type="page" text:anchor-page-number="1" draw:z-index="1695" draw:name="Shape107" draw:style-name="gr2" draw:text-style-name="P3" svg:width="4.7252in" svg:height="0.1917in" svg:x="3.1181in" svg:y="3.3815in" svg:viewBox="0 0 12003 488" draw:points="0,0 12003,0 12003,488 0,488">
        <text:p/>
      </draw:polygon>
      <draw:frame text:anchor-type="page" text:anchor-page-number="6" draw:z-index="1694" draw:name="Shape1833" draw:style-name="gr1" draw:text-style-name="P2" svg:width="0.0433in" svg:height="0.1925in" svg:x="4.6866in" svg:y="1.8799in">
        <draw:text-box>
          <text:p><text:span text:style-name="T2"><text:s/></text:span></text:p>
        </draw:text-box>
      </draw:frame>
      <draw:polygon text:anchor-type="page" text:anchor-page-number="10" draw:z-index="1693" draw:name="Shape3587" draw:style-name="gr3" draw:text-style-name="P4" svg:width="1.9819in" svg:height="0.0087in" svg:x="0.363in" svg:y="4.4063in" svg:viewBox="0 0 5035 23" draw:points="0,0 5035,0 5035,23 0,23">
        <text:p/>
      </draw:polygon>
      <draw:frame text:anchor-type="page" text:anchor-page-number="15" draw:z-index="1692" draw:name="Shape5006" draw:style-name="gr1" draw:text-style-name="P2" svg:width="1.8768in" svg:height="0.1295in" svg:x="0.3634in" svg:y="3.0154in">
        <draw:text-box>
          <text:p><text:span text:style-name="T1">- DNEL: Livello derivato senza effetto </text:span></text:p>
        </draw:text-box>
      </draw:frame>
      <draw:polygon text:anchor-type="page" text:anchor-page-number="8" draw:z-index="1691" draw:name="Shape3201" draw:style-name="gr5" draw:text-style-name="P6" svg:width="7.4803in" svg:height="0.1748in" svg:x="0.363in" svg:y="3.6531in" svg:viewBox="0 0 19001 445" draw:points="0,0 19001,0 19001,445 0,445">
        <text:p/>
      </draw:polygon>
      <draw:frame text:anchor-type="page" text:anchor-page-number="11" draw:z-index="1690" draw:name="Shape3841" draw:style-name="gr1" draw:text-style-name="P2" svg:width="0.0433in" svg:height="0.1925in" svg:x="4.2382in" svg:y="2.1374in">
        <draw:text-box>
          <text:p><text:span text:style-name="T2"><text:s/></text:span></text:p>
        </draw:text-box>
      </draw:frame>
      <draw:frame text:anchor-type="page" text:anchor-page-number="7" draw:z-index="1689" draw:name="Shape2820" draw:style-name="gr1" draw:text-style-name="P2" svg:width="0.0433in" svg:height="0.1925in" svg:x="0.3634in" svg:y="5.2535in">
        <draw:text-box>
          <text:p><text:span text:style-name="T2"><text:s/></text:span></text:p>
        </draw:text-box>
      </draw:frame>
      <draw:frame text:anchor-type="page" text:anchor-page-number="5" draw:z-index="1688" draw:name="Shape1204" draw:style-name="gr1" draw:text-style-name="P2" svg:width="0.0433in" svg:height="0.1925in" svg:x="0.411in" svg:y="4.9693in">
        <draw:text-box>
          <text:p><text:span text:style-name="T2"><text:s/></text:span></text:p>
        </draw:text-box>
      </draw:frame>
      <draw:polygon text:anchor-type="page" text:anchor-page-number="2" draw:z-index="1687" draw:name="Shape441" draw:style-name="gr2" draw:text-style-name="P3" svg:width="1.3768in" svg:height="0.1268in" svg:x="0.363in" svg:y="3.5898in" svg:viewBox="0 0 3498 323" draw:points="0,0 3498,0 3498,323 0,323">
        <text:p/>
      </draw:polygon>
      <draw:frame text:anchor-type="page" text:anchor-page-number="12" draw:z-index="1686" draw:name="Shape4073" draw:style-name="gr1" draw:text-style-name="P2" svg:width="0.0433in" svg:height="0.1925in" svg:x="0.3634in" svg:y="6.211in">
        <draw:text-box>
          <text:p><text:span text:style-name="T2"><text:s/></text:span></text:p>
        </draw:text-box>
      </draw:frame>
      <draw:frame text:anchor-type="page" text:anchor-page-number="3" draw:z-index="1685" draw:name="Shape760" draw:style-name="gr1" draw:text-style-name="P2" svg:width="0.0433in" svg:height="0.1925in" svg:x="3.3634in" svg:y="1.9945in">
        <draw:text-box>
          <text:p><text:span text:style-name="T2"><text:s/></text:span></text:p>
        </draw:text-box>
      </draw:frame>
      <draw:frame text:anchor-type="page" text:anchor-page-number="4" draw:z-index="1684" draw:name="Shape1063" draw:style-name="gr1" draw:text-style-name="P2" svg:width="0.0433in" svg:height="0.1925in" svg:x="0.3634in" svg:y="5.1098in">
        <draw:text-box>
          <text:p><text:span text:style-name="T2"><text:s/></text:span></text:p>
        </draw:text-box>
      </draw:frame>
      <draw:frame text:anchor-type="page" text:anchor-page-number="1" draw:z-index="1683" draw:name="Shape94" draw:style-name="gr1" draw:text-style-name="P2" svg:width="0.0433in" svg:height="0.1925in" svg:x="4.1165in" svg:y="3.2063in">
        <draw:text-box>
          <text:p><text:span text:style-name="T2"><text:s/></text:span></text:p>
        </draw:text-box>
      </draw:frame>
      <draw:frame text:anchor-type="page" text:anchor-page-number="9" draw:z-index="1682" draw:name="Shape3350" draw:style-name="gr1" draw:text-style-name="P2" svg:width="0.0433in" svg:height="0.1925in" svg:x="1.3563in" svg:y="4.1835in">
        <draw:text-box>
          <text:p><text:span text:style-name="T2"><text:s/></text:span></text:p>
        </draw:text-box>
      </draw:frame>
      <draw:polygon text:anchor-type="page" text:anchor-page-number="14" draw:z-index="1681" draw:name="Shape4419" draw:style-name="gr2" draw:text-style-name="P3" svg:width="4.235in" svg:height="0.1283in" svg:x="1.7882in" svg:y="2.8697in" svg:viewBox="0 0 10758 327" draw:points="0,0 10758,0 10758,327 0,327">
        <text:p/>
      </draw:polygon>
      <draw:frame text:anchor-type="page" text:anchor-page-number="13" draw:z-index="1680" draw:name="Shape4208" draw:style-name="gr1" draw:text-style-name="P2" svg:width="0.0433in" svg:height="0.1925in" svg:x="0.411in" svg:y="2.9681in">
        <draw:text-box>
          <text:p><text:span text:style-name="T2"><text:s/></text:span></text:p>
        </draw:text-box>
      </draw:frame>
      <draw:polygon text:anchor-type="page" text:anchor-page-number="3" draw:z-index="1679" draw:name="Shape765" draw:style-name="gr2" draw:text-style-name="P3" svg:width="0.2965in" svg:height="0.1917in" svg:x="7.3016in" svg:y="1.9913in" svg:viewBox="0 0 754 488" draw:points="0,0 754,0 754,488 0,488">
        <text:p/>
      </draw:polygon>
      <draw:frame text:anchor-type="page" text:anchor-page-number="12" draw:z-index="1678" draw:name="Shape4072" draw:style-name="gr1" draw:text-style-name="P2" svg:width="1.5114in" svg:height="0.1295in" svg:x="0.3634in" svg:y="6.0807in">
        <draw:text-box>
          <text:p><text:span text:style-name="T3">14.5. Pericoli per l`ambiente </text:span></text:p>
        </draw:text-box>
      </draw:frame>
      <draw:frame text:anchor-type="page" text:anchor-page-number="10" draw:z-index="1677" draw:name="Shape3586" draw:style-name="gr1" draw:text-style-name="P2" svg:width="1.9898in" svg:height="0.1295in" svg:x="0.3634in" svg:y="4.2937in">
        <draw:text-box>
          <text:p><text:span text:style-name="T1">PERICOLO IN CASO DI ASPIRAZIONE</text:span></text:p>
        </draw:text-box>
      </draw:frame>
      <draw:frame text:anchor-type="page" text:anchor-page-number="2" draw:z-index="1676" draw:name="Shape430" draw:style-name="gr1" draw:text-style-name="P2" svg:width="0.0433in" svg:height="0.1925in" svg:x="1.861in" svg:y="3.2252in">
        <draw:text-box>
          <text:p><text:span text:style-name="T2"><text:s/></text:span></text:p>
        </draw:text-box>
      </draw:frame>
      <draw:frame text:anchor-type="page" text:anchor-page-number="8" draw:z-index="1675" draw:name="Shape3194" draw:style-name="gr1" draw:text-style-name="P2" svg:width="0.0433in" svg:height="0.1925in" svg:x="1.7929in" svg:y="3.2874in">
        <draw:text-box>
          <text:p><text:span text:style-name="T2"><text:s/></text:span></text:p>
        </draw:text-box>
      </draw:frame>
      <draw:frame text:anchor-type="page" text:anchor-page-number="4" draw:z-index="1674" draw:name="Shape1062" draw:style-name="gr1" draw:text-style-name="P2" svg:width="2.2449in" svg:height="0.1295in" svg:x="0.3634in" svg:y="4.9807in">
        <draw:text-box>
          <text:p><text:span text:style-name="T1">Evitare di respirare i prodotti di combustione. </text:span></text:p>
        </draw:text-box>
      </draw:frame>
      <draw:frame text:anchor-type="page" text:anchor-page-number="16" draw:z-index="1673" draw:name="Shape5165" draw:style-name="gr1" draw:text-style-name="P2" svg:width="0.0433in" svg:height="0.1925in" svg:x="0.3634in" svg:y="5.1264in">
        <draw:text-box>
          <text:p><text:span text:style-name="T2"><text:s/></text:span></text:p>
        </draw:text-box>
      </draw:frame>
      <draw:frame text:anchor-type="page" text:anchor-page-number="5" draw:z-index="1672" draw:name="Shape1203" draw:style-name="gr1" draw:text-style-name="P2" svg:width="0.0433in" svg:height="0.1925in" svg:x="0.3634in" svg:y="4.7898in">
        <draw:text-box>
          <text:p><text:span text:style-name="T2"><text:s/></text:span></text:p>
        </draw:text-box>
      </draw:frame>
      <draw:polygon text:anchor-type="page" text:anchor-page-number="1" draw:z-index="1671" draw:name="Shape101" draw:style-name="gr2" draw:text-style-name="P3" svg:width="2.6583in" svg:height="0.1917in" svg:x="0.4114in" svg:y="3.3815in" svg:viewBox="0 0 6753 488" draw:points="0,0 6753,0 6753,488 0,488">
        <text:p/>
      </draw:polygon>
      <draw:polygon text:anchor-type="page" text:anchor-page-number="14" draw:z-index="1670" draw:name="Shape4418" draw:style-name="gr2" draw:text-style-name="P3" svg:width="4.3319in" svg:height="0.1917in" svg:x="1.7398in" svg:y="2.8697in" svg:viewBox="0 0 11004 488" draw:points="0,0 11004,0 11004,488 0,488">
        <text:p/>
      </draw:polygon>
      <draw:polygon text:anchor-type="page" text:anchor-page-number="9" draw:z-index="1669" draw:name="Shape3357" draw:style-name="gr2" draw:text-style-name="P3" svg:width="3.0516in" svg:height="0.1268in" svg:x="0.4114in" svg:y="4.3563in" svg:viewBox="0 0 7752 323" draw:points="0,0 7752,0 7752,323 0,323">
        <text:p/>
      </draw:polygon>
      <draw:polygon text:anchor-type="page" text:anchor-page-number="7" draw:z-index="1668" draw:name="Shape2824" draw:style-name="gr5" draw:text-style-name="P6" svg:width="7.3835in" svg:height="0.1768in" svg:x="0.4114in" svg:y="5.4413in" svg:viewBox="0 0 18755 450" draw:points="0,0 18755,0 18755,450 0,450">
        <text:p/>
      </draw:polygon>
      <draw:frame text:anchor-type="page" text:anchor-page-number="15" draw:z-index="1667" draw:name="Shape5005" draw:style-name="gr1" draw:text-style-name="P2" svg:width="1.8661in" svg:height="0.1295in" svg:x="0.3634in" svg:y="2.889in">
        <draw:text-box>
          <text:p><text:span text:style-name="T1">- CLP: Regolamento (CE) 1272/2008 </text:span></text:p>
        </draw:text-box>
      </draw:frame>
      <draw:polygon text:anchor-type="page" text:anchor-page-number="6" draw:z-index="1666" draw:name="Shape1865" draw:style-name="gr4" draw:text-style-name="P5" svg:width="0.4917in" svg:height="0.1917in" svg:x="5.3331in" svg:y="1.9382in" svg:viewBox="0 0 1250 488" draw:points="0,0 1250,0 1250,488 0,488">
        <text:p/>
      </draw:polygon>
      <draw:frame text:anchor-type="page" text:anchor-page-number="11" draw:z-index="1665" draw:name="Shape3852" draw:style-name="gr1" draw:text-style-name="P2" svg:width="0.6823in" svg:height="0.1295in" svg:x="3.561in" svg:y="2.1854in">
        <draw:text-box>
          <text:p><text:span text:style-name="T1">&gt; 10000 mg/l </text:span></text:p>
        </draw:text-box>
      </draw:frame>
      <draw:frame text:anchor-type="page" text:anchor-page-number="13" draw:z-index="1664" draw:name="Shape4207" draw:style-name="gr1" draw:text-style-name="P2" svg:width="0.0433in" svg:height="0.1925in" svg:x="0.3634in" svg:y="2.8264in">
        <draw:text-box>
          <text:p><text:span text:style-name="T2"><text:s/></text:span></text:p>
        </draw:text-box>
      </draw:frame>
      <draw:polygon text:anchor-type="page" text:anchor-page-number="1" draw:z-index="1663" draw:name="Shape105" draw:style-name="gr2" draw:text-style-name="P3" svg:width="2.7551in" svg:height="0.1917in" svg:x="0.363in" svg:y="3.3815in" svg:viewBox="0 0 6999 488" draw:points="0,0 6999,0 6999,488 0,488">
        <text:p/>
      </draw:polygon>
      <draw:frame text:anchor-type="page" text:anchor-page-number="2" draw:z-index="1662" draw:name="Shape436" draw:style-name="gr1" draw:text-style-name="P2" svg:width="0.076in" svg:height="0.1295in" svg:x="1.7882in" svg:y="3.272in">
        <draw:text-box>
          <text:p><text:span text:style-name="T1">--</text:span></text:p>
        </draw:text-box>
      </draw:frame>
      <draw:frame text:anchor-type="page" text:anchor-page-number="8" draw:z-index="1661" draw:name="Shape3197" draw:style-name="gr1" draw:text-style-name="P2" svg:width="1.3504in" svg:height="0.1295in" svg:x="0.4535in" svg:y="3.3354in">
        <draw:text-box>
          <text:p><text:span text:style-name="T1">Informazioni non disponibili</text:span></text:p>
        </draw:text-box>
      </draw:frame>
      <draw:polygon text:anchor-type="page" text:anchor-page-number="9" draw:z-index="1660" draw:name="Shape3356" draw:style-name="gr2" draw:text-style-name="P3" svg:width="3.1504in" svg:height="0.1268in" svg:x="0.363in" svg:y="4.3563in" svg:viewBox="0 0 8003 323" draw:points="0,0 8003,0 8003,323 0,323">
        <text:p/>
      </draw:polygon>
      <draw:polygon text:anchor-type="page" text:anchor-page-number="3" draw:z-index="1659" draw:name="Shape761" draw:style-name="gr2" draw:text-style-name="P3" svg:width="0.3933in" svg:height="0.1917in" svg:x="7.2531in" svg:y="1.9913in" svg:viewBox="0 0 1000 488" draw:points="0,0 1000,0 1000,488 0,488">
        <text:p/>
      </draw:polygon>
      <draw:frame text:anchor-type="page" text:anchor-page-number="12" draw:z-index="1658" draw:name="Shape4071" draw:style-name="gr1" draw:text-style-name="P2" svg:width="0.0433in" svg:height="0.1925in" svg:x="0.3634in" svg:y="5.8917in">
        <draw:text-box>
          <text:p><text:span text:style-name="T2"><text:s/></text:span></text:p>
        </draw:text-box>
      </draw:frame>
      <draw:polygon text:anchor-type="page" text:anchor-page-number="13" draw:z-index="1657" draw:name="Shape4212" draw:style-name="gr2" draw:text-style-name="P3" svg:width="1.8717in" svg:height="0.1264in" svg:x="0.4114in" svg:y="3.015in" svg:viewBox="0 0 4755 322" draw:points="0,0 4755,0 4755,322 0,322">
        <text:p/>
      </draw:polygon>
      <draw:frame text:anchor-type="page" text:anchor-page-number="4" draw:z-index="1656" draw:name="Shape1061" draw:style-name="gr1" draw:text-style-name="P2" svg:width="3.2224in" svg:height="0.1295in" svg:x="0.3634in" svg:y="4.852in">
        <draw:text-box>
          <text:p><text:span text:style-name="T1">PERICOLI DOVUTI ALL'ESPOSIZIONE IN CASO DI INCENDIO </text:span></text:p>
        </draw:text-box>
      </draw:frame>
      <draw:frame text:anchor-type="page" text:anchor-page-number="14" draw:z-index="1655" draw:name="Shape4411" draw:style-name="gr1" draw:text-style-name="P2" svg:width="0.5685in" svg:height="0.113in" svg:x="0.4535in" svg:y="2.8701in">
        <draw:text-box>
          <text:p><text:span text:style-name="T5">Acute Tox. 3</text:span></text:p>
        </draw:text-box>
      </draw:frame>
      <draw:polygon text:anchor-type="page" text:anchor-page-number="5" draw:z-index="1654" draw:name="Shape1207" draw:style-name="gr5" draw:text-style-name="P6" svg:width="7.3835in" svg:height="0.1768in" svg:x="0.4114in" svg:y="4.978in" svg:viewBox="0 0 18755 450" draw:points="0,0 18755,0 18755,450 0,450">
        <text:p/>
      </draw:polygon>
      <draw:frame text:anchor-type="page" text:anchor-page-number="15" draw:z-index="1653" draw:name="Shape5004" draw:style-name="gr1" draw:text-style-name="P2" svg:width="3.8858in" svg:height="0.1295in" svg:x="0.3634in" svg:y="2.7602in">
        <draw:text-box>
          <text:p><text:span text:style-name="T1">- CE: Numero identificativo in ESIS (archivio europeo delle sostanze esistenti) </text:span></text:p>
        </draw:text-box>
      </draw:frame>
      <draw:frame text:anchor-type="page" text:anchor-page-number="16" draw:z-index="1652" draw:name="Shape5164" draw:style-name="gr1" draw:text-style-name="P2" svg:width="1.1394in" svg:height="0.1295in" svg:x="0.3634in" svg:y="4.9965in">
        <draw:text-box>
          <text:p><text:span text:style-name="T1">indicato in sezione 12. </text:span></text:p>
        </draw:text-box>
      </draw:frame>
      <draw:frame text:anchor-type="page" text:anchor-page-number="11" draw:z-index="1651" draw:name="Shape3853" draw:style-name="gr1" draw:text-style-name="P2" svg:width="0.0433in" svg:height="0.1925in" svg:x="2.7728in" svg:y="2.1862in">
        <draw:text-box>
          <text:p><text:span text:style-name="T2"><text:s/></text:span></text:p>
        </draw:text-box>
      </draw:frame>
      <draw:polygon text:anchor-type="page" text:anchor-page-number="6" draw:z-index="1650" draw:name="Shape1864" draw:style-name="gr4" draw:text-style-name="P5" svg:width="0.5917in" svg:height="0.2232in" svg:x="5.2831in" svg:y="1.9382in" svg:viewBox="0 0 1504 568" draw:points="0,0 1504,0 1504,568 0,568">
        <text:p/>
      </draw:polygon>
      <draw:polygon text:anchor-type="page" text:anchor-page-number="7" draw:z-index="1649" draw:name="Shape2823" draw:style-name="gr5" draw:text-style-name="P6" svg:width="7.4803in" svg:height="0.1768in" svg:x="0.363in" svg:y="5.4413in" svg:viewBox="0 0 19001 450" draw:points="0,0 19001,0 19001,450 0,450">
        <text:p/>
      </draw:polygon>
      <draw:frame text:anchor-type="page" text:anchor-page-number="10" draw:z-index="1648" draw:name="Shape3584" draw:style-name="gr1" draw:text-style-name="P2" svg:width="0.0433in" svg:height="0.1925in" svg:x="0.3634in" svg:y="4.1035in">
        <draw:text-box>
          <text:p><text:span text:style-name="T2"><text:s/></text:span></text:p>
        </draw:text-box>
      </draw:frame>
      <draw:frame text:anchor-type="page" text:anchor-page-number="1" draw:z-index="1647" draw:name="Shape104" draw:style-name="gr1" draw:text-style-name="P2" svg:width="0.9587in" svg:height="0.1295in" svg:x="3.1665in" svg:y="3.2543in">
        <draw:text-box>
          <text:p><text:span text:style-name="T3">TYRKYS BIANCO </text:span></text:p>
        </draw:text-box>
      </draw:frame>
      <draw:polygon text:anchor-type="page" text:anchor-page-number="13" draw:z-index="1646" draw:name="Shape4211" draw:style-name="gr2" draw:text-style-name="P3" svg:width="1.9685in" svg:height="0.3831in" svg:x="0.363in" svg:y="3.015in" svg:viewBox="0 0 5001 974" draw:points="0,0 5001,0 5001,974 0,974">
        <text:p/>
      </draw:polygon>
      <draw:frame text:anchor-type="page" text:anchor-page-number="4" draw:z-index="1645" draw:name="Shape1060" draw:style-name="gr1" draw:text-style-name="P2" svg:width="0.0433in" svg:height="0.1925in" svg:x="0.3634in" svg:y="4.6634in">
        <draw:text-box>
          <text:p><text:span text:style-name="T2"><text:s/></text:span></text:p>
        </draw:text-box>
      </draw:frame>
      <draw:frame text:anchor-type="page" text:anchor-page-number="2" draw:z-index="1644" draw:name="Shape429" draw:style-name="gr1" draw:text-style-name="P2" svg:width="0.0433in" svg:height="0.1925in" svg:x="1.6154in" svg:y="3.2252in">
        <draw:text-box>
          <text:p><text:span text:style-name="T2"><text:s/></text:span></text:p>
        </draw:text-box>
      </draw:frame>
      <draw:frame text:anchor-type="page" text:anchor-page-number="7" draw:z-index="1643" draw:name="Shape2819" draw:style-name="gr1" draw:text-style-name="P2" svg:width="0.0433in" svg:height="0.1925in" svg:x="0.3634in" svg:y="5.061in">
        <draw:text-box>
          <text:p><text:span text:style-name="T2"><text:s/></text:span></text:p>
        </draw:text-box>
      </draw:frame>
      <draw:frame text:anchor-type="page" text:anchor-page-number="12" draw:z-index="1642" draw:name="Shape4070" draw:style-name="gr1" draw:text-style-name="P2" svg:width="0.0433in" svg:height="0.1925in" svg:x="0.3634in" svg:y="5.6992in">
        <draw:text-box>
          <text:p><text:span text:style-name="T2"><text:s/></text:span></text:p>
        </draw:text-box>
      </draw:frame>
      <draw:frame text:anchor-type="page" text:anchor-page-number="3" draw:z-index="1641" draw:name="Shape757" draw:style-name="gr1" draw:text-style-name="P2" svg:width="0.0433in" svg:height="0.1925in" svg:x="2.3799in" svg:y="1.9945in">
        <draw:text-box>
          <text:p><text:span text:style-name="T2"><text:s/></text:span></text:p>
        </draw:text-box>
      </draw:frame>
      <draw:polygon text:anchor-type="page" text:anchor-page-number="11" draw:z-index="1640" draw:name="Shape3855" draw:style-name="gr2" draw:text-style-name="P3" svg:width="3.8402in" svg:height="0.1283in" svg:x="3.5614in" svg:y="2.1831in" svg:viewBox="0 0 9755 327" draw:points="0,0 9755,0 9755,327 0,327">
        <text:p/>
      </draw:polygon>
      <draw:frame text:anchor-type="page" text:anchor-page-number="6" draw:z-index="1639" draw:name="Shape1861" draw:style-name="gr1" draw:text-style-name="P2" svg:width="0.5331in" svg:height="0.113in" svg:x="4.1516in" svg:y="1.9402in">
        <draw:text-box>
          <text:p><text:span text:style-name="T4">STEL/15min</text:span></text:p>
        </draw:text-box>
      </draw:frame>
      <draw:frame text:anchor-type="page" text:anchor-page-number="15" draw:z-index="1638" draw:name="Shape5003" draw:style-name="gr1" draw:text-style-name="P2" svg:width="2.3378in" svg:height="0.1295in" svg:x="0.3634in" svg:y="2.6319in">
        <draw:text-box>
          <text:p><text:span text:style-name="T1">- CAS: Numero del Chemical Abstract Service <text:s/></text:span></text:p>
        </draw:text-box>
      </draw:frame>
      <draw:frame text:anchor-type="page" text:anchor-page-number="8" draw:z-index="1637" draw:name="Shape3193" draw:style-name="gr1" draw:text-style-name="P2" svg:width="0.0433in" svg:height="0.1925in" svg:x="0.411in" svg:y="3.2874in">
        <draw:text-box>
          <text:p><text:span text:style-name="T2"><text:s/></text:span></text:p>
        </draw:text-box>
      </draw:frame>
      <draw:frame text:anchor-type="page" text:anchor-page-number="16" draw:z-index="1636" draw:name="Shape5163" draw:style-name="gr1" draw:text-style-name="P2" svg:width="7.3543in" svg:height="0.1295in" svg:x="0.3634in" svg:y="4.8689in">
        <draw:text-box>
          <text:p><text:span text:style-name="T1">Pericoli per l`ambiente: La classificazione del prodotto è basata sui metodi di calcolo di cui all'Allegato I del CLP Parte 4, salvo che sia diversamente </text:span></text:p>
        </draw:text-box>
      </draw:frame>
      <draw:polygon text:anchor-type="page" text:anchor-page-number="9" draw:z-index="1635" draw:name="Shape3355" draw:style-name="gr3" draw:text-style-name="P4" svg:width="0.9933in" svg:height="0.0083in" svg:x="0.363in" svg:y="4.3433in" svg:viewBox="0 0 2524 22" draw:points="0,0 2524,0 2524,22 0,22">
        <text:p/>
      </draw:polygon>
      <draw:frame text:anchor-type="page" text:anchor-page-number="10" draw:z-index="1634" draw:name="Shape3582" draw:style-name="gr1" draw:text-style-name="P2" svg:width="0.0433in" svg:height="0.1925in" svg:x="3.748in" svg:y="3.9264in">
        <draw:text-box>
          <text:p><text:span text:style-name="T2"><text:s/></text:span></text:p>
        </draw:text-box>
      </draw:frame>
      <draw:polygon text:anchor-type="page" text:anchor-page-number="5" draw:z-index="1633" draw:name="Shape1206" draw:style-name="gr5" draw:text-style-name="P6" svg:width="7.4803in" svg:height="0.1768in" svg:x="0.363in" svg:y="4.978in" svg:viewBox="0 0 19001 450" draw:points="0,0 19001,0 19001,450 0,450">
        <text:p/>
      </draw:polygon>
      <draw:frame text:anchor-type="page" text:anchor-page-number="14" draw:z-index="1632" draw:name="Shape4404" draw:style-name="gr1" draw:text-style-name="P2" svg:width="0.0433in" svg:height="0.1925in" svg:x="0.411in" svg:y="2.8098in">
        <draw:text-box>
          <text:p><text:span text:style-name="T2"><text:s/></text:span></text:p>
        </draw:text-box>
      </draw:frame>
      <draw:polygon text:anchor-type="page" text:anchor-page-number="11" draw:z-index="1631" draw:name="Shape3854" draw:style-name="gr2" draw:text-style-name="P3" svg:width="3.937in" svg:height="0.1917in" svg:x="3.513in" svg:y="2.1831in" svg:viewBox="0 0 10001 488" draw:points="0,0 10001,0 10001,488 0,488">
        <text:p/>
      </draw:polygon>
      <draw:frame text:anchor-type="page" text:anchor-page-number="15" draw:z-index="1630" draw:name="Shape5002" draw:style-name="gr1" draw:text-style-name="P2" svg:width="1.7224in" svg:height="0.1295in" svg:x="0.3634in" svg:y="2.5055in">
        <draw:text-box>
          <text:p><text:span text:style-name="T1">- ATE / STA: Stima Tossicità Acuta </text:span></text:p>
        </draw:text-box>
      </draw:frame>
      <draw:frame text:anchor-type="page" text:anchor-page-number="4" draw:z-index="1629" draw:name="Shape1059" draw:style-name="gr1" draw:text-style-name="P2" svg:width="3.2142in" svg:height="0.1295in" svg:x="0.3634in" svg:y="4.5319in">
        <draw:text-box>
          <text:p><text:span text:style-name="T3">5.2. Pericoli speciali derivanti dalla sostanza o dalla miscela </text:span></text:p>
        </draw:text-box>
      </draw:frame>
      <draw:frame text:anchor-type="page" text:anchor-page-number="16" draw:z-index="1628" draw:name="Shape5162" draw:style-name="gr1" draw:text-style-name="P2" svg:width="1.1307in" svg:height="0.1295in" svg:x="0.3634in" svg:y="4.7402in">
        <draw:text-box>
          <text:p><text:span text:style-name="T1">indicato in sezione 11. </text:span></text:p>
        </draw:text-box>
      </draw:frame>
      <draw:frame text:anchor-type="page" text:anchor-page-number="13" draw:z-index="1627" draw:name="Shape4204" draw:style-name="gr1" draw:text-style-name="P2" svg:width="0.0433in" svg:height="0.1925in" svg:x="5.2846in" svg:y="2.6492in">
        <draw:text-box>
          <text:p><text:span text:style-name="T2"><text:s/></text:span></text:p>
        </draw:text-box>
      </draw:frame>
      <draw:polygon text:anchor-type="page" text:anchor-page-number="3" draw:z-index="1626" draw:name="Shape759" draw:style-name="gr2" draw:text-style-name="P3" svg:width="3.8417in" svg:height="0.1917in" svg:x="3.363in" svg:y="1.9913in" svg:viewBox="0 0 9759 488" draw:points="0,0 9759,0 9759,488 0,488">
        <text:p/>
      </draw:polygon>
      <draw:frame text:anchor-type="page" text:anchor-page-number="10" draw:z-index="1625" draw:name="Shape3583" draw:style-name="gr1" draw:text-style-name="P2" svg:width="3.4071in" svg:height="0.1295in" svg:x="0.3634in" svg:y="3.9736in">
        <draw:text-box>
          <text:p><text:span text:style-name="T1">Non risponde ai criteri di classificazione per questa classe di pericolo</text:span></text:p>
        </draw:text-box>
      </draw:frame>
      <draw:frame text:anchor-type="page" text:anchor-page-number="12" draw:z-index="1624" draw:name="Shape4069" draw:style-name="gr1" draw:text-style-name="P2" svg:width="0.7787in" svg:height="0.1295in" svg:x="0.3634in" svg:y="5.5701in">
        <draw:text-box>
          <text:p><text:span text:style-name="T1">non applicabile </text:span></text:p>
        </draw:text-box>
      </draw:frame>
      <draw:frame text:anchor-type="page" text:anchor-page-number="1" draw:z-index="1623" draw:name="Shape96" draw:style-name="gr1" draw:text-style-name="P2" svg:width="0.0433in" svg:height="0.1925in" svg:x="1.2252in" svg:y="3.2075in">
        <draw:text-box>
          <text:p><text:span text:style-name="T2"><text:s/></text:span></text:p>
        </draw:text-box>
      </draw:frame>
      <draw:frame text:anchor-type="page" text:anchor-page-number="8" draw:z-index="1622" draw:name="Shape3192" draw:style-name="gr1" draw:text-style-name="P2" svg:width="0.0433in" svg:height="0.1925in" svg:x="0.3634in" svg:y="3.1445in">
        <draw:text-box>
          <text:p><text:span text:style-name="T2"><text:s/></text:span></text:p>
        </draw:text-box>
      </draw:frame>
      <draw:frame text:anchor-type="page" text:anchor-page-number="6" draw:z-index="1621" draw:name="Shape1862" draw:style-name="gr1" draw:text-style-name="P2" svg:width="0.0433in" svg:height="0.1925in" svg:x="3.561in" svg:y="1.9417in">
        <draw:text-box>
          <text:p><text:span text:style-name="T2"><text:s/></text:span></text:p>
        </draw:text-box>
      </draw:frame>
      <draw:frame text:anchor-type="page" text:anchor-page-number="14" draw:z-index="1620" draw:name="Shape4403" draw:style-name="gr1" draw:text-style-name="P2" svg:width="0.0433in" svg:height="0.1925in" svg:x="6.1193in" svg:y="2.6811in">
        <draw:text-box>
          <text:p><text:span text:style-name="T2"><text:s/></text:span></text:p>
        </draw:text-box>
      </draw:frame>
      <draw:frame text:anchor-type="page" text:anchor-page-number="9" draw:z-index="1619" draw:name="Shape3351" draw:style-name="gr1" draw:text-style-name="P2" svg:width="0.985in" svg:height="0.1295in" svg:x="0.3634in" svg:y="4.2307in">
        <draw:text-box>
          <text:p><text:span text:style-name="T1">TOSSICITÀ ACUTA</text:span></text:p>
        </draw:text-box>
      </draw:frame>
      <draw:frame text:anchor-type="page" text:anchor-page-number="7" draw:z-index="1618" draw:name="Shape2818" draw:style-name="gr1" draw:text-style-name="P2" svg:width="0.0433in" svg:height="0.1925in" svg:x="0.3634in" svg:y="4.8693in">
        <draw:text-box>
          <text:p><text:span text:style-name="T2"><text:s/></text:span></text:p>
        </draw:text-box>
      </draw:frame>
      <draw:frame text:anchor-type="page" text:anchor-page-number="5" draw:z-index="1617" draw:name="Shape1202" draw:style-name="gr1" draw:text-style-name="P2" svg:width="1.3815in" svg:height="0.1295in" svg:x="0.3634in" svg:y="4.6602in">
        <draw:text-box>
          <text:p><text:span text:style-name="T1">Informazioni non disponibili </text:span></text:p>
        </draw:text-box>
      </draw:frame>
      <draw:polygon text:anchor-type="page" text:anchor-page-number="2" draw:z-index="1616" draw:name="Shape435" draw:style-name="gr2" draw:text-style-name="P3" svg:width="6.0067in" svg:height="0.1283in" svg:x="1.7882in" svg:y="3.2697in" svg:viewBox="0 0 15258 327" draw:points="0,0 15258,0 15258,327 0,327">
        <text:p/>
      </draw:polygon>
      <draw:polygon text:anchor-type="page" text:anchor-page-number="2" draw:z-index="1615" draw:name="Shape434" draw:style-name="gr2" draw:text-style-name="P3" svg:width="6.1035in" svg:height="0.1283in" svg:x="1.7398in" svg:y="3.2697in" svg:viewBox="0 0 15504 327" draw:points="0,0 15504,0 15504,327 0,327">
        <text:p/>
      </draw:polygon>
      <draw:frame text:anchor-type="page" text:anchor-page-number="4" draw:z-index="1614" draw:name="Shape1058" draw:style-name="gr1" draw:text-style-name="P2" svg:width="0.0433in" svg:height="0.1925in" svg:x="0.3634in" svg:y="4.3429in">
        <draw:text-box>
          <text:p><text:span text:style-name="T2"><text:s/></text:span></text:p>
        </draw:text-box>
      </draw:frame>
      <draw:polygon text:anchor-type="page" text:anchor-page-number="6" draw:z-index="1613" draw:name="Shape1863" draw:style-name="gr4" draw:text-style-name="P5" svg:width="1.0831in" svg:height="0.1114in" svg:x="4.1516in" svg:y="1.9382in" svg:viewBox="0 0 2752 284" draw:points="0,0 2752,0 2752,284 0,284">
        <text:p/>
      </draw:polygon>
      <draw:frame text:anchor-type="page" text:anchor-page-number="16" draw:z-index="1612" draw:name="Shape5161" draw:style-name="gr1" draw:text-style-name="P2" svg:width="7.8697in" svg:height="0.1295in" svg:x="0.3634in" svg:y="4.6134in">
        <draw:text-box>
          <text:p><text:span text:style-name="T1">Pericoli <text:s/>per <text:s/>la salute: <text:s/>La <text:s/>classificazione <text:s/>del <text:s/>prodotto <text:s/>è <text:s/>basata <text:s/>sui metodi <text:s/>di calcolo <text:s/>di cui <text:s/>all'Allegato <text:s/>I <text:s/>del <text:s/>CLP Parte <text:s/>3, <text:s/>salvo <text:s/>che <text:s/>sia <text:s/>diversamente </text:span></text:p>
        </draw:text-box>
      </draw:frame>
      <draw:frame text:anchor-type="page" text:anchor-page-number="5" draw:z-index="1611" draw:name="Shape1201" draw:style-name="gr1" draw:text-style-name="P2" svg:width="0.0433in" svg:height="0.1925in" svg:x="0.3634in" svg:y="4.4717in">
        <draw:text-box>
          <text:p><text:span text:style-name="T2"><text:s/></text:span></text:p>
        </draw:text-box>
      </draw:frame>
      <draw:frame text:anchor-type="page" text:anchor-page-number="10" draw:z-index="1610" draw:name="Shape3581" draw:style-name="gr1" draw:text-style-name="P2" svg:width="0.0433in" svg:height="0.1925in" svg:x="0.3634in" svg:y="3.7846in">
        <draw:text-box>
          <text:p><text:span text:style-name="T2"><text:s/></text:span></text:p>
        </draw:text-box>
      </draw:frame>
      <draw:polygon text:anchor-type="page" text:anchor-page-number="1" draw:z-index="1609" draw:name="Shape103" draw:style-name="gr2" draw:text-style-name="P3" svg:width="4.6283in" svg:height="0.1283in" svg:x="3.1665in" svg:y="3.2531in" svg:viewBox="0 0 11757 327" draw:points="0,0 11757,0 11757,327 0,327">
        <text:p/>
      </draw:polygon>
      <draw:polygon text:anchor-type="page" text:anchor-page-number="3" draw:z-index="1608" draw:name="Shape758" draw:style-name="gr2" draw:text-style-name="P3" svg:width="3.9382in" svg:height="0.1917in" svg:x="3.315in" svg:y="1.9913in" svg:viewBox="0 0 10004 488" draw:points="0,0 10004,0 10004,488 0,488">
        <text:p/>
      </draw:polygon>
      <draw:frame text:anchor-type="page" text:anchor-page-number="15" draw:z-index="1607" draw:name="Shape5001" draw:style-name="gr1" draw:text-style-name="P2" svg:width="3.587in" svg:height="0.1295in" svg:x="0.3634in" svg:y="2.3772in">
        <draw:text-box>
          <text:p><text:span text:style-name="T1">- ADR: Accordo europeo per il trasporto delle merci pericolose su strada </text:span></text:p>
        </draw:text-box>
      </draw:frame>
      <draw:frame text:anchor-type="page" text:anchor-page-number="9" draw:z-index="1606" draw:name="Shape3349" draw:style-name="gr1" draw:text-style-name="P2" svg:width="0.0433in" svg:height="0.1925in" svg:x="0.3634in" svg:y="4.0398in">
        <draw:text-box>
          <text:p><text:span text:style-name="T2"><text:s/></text:span></text:p>
        </draw:text-box>
      </draw:frame>
      <draw:frame text:anchor-type="page" text:anchor-page-number="12" draw:z-index="1605" draw:name="Shape4068" draw:style-name="gr1" draw:text-style-name="P2" svg:width="0.0433in" svg:height="0.1925in" svg:x="0.3634in" svg:y="5.3811in">
        <draw:text-box>
          <text:p><text:span text:style-name="T2"><text:s/></text:span></text:p>
        </draw:text-box>
      </draw:frame>
      <draw:polygon text:anchor-type="page" text:anchor-page-number="14" draw:z-index="1604" draw:name="Shape4408" draw:style-name="gr2" draw:text-style-name="P3" svg:width="1.2799in" svg:height="0.1118in" svg:x="0.4114in" svg:y="2.8697in" svg:viewBox="0 0 3252 285" draw:points="0,0 3252,0 3252,285 0,285">
        <text:p/>
      </draw:polygon>
      <draw:frame text:anchor-type="page" text:anchor-page-number="13" draw:z-index="1603" draw:name="Shape4206" draw:style-name="gr1" draw:text-style-name="P2" svg:width="1.7276in" svg:height="0.1295in" svg:x="3.561in" svg:y="2.6972in">
        <draw:text-box>
          <text:p><text:span text:style-name="T1">REACH: 01-2119489379-17-XXXX</text:span></text:p>
        </draw:text-box>
      </draw:frame>
      <draw:frame text:anchor-type="page" text:anchor-page-number="11" draw:z-index="1602" draw:name="Shape3840" draw:style-name="gr1" draw:text-style-name="P2" svg:width="0.0433in" svg:height="0.1925in" svg:x="1.3547in" svg:y="2.1374in">
        <draw:text-box>
          <text:p><text:span text:style-name="T2"><text:s/></text:span></text:p>
        </draw:text-box>
      </draw:frame>
      <draw:frame text:anchor-type="page" text:anchor-page-number="7" draw:z-index="1601" draw:name="Shape2817" draw:style-name="gr1" draw:text-style-name="P2" svg:width="1.0335in" svg:height="0.1295in" svg:x="0.3634in" svg:y="4.7402in">
        <draw:text-box>
          <text:p><text:span text:style-name="T1">di tutela ambientale. </text:span></text:p>
        </draw:text-box>
      </draw:frame>
      <draw:polygon text:anchor-type="page" text:anchor-page-number="8" draw:z-index="1600" draw:name="Shape3196" draw:style-name="gr2" draw:text-style-name="P3" svg:width="7.3835in" svg:height="0.1283in" svg:x="0.4114in" svg:y="3.3331in" svg:viewBox="0 0 18755 327" draw:points="0,0 18755,0 18755,327 0,327">
        <text:p/>
      </draw:polygon>
      <draw:polygon text:anchor-type="page" text:anchor-page-number="1" draw:z-index="1599" draw:name="Shape102" draw:style-name="gr2" draw:text-style-name="P3" svg:width="4.7252in" svg:height="0.1283in" svg:x="3.1181in" svg:y="3.2531in" svg:viewBox="0 0 12003 327" draw:points="0,0 12003,0 12003,327 0,327">
        <text:p/>
      </draw:polygon>
      <draw:polygon text:anchor-type="page" text:anchor-page-number="11" draw:z-index="1598" draw:name="Shape3851" draw:style-name="gr2" draw:text-style-name="P3" svg:width="0.6898in" svg:height="0.1917in" svg:x="2.7732in" svg:y="2.1831in" svg:viewBox="0 0 1753 488" draw:points="0,0 1753,0 1753,488 0,488">
        <text:p/>
      </draw:polygon>
      <draw:frame text:anchor-type="page" text:anchor-page-number="3" draw:z-index="1597" draw:name="Shape741" draw:style-name="gr1" draw:text-style-name="P2" svg:width="0.0433in" svg:height="0.1925in" svg:x="1.3429in" svg:y="1.9465in">
        <draw:text-box>
          <text:p><text:span text:style-name="T2"><text:s/></text:span></text:p>
        </draw:text-box>
      </draw:frame>
      <draw:polygon text:anchor-type="page" text:anchor-page-number="14" draw:z-index="1596" draw:name="Shape4407" draw:style-name="gr2" draw:text-style-name="P3" svg:width="1.3768in" svg:height="0.1917in" svg:x="0.363in" svg:y="2.8697in" svg:viewBox="0 0 3498 488" draw:points="0,0 3498,0 3498,488 0,488">
        <text:p/>
      </draw:polygon>
      <draw:frame text:anchor-type="page" text:anchor-page-number="7" draw:z-index="1595" draw:name="Shape2816" draw:style-name="gr1" draw:text-style-name="P2" svg:width="7.5217in" svg:height="0.1295in" svg:x="0.3634in" svg:y="4.6138in">
        <draw:text-box>
          <text:p><text:span text:style-name="T1">Le emissioni da processi produttivi, comprese quelle da apparecchiature di ventilazione dovrebbero essere controllate ai fini del rispetto della normativa </text:span></text:p>
        </draw:text-box>
      </draw:frame>
      <draw:frame text:anchor-type="page" text:anchor-page-number="13" draw:z-index="1594" draw:name="Shape4203" draw:style-name="gr1" draw:text-style-name="P2" svg:width="1.9106in" svg:height="0.1295in" svg:x="3.561in" svg:y="2.5689in">
        <draw:text-box>
          <text:p><text:span text:style-name="T1">diametro aerodinamico ≤ 10 μm) Reg. </text:span></text:p>
        </draw:text-box>
      </draw:frame>
      <draw:frame text:anchor-type="page" text:anchor-page-number="4" draw:z-index="1593" draw:name="Shape1057" draw:style-name="gr1" draw:text-style-name="P2" svg:width="1.176in" svg:height="0.1295in" svg:x="0.3634in" svg:y="4.2138in">
        <draw:text-box>
          <text:p><text:span text:style-name="T1">Nessuno in particolare. </text:span></text:p>
        </draw:text-box>
      </draw:frame>
      <draw:frame text:anchor-type="page" text:anchor-page-number="2" draw:z-index="1592" draw:name="Shape433" draw:style-name="gr1" draw:text-style-name="P2" svg:width="1.1697in" svg:height="0.1295in" svg:x="0.4535in" svg:y="3.272in">
        <draw:text-box>
          <text:p><text:span text:style-name="T1">Pittogrammi di pericolo:</text:span></text:p>
        </draw:text-box>
      </draw:frame>
      <draw:frame text:anchor-type="page" text:anchor-page-number="12" draw:z-index="1591" draw:name="Shape4067" draw:style-name="gr1" draw:text-style-name="P2" svg:width="0.0433in" svg:height="0.1925in" svg:x="0.3634in" svg:y="5.1898in">
        <draw:text-box>
          <text:p><text:span text:style-name="T2"><text:s/></text:span></text:p>
        </draw:text-box>
      </draw:frame>
      <draw:frame text:anchor-type="page" text:anchor-page-number="9" draw:z-index="1590" draw:name="Shape3348" draw:style-name="gr1" draw:text-style-name="P2" svg:width="1.3815in" svg:height="0.1295in" svg:x="0.3634in" svg:y="3.9102in">
        <draw:text-box>
          <text:p><text:span text:style-name="T1">Informazioni non disponibili </text:span></text:p>
        </draw:text-box>
      </draw:frame>
      <draw:frame text:anchor-type="page" text:anchor-page-number="10" draw:z-index="1589" draw:name="Shape3578" draw:style-name="gr1" draw:text-style-name="P2" svg:width="0.0433in" svg:height="0.1925in" svg:x="4.8035in" svg:y="3.6075in">
        <draw:text-box>
          <text:p><text:span text:style-name="T2"><text:s/></text:span></text:p>
        </draw:text-box>
      </draw:frame>
      <draw:frame text:anchor-type="page" text:anchor-page-number="16" draw:z-index="1588" draw:name="Shape5160" draw:style-name="gr1" draw:text-style-name="P2" svg:width="2.8358in" svg:height="0.1295in" svg:x="0.3634in" svg:y="4.4846in">
        <draw:text-box>
          <text:p><text:span text:style-name="T1">delle proprietà chimico fisiche sono riportati in sezione 9. </text:span></text:p>
        </draw:text-box>
      </draw:frame>
      <draw:frame text:anchor-type="page" text:anchor-page-number="15" draw:z-index="1587" draw:name="Shape5000" draw:style-name="gr1" draw:text-style-name="P2" svg:width="0.598in" svg:height="0.1295in" svg:x="0.3634in" svg:y="2.2484in">
        <draw:text-box>
          <text:p><text:span text:style-name="T1">LEGENDA: </text:span></text:p>
        </draw:text-box>
      </draw:frame>
      <draw:polygon text:anchor-type="page" text:anchor-page-number="6" draw:z-index="1586" draw:name="Shape1855" draw:style-name="gr4" draw:text-style-name="P5" svg:width="1.1799in" svg:height="0.2232in" svg:x="4.1031in" svg:y="1.9382in" svg:viewBox="0 0 2998 568" draw:points="0,0 2998,0 2998,568 0,568">
        <text:p/>
      </draw:polygon>
      <draw:frame text:anchor-type="page" text:anchor-page-number="5" draw:z-index="1585" draw:name="Shape1200" draw:style-name="gr1" draw:text-style-name="P2" svg:width="1.2878in" svg:height="0.1295in" svg:x="0.3634in" svg:y="4.3402in">
        <draw:text-box>
          <text:p><text:span text:style-name="T3">7.3. Usi finali particolari </text:span></text:p>
        </draw:text-box>
      </draw:frame>
      <draw:polygon text:anchor-type="page" text:anchor-page-number="8" draw:z-index="1584" draw:name="Shape3195" draw:style-name="gr2" draw:text-style-name="P3" svg:width="7.4803in" svg:height="0.1283in" svg:x="0.363in" svg:y="3.3331in" svg:viewBox="0 0 19001 327" draw:points="0,0 19001,0 19001,327 0,327">
        <text:p/>
      </draw:polygon>
      <draw:frame text:anchor-type="page" text:anchor-page-number="16" draw:z-index="1583" draw:name="Shape5159" draw:style-name="gr1" draw:text-style-name="P2" svg:width="7.4512in" svg:height="0.1295in" svg:x="0.3634in" svg:y="4.3571in">
        <draw:text-box>
          <text:p><text:span text:style-name="T1">Pericoli chimico fisici: La classificazione del prodotto è stata derivata dai criteri stabiliti dal Regolamento CLP Allegato I Parte 2. I metodi di valutazione </text:span></text:p>
        </draw:text-box>
      </draw:frame>
      <draw:frame text:anchor-type="page" text:anchor-page-number="6" draw:z-index="1582" draw:name="Shape1832" draw:style-name="gr1" draw:text-style-name="P2" svg:width="0.0433in" svg:height="0.1925in" svg:x="2.7311in" svg:y="1.8799in">
        <draw:text-box>
          <text:p><text:span text:style-name="T2"><text:s/></text:span></text:p>
        </draw:text-box>
      </draw:frame>
      <draw:frame text:anchor-type="page" text:anchor-page-number="12" draw:z-index="1581" draw:name="Shape4066" draw:style-name="gr1" draw:text-style-name="P2" svg:width="1.4634in" svg:height="0.1295in" svg:x="0.3634in" svg:y="5.0583in">
        <draw:text-box>
          <text:p><text:span text:style-name="T3">14.4. Gruppo d'imballaggio </text:span></text:p>
        </draw:text-box>
      </draw:frame>
      <draw:frame text:anchor-type="page" text:anchor-page-number="8" draw:z-index="1580" draw:name="Shape3191" draw:style-name="gr1" draw:text-style-name="P2" svg:width="0.0433in" svg:height="0.1925in" svg:x="0.3634in" svg:y="2.9535in">
        <draw:text-box>
          <text:p><text:span text:style-name="T2"><text:s/></text:span></text:p>
        </draw:text-box>
      </draw:frame>
      <draw:frame text:anchor-type="page" text:anchor-page-number="2" draw:z-index="1579" draw:name="Shape428" draw:style-name="gr1" draw:text-style-name="P2" svg:width="0.0433in" svg:height="0.1925in" svg:x="0.411in" svg:y="3.2252in">
        <draw:text-box>
          <text:p><text:span text:style-name="T2"><text:s/></text:span></text:p>
        </draw:text-box>
      </draw:frame>
      <draw:polygon text:anchor-type="page" text:anchor-page-number="10" draw:z-index="1578" draw:name="Shape3580" draw:style-name="gr3" draw:text-style-name="P4" svg:width="4.4402in" svg:height="0.0083in" svg:x="0.363in" svg:y="3.7681in" svg:viewBox="0 0 11279 22" draw:points="0,0 11279,0 11279,22 0,22">
        <text:p/>
      </draw:polygon>
      <draw:frame text:anchor-type="page" text:anchor-page-number="7" draw:z-index="1577" draw:name="Shape2815" draw:style-name="gr1" draw:text-style-name="P2" svg:width="2.5039in" svg:height="0.1295in" svg:x="0.3634in" svg:y="4.4854in">
        <draw:text-box>
          <text:p><text:span text:style-name="T1">CONTROLLI DELL`ESPOSIZIONE AMBIENTALE </text:span></text:p>
        </draw:text-box>
      </draw:frame>
      <draw:frame text:anchor-type="page" text:anchor-page-number="14" draw:z-index="1576" draw:name="Shape4396" draw:style-name="gr1" draw:text-style-name="P2" svg:width="0.0433in" svg:height="0.1925in" svg:x="3.1417in" svg:y="2.6335in">
        <draw:text-box>
          <text:p><text:span text:style-name="T2"><text:s/></text:span></text:p>
        </draw:text-box>
      </draw:frame>
      <draw:polygon text:anchor-type="page" text:anchor-page-number="11" draw:z-index="1575" draw:name="Shape3850" draw:style-name="gr2" draw:text-style-name="P3" svg:width="0.7882in" svg:height="0.1917in" svg:x="2.7248in" svg:y="2.1831in" svg:viewBox="0 0 2003 488" draw:points="0,0 2003,0 2003,488 0,488">
        <text:p/>
      </draw:polygon>
      <draw:frame text:anchor-type="page" text:anchor-page-number="9" draw:z-index="1574" draw:name="Shape3347" draw:style-name="gr1" draw:text-style-name="P2" svg:width="0.0433in" svg:height="0.1925in" svg:x="0.3634in" svg:y="3.7193in">
        <draw:text-box>
          <text:p><text:span text:style-name="T2"><text:s/></text:span></text:p>
        </draw:text-box>
      </draw:frame>
      <draw:frame text:anchor-type="page" text:anchor-page-number="5" draw:z-index="1573" draw:name="Shape1199" draw:style-name="gr1" draw:text-style-name="P2" svg:width="0.0433in" svg:height="0.1925in" svg:x="0.3634in" svg:y="4.1516in">
        <draw:text-box>
          <text:p><text:span text:style-name="T2"><text:s/></text:span></text:p>
        </draw:text-box>
      </draw:frame>
      <draw:frame text:anchor-type="page" text:anchor-page-number="15" draw:z-index="1572" draw:name="Shape4999" draw:style-name="gr1" draw:text-style-name="P2" svg:width="0.0433in" svg:height="0.1925in" svg:x="0.3634in" svg:y="2.0598in">
        <draw:text-box>
          <text:p><text:span text:style-name="T2"><text:s/></text:span></text:p>
        </draw:text-box>
      </draw:frame>
      <draw:polygon text:anchor-type="page" text:anchor-page-number="3" draw:z-index="1571" draw:name="Shape756" draw:style-name="gr2" draw:text-style-name="P3" svg:width="0.8866in" svg:height="0.1917in" svg:x="2.3799in" svg:y="1.9913in" svg:viewBox="0 0 2253 488" draw:points="0,0 2253,0 2253,488 0,488">
        <text:p/>
      </draw:polygon>
      <draw:polygon text:anchor-type="page" text:anchor-page-number="13" draw:z-index="1570" draw:name="Shape4205" draw:style-name="gr2" draw:text-style-name="P3" svg:width="1.8717in" svg:height="0.1283in" svg:x="3.5614in" svg:y="2.6949in" svg:viewBox="0 0 4755 327" draw:points="0,0 4755,0 4755,327 0,327">
        <text:p/>
      </draw:polygon>
      <draw:frame text:anchor-type="page" text:anchor-page-number="1" draw:z-index="1569" draw:name="Shape100" draw:style-name="gr1" draw:text-style-name="P2" svg:width="0.7787in" svg:height="0.1295in" svg:x="0.4535in" svg:y="3.2555in">
        <draw:text-box>
          <text:p><text:span text:style-name="T1">Denominazione</text:span></text:p>
        </draw:text-box>
      </draw:frame>
      <draw:frame text:anchor-type="page" text:anchor-page-number="4" draw:z-index="1568" draw:name="Shape1056" draw:style-name="gr1" draw:text-style-name="P2" svg:width="1.9087in" svg:height="0.1295in" svg:x="0.3634in" svg:y="4.0854in">
        <draw:text-box>
          <text:p><text:span text:style-name="T1">MEZZI DI ESTINZIONE NON IDONEI </text:span></text:p>
        </draw:text-box>
      </draw:frame>
      <draw:polygon text:anchor-type="page" text:anchor-page-number="14" draw:z-index="1567" draw:name="Shape4410" draw:style-name="gr2" draw:text-style-name="P3" svg:width="0.4933in" svg:height="0.1917in" svg:x="6.1197in" svg:y="2.678in" svg:viewBox="0 0 1254 488" draw:points="0,0 1254,0 1254,488 0,488">
        <text:p/>
      </draw:polygon>
      <draw:frame text:anchor-type="page" text:anchor-page-number="8" draw:z-index="1566" draw:name="Shape3187" draw:style-name="gr1" draw:text-style-name="P2" svg:width="0.0433in" svg:height="0.1925in" svg:x="2.3311in" svg:y="2.7764in">
        <draw:text-box>
          <text:p><text:span text:style-name="T2"><text:s/></text:span></text:p>
        </draw:text-box>
      </draw:frame>
      <draw:frame text:anchor-type="page" text:anchor-page-number="10" draw:z-index="1565" draw:name="Shape3579" draw:style-name="gr1" draw:text-style-name="P2" svg:width="4.4496in" svg:height="0.1295in" svg:x="0.3634in" svg:y="3.6555in">
        <draw:text-box>
          <text:p><text:span text:style-name="T1">TOSSICITÀ SPECIFICA PER ORGANI BERSAGLIO (STOT) - ESPOSIZIONE RIPETUTA</text:span></text:p>
        </draw:text-box>
      </draw:frame>
      <draw:frame text:anchor-type="page" text:anchor-page-number="9" draw:z-index="1564" draw:name="Shape3344" draw:style-name="gr1" draw:text-style-name="P2" svg:width="0.0433in" svg:height="0.1925in" svg:x="1.1228in" svg:y="3.5429in">
        <draw:text-box>
          <text:p><text:span text:style-name="T2"><text:s/></text:span></text:p>
        </draw:text-box>
      </draw:frame>
      <draw:frame text:anchor-type="page" text:anchor-page-number="15" draw:z-index="1563" draw:name="Shape4986" draw:style-name="gr1" draw:text-style-name="P2" svg:width="0.0433in" svg:height="0.1925in" svg:x="2.5417in" svg:y="1.8835in">
        <draw:text-box>
          <text:p><text:span text:style-name="T2"><text:s/></text:span></text:p>
        </draw:text-box>
      </draw:frame>
      <draw:frame text:anchor-type="page" text:anchor-page-number="12" draw:z-index="1562" draw:name="Shape4065" draw:style-name="gr1" draw:text-style-name="P2" svg:width="0.0433in" svg:height="0.1925in" svg:x="0.3634in" svg:y="4.8693in">
        <draw:text-box>
          <text:p><text:span text:style-name="T2"><text:s/></text:span></text:p>
        </draw:text-box>
      </draw:frame>
      <draw:frame text:anchor-type="page" text:anchor-page-number="11" draw:z-index="1561" draw:name="Shape3849" draw:style-name="gr1" draw:text-style-name="P2" svg:width="0.9094in" svg:height="0.1295in" svg:x="0.4535in" svg:y="2.1854in">
        <draw:text-box>
          <text:p><text:span text:style-name="T1">Solubilità in acqua</text:span></text:p>
        </draw:text-box>
      </draw:frame>
      <draw:frame text:anchor-type="page" text:anchor-page-number="1" draw:z-index="1560" draw:name="Shape95" draw:style-name="gr1" draw:text-style-name="P2" svg:width="0.0433in" svg:height="0.1925in" svg:x="0.411in" svg:y="3.2075in">
        <draw:text-box>
          <text:p><text:span text:style-name="T2"><text:s/></text:span></text:p>
        </draw:text-box>
      </draw:frame>
      <draw:frame text:anchor-type="page" text:anchor-page-number="4" draw:z-index="1559" draw:name="Shape1055" draw:style-name="gr1" draw:text-style-name="P2" svg:width="5.1724in" svg:height="0.1295in" svg:x="0.3634in" svg:y="3.9583in">
        <draw:text-box>
          <text:p><text:span text:style-name="T1">I mezzi di estinzione sono quelli tradizionali: anidride carbonica, schiuma, polvere ed acqua nebulizzata. </text:span></text:p>
        </draw:text-box>
      </draw:frame>
      <draw:polygon text:anchor-type="page" text:anchor-page-number="6" draw:z-index="1558" draw:name="Shape1853" draw:style-name="gr4" draw:text-style-name="P5" svg:width="0.4933in" svg:height="0.1917in" svg:x="3.5614in" svg:y="1.9382in" svg:viewBox="0 0 1254 488" draw:points="0,0 1254,0 1254,488 0,488">
        <text:p/>
      </draw:polygon>
      <draw:frame text:anchor-type="page" text:anchor-page-number="5" draw:z-index="1557" draw:name="Shape1198" draw:style-name="gr1" draw:text-style-name="P2" svg:width="3.4571in" svg:height="0.1295in" svg:x="0.3634in" svg:y="4.022in">
        <draw:text-box>
          <text:p><text:span text:style-name="T1">lontano da eventuali materiali incompatibili, verificando la sezione 10. </text:span></text:p>
        </draw:text-box>
      </draw:frame>
      <draw:frame text:anchor-type="page" text:anchor-page-number="7" draw:z-index="1556" draw:name="Shape2814" draw:style-name="gr1" draw:text-style-name="P2" svg:width="0.0433in" svg:height="0.1925in" svg:x="0.3634in" svg:y="4.2945in">
        <draw:text-box>
          <text:p><text:span text:style-name="T2"><text:s/></text:span></text:p>
        </draw:text-box>
      </draw:frame>
      <draw:frame text:anchor-type="page" text:anchor-page-number="13" draw:z-index="1555" draw:name="Shape4201" draw:style-name="gr1" draw:text-style-name="P2" svg:width="1.6831in" svg:height="0.1295in" svg:x="3.561in" svg:y="2.4402in">
        <draw:text-box>
          <text:p><text:span text:style-name="T1">contenente &lt; 1% di particelle con </text:span></text:p>
        </draw:text-box>
      </draw:frame>
      <draw:frame text:anchor-type="page" text:anchor-page-number="16" draw:z-index="1554" draw:name="Shape5158" draw:style-name="gr1" draw:text-style-name="P2" svg:width="2.578in" svg:height="0.1295in" svg:x="0.3634in" svg:y="4.2307in">
        <draw:text-box>
          <text:p><text:span text:style-name="T1">METODI DI CALCOLO DELLA CLASSIFICAZIONE </text:span></text:p>
        </draw:text-box>
      </draw:frame>
      <draw:frame text:anchor-type="page" text:anchor-page-number="2" draw:z-index="1553" draw:name="Shape427" draw:style-name="gr1" draw:text-style-name="P2" svg:width="0.0433in" svg:height="0.1925in" svg:x="0.3634in" svg:y="3.0811in">
        <draw:text-box>
          <text:p><text:span text:style-name="T2"><text:s/></text:span></text:p>
        </draw:text-box>
      </draw:frame>
      <draw:polygon text:anchor-type="page" text:anchor-page-number="3" draw:z-index="1552" draw:name="Shape755" draw:style-name="gr2" draw:text-style-name="P3" svg:width="0.9835in" svg:height="0.1917in" svg:x="2.3315in" svg:y="1.9913in" svg:viewBox="0 0 2499 488" draw:points="0,0 2499,0 2499,488 0,488">
        <text:p/>
      </draw:polygon>
      <draw:polygon text:anchor-type="page" text:anchor-page-number="14" draw:z-index="1551" draw:name="Shape4409" draw:style-name="gr2" draw:text-style-name="P3" svg:width="0.5898in" svg:height="0.1917in" svg:x="6.0717in" svg:y="2.678in" svg:viewBox="0 0 1499 488" draw:points="0,0 1499,0 1499,488 0,488">
        <text:p/>
      </draw:polygon>
      <draw:frame text:anchor-type="page" text:anchor-page-number="1" draw:z-index="1550" draw:name="Shape91" draw:style-name="gr1" draw:text-style-name="P2" svg:width="0.0433in" svg:height="0.1925in" svg:x="2.0465in" svg:y="3.078in">
        <draw:text-box>
          <text:p><text:span text:style-name="T2"><text:s/></text:span></text:p>
        </draw:text-box>
      </draw:frame>
      <draw:frame text:anchor-type="page" text:anchor-page-number="16" draw:z-index="1549" draw:name="Shape5157" draw:style-name="gr1" draw:text-style-name="P2" svg:width="3.9606in" svg:height="0.1295in" svg:x="0.3634in" svg:y="4.102in">
        <draw:text-box>
          <text:p><text:span text:style-name="T1">Fornire adeguata formazione al personale addetto all`utilizzo di prodotti chimici. </text:span></text:p>
        </draw:text-box>
      </draw:frame>
      <draw:polygon text:anchor-type="page" text:anchor-page-number="9" draw:z-index="1548" draw:name="Shape3346" draw:style-name="gr3" draw:text-style-name="P4" svg:width="0.7602in" svg:height="0.0083in" svg:x="0.363in" svg:y="3.7031in" svg:viewBox="0 0 1932 22" draw:points="0,0 1932,0 1932,22 0,22">
        <text:p/>
      </draw:polygon>
      <draw:frame text:anchor-type="page" text:anchor-page-number="3" draw:z-index="1547" draw:name="Shape754" draw:style-name="gr1" draw:text-style-name="P2" svg:width="0.8969in" svg:height="0.1295in" svg:x="0.4535in" svg:y="1.9937in">
        <draw:text-box>
          <text:p><text:span text:style-name="T1">CAS <text:s text:c="2"/>14807-96-6</text:span></text:p>
        </draw:text-box>
      </draw:frame>
      <draw:frame text:anchor-type="page" text:anchor-page-number="10" draw:z-index="1546" draw:name="Shape3577" draw:style-name="gr1" draw:text-style-name="P2" svg:width="0.0433in" svg:height="0.1925in" svg:x="0.3634in" svg:y="3.4646in">
        <draw:text-box>
          <text:p><text:span text:style-name="T2"><text:s/></text:span></text:p>
        </draw:text-box>
      </draw:frame>
      <draw:frame text:anchor-type="page" text:anchor-page-number="15" draw:z-index="1545" draw:name="Shape4998" draw:style-name="gr1" draw:text-style-name="P2" svg:width="0.5606in" svg:height="0.1295in" svg:x="1.9866in" svg:y="1.9307in">
        <draw:text-box>
          <text:p><text:span text:style-name="T1">Costruzioni</text:span></text:p>
        </draw:text-box>
      </draw:frame>
      <draw:frame text:anchor-type="page" text:anchor-page-number="8" draw:z-index="1544" draw:name="Shape3190" draw:style-name="gr1" draw:text-style-name="P2" svg:width="1.8843in" svg:height="0.1295in" svg:x="0.4535in" svg:y="2.8236in">
        <draw:text-box>
          <text:p><text:span text:style-name="T1">9.2.2. Altre caratteristiche di sicurezza</text:span></text:p>
        </draw:text-box>
      </draw:frame>
      <draw:frame text:anchor-type="page" text:anchor-page-number="11" draw:z-index="1543" draw:name="Shape3839" draw:style-name="gr1" draw:text-style-name="P2" svg:width="0.0433in" svg:height="0.1925in" svg:x="0.411in" svg:y="2.1374in">
        <draw:text-box>
          <text:p><text:span text:style-name="T2"><text:s/></text:span></text:p>
        </draw:text-box>
      </draw:frame>
      <draw:polygon text:anchor-type="page" text:anchor-page-number="13" draw:z-index="1542" draw:name="Shape4202" draw:style-name="gr2" draw:text-style-name="P3" svg:width="1.8717in" svg:height="0.1283in" svg:x="3.5614in" svg:y="2.5665in" svg:viewBox="0 0 4755 327" draw:points="0,0 4755,0 4755,327 0,327">
        <text:p/>
      </draw:polygon>
      <draw:polygon text:anchor-type="page" text:anchor-page-number="6" draw:z-index="1541" draw:name="Shape1851" draw:style-name="gr4" draw:text-style-name="P5" svg:width="0.5902in" svg:height="0.2232in" svg:x="3.513in" svg:y="1.9382in" svg:viewBox="0 0 1500 568" draw:points="0,0 1500,0 1500,568 0,568">
        <text:p/>
      </draw:polygon>
      <draw:polygon text:anchor-type="page" text:anchor-page-number="2" draw:z-index="1540" draw:name="Shape432" draw:style-name="gr2" draw:text-style-name="P3" svg:width="1.2799in" svg:height="0.1283in" svg:x="0.4114in" svg:y="3.2697in" svg:viewBox="0 0 3252 327" draw:points="0,0 3252,0 3252,327 0,327">
        <text:p/>
      </draw:polygon>
      <draw:frame text:anchor-type="page" text:anchor-page-number="12" draw:z-index="1539" draw:name="Shape4064" draw:style-name="gr1" draw:text-style-name="P2" svg:width="0.0433in" svg:height="0.1925in" svg:x="0.3634in" svg:y="4.678in">
        <draw:text-box>
          <text:p><text:span text:style-name="T2"><text:s/></text:span></text:p>
        </draw:text-box>
      </draw:frame>
      <draw:frame text:anchor-type="page" text:anchor-page-number="4" draw:z-index="1538" draw:name="Shape1054" draw:style-name="gr1" draw:text-style-name="P2" svg:width="1.6295in" svg:height="0.1295in" svg:x="0.3634in" svg:y="3.8307in">
        <draw:text-box>
          <text:p><text:span text:style-name="T1">MEZZI DI ESTINZIONE IDONEI </text:span></text:p>
        </draw:text-box>
      </draw:frame>
      <draw:frame text:anchor-type="page" text:anchor-page-number="5" draw:z-index="1537" draw:name="Shape1197" draw:style-name="gr1" draw:text-style-name="P2" svg:width="7.4469in" svg:height="0.1295in" svg:x="0.3634in" svg:y="3.8937in">
        <draw:text-box>
          <text:p><text:span text:style-name="T1">Conservare solo nel contenitore originale. Conservare i recipienti chiusi, in luogo ben ventilato, al riparo dai raggi solari diretti. Conservare i contenitori </text:span></text:p>
        </draw:text-box>
      </draw:frame>
      <draw:frame text:anchor-type="page" text:anchor-page-number="7" draw:z-index="1536" draw:name="Shape2813" draw:style-name="gr1" draw:text-style-name="P2" svg:width="4.563in" svg:height="0.1295in" svg:x="0.3634in" svg:y="4.1654in">
        <draw:text-box>
          <text:p><text:span text:style-name="T1">scelta del dispositivo di protezione delle vie respiratorie, fare riferimento alla norma EN 529. </text:span></text:p>
        </draw:text-box>
      </draw:frame>
      <draw:frame text:anchor-type="page" text:anchor-page-number="11" draw:z-index="1535" draw:name="Shape3837" draw:style-name="gr1" draw:text-style-name="P2" svg:width="0.0433in" svg:height="0.1925in" svg:x="3.561in" svg:y="1.8035in">
        <draw:text-box>
          <text:p><text:span text:style-name="T2"><text:s/></text:span></text:p>
        </draw:text-box>
      </draw:frame>
      <draw:frame text:anchor-type="page" text:anchor-page-number="12" draw:z-index="1534" draw:name="Shape4063" draw:style-name="gr1" draw:text-style-name="P2" svg:width="0.7787in" svg:height="0.1295in" svg:x="0.3634in" svg:y="4.5484in">
        <draw:text-box>
          <text:p><text:span text:style-name="T1">non applicabile </text:span></text:p>
        </draw:text-box>
      </draw:frame>
      <draw:frame text:anchor-type="page" text:anchor-page-number="9" draw:z-index="1533" draw:name="Shape3345" draw:style-name="gr1" draw:text-style-name="P2" svg:width="0.7642in" svg:height="0.1295in" svg:x="0.3634in" svg:y="3.5902in">
        <draw:text-box>
          <text:p><text:span text:style-name="T1">Effetti interattivi</text:span></text:p>
        </draw:text-box>
      </draw:frame>
      <draw:frame text:anchor-type="page" text:anchor-page-number="13" draw:z-index="1532" draw:name="Shape4199" draw:style-name="gr1" draw:text-style-name="P2" svg:width="1.7307in" svg:height="0.1295in" svg:x="3.561in" svg:y="2.3138in">
        <draw:text-box>
          <text:p><text:span text:style-name="T1">BIOSSIDO DI TITANIO (in polvere </text:span></text:p>
        </draw:text-box>
      </draw:frame>
      <draw:frame text:anchor-type="page" text:anchor-page-number="16" draw:z-index="1531" draw:name="Shape5156" draw:style-name="gr1" draw:text-style-name="P2" svg:width="5.0106in" svg:height="0.1295in" svg:x="0.3634in" svg:y="3.9736in">
        <draw:text-box>
          <text:p><text:span text:style-name="T1">disposizioni vigenti in materia di igiene e sicurezza. Non si assumono responsabilità per usi impropri. </text:span></text:p>
        </draw:text-box>
      </draw:frame>
      <draw:frame text:anchor-type="page" text:anchor-page-number="15" draw:z-index="1530" draw:name="Shape4985" draw:style-name="gr1" draw:text-style-name="P2" svg:width="0.0433in" svg:height="0.1925in" svg:x="1.3063in" svg:y="1.8681in">
        <draw:text-box>
          <text:p><text:span text:style-name="T2"><text:s/></text:span></text:p>
        </draw:text-box>
      </draw:frame>
      <draw:frame text:anchor-type="page" text:anchor-page-number="7" draw:z-index="1529" draw:name="Shape2812" draw:style-name="gr1" draw:text-style-name="P2" svg:width="7.4988in" svg:height="0.1295in" svg:x="0.3634in" svg:y="4.039in">
        <draw:text-box>
          <text:p><text:span text:style-name="T1">autorespiratore ad aria compressa a circuito aperto (rif. norma EN 137) oppure un respiratore a presa d'aria esterna (rif. norma EN 138). Per la corretta </text:span></text:p>
        </draw:text-box>
      </draw:frame>
      <draw:frame text:anchor-type="page" text:anchor-page-number="14" draw:z-index="1528" draw:name="Shape4402" draw:style-name="gr1" draw:text-style-name="P2" svg:width="1.3504in" svg:height="0.1295in" svg:x="1.7882in" svg:y="2.6807in">
        <draw:text-box>
          <text:p><text:span text:style-name="T1">Tossicità acuta, categoria 2</text:span></text:p>
        </draw:text-box>
      </draw:frame>
      <draw:frame text:anchor-type="page" text:anchor-page-number="3" draw:z-index="1527" draw:name="Shape751" draw:style-name="gr1" draw:text-style-name="P2" svg:width="0.0433in" svg:height="0.1925in" svg:x="0.411in" svg:y="1.9465in">
        <draw:text-box>
          <text:p><text:span text:style-name="T2"><text:s/></text:span></text:p>
        </draw:text-box>
      </draw:frame>
      <draw:frame text:anchor-type="page" text:anchor-page-number="6" draw:z-index="1526" draw:name="Shape1850" draw:style-name="gr1" draw:text-style-name="P2" svg:width="0.3469in" svg:height="0.113in" svg:x="2.3799in" svg:y="1.9402in">
        <draw:text-box>
          <text:p><text:span text:style-name="T4">TWA/8h</text:span></text:p>
        </draw:text-box>
      </draw:frame>
      <draw:polygon text:anchor-type="page" text:anchor-page-number="2" draw:z-index="1525" draw:name="Shape431" draw:style-name="gr2" draw:text-style-name="P3" svg:width="1.3768in" svg:height="0.1283in" svg:x="0.363in" svg:y="3.2697in" svg:viewBox="0 0 3498 327" draw:points="0,0 3498,0 3498,327 0,327">
        <text:p/>
      </draw:polygon>
      <draw:polygon text:anchor-type="page" text:anchor-page-number="1" draw:z-index="1524" draw:name="Shape99" draw:style-name="gr2" draw:text-style-name="P3" svg:width="2.6583in" svg:height="0.1283in" svg:x="0.4114in" svg:y="3.2531in" svg:viewBox="0 0 6753 327" draw:points="0,0 6753,0 6753,327 0,327">
        <text:p/>
      </draw:polygon>
      <draw:frame text:anchor-type="page" text:anchor-page-number="8" draw:z-index="1523" draw:name="Shape3186" draw:style-name="gr1" draw:text-style-name="P2" svg:width="0.0433in" svg:height="0.1925in" svg:x="0.411in" svg:y="2.7764in">
        <draw:text-box>
          <text:p><text:span text:style-name="T2"><text:s/></text:span></text:p>
        </draw:text-box>
      </draw:frame>
      <draw:frame text:anchor-type="page" text:anchor-page-number="10" draw:z-index="1522" draw:name="Shape3575" draw:style-name="gr1" draw:text-style-name="P2" svg:width="0.0433in" svg:height="0.1925in" svg:x="3.748in" svg:y="3.2874in">
        <draw:text-box>
          <text:p><text:span text:style-name="T2"><text:s/></text:span></text:p>
        </draw:text-box>
      </draw:frame>
      <draw:frame text:anchor-type="page" text:anchor-page-number="5" draw:z-index="1521" draw:name="Shape1196" draw:style-name="gr1" draw:text-style-name="P2" svg:width="0.0433in" svg:height="0.1925in" svg:x="0.3634in" svg:y="3.7047in">
        <draw:text-box>
          <text:p><text:span text:style-name="T2"><text:s/></text:span></text:p>
        </draw:text-box>
      </draw:frame>
      <draw:frame text:anchor-type="page" text:anchor-page-number="4" draw:z-index="1520" draw:name="Shape1053" draw:style-name="gr1" draw:text-style-name="P2" svg:width="0.0433in" svg:height="0.1925in" svg:x="0.3634in" svg:y="3.6398in">
        <draw:text-box>
          <text:p><text:span text:style-name="T2"><text:s/></text:span></text:p>
        </draw:text-box>
      </draw:frame>
      <draw:frame text:anchor-type="page" text:anchor-page-number="7" draw:z-index="1519" draw:name="Shape2811" draw:style-name="gr1" draw:text-style-name="P2" svg:width="7.2713in" svg:height="0.1295in" svg:x="0.3634in" svg:y="3.9102in">
        <draw:text-box>
          <text:p><text:span text:style-name="T1">Nel caso in cui la sostanza considerata sia inodore o la sua soglia olfattiva sia superiore al relativo TLV-TWA e in caso di emergenza, indossare un </text:span></text:p>
        </draw:text-box>
      </draw:frame>
      <draw:polygon text:anchor-type="page" text:anchor-page-number="11" draw:z-index="1518" draw:name="Shape3848" draw:style-name="gr2" draw:text-style-name="P3" svg:width="2.265in" svg:height="0.1283in" svg:x="0.4114in" svg:y="2.1831in" svg:viewBox="0 0 5754 327" draw:points="0,0 5754,0 5754,327 0,327">
        <text:p/>
      </draw:polygon>
      <draw:frame text:anchor-type="page" text:anchor-page-number="14" draw:z-index="1517" draw:name="Shape4395" draw:style-name="gr1" draw:text-style-name="P2" svg:width="0.0433in" svg:height="0.1925in" svg:x="1.0311in" svg:y="2.6181in">
        <draw:text-box>
          <text:p><text:span text:style-name="T2"><text:s/></text:span></text:p>
        </draw:text-box>
      </draw:frame>
      <draw:frame text:anchor-type="page" text:anchor-page-number="16" draw:z-index="1516" draw:name="Shape5155" draw:style-name="gr1" draw:text-style-name="P2" svg:width="7.8067in" svg:height="0.1295in" svg:x="0.3634in" svg:y="3.8465in">
        <draw:text-box>
          <text:p><text:span text:style-name="T1">Poichè <text:s/>l'uso <text:s/>del <text:s/>prodotto <text:s/>non <text:s/>cade <text:s/>sotto <text:s/>il <text:s/>nostro <text:s/>diretto <text:s/>controllo, <text:s/>è <text:s/>obbligo <text:s/>dell'utilizzatore <text:s/>osservare <text:s/>sotto <text:s/>la <text:s/>propria <text:s/>responsabilità <text:s/>le <text:s/>leggi <text:s/>e <text:s/>le </text:span></text:p>
        </draw:text-box>
      </draw:frame>
      <draw:polygon text:anchor-type="page" text:anchor-page-number="15" draw:z-index="1515" draw:name="Shape4997" draw:style-name="gr2" draw:text-style-name="P3" svg:width="4.6264in" svg:height="0.128in" svg:x="1.9866in" svg:y="1.9283in" svg:viewBox="0 0 11752 326" draw:points="0,0 11752,0 11752,326 0,326">
        <text:p/>
      </draw:polygon>
      <draw:frame text:anchor-type="page" text:anchor-page-number="4" draw:z-index="1514" draw:name="Shape1052" draw:style-name="gr1" draw:text-style-name="P2" svg:width="1.2567in" svg:height="0.1295in" svg:x="0.3634in" svg:y="3.5083in">
        <draw:text-box>
          <text:p><text:span text:style-name="T3">5.1. Mezzi di estinzione </text:span></text:p>
        </draw:text-box>
      </draw:frame>
      <draw:frame text:anchor-type="page" text:anchor-page-number="6" draw:z-index="1513" draw:name="Shape1831" draw:style-name="gr1" draw:text-style-name="P2" svg:width="0.0433in" svg:height="0.1925in" svg:x="1.8181in" svg:y="1.8799in">
        <draw:text-box>
          <text:p><text:span text:style-name="T2"><text:s/></text:span></text:p>
        </draw:text-box>
      </draw:frame>
      <draw:polygon text:anchor-type="page" text:anchor-page-number="1" draw:z-index="1512" draw:name="Shape97" draw:style-name="gr2" draw:text-style-name="P3" svg:width="2.7551in" svg:height="0.1283in" svg:x="0.363in" svg:y="3.2531in" svg:viewBox="0 0 6999 327" draw:points="0,0 6999,0 6999,327 0,327">
        <text:p/>
      </draw:polygon>
      <draw:frame text:anchor-type="page" text:anchor-page-number="12" draw:z-index="1511" draw:name="Shape4062" draw:style-name="gr1" draw:text-style-name="P2" svg:width="0.0433in" svg:height="0.1925in" svg:x="0.3634in" svg:y="4.3598in">
        <draw:text-box>
          <text:p><text:span text:style-name="T2"><text:s/></text:span></text:p>
        </draw:text-box>
      </draw:frame>
      <draw:frame text:anchor-type="page" text:anchor-page-number="8" draw:z-index="1510" draw:name="Shape3185" draw:style-name="gr1" draw:text-style-name="P2" svg:width="0.0433in" svg:height="0.1925in" svg:x="0.3634in" svg:y="2.6346in">
        <draw:text-box>
          <text:p><text:span text:style-name="T2"><text:s/></text:span></text:p>
        </draw:text-box>
      </draw:frame>
      <draw:frame text:anchor-type="page" text:anchor-page-number="2" draw:z-index="1509" draw:name="Shape426" draw:style-name="gr1" draw:text-style-name="P2" svg:width="5.676in" svg:height="0.1295in" svg:x="0.3634in" svg:y="2.952in">
        <draw:text-box>
          <text:p><text:span text:style-name="T1">Etichettatura di pericolo ai sensi del Regolamento (CE) 1272/2008 (CLP) e successive modifiche ed adeguamenti. </text:span></text:p>
        </draw:text-box>
      </draw:frame>
      <draw:polygon text:anchor-type="page" text:anchor-page-number="13" draw:z-index="1508" draw:name="Shape4200" draw:style-name="gr2" draw:text-style-name="P3" svg:width="1.8717in" svg:height="0.1268in" svg:x="3.5614in" svg:y="2.4398in" svg:viewBox="0 0 4755 323" draw:points="0,0 4755,0 4755,323 0,323">
        <text:p/>
      </draw:polygon>
      <draw:frame text:anchor-type="page" text:anchor-page-number="3" draw:z-index="1507" draw:name="Shape750" draw:style-name="gr1" draw:text-style-name="P2" svg:width="0.0433in" svg:height="0.1925in" svg:x="7.3016in" svg:y="1.8035in">
        <draw:text-box>
          <text:p><text:span text:style-name="T2"><text:s/></text:span></text:p>
        </draw:text-box>
      </draw:frame>
      <draw:frame text:anchor-type="page" text:anchor-page-number="9" draw:z-index="1506" draw:name="Shape3343" draw:style-name="gr1" draw:text-style-name="P2" svg:width="0.0433in" svg:height="0.1925in" svg:x="0.3634in" svg:y="3.4016in">
        <draw:text-box>
          <text:p><text:span text:style-name="T2"><text:s/></text:span></text:p>
        </draw:text-box>
      </draw:frame>
      <draw:frame text:anchor-type="page" text:anchor-page-number="5" draw:z-index="1505" draw:name="Shape1195" draw:style-name="gr1" draw:text-style-name="P2" svg:width="4.0713in" svg:height="0.1295in" svg:x="0.3634in" svg:y="3.5736in">
        <draw:text-box>
          <text:p><text:span text:style-name="T3">7.2. Condizioni per lo stoccaggio sicuro, comprese eventuali incompatibilità </text:span></text:p>
        </draw:text-box>
      </draw:frame>
      <draw:frame text:anchor-type="page" text:anchor-page-number="10" draw:z-index="1504" draw:name="Shape3576" draw:style-name="gr1" draw:text-style-name="P2" svg:width="3.4071in" svg:height="0.1295in" svg:x="0.3634in" svg:y="3.3354in">
        <draw:text-box>
          <text:p><text:span text:style-name="T1">Non risponde ai criteri di classificazione per questa classe di pericolo</text:span></text:p>
        </draw:text-box>
      </draw:frame>
      <draw:frame text:anchor-type="page" text:anchor-page-number="12" draw:z-index="1503" draw:name="Shape4061" draw:style-name="gr1" draw:text-style-name="P2" svg:width="0.0433in" svg:height="0.1925in" svg:x="0.3634in" svg:y="4.1681in">
        <draw:text-box>
          <text:p><text:span text:style-name="T2"><text:s/></text:span></text:p>
        </draw:text-box>
      </draw:frame>
      <draw:frame text:anchor-type="page" text:anchor-page-number="10" draw:z-index="1502" draw:name="Shape3574" draw:style-name="gr1" draw:text-style-name="P2" svg:width="0.0433in" svg:height="0.1925in" svg:x="0.3634in" svg:y="3.1445in">
        <draw:text-box>
          <text:p><text:span text:style-name="T2"><text:s/></text:span></text:p>
        </draw:text-box>
      </draw:frame>
      <draw:frame text:anchor-type="page" text:anchor-page-number="2" draw:z-index="1501" draw:name="Shape425" draw:style-name="gr1" draw:text-style-name="P2" svg:width="0.0433in" svg:height="0.1925in" svg:x="0.3634in" svg:y="2.761in">
        <draw:text-box>
          <text:p><text:span text:style-name="T2"><text:s/></text:span></text:p>
        </draw:text-box>
      </draw:frame>
      <draw:polygon text:anchor-type="page" text:anchor-page-number="6" draw:z-index="1500" draw:name="Shape1849" draw:style-name="gr4" draw:text-style-name="P5" svg:width="1.0831in" svg:height="0.1114in" svg:x="2.3799in" svg:y="1.9382in" svg:viewBox="0 0 2752 284" draw:points="0,0 2752,0 2752,284 0,284">
        <text:p/>
      </draw:polygon>
      <draw:frame text:anchor-type="page" text:anchor-page-number="1" draw:z-index="1499" draw:name="Shape92" draw:style-name="gr1" draw:text-style-name="P2" svg:width="1.6043in" svg:height="0.1295in" svg:x="0.4535in" svg:y="3.1256in">
        <draw:text-box>
          <text:p><text:span text:style-name="T3">1.1. Identificatore del prodotto</text:span></text:p>
        </draw:text-box>
      </draw:frame>
      <draw:frame text:anchor-type="page" text:anchor-page-number="4" draw:z-index="1498" draw:name="Shape1051" draw:style-name="gr1" draw:text-style-name="P2" svg:width="0.0433in" svg:height="0.1925in" svg:x="0.3634in" svg:y="3.3217in">
        <draw:text-box>
          <text:p><text:span text:style-name="T2"><text:s/></text:span></text:p>
        </draw:text-box>
      </draw:frame>
      <draw:polygon text:anchor-type="page" text:anchor-page-number="3" draw:z-index="1497" draw:name="Shape753" draw:style-name="gr2" draw:text-style-name="P3" svg:width="1.8717in" svg:height="0.1283in" svg:x="0.4114in" svg:y="1.9913in" svg:viewBox="0 0 4755 327" draw:points="0,0 4755,0 4755,327 0,327">
        <text:p/>
      </draw:polygon>
      <draw:polygon text:anchor-type="page" text:anchor-page-number="15" draw:z-index="1496" draw:name="Shape4996" draw:style-name="gr2" draw:text-style-name="P3" svg:width="4.7232in" svg:height="0.1283in" svg:x="1.9382in" svg:y="1.928in" svg:viewBox="0 0 11998 327" draw:points="0,0 11998,0 11998,327 0,327">
        <text:p/>
      </draw:polygon>
      <draw:frame text:anchor-type="page" text:anchor-page-number="5" draw:z-index="1495" draw:name="Shape1194" draw:style-name="gr1" draw:text-style-name="P2" svg:width="0.0433in" svg:height="0.1925in" svg:x="0.3634in" svg:y="3.3846in">
        <draw:text-box>
          <text:p><text:span text:style-name="T2"><text:s/></text:span></text:p>
        </draw:text-box>
      </draw:frame>
      <draw:frame text:anchor-type="page" text:anchor-page-number="16" draw:z-index="1494" draw:name="Shape5154" draw:style-name="gr1" draw:text-style-name="P2" svg:width="4.8559in" svg:height="0.1295in" svg:x="0.3634in" svg:y="3.7189in">
        <draw:text-box>
          <text:p><text:span text:style-name="T1">Non si deve interpretare tale documento come garanzia di alcuna proprietà specifica del prodotto. </text:span></text:p>
        </draw:text-box>
      </draw:frame>
      <draw:frame text:anchor-type="page" text:anchor-page-number="7" draw:z-index="1493" draw:name="Shape2810" draw:style-name="gr1" draw:text-style-name="P2" svg:width="3.5504in" svg:height="0.1295in" svg:x="0.3634in" svg:y="3.7819in">
        <draw:text-box>
          <text:p><text:span text:style-name="T1">in relazione alla concentrazione limite di utilizzo. (rif. norma EN 14387). </text:span></text:p>
        </draw:text-box>
      </draw:frame>
      <draw:frame text:anchor-type="page" text:anchor-page-number="9" draw:z-index="1492" draw:name="Shape3342" draw:style-name="gr1" draw:text-style-name="P2" svg:width="1.3815in" svg:height="0.1295in" svg:x="0.3634in" svg:y="3.272in">
        <draw:text-box>
          <text:p><text:span text:style-name="T1">Informazioni non disponibili </text:span></text:p>
        </draw:text-box>
      </draw:frame>
      <draw:polygon text:anchor-type="page" text:anchor-page-number="14" draw:z-index="1491" draw:name="Shape4401" draw:style-name="gr2" draw:text-style-name="P3" svg:width="4.235in" svg:height="0.128in" svg:x="1.7882in" svg:y="2.6783in" svg:viewBox="0 0 10758 326" draw:points="0,0 10758,0 10758,326 0,326">
        <text:p/>
      </draw:polygon>
      <draw:polygon text:anchor-type="page" text:anchor-page-number="8" draw:z-index="1490" draw:name="Shape3189" draw:style-name="gr2" draw:text-style-name="P3" svg:width="7.3835in" svg:height="0.1264in" svg:x="0.4114in" svg:y="2.8232in" svg:viewBox="0 0 18755 322" draw:points="0,0 18755,0 18755,322 0,322">
        <text:p/>
      </draw:polygon>
      <draw:polygon text:anchor-type="page" text:anchor-page-number="11" draw:z-index="1489" draw:name="Shape3842" draw:style-name="gr2" draw:text-style-name="P3" svg:width="2.3618in" svg:height="0.1917in" svg:x="0.363in" svg:y="2.1831in" svg:viewBox="0 0 6000 488" draw:points="0,0 6000,0 6000,488 0,488">
        <text:p/>
      </draw:polygon>
      <draw:frame text:anchor-type="page" text:anchor-page-number="13" draw:z-index="1488" draw:name="Shape4190" draw:style-name="gr1" draw:text-style-name="P2" svg:width="0.0433in" svg:height="0.1925in" svg:x="2.5035in" svg:y="2.2661in">
        <draw:text-box>
          <text:p><text:span text:style-name="T2"><text:s/></text:span></text:p>
        </draw:text-box>
      </draw:frame>
      <draw:frame text:anchor-type="page" text:anchor-page-number="15" draw:z-index="1487" draw:name="Shape4995" draw:style-name="gr1" draw:text-style-name="P2" svg:width="0.1094in" svg:height="0.113in" svg:x="1.198in" svg:y="1.9291in">
        <draw:text-box>
          <text:p><text:span text:style-name="T5">19</text:span></text:p>
        </draw:text-box>
      </draw:frame>
      <draw:polygon text:anchor-type="page" text:anchor-page-number="13" draw:z-index="1486" draw:name="Shape4198" draw:style-name="gr2" draw:text-style-name="P3" svg:width="1.8717in" svg:height="0.1283in" svg:x="3.5614in" svg:y="2.3114in" svg:viewBox="0 0 4755 327" draw:points="0,0 4755,0 4755,327 0,327">
        <text:p/>
      </draw:polygon>
      <draw:frame text:anchor-type="page" text:anchor-page-number="2" draw:z-index="1485" draw:name="Shape424" draw:style-name="gr1" draw:text-style-name="P2" svg:width="0.0433in" svg:height="0.1925in" svg:x="0.3634in" svg:y="2.5693in">
        <draw:text-box>
          <text:p><text:span text:style-name="T2"><text:s/></text:span></text:p>
        </draw:text-box>
      </draw:frame>
      <draw:polygon text:anchor-type="page" text:anchor-page-number="14" draw:z-index="1484" draw:name="Shape4400" draw:style-name="gr2" draw:text-style-name="P3" svg:width="4.3319in" svg:height="0.1917in" svg:x="1.7398in" svg:y="2.678in" svg:viewBox="0 0 11004 488" draw:points="0,0 11004,0 11004,488 0,488">
        <text:p/>
      </draw:polygon>
      <draw:frame text:anchor-type="page" text:anchor-page-number="12" draw:z-index="1483" draw:name="Shape4060" draw:style-name="gr1" draw:text-style-name="P2" svg:width="2.437in" svg:height="0.1295in" svg:x="0.3634in" svg:y="4.0366in">
        <draw:text-box>
          <text:p><text:span text:style-name="T3">14.3. Classi di pericolo connesso al trasporto </text:span></text:p>
        </draw:text-box>
      </draw:frame>
      <draw:frame text:anchor-type="page" text:anchor-page-number="1" draw:z-index="1482" draw:name="Shape90" draw:style-name="gr1" draw:text-style-name="P2" svg:width="0.0433in" svg:height="0.1925in" svg:x="0.411in" svg:y="3.078in">
        <draw:text-box>
          <text:p><text:span text:style-name="T2"><text:s/></text:span></text:p>
        </draw:text-box>
      </draw:frame>
      <draw:frame text:anchor-type="page" text:anchor-page-number="4" draw:z-index="1481" draw:name="Shape1047" draw:style-name="gr1" draw:text-style-name="P2" svg:width="0.0433in" svg:height="0.1925in" svg:x="3.2717in" svg:y="3.1335in">
        <draw:text-box>
          <text:p><text:span text:style-name="T2"><text:s/></text:span></text:p>
        </draw:text-box>
      </draw:frame>
      <draw:polygon text:anchor-type="page" text:anchor-page-number="3" draw:z-index="1480" draw:name="Shape752" draw:style-name="gr2" draw:text-style-name="P3" svg:width="1.9685in" svg:height="0.1917in" svg:x="0.363in" svg:y="1.9913in" svg:viewBox="0 0 5001 488" draw:points="0,0 5001,0 5001,488 0,488">
        <text:p/>
      </draw:polygon>
      <draw:frame text:anchor-type="page" text:anchor-page-number="5" draw:z-index="1479" draw:name="Shape1193" draw:style-name="gr1" draw:text-style-name="P2" svg:width="0.4307in" svg:height="0.1295in" svg:x="0.3634in" svg:y="3.2555in">
        <draw:text-box>
          <text:p><text:span text:style-name="T1">mangia. </text:span></text:p>
        </draw:text-box>
      </draw:frame>
      <draw:polygon text:anchor-type="page" text:anchor-page-number="6" draw:z-index="1478" draw:name="Shape1848" draw:style-name="gr4" draw:text-style-name="P5" svg:width="1.1815in" svg:height="0.2232in" svg:x="2.3315in" svg:y="1.9382in" svg:viewBox="0 0 3002 568" draw:points="0,0 3002,0 3002,568 0,568">
        <text:p/>
      </draw:polygon>
      <draw:frame text:anchor-type="page" text:anchor-page-number="9" draw:z-index="1477" draw:name="Shape3341" draw:style-name="gr1" draw:text-style-name="P2" svg:width="0.0433in" svg:height="0.1925in" svg:x="0.3634in" svg:y="3.0811in">
        <draw:text-box>
          <text:p><text:span text:style-name="T2"><text:s/></text:span></text:p>
        </draw:text-box>
      </draw:frame>
      <draw:frame text:anchor-type="page" text:anchor-page-number="11" draw:z-index="1476" draw:name="Shape3836" draw:style-name="gr1" draw:text-style-name="P2" svg:width="0.0433in" svg:height="0.1925in" svg:x="2.7728in" svg:y="1.8035in">
        <draw:text-box>
          <text:p><text:span text:style-name="T2"><text:s/></text:span></text:p>
        </draw:text-box>
      </draw:frame>
      <draw:frame text:anchor-type="page" text:anchor-page-number="7" draw:z-index="1475" draw:name="Shape2809" draw:style-name="gr1" draw:text-style-name="P2" svg:width="7.5713in" svg:height="0.1295in" svg:x="0.3634in" svg:y="3.6555in">
        <draw:text-box>
          <text:p><text:span text:style-name="T1">lavoratore ai valori di soglia presi in considerazione. Si consiglia di indossare una maschera con filtro di tipo B la cui classe (1, 2 o 3) dovrà essere scelta </text:span></text:p>
        </draw:text-box>
      </draw:frame>
      <draw:polygon text:anchor-type="page" text:anchor-page-number="8" draw:z-index="1474" draw:name="Shape3188" draw:style-name="gr2" draw:text-style-name="P3" svg:width="7.4803in" svg:height="0.1264in" svg:x="0.363in" svg:y="2.8232in" svg:viewBox="0 0 19001 322" draw:points="0,0 19001,0 19001,322 0,322">
        <text:p/>
      </draw:polygon>
      <draw:frame text:anchor-type="page" text:anchor-page-number="10" draw:z-index="1473" draw:name="Shape3571" draw:style-name="gr1" draw:text-style-name="P2" svg:width="0.0433in" svg:height="0.1925in" svg:x="4.748in" svg:y="2.9681in">
        <draw:text-box>
          <text:p><text:span text:style-name="T2"><text:s/></text:span></text:p>
        </draw:text-box>
      </draw:frame>
      <draw:frame text:anchor-type="page" text:anchor-page-number="16" draw:z-index="1472" draw:name="Shape5153" draw:style-name="gr1" draw:text-style-name="P2" svg:width="5.048in" svg:height="0.1295in" svg:x="0.3634in" svg:y="3.5902in">
        <draw:text-box>
          <text:p><text:span text:style-name="T1">assicurarsi della idoneità e completezza delle informazioni in relazione allo specifico uso del prodotto. </text:span></text:p>
        </draw:text-box>
      </draw:frame>
      <draw:frame text:anchor-type="page" text:anchor-page-number="4" draw:z-index="1471" draw:name="Shape1050" draw:style-name="gr1" draw:text-style-name="P2" svg:width="2.8331in" svg:height="0.1776in" svg:x="0.4535in" svg:y="3.1425in">
        <draw:text-box>
          <text:p><text:span text:style-name="T6">SEZIONE 5. Misure di lotta antincendio</text:span></text:p>
        </draw:text-box>
      </draw:frame>
      <draw:polygon text:anchor-type="page" text:anchor-page-number="10" draw:z-index="1470" draw:name="Shape3573" draw:style-name="gr3" draw:text-style-name="P4" svg:width="4.385in" svg:height="0.0083in" svg:x="0.363in" svg:y="3.1283in" svg:viewBox="0 0 11139 22" draw:points="0,0 11139,0 11139,22 0,22">
        <text:p/>
      </draw:polygon>
      <draw:polygon text:anchor-type="page" text:anchor-page-number="13" draw:z-index="1469" draw:name="Shape4197" draw:style-name="gr2" draw:text-style-name="P3" svg:width="1.9685in" svg:height="0.5118in" svg:x="3.513in" svg:y="2.3114in" svg:viewBox="0 0 5001 1301" draw:points="0,0 5001,0 5001,1301 0,1301">
        <text:p/>
      </draw:polygon>
      <draw:frame text:anchor-type="page" text:anchor-page-number="8" draw:z-index="1468" draw:name="Shape3181" draw:style-name="gr1" draw:text-style-name="P2" svg:width="0.0433in" svg:height="0.1925in" svg:x="1.7929in" svg:y="2.4575in">
        <draw:text-box>
          <text:p><text:span text:style-name="T2"><text:s/></text:span></text:p>
        </draw:text-box>
      </draw:frame>
      <draw:frame text:anchor-type="page" text:anchor-page-number="14" draw:z-index="1467" draw:name="Shape4399" draw:style-name="gr1" draw:text-style-name="P2" svg:width="0.5685in" svg:height="0.113in" svg:x="0.4535in" svg:y="2.6791in">
        <draw:text-box>
          <text:p><text:span text:style-name="T5">Acute Tox. 2</text:span></text:p>
        </draw:text-box>
      </draw:frame>
      <draw:frame text:anchor-type="page" text:anchor-page-number="6" draw:z-index="1466" draw:name="Shape1847" draw:style-name="gr1" draw:text-style-name="P2" svg:width="0.2276in" svg:height="0.113in" svg:x="1.5917in" svg:y="1.9402in">
        <draw:text-box>
          <text:p><text:span text:style-name="T4">Stato</text:span></text:p>
        </draw:text-box>
      </draw:frame>
      <draw:frame text:anchor-type="page" text:anchor-page-number="1" draw:z-index="1465" draw:name="Shape89" draw:style-name="gr1" draw:text-style-name="P2" svg:width="0.0433in" svg:height="0.1925in" svg:x="4.1335in" svg:y="2.9374in">
        <draw:text-box>
          <text:p><text:span text:style-name="T2"><text:s/></text:span></text:p>
        </draw:text-box>
      </draw:frame>
      <draw:frame text:anchor-type="page" text:anchor-page-number="3" draw:z-index="1464" draw:name="Shape747" draw:style-name="gr1" draw:text-style-name="P2" svg:width="0.0433in" svg:height="0.1925in" svg:x="3.3634in" svg:y="1.8035in">
        <draw:text-box>
          <text:p><text:span text:style-name="T2"><text:s/></text:span></text:p>
        </draw:text-box>
      </draw:frame>
      <draw:frame text:anchor-type="page" text:anchor-page-number="9" draw:z-index="1463" draw:name="Shape3338" draw:style-name="gr1" draw:text-style-name="P2" svg:width="0.0433in" svg:height="0.1925in" svg:x="4.8717in" svg:y="2.9047in">
        <draw:text-box>
          <text:p><text:span text:style-name="T2"><text:s/></text:span></text:p>
        </draw:text-box>
      </draw:frame>
      <draw:frame text:anchor-type="page" text:anchor-page-number="16" draw:z-index="1462" draw:name="Shape5152" draw:style-name="gr1" draw:text-style-name="P2" svg:width="7.7831in" svg:height="0.1295in" svg:x="0.3634in" svg:y="3.4638in">
        <draw:text-box>
          <text:p><text:span text:style-name="T1">Le <text:s/>informazioni <text:s/>contenute <text:s/>in <text:s/>questa <text:s/>scheda <text:s/>si <text:s/>basano <text:s/>sulle <text:s/>conoscenze <text:s/>disponibili <text:s/>presso <text:s/>di <text:s/>noi <text:s/>alla <text:s/>data <text:s/>dell`ultima <text:s/>versione. <text:s/>L`utilizzatore <text:s/>deve </text:span></text:p>
        </draw:text-box>
      </draw:frame>
      <draw:frame text:anchor-type="page" text:anchor-page-number="15" draw:z-index="1461" draw:name="Shape4983" draw:style-name="gr1" draw:text-style-name="P2" svg:width="0.0433in" svg:height="0.1925in" svg:x="0.5882in" svg:y="1.8681in">
        <draw:text-box>
          <text:p><text:span text:style-name="T2"><text:s/></text:span></text:p>
        </draw:text-box>
      </draw:frame>
      <draw:polygon text:anchor-type="page" text:anchor-page-number="11" draw:z-index="1460" draw:name="Shape3847" draw:style-name="gr2" draw:text-style-name="P3" svg:width="3.8402in" svg:height="0.1913in" svg:x="3.5614in" svg:y="1.8in" svg:viewBox="0 0 9755 487" draw:points="0,0 9755,0 9755,487 0,487">
        <text:p/>
      </draw:polygon>
      <draw:frame text:anchor-type="page" text:anchor-page-number="7" draw:z-index="1459" draw:name="Shape2808" draw:style-name="gr1" draw:text-style-name="P2" svg:width="7.4949in" svg:height="0.1295in" svg:x="0.3634in" svg:y="3.5272in">
        <draw:text-box>
          <text:p><text:span text:style-name="T1">L`utilizzo di mezzi di protezione delle vie respiratorie è necessario in caso le misure tecniche adottate non siano sufficienti per limitare l`esposizione del </text:span></text:p>
        </draw:text-box>
      </draw:frame>
      <draw:frame text:anchor-type="page" text:anchor-page-number="12" draw:z-index="1458" draw:name="Shape4059" draw:style-name="gr1" draw:text-style-name="P2" svg:width="0.0433in" svg:height="0.1925in" svg:x="0.3634in" svg:y="3.848in">
        <draw:text-box>
          <text:p><text:span text:style-name="T2"><text:s/></text:span></text:p>
        </draw:text-box>
      </draw:frame>
      <draw:frame text:anchor-type="page" text:anchor-page-number="2" draw:z-index="1457" draw:name="Shape423" draw:style-name="gr1" draw:text-style-name="P2" svg:width="1.437in" svg:height="0.1295in" svg:x="0.3634in" svg:y="2.439in">
        <draw:text-box>
          <text:p><text:span text:style-name="T3">2.2. Elementi dell`etichetta </text:span></text:p>
        </draw:text-box>
      </draw:frame>
      <draw:frame text:anchor-type="page" text:anchor-page-number="5" draw:z-index="1456" draw:name="Shape1192" draw:style-name="gr1" draw:text-style-name="P2" svg:width="7.9512in" svg:height="0.1295in" svg:x="0.3634in" svg:y="3.1272in">
        <draw:text-box>
          <text:p><text:span text:style-name="T1">mangiare, <text:s/>nè <text:s/>bere, <text:s/>nè <text:s/>fumare <text:s/>durante <text:s/>l'impiego. <text:s/>Togliere <text:s/>gli <text:s/>indumenti <text:s/>contaminati <text:s/>e <text:s/>i <text:s/>dispositivi <text:s/>di <text:s/>protezione <text:s/>prima <text:s/>di <text:s/>accedere <text:s/>alle <text:s/>zone <text:s/>in <text:s/>cui <text:s/>si </text:span></text:p>
        </draw:text-box>
      </draw:frame>
      <draw:frame text:anchor-type="page" text:anchor-page-number="4" draw:z-index="1455" draw:name="Shape1046" draw:style-name="gr1" draw:text-style-name="P2" svg:width="0.0433in" svg:height="0.1925in" svg:x="0.411in" svg:y="3.1335in">
        <draw:text-box>
          <text:p><text:span text:style-name="T2"><text:s/></text:span></text:p>
        </draw:text-box>
      </draw:frame>
      <draw:polygon text:anchor-type="page" text:anchor-page-number="15" draw:z-index="1454" draw:name="Shape4994" draw:style-name="gr2" draw:text-style-name="P3" svg:width="0.6902in" svg:height="0.1118in" svg:x="1.198in" svg:y="1.928in" svg:viewBox="0 0 1754 285" draw:points="0,0 1754,0 1754,285 0,285">
        <text:p/>
      </draw:polygon>
      <draw:polygon text:anchor-type="page" text:anchor-page-number="3" draw:z-index="1453" draw:name="Shape749" draw:style-name="gr2" draw:text-style-name="P3" svg:width="0.2965in" svg:height="0.1913in" svg:x="7.3016in" svg:y="1.8in" svg:viewBox="0 0 754 487" draw:points="0,0 754,0 754,487 0,487">
        <text:p/>
      </draw:polygon>
      <draw:frame text:anchor-type="page" text:anchor-page-number="2" draw:z-index="1452" draw:name="Shape422" draw:style-name="gr1" draw:text-style-name="P2" svg:width="0.0433in" svg:height="0.1925in" svg:x="0.3634in" svg:y="2.2516in">
        <draw:text-box>
          <text:p><text:span text:style-name="T2"><text:s/></text:span></text:p>
        </draw:text-box>
      </draw:frame>
      <draw:frame text:anchor-type="page" text:anchor-page-number="14" draw:z-index="1451" draw:name="Shape4394" draw:style-name="gr1" draw:text-style-name="P2" svg:width="0.0433in" svg:height="0.1925in" svg:x="0.411in" svg:y="2.6181in">
        <draw:text-box>
          <text:p><text:span text:style-name="T2"><text:s/></text:span></text:p>
        </draw:text-box>
      </draw:frame>
      <draw:frame text:anchor-type="page" text:anchor-page-number="16" draw:z-index="1450" draw:name="Shape5151" draw:style-name="gr1" draw:text-style-name="P2" svg:width="1.1205in" svg:height="0.1295in" svg:x="0.3634in" svg:y="3.3354in">
        <draw:text-box>
          <text:p><text:span text:style-name="T1">Nota per l`utilizzatore: </text:span></text:p>
        </draw:text-box>
      </draw:frame>
      <draw:frame text:anchor-type="page" text:anchor-page-number="6" draw:z-index="1449" draw:name="Shape1830" draw:style-name="gr1" draw:text-style-name="P2" svg:width="0.0433in" svg:height="0.1925in" svg:x="0.6417in" svg:y="1.8799in">
        <draw:text-box>
          <text:p><text:span text:style-name="T2"><text:s/></text:span></text:p>
        </draw:text-box>
      </draw:frame>
      <draw:polygon text:anchor-type="page" text:anchor-page-number="1" draw:z-index="1448" draw:name="Shape98" draw:style-name="gr2" draw:text-style-name="P3" svg:width="7.3835in" svg:height="0.1268in" svg:x="0.4114in" svg:y="3.1264in" svg:viewBox="0 0 18755 323" draw:points="0,0 18755,0 18755,323 0,323">
        <text:p/>
      </draw:polygon>
      <draw:polygon text:anchor-type="page" text:anchor-page-number="11" draw:z-index="1447" draw:name="Shape3846" draw:style-name="gr2" draw:text-style-name="P3" svg:width="3.937in" svg:height="0.3831in" svg:x="3.513in" svg:y="1.8in" svg:viewBox="0 0 10001 974" draw:points="0,0 10001,0 10001,974 0,974">
        <text:p/>
      </draw:polygon>
      <draw:frame text:anchor-type="page" text:anchor-page-number="7" draw:z-index="1446" draw:name="Shape2807" draw:style-name="gr1" draw:text-style-name="P2" svg:width="1.6067in" svg:height="0.1295in" svg:x="0.3634in" svg:y="3.3984in">
        <draw:text-box>
          <text:p><text:span text:style-name="T1">PROTEZIONE RESPIRATORIA </text:span></text:p>
        </draw:text-box>
      </draw:frame>
      <draw:frame text:anchor-type="page" text:anchor-page-number="13" draw:z-index="1445" draw:name="Shape4196" draw:style-name="gr1" draw:text-style-name="P2" svg:width="0.126in" svg:height="0.1295in" svg:x="2.3799in" svg:y="2.3138in">
        <draw:text-box>
          <text:p><text:span text:style-name="T1">75</text:span></text:p>
        </draw:text-box>
      </draw:frame>
      <draw:polygon text:anchor-type="page" text:anchor-page-number="9" draw:z-index="1444" draw:name="Shape3340" draw:style-name="gr3" draw:text-style-name="P4" svg:width="4.5083in" svg:height="0.0083in" svg:x="0.363in" svg:y="3.065in" svg:viewBox="0 0 11452 22" draw:points="0,0 11452,0 11452,22 0,22">
        <text:p/>
      </draw:polygon>
      <draw:frame text:anchor-type="page" text:anchor-page-number="8" draw:z-index="1443" draw:name="Shape3184" draw:style-name="gr1" draw:text-style-name="P2" svg:width="1.3504in" svg:height="0.1295in" svg:x="0.4535in" svg:y="2.5055in">
        <draw:text-box>
          <text:p><text:span text:style-name="T1">Informazioni non disponibili</text:span></text:p>
        </draw:text-box>
      </draw:frame>
      <draw:frame text:anchor-type="page" text:anchor-page-number="5" draw:z-index="1442" draw:name="Shape1191" draw:style-name="gr1" draw:text-style-name="P2" svg:width="7.3752in" svg:height="0.1295in" svg:x="0.3634in" svg:y="3.0008in">
        <draw:text-box>
          <text:p><text:span text:style-name="T1">Manipolare il prodotto dopo aver consultato tutte le altre sezioni di questa scheda di sicurezza. Evitare la dispersione del prodotto nell'ambiente. Non </text:span></text:p>
        </draw:text-box>
      </draw:frame>
      <draw:frame text:anchor-type="page" text:anchor-page-number="10" draw:z-index="1441" draw:name="Shape3572" draw:style-name="gr1" draw:text-style-name="P2" svg:width="4.4024in" svg:height="0.1295in" svg:x="0.3634in" svg:y="3.0154in">
        <draw:text-box>
          <text:p><text:span text:style-name="T1">TOSSICITÀ SPECIFICA PER ORGANI BERSAGLIO (STOT) - ESPOSIZIONE SINGOLA</text:span></text:p>
        </draw:text-box>
      </draw:frame>
      <draw:frame text:anchor-type="page" text:anchor-page-number="12" draw:z-index="1440" draw:name="Shape4058" draw:style-name="gr1" draw:text-style-name="P2" svg:width="0.0433in" svg:height="0.1925in" svg:x="0.3634in" svg:y="3.6563in">
        <draw:text-box>
          <text:p><text:span text:style-name="T2"><text:s/></text:span></text:p>
        </draw:text-box>
      </draw:frame>
      <draw:polygon text:anchor-type="page" text:anchor-page-number="3" draw:z-index="1439" draw:name="Shape748" draw:style-name="gr2" draw:text-style-name="P3" svg:width="0.3933in" svg:height="0.1913in" svg:x="7.2531in" svg:y="1.8in" svg:viewBox="0 0 1000 487" draw:points="0,0 1000,0 1000,487 0,487">
        <text:p/>
      </draw:polygon>
      <draw:frame text:anchor-type="page" text:anchor-page-number="9" draw:z-index="1438" draw:name="Shape3339" draw:style-name="gr1" draw:text-style-name="P2" svg:width="4.5343in" svg:height="0.1295in" svg:x="0.3634in" svg:y="2.952in">
        <draw:text-box>
          <text:p><text:span text:style-name="T1">Effetti immediati, ritardati e ed effetti cronici derivanti da esposizioni a breve e lungo termine</text:span></text:p>
        </draw:text-box>
      </draw:frame>
      <draw:frame text:anchor-type="page" text:anchor-page-number="7" draw:z-index="1437" draw:name="Shape2806" draw:style-name="gr1" draw:text-style-name="P2" svg:width="0.0433in" svg:height="0.1925in" svg:x="0.3634in" svg:y="3.2098in">
        <draw:text-box>
          <text:p><text:span text:style-name="T2"><text:s/></text:span></text:p>
        </draw:text-box>
      </draw:frame>
      <draw:frame text:anchor-type="page" text:anchor-page-number="2" draw:z-index="1436" draw:name="Shape415" draw:style-name="gr1" draw:text-style-name="P2" svg:width="0.0433in" svg:height="0.1925in" svg:x="3.2398in" svg:y="2.0752in">
        <draw:text-box>
          <text:p><text:span text:style-name="T2"><text:s/></text:span></text:p>
        </draw:text-box>
      </draw:frame>
      <draw:frame text:anchor-type="page" text:anchor-page-number="8" draw:z-index="1435" draw:name="Shape3180" draw:style-name="gr1" draw:text-style-name="P2" svg:width="0.0433in" svg:height="0.1925in" svg:x="0.411in" svg:y="2.4575in">
        <draw:text-box>
          <text:p><text:span text:style-name="T2"><text:s/></text:span></text:p>
        </draw:text-box>
      </draw:frame>
      <draw:frame text:anchor-type="page" text:anchor-page-number="13" draw:z-index="1434" draw:name="Shape4189" draw:style-name="gr1" draw:text-style-name="P2" svg:width="0.0433in" svg:height="0.1925in" svg:x="0.7429in" svg:y="2.2661in">
        <draw:text-box>
          <text:p><text:span text:style-name="T2"><text:s/></text:span></text:p>
        </draw:text-box>
      </draw:frame>
      <draw:frame text:anchor-type="page" text:anchor-page-number="16" draw:z-index="1433" draw:name="Shape5150" draw:style-name="gr1" draw:text-style-name="P2" svg:width="0.0433in" svg:height="0.1925in" svg:x="0.3634in" svg:y="3.1445in">
        <draw:text-box>
          <text:p><text:span text:style-name="T2"><text:s/></text:span></text:p>
        </draw:text-box>
      </draw:frame>
      <draw:frame text:anchor-type="page" text:anchor-page-number="11" draw:z-index="1432" draw:name="Shape3838" draw:style-name="gr1" draw:text-style-name="P2" svg:width="0.0433in" svg:height="0.1925in" svg:x="1.8063in" svg:y="2.0098in">
        <draw:text-box>
          <text:p><text:span text:style-name="T2"><text:s/></text:span></text:p>
        </draw:text-box>
      </draw:frame>
      <draw:polygon text:anchor-type="page" text:anchor-page-number="6" draw:z-index="1431" draw:name="Shape1846" draw:style-name="gr4" draw:text-style-name="P5" svg:width="0.6917in" svg:height="0.1114in" svg:x="1.5913in" svg:y="1.9382in" svg:viewBox="0 0 1758 284" draw:points="0,0 1758,0 1758,284 0,284">
        <text:p/>
      </draw:polygon>
      <draw:polygon text:anchor-type="page" text:anchor-page-number="1" draw:z-index="1430" draw:name="Shape93" draw:style-name="gr2" draw:text-style-name="P3" svg:width="7.4803in" svg:height="0.1268in" svg:x="0.363in" svg:y="3.1264in" svg:viewBox="0 0 19001 323" draw:points="0,0 19001,0 19001,323 0,323">
        <text:p/>
      </draw:polygon>
      <draw:frame text:anchor-type="page" text:anchor-page-number="5" draw:z-index="1429" draw:name="Shape1190" draw:style-name="gr1" draw:text-style-name="P2" svg:width="0.0433in" svg:height="0.1925in" svg:x="0.3634in" svg:y="2.8098in">
        <draw:text-box>
          <text:p><text:span text:style-name="T2"><text:s/></text:span></text:p>
        </draw:text-box>
      </draw:frame>
      <draw:frame text:anchor-type="page" text:anchor-page-number="12" draw:z-index="1428" draw:name="Shape4057" draw:style-name="gr1" draw:text-style-name="P2" svg:width="0.7787in" svg:height="0.1295in" svg:x="0.3634in" svg:y="3.5272in">
        <draw:text-box>
          <text:p><text:span text:style-name="T1">non applicabile </text:span></text:p>
        </draw:text-box>
      </draw:frame>
      <draw:frame text:anchor-type="page" text:anchor-page-number="10" draw:z-index="1427" draw:name="Shape3570" draw:style-name="gr1" draw:text-style-name="P2" svg:width="0.0433in" svg:height="0.1925in" svg:x="0.3634in" svg:y="2.8264in">
        <draw:text-box>
          <text:p><text:span text:style-name="T2"><text:s/></text:span></text:p>
        </draw:text-box>
      </draw:frame>
      <draw:frame text:anchor-type="page" text:anchor-page-number="4" draw:z-index="1426" draw:name="Shape1045" draw:style-name="gr1" draw:text-style-name="P2" svg:width="0.0433in" svg:height="0.1925in" svg:x="0.3634in" svg:y="2.9535in">
        <draw:text-box>
          <text:p><text:span text:style-name="T2"><text:s/></text:span></text:p>
        </draw:text-box>
      </draw:frame>
      <draw:frame text:anchor-type="page" text:anchor-page-number="14" draw:z-index="1425" draw:name="Shape4393" draw:style-name="gr1" draw:text-style-name="P2" svg:width="0.0433in" svg:height="0.1925in" svg:x="0.3634in" svg:y="2.4898in">
        <draw:text-box>
          <text:p><text:span text:style-name="T2"><text:s/></text:span></text:p>
        </draw:text-box>
      </draw:frame>
      <draw:polygon text:anchor-type="page" text:anchor-page-number="15" draw:z-index="1424" draw:name="Shape4993" draw:style-name="gr2" draw:text-style-name="P3" svg:width="0.7886in" svg:height="0.1283in" svg:x="1.15in" svg:y="1.928in" svg:viewBox="0 0 2004 327" draw:points="0,0 2004,0 2004,327 0,327">
        <text:p/>
      </draw:polygon>
      <draw:frame text:anchor-type="page" text:anchor-page-number="5" draw:z-index="1423" draw:name="Shape1189" draw:style-name="gr1" draw:text-style-name="P2" svg:width="2.3752in" svg:height="0.1295in" svg:x="0.3634in" svg:y="2.6783in">
        <draw:text-box>
          <text:p><text:span text:style-name="T3">7.1. Precauzioni per la manipolazione sicura </text:span></text:p>
        </draw:text-box>
      </draw:frame>
      <draw:frame text:anchor-type="page" text:anchor-page-number="7" draw:z-index="1422" draw:name="Shape2805" draw:style-name="gr1" draw:text-style-name="P2" svg:width="3.8732in" svg:height="0.1295in" svg:x="0.3634in" svg:y="3.0807in">
        <draw:text-box>
          <text:p><text:span text:style-name="T1">Si consiglia di indossare occhiali protettivi ermetici (rif. norma EN ISO 16321). </text:span></text:p>
        </draw:text-box>
      </draw:frame>
      <draw:frame text:anchor-type="page" text:anchor-page-number="9" draw:z-index="1421" draw:name="Shape3337" draw:style-name="gr1" draw:text-style-name="P2" svg:width="0.0433in" svg:height="0.1925in" svg:x="0.3634in" svg:y="2.761in">
        <draw:text-box>
          <text:p><text:span text:style-name="T2"><text:s/></text:span></text:p>
        </draw:text-box>
      </draw:frame>
      <draw:polygon text:anchor-type="page" text:anchor-page-number="6" draw:z-index="1420" draw:name="Shape1845" draw:style-name="gr4" draw:text-style-name="P5" svg:width="0.7882in" svg:height="0.2232in" svg:x="1.5433in" svg:y="1.9382in" svg:viewBox="0 0 2003 568" draw:points="0,0 2003,0 2003,568 0,568">
        <text:p/>
      </draw:polygon>
      <draw:polygon text:anchor-type="page" text:anchor-page-number="11" draw:z-index="1419" draw:name="Shape3835" draw:style-name="gr2" draw:text-style-name="P3" svg:width="0.6898in" svg:height="0.1913in" svg:x="2.7732in" svg:y="1.8in" svg:viewBox="0 0 1753 487" draw:points="0,0 1753,0 1753,487 0,487">
        <text:p/>
      </draw:polygon>
      <draw:frame text:anchor-type="page" text:anchor-page-number="15" draw:z-index="1418" draw:name="Shape4992" draw:style-name="gr1" draw:text-style-name="P2" svg:width="0.1358in" svg:height="0.113in" svg:x="0.4535in" svg:y="1.9291in">
        <draw:text-box>
          <text:p><text:span text:style-name="T5">SU</text:span></text:p>
        </draw:text-box>
      </draw:frame>
      <draw:frame text:anchor-type="page" text:anchor-page-number="3" draw:z-index="1417" draw:name="Shape744" draw:style-name="gr1" draw:text-style-name="P2" svg:width="0.0433in" svg:height="0.1925in" svg:x="2.3799in" svg:y="1.8035in">
        <draw:text-box>
          <text:p><text:span text:style-name="T2"><text:s/></text:span></text:p>
        </draw:text-box>
      </draw:frame>
      <draw:polygon text:anchor-type="page" text:anchor-page-number="4" draw:z-index="1416" draw:name="Shape1049" draw:style-name="gr5" draw:text-style-name="P6" svg:width="7.3835in" svg:height="0.1768in" svg:x="0.4114in" svg:y="3.1413in" svg:viewBox="0 0 18755 450" draw:points="0,0 18755,0 18755,450 0,450">
        <text:p/>
      </draw:polygon>
      <draw:polygon text:anchor-type="page" text:anchor-page-number="13" draw:z-index="1415" draw:name="Shape4195" draw:style-name="gr2" draw:text-style-name="P3" svg:width="1.0831in" svg:height="0.1283in" svg:x="2.3799in" svg:y="2.3114in" svg:viewBox="0 0 2752 327" draw:points="0,0 2752,0 2752,327 0,327">
        <text:p/>
      </draw:polygon>
      <draw:frame text:anchor-type="page" text:anchor-page-number="12" draw:z-index="1414" draw:name="Shape4056" draw:style-name="gr1" draw:text-style-name="P2" svg:width="0.0433in" svg:height="0.1925in" svg:x="0.3634in" svg:y="3.3362in">
        <draw:text-box>
          <text:p><text:span text:style-name="T2"><text:s/></text:span></text:p>
        </draw:text-box>
      </draw:frame>
      <draw:frame text:anchor-type="page" text:anchor-page-number="16" draw:z-index="1413" draw:name="Shape5149" draw:style-name="gr1" draw:text-style-name="P2" svg:width="0.0433in" svg:height="0.1925in" svg:x="0.3634in" svg:y="2.9535in">
        <draw:text-box>
          <text:p><text:span text:style-name="T2"><text:s/></text:span></text:p>
        </draw:text-box>
      </draw:frame>
      <draw:frame text:anchor-type="page" text:anchor-page-number="2" draw:z-index="1412" draw:name="Shape421" draw:style-name="gr1" draw:text-style-name="P2" svg:width="0.076in" svg:height="0.1295in" svg:x="3.1665in" svg:y="2.122in">
        <draw:text-box>
          <text:p><text:span text:style-name="T1">--</text:span></text:p>
        </draw:text-box>
      </draw:frame>
      <draw:frame text:anchor-type="page" text:anchor-page-number="10" draw:z-index="1411" draw:name="Shape3568" draw:style-name="gr1" draw:text-style-name="P2" svg:width="0.0433in" svg:height="0.1925in" svg:x="3.748in" svg:y="2.6492in">
        <draw:text-box>
          <text:p><text:span text:style-name="T2"><text:s/></text:span></text:p>
        </draw:text-box>
      </draw:frame>
      <draw:frame text:anchor-type="page" text:anchor-page-number="8" draw:z-index="1410" draw:name="Shape3179" draw:style-name="gr1" draw:text-style-name="P2" svg:width="0.0433in" svg:height="0.1925in" svg:x="0.3634in" svg:y="2.3146in">
        <draw:text-box>
          <text:p><text:span text:style-name="T2"><text:s/></text:span></text:p>
        </draw:text-box>
      </draw:frame>
      <draw:polygon text:anchor-type="page" text:anchor-page-number="14" draw:z-index="1409" draw:name="Shape4398" draw:style-name="gr2" draw:text-style-name="P3" svg:width="1.2799in" svg:height="0.1118in" svg:x="0.4114in" svg:y="2.678in" svg:viewBox="0 0 3252 285" draw:points="0,0 3252,0 3252,285 0,285">
        <text:p/>
      </draw:polygon>
      <draw:frame text:anchor-type="page" text:anchor-page-number="1" draw:z-index="1408" draw:name="Shape85" draw:style-name="gr1" draw:text-style-name="P2" svg:width="0.0433in" svg:height="0.1925in" svg:x="5.8035in" svg:y="2.7492in">
        <draw:text-box>
          <text:p><text:span text:style-name="T2"><text:s/></text:span></text:p>
        </draw:text-box>
      </draw:frame>
      <draw:frame text:anchor-type="page" text:anchor-page-number="15" draw:z-index="1407" draw:name="Shape4982" draw:style-name="gr1" draw:text-style-name="P2" svg:width="0.0433in" svg:height="0.1925in" svg:x="0.411in" svg:y="1.8681in">
        <draw:text-box>
          <text:p><text:span text:style-name="T2"><text:s/></text:span></text:p>
        </draw:text-box>
      </draw:frame>
      <draw:polygon text:anchor-type="page" text:anchor-page-number="11" draw:z-index="1406" draw:name="Shape3845" draw:style-name="gr2" draw:text-style-name="P3" svg:width="0.7882in" svg:height="0.3831in" svg:x="2.7248in" svg:y="1.8in" svg:viewBox="0 0 2003 974" draw:points="0,0 2003,0 2003,974 0,974">
        <text:p/>
      </draw:polygon>
      <draw:frame text:anchor-type="page" text:anchor-page-number="16" draw:z-index="1405" draw:name="Shape5148" draw:style-name="gr1" draw:text-style-name="P2" svg:width="5.1843in" svg:height="0.1295in" svg:x="0.3634in" svg:y="2.8236in">
        <draw:text-box>
          <text:p><text:span text:style-name="T1">- Banca dati di modelli di SDS di sostanze chimiche - Ministero della Salute e Istituto Superiore di Sanità </text:span></text:p>
        </draw:text-box>
      </draw:frame>
      <draw:frame text:anchor-type="page" text:anchor-page-number="7" draw:z-index="1404" draw:name="Shape2804" draw:style-name="gr1" draw:text-style-name="P2" svg:width="1.5177in" svg:height="0.1295in" svg:x="0.3634in" svg:y="2.952in">
        <draw:text-box>
          <text:p><text:span text:style-name="T1">PROTEZIONE DEGLI OCCHI </text:span></text:p>
        </draw:text-box>
      </draw:frame>
      <draw:frame text:anchor-type="page" text:anchor-page-number="9" draw:z-index="1403" draw:name="Shape3335" draw:style-name="gr1" draw:text-style-name="P2" svg:width="0.0433in" svg:height="0.1925in" svg:x="6.378in" svg:y="2.5846in">
        <draw:text-box>
          <text:p><text:span text:style-name="T2"><text:s/></text:span></text:p>
        </draw:text-box>
      </draw:frame>
      <draw:polygon text:anchor-type="page" text:anchor-page-number="3" draw:z-index="1402" draw:name="Shape746" draw:style-name="gr2" draw:text-style-name="P3" svg:width="3.8417in" svg:height="0.1913in" svg:x="3.363in" svg:y="1.8in" svg:viewBox="0 0 9759 487" draw:points="0,0 9759,0 9759,487 0,487">
        <text:p/>
      </draw:polygon>
      <draw:frame text:anchor-type="page" text:anchor-page-number="12" draw:z-index="1401" draw:name="Shape4055" draw:style-name="gr1" draw:text-style-name="P2" svg:width="0.0433in" svg:height="0.1925in" svg:x="0.3634in" svg:y="3.1445in">
        <draw:text-box>
          <text:p><text:span text:style-name="T2"><text:s/></text:span></text:p>
        </draw:text-box>
      </draw:frame>
      <draw:frame text:anchor-type="page" text:anchor-page-number="5" draw:z-index="1400" draw:name="Shape1188" draw:style-name="gr1" draw:text-style-name="P2" svg:width="0.0433in" svg:height="0.1925in" svg:x="0.3634in" svg:y="2.4898in">
        <draw:text-box>
          <text:p><text:span text:style-name="T2"><text:s/></text:span></text:p>
        </draw:text-box>
      </draw:frame>
      <draw:frame text:anchor-type="page" text:anchor-page-number="2" draw:z-index="1399" draw:name="Shape414" draw:style-name="gr1" draw:text-style-name="P2" svg:width="0.0433in" svg:height="0.1925in" svg:x="2.4047in" svg:y="2.0752in">
        <draw:text-box>
          <text:p><text:span text:style-name="T2"><text:s/></text:span></text:p>
        </draw:text-box>
      </draw:frame>
      <draw:frame text:anchor-type="page" text:anchor-page-number="6" draw:z-index="1398" draw:name="Shape1844" draw:style-name="gr1" draw:text-style-name="P2" svg:width="0.1858in" svg:height="0.113in" svg:x="0.4535in" svg:y="1.9402in">
        <draw:text-box>
          <text:p><text:span text:style-name="T4">Tipo</text:span></text:p>
        </draw:text-box>
      </draw:frame>
      <draw:frame text:anchor-type="page" text:anchor-page-number="1" draw:z-index="1397" draw:name="Shape88" draw:style-name="gr1" draw:text-style-name="P2" svg:width="5.3752in" svg:height="0.1776in" svg:x="0.4535in" svg:y="2.7598in">
        <draw:text-box>
          <text:p><text:span text:style-name="T6">SEZIONE 1. Identificazione della sostanza/miscela e della società/impresa</text:span></text:p>
        </draw:text-box>
      </draw:frame>
      <draw:polygon text:anchor-type="page" text:anchor-page-number="13" draw:z-index="1396" draw:name="Shape4194" draw:style-name="gr2" draw:text-style-name="P3" svg:width="1.1815in" svg:height="0.5118in" svg:x="2.3315in" svg:y="2.3114in" svg:viewBox="0 0 3002 1301" draw:points="0,0 3002,0 3002,1301 0,1301">
        <text:p/>
      </draw:polygon>
      <draw:polygon text:anchor-type="page" text:anchor-page-number="4" draw:z-index="1395" draw:name="Shape1048" draw:style-name="gr5" draw:text-style-name="P6" svg:width="7.4803in" svg:height="0.1768in" svg:x="0.363in" svg:y="3.1413in" svg:viewBox="0 0 19001 450" draw:points="0,0 19001,0 19001,450 0,450">
        <text:p/>
      </draw:polygon>
      <draw:polygon text:anchor-type="page" text:anchor-page-number="8" draw:z-index="1394" draw:name="Shape3183" draw:style-name="gr2" draw:text-style-name="P3" svg:width="7.3835in" svg:height="0.1283in" svg:x="0.4114in" svg:y="2.5031in" svg:viewBox="0 0 18755 327" draw:points="0,0 18755,0 18755,327 0,327">
        <text:p/>
      </draw:polygon>
      <draw:frame text:anchor-type="page" text:anchor-page-number="10" draw:z-index="1393" draw:name="Shape3569" draw:style-name="gr1" draw:text-style-name="P2" svg:width="3.4071in" svg:height="0.1295in" svg:x="0.3634in" svg:y="2.6972in">
        <draw:text-box>
          <text:p><text:span text:style-name="T1">Non risponde ai criteri di classificazione per questa classe di pericolo</text:span></text:p>
        </draw:text-box>
      </draw:frame>
      <draw:polygon text:anchor-type="page" text:anchor-page-number="14" draw:z-index="1392" draw:name="Shape4397" draw:style-name="gr2" draw:text-style-name="P3" svg:width="1.3768in" svg:height="0.1917in" svg:x="0.363in" svg:y="2.678in" svg:viewBox="0 0 3498 488" draw:points="0,0 3498,0 3498,488 0,488">
        <text:p/>
      </draw:polygon>
      <draw:polygon text:anchor-type="page" text:anchor-page-number="8" draw:z-index="1391" draw:name="Shape3182" draw:style-name="gr2" draw:text-style-name="P3" svg:width="7.4803in" svg:height="0.1283in" svg:x="0.363in" svg:y="2.5031in" svg:viewBox="0 0 19001 327" draw:points="0,0 19001,0 19001,327 0,327">
        <text:p/>
      </draw:polygon>
      <draw:frame text:anchor-type="page" text:anchor-page-number="16" draw:z-index="1390" draw:name="Shape5147" draw:style-name="gr1" draw:text-style-name="P2" svg:width="1.3169in" svg:height="0.1295in" svg:x="0.3634in" svg:y="2.6965in">
        <draw:text-box>
          <text:p><text:span text:style-name="T1">- Sito Web Agenzia ECHA </text:span></text:p>
        </draw:text-box>
      </draw:frame>
      <draw:frame text:anchor-type="page" text:anchor-page-number="14" draw:z-index="1389" draw:name="Shape4392" draw:style-name="gr1" draw:text-style-name="P2" svg:width="3.6122in" svg:height="0.1295in" svg:x="0.3634in" svg:y="2.3602in">
        <draw:text-box>
          <text:p><text:span text:style-name="T1">Testo delle indicazioni di pericolo (H) citate alle sezioni 2-3 della scheda: </text:span></text:p>
        </draw:text-box>
      </draw:frame>
      <draw:frame text:anchor-type="page" text:anchor-page-number="12" draw:z-index="1388" draw:name="Shape4054" draw:style-name="gr1" draw:text-style-name="P2" svg:width="2.4185in" svg:height="0.1295in" svg:x="0.3634in" svg:y="3.0138in">
        <draw:text-box>
          <text:p><text:span text:style-name="T3">14.2. Designazione ufficiale ONU di trasporto </text:span></text:p>
        </draw:text-box>
      </draw:frame>
      <draw:frame text:anchor-type="page" text:anchor-page-number="1" draw:z-index="1387" draw:name="Shape84" draw:style-name="gr1" draw:text-style-name="P2" svg:width="0.0433in" svg:height="0.1925in" svg:x="0.411in" svg:y="2.7492in">
        <draw:text-box>
          <text:p><text:span text:style-name="T2"><text:s/></text:span></text:p>
        </draw:text-box>
      </draw:frame>
      <draw:polygon text:anchor-type="page" text:anchor-page-number="2" draw:z-index="1386" draw:name="Shape420" draw:style-name="gr2" draw:text-style-name="P3" svg:width="1.8717in" svg:height="0.1283in" svg:x="3.1665in" svg:y="2.1197in" svg:viewBox="0 0 4755 327" draw:points="0,0 4755,0 4755,327 0,327">
        <text:p/>
      </draw:polygon>
      <draw:polygon text:anchor-type="page" text:anchor-page-number="3" draw:z-index="1385" draw:name="Shape745" draw:style-name="gr2" draw:text-style-name="P3" svg:width="3.9382in" svg:height="0.1913in" svg:x="3.315in" svg:y="1.8in" svg:viewBox="0 0 10004 487" draw:points="0,0 10004,0 10004,487 0,487">
        <text:p/>
      </draw:polygon>
      <draw:frame text:anchor-type="page" text:anchor-page-number="4" draw:z-index="1384" draw:name="Shape1044" draw:style-name="gr1" draw:text-style-name="P2" svg:width="0.0433in" svg:height="0.1925in" svg:x="0.3634in" svg:y="2.761in">
        <draw:text-box>
          <text:p><text:span text:style-name="T2"><text:s/></text:span></text:p>
        </draw:text-box>
      </draw:frame>
      <draw:frame text:anchor-type="page" text:anchor-page-number="15" draw:z-index="1383" draw:name="Shape4980" draw:style-name="gr1" draw:text-style-name="P2" svg:width="0.0433in" svg:height="0.1925in" svg:x="3.5728in" svg:y="1.7547in">
        <draw:text-box>
          <text:p><text:span text:style-name="T2"><text:s/></text:span></text:p>
        </draw:text-box>
      </draw:frame>
      <draw:frame text:anchor-type="page" text:anchor-page-number="5" draw:z-index="1382" draw:name="Shape1184" draw:style-name="gr1" draw:text-style-name="P2" svg:width="0.0433in" svg:height="0.1925in" svg:x="3.9681in" svg:y="2.3035in">
        <draw:text-box>
          <text:p><text:span text:style-name="T2"><text:s/></text:span></text:p>
        </draw:text-box>
      </draw:frame>
      <draw:frame text:anchor-type="page" text:anchor-page-number="10" draw:z-index="1381" draw:name="Shape3567" draw:style-name="gr1" draw:text-style-name="P2" svg:width="0.0433in" svg:height="0.1925in" svg:x="0.3634in" svg:y="2.5063in">
        <draw:text-box>
          <text:p><text:span text:style-name="T2"><text:s/></text:span></text:p>
        </draw:text-box>
      </draw:frame>
      <draw:frame text:anchor-type="page" text:anchor-page-number="13" draw:z-index="1380" draw:name="Shape4193" draw:style-name="gr1" draw:text-style-name="P2" svg:width="0.2941in" svg:height="0.1295in" svg:x="0.4535in" svg:y="2.3138in">
        <draw:text-box>
          <text:p><text:span text:style-name="T1">Punto</text:span></text:p>
        </draw:text-box>
      </draw:frame>
      <draw:frame text:anchor-type="page" text:anchor-page-number="7" draw:z-index="1379" draw:name="Shape2803" draw:style-name="gr1" draw:text-style-name="P2" svg:width="0.0433in" svg:height="0.1925in" svg:x="0.3634in" svg:y="2.761in">
        <draw:text-box>
          <text:p><text:span text:style-name="T2"><text:s/></text:span></text:p>
        </draw:text-box>
      </draw:frame>
      <draw:frame text:anchor-type="page" text:anchor-page-number="9" draw:z-index="1378" draw:name="Shape3336" draw:style-name="gr1" draw:text-style-name="P2" svg:width="6.0543in" svg:height="0.1295in" svg:x="0.3634in" svg:y="2.6319in">
        <draw:text-box>
          <text:p><text:span text:style-name="T1">Attenzione! In caso di vaporizzazione possono formarsi goccioline respirabili pericolose. Non respirare i vapori o le nebbie.</text:span></text:p>
        </draw:text-box>
      </draw:frame>
      <draw:frame text:anchor-type="page" text:anchor-page-number="6" draw:z-index="1377" draw:name="Shape1829" draw:style-name="gr1" draw:text-style-name="P2" svg:width="0.0433in" svg:height="0.1925in" svg:x="0.411in" svg:y="1.8799in">
        <draw:text-box>
          <text:p><text:span text:style-name="T2"><text:s/></text:span></text:p>
        </draw:text-box>
      </draw:frame>
      <draw:frame text:anchor-type="page" text:anchor-page-number="11" draw:z-index="1376" draw:name="Shape3844" draw:style-name="gr1" draw:text-style-name="P2" svg:width="1.4059in" svg:height="0.1295in" svg:x="0.411in" svg:y="2.0571in">
        <draw:text-box>
          <text:p><text:span text:style-name="T1">2H-ISOTIAZOL-3-ONE (3:1)</text:span></text:p>
        </draw:text-box>
      </draw:frame>
      <draw:frame text:anchor-type="page" text:anchor-page-number="7" draw:z-index="1375" draw:name="Shape2802" draw:style-name="gr1" draw:text-style-name="P2" svg:width="3.9358in" svg:height="0.1295in" svg:x="0.3634in" svg:y="2.6319in">
        <draw:text-box>
          <text:p><text:span text:style-name="T1">20344). Lavarsi con acqua e sapone dopo aver rimosso gli indumenti protettivi. </text:span></text:p>
        </draw:text-box>
      </draw:frame>
      <draw:frame text:anchor-type="page" text:anchor-page-number="4" draw:z-index="1374" draw:name="Shape1043" draw:style-name="gr1" draw:text-style-name="P2" svg:width="2.463in" svg:height="0.1295in" svg:x="0.3634in" svg:y="2.6319in">
        <draw:text-box>
          <text:p><text:span text:style-name="T1">Acqua corrente per il lavaggio cutaneo e oculare. </text:span></text:p>
        </draw:text-box>
      </draw:frame>
      <draw:frame text:anchor-type="page" text:anchor-page-number="16" draw:z-index="1373" draw:name="Shape5146" draw:style-name="gr1" draw:text-style-name="P2" svg:width="1.1862in" svg:height="0.1295in" svg:x="0.3634in" svg:y="2.5689in">
        <draw:text-box>
          <text:p><text:span text:style-name="T1">- Sito Web IFA GESTIS </text:span></text:p>
        </draw:text-box>
      </draw:frame>
      <draw:frame text:anchor-type="page" text:anchor-page-number="8" draw:z-index="1372" draw:name="Shape3178" draw:style-name="gr1" draw:text-style-name="P2" svg:width="0.0433in" svg:height="0.1925in" svg:x="0.3634in" svg:y="2.1228in">
        <draw:text-box>
          <text:p><text:span text:style-name="T2"><text:s/></text:span></text:p>
        </draw:text-box>
      </draw:frame>
      <draw:polygon text:anchor-type="page" text:anchor-page-number="15" draw:z-index="1371" draw:name="Shape4988" draw:style-name="gr2" draw:text-style-name="P3" svg:width="0.6902in" svg:height="0.1118in" svg:x="0.4114in" svg:y="1.928in" svg:viewBox="0 0 1754 285" draw:points="0,0 1754,0 1754,285 0,285">
        <text:p/>
      </draw:polygon>
      <draw:frame text:anchor-type="page" text:anchor-page-number="13" draw:z-index="1370" draw:name="Shape4188" draw:style-name="gr1" draw:text-style-name="P2" svg:width="0.0433in" svg:height="0.1925in" svg:x="0.411in" svg:y="2.2661in">
        <draw:text-box>
          <text:p><text:span text:style-name="T2"><text:s/></text:span></text:p>
        </draw:text-box>
      </draw:frame>
      <draw:frame text:anchor-type="page" text:anchor-page-number="9" draw:z-index="1369" draw:name="Shape3334" draw:style-name="gr1" draw:text-style-name="P2" svg:width="0.0433in" svg:height="0.1925in" svg:x="0.3634in" svg:y="2.4429in">
        <draw:text-box>
          <text:p><text:span text:style-name="T2"><text:s/></text:span></text:p>
        </draw:text-box>
      </draw:frame>
      <draw:polygon text:anchor-type="page" text:anchor-page-number="2" draw:z-index="1368" draw:name="Shape419" draw:style-name="gr2" draw:text-style-name="P3" svg:width="1.9701in" svg:height="0.1283in" svg:x="3.1181in" svg:y="2.1197in" svg:viewBox="0 0 5005 327" draw:points="0,0 5005,0 5005,327 0,327">
        <text:p/>
      </draw:polygon>
      <draw:frame text:anchor-type="page" text:anchor-page-number="1" draw:z-index="1367" draw:name="Shape83" draw:style-name="gr1" draw:text-style-name="P2" svg:width="0.0433in" svg:height="0.1925in" svg:x="4.1335in" svg:y="2.5693in">
        <draw:text-box>
          <text:p><text:span text:style-name="T2"><text:s/></text:span></text:p>
        </draw:text-box>
      </draw:frame>
      <draw:frame text:anchor-type="page" text:anchor-page-number="10" draw:z-index="1366" draw:name="Shape3564" draw:style-name="gr1" draw:text-style-name="P2" svg:width="0.0433in" svg:height="0.1925in" svg:x="2.2583in" svg:y="2.3299in">
        <draw:text-box>
          <text:p><text:span text:style-name="T2"><text:s/></text:span></text:p>
        </draw:text-box>
      </draw:frame>
      <draw:frame text:anchor-type="page" text:anchor-page-number="5" draw:z-index="1365" draw:name="Shape1187" draw:style-name="gr1" draw:text-style-name="P2" svg:width="3.5323in" svg:height="0.1776in" svg:x="0.4535in" svg:y="2.3126in">
        <draw:text-box>
          <text:p><text:span text:style-name="T6">SEZIONE 7. Manipolazione e immagazzinamento</text:span></text:p>
        </draw:text-box>
      </draw:frame>
      <draw:frame text:anchor-type="page" text:anchor-page-number="11" draw:z-index="1364" draw:name="Shape3834" draw:style-name="gr1" draw:text-style-name="P2" svg:width="2.1134in" svg:height="0.1295in" svg:x="0.411in" svg:y="1.9307in">
        <draw:text-box>
          <text:p><text:span text:style-name="T1">METIL-2H-ISOTIAZOL-3-ONE E 2-METIL-</text:span></text:p>
        </draw:text-box>
      </draw:frame>
      <draw:frame text:anchor-type="page" text:anchor-page-number="12" draw:z-index="1363" draw:name="Shape4053" draw:style-name="gr1" draw:text-style-name="P2" svg:width="0.0433in" svg:height="0.1925in" svg:x="0.3634in" svg:y="2.8264in">
        <draw:text-box>
          <text:p><text:span text:style-name="T2"><text:s/></text:span></text:p>
        </draw:text-box>
      </draw:frame>
      <draw:frame text:anchor-type="page" text:anchor-page-number="6" draw:z-index="1362" draw:name="Shape1825" draw:style-name="gr1" draw:text-style-name="P2" svg:width="0.0433in" svg:height="0.1925in" svg:x="1.5953in" svg:y="1.7535in">
        <draw:text-box>
          <text:p><text:span text:style-name="T2"><text:s/></text:span></text:p>
        </draw:text-box>
      </draw:frame>
      <draw:frame text:anchor-type="page" text:anchor-page-number="14" draw:z-index="1361" draw:name="Shape4391" draw:style-name="gr1" draw:text-style-name="P2" svg:width="0.0433in" svg:height="0.1925in" svg:x="0.3634in" svg:y="2.1717in">
        <draw:text-box>
          <text:p><text:span text:style-name="T2"><text:s/></text:span></text:p>
        </draw:text-box>
      </draw:frame>
      <draw:frame text:anchor-type="page" text:anchor-page-number="3" draw:z-index="1360" draw:name="Shape737" draw:style-name="gr1" draw:text-style-name="P2" svg:width="0.0433in" svg:height="0.1925in" svg:x="1.2063in" svg:y="1.7547in">
        <draw:text-box>
          <text:p><text:span text:style-name="T2"><text:s/></text:span></text:p>
        </draw:text-box>
      </draw:frame>
      <draw:polygon text:anchor-type="page" text:anchor-page-number="10" draw:z-index="1359" draw:name="Shape3566" draw:style-name="gr3" draw:text-style-name="P4" svg:width="1.8953in" svg:height="0.0083in" svg:x="0.363in" svg:y="2.4898in" svg:viewBox="0 0 4815 22" draw:points="0,0 4815,0 4815,22 0,22">
        <text:p/>
      </draw:polygon>
      <draw:polygon text:anchor-type="page" text:anchor-page-number="11" draw:z-index="1358" draw:name="Shape3843" draw:style-name="gr2" draw:text-style-name="P3" svg:width="2.265in" svg:height="0.1268in" svg:x="0.4114in" svg:y="2.0563in" svg:viewBox="0 0 5754 323" draw:points="0,0 5754,0 5754,323 0,323">
        <text:p/>
      </draw:polygon>
      <draw:polygon text:anchor-type="page" text:anchor-page-number="1" draw:z-index="1357" draw:name="Shape87" draw:style-name="gr5" draw:text-style-name="P6" svg:width="7.3835in" svg:height="0.1764in" svg:x="0.4114in" svg:y="2.7583in" svg:viewBox="0 0 18755 449" draw:points="0,0 18755,0 18755,449 0,449">
        <text:p/>
      </draw:polygon>
      <draw:frame text:anchor-type="page" text:anchor-page-number="7" draw:z-index="1356" draw:name="Shape2801" draw:style-name="gr1" draw:text-style-name="P2" svg:width="7.4906in" svg:height="0.1295in" svg:x="0.3634in" svg:y="2.5055in">
        <draw:text-box>
          <text:p><text:span text:style-name="T1">Indossare abiti da lavoro con maniche lunghe e calzature di sicurezza per uso professionale di categoria I (rif. Regolamento 2016/425 e norma EN ISO </text:span></text:p>
        </draw:text-box>
      </draw:frame>
      <draw:polygon text:anchor-type="page" text:anchor-page-number="6" draw:z-index="1355" draw:name="Shape1836" draw:style-name="gr4" draw:text-style-name="P5" svg:width="1.0835in" svg:height="0.1114in" svg:x="0.4114in" svg:y="1.9382in" svg:viewBox="0 0 2753 284" draw:points="0,0 2753,0 2753,284 0,284">
        <text:p/>
      </draw:polygon>
      <draw:frame text:anchor-type="page" text:anchor-page-number="4" draw:z-index="1354" draw:name="Shape1042" draw:style-name="gr1" draw:text-style-name="P2" svg:width="0.0433in" svg:height="0.1925in" svg:x="0.3634in" svg:y="2.4429in">
        <draw:text-box>
          <text:p><text:span text:style-name="T2"><text:s/></text:span></text:p>
        </draw:text-box>
      </draw:frame>
      <draw:polygon text:anchor-type="page" text:anchor-page-number="15" draw:z-index="1353" draw:name="Shape4987" draw:style-name="gr2" draw:text-style-name="P3" svg:width="0.7866in" svg:height="0.1283in" svg:x="0.363in" svg:y="1.928in" svg:viewBox="0 0 1999 327" draw:points="0,0 1999,0 1999,327 0,327">
        <text:p/>
      </draw:polygon>
      <draw:polygon text:anchor-type="page" text:anchor-page-number="3" draw:z-index="1352" draw:name="Shape743" draw:style-name="gr2" draw:text-style-name="P3" svg:width="0.8866in" svg:height="0.1913in" svg:x="2.3799in" svg:y="1.8in" svg:viewBox="0 0 2253 487" draw:points="0,0 2253,0 2253,487 0,487">
        <text:p/>
      </draw:polygon>
      <draw:frame text:anchor-type="page" text:anchor-page-number="2" draw:z-index="1351" draw:name="Shape418" draw:style-name="gr1" draw:text-style-name="P2" svg:width="1.9657in" svg:height="0.1295in" svg:x="0.4535in" svg:y="2.122in">
        <draw:text-box>
          <text:p><text:span text:style-name="T1">Classificazione e indicazioni di pericolo:</text:span></text:p>
        </draw:text-box>
      </draw:frame>
      <draw:frame text:anchor-type="page" text:anchor-page-number="13" draw:z-index="1350" draw:name="Shape4187" draw:style-name="gr1" draw:text-style-name="P2" svg:width="0.0433in" svg:height="0.1925in" svg:x="0.3634in" svg:y="2.1228in">
        <draw:text-box>
          <text:p><text:span text:style-name="T2"><text:s/></text:span></text:p>
        </draw:text-box>
      </draw:frame>
      <draw:frame text:anchor-type="page" text:anchor-page-number="12" draw:z-index="1349" draw:name="Shape4052" draw:style-name="gr1" draw:text-style-name="P2" svg:width="0.0433in" svg:height="0.1925in" svg:x="0.3634in" svg:y="2.6346in">
        <draw:text-box>
          <text:p><text:span text:style-name="T2"><text:s/></text:span></text:p>
        </draw:text-box>
      </draw:frame>
      <draw:frame text:anchor-type="page" text:anchor-page-number="14" draw:z-index="1348" draw:name="Shape4387" draw:style-name="gr1" draw:text-style-name="P2" svg:width="0.0433in" svg:height="0.1925in" svg:x="2.7193in" svg:y="1.9835in">
        <draw:text-box>
          <text:p><text:span text:style-name="T2"><text:s/></text:span></text:p>
        </draw:text-box>
      </draw:frame>
      <draw:frame text:anchor-type="page" text:anchor-page-number="16" draw:z-index="1347" draw:name="Shape5145" draw:style-name="gr1" draw:text-style-name="P2" svg:width="3.5504in" svg:height="0.1295in" svg:x="0.3634in" svg:y="2.4402in">
        <draw:text-box>
          <text:p><text:span text:style-name="T1">- N.I. Sax - Dangerous properties of Industrial Materials-7, 1989 Edition </text:span></text:p>
        </draw:text-box>
      </draw:frame>
      <draw:frame text:anchor-type="page" text:anchor-page-number="5" draw:z-index="1346" draw:name="Shape1183" draw:style-name="gr1" draw:text-style-name="P2" svg:width="0.0433in" svg:height="0.1925in" svg:x="0.411in" svg:y="2.3035in">
        <draw:text-box>
          <text:p><text:span text:style-name="T2"><text:s/></text:span></text:p>
        </draw:text-box>
      </draw:frame>
      <draw:frame text:anchor-type="page" text:anchor-page-number="9" draw:z-index="1345" draw:name="Shape3331" draw:style-name="gr1" draw:text-style-name="P2" svg:width="0.0433in" svg:height="0.1925in" svg:x="2.5866in" svg:y="2.2661in">
        <draw:text-box>
          <text:p><text:span text:style-name="T2"><text:s/></text:span></text:p>
        </draw:text-box>
      </draw:frame>
      <draw:frame text:anchor-type="page" text:anchor-page-number="8" draw:z-index="1344" draw:name="Shape3174" draw:style-name="gr1" draw:text-style-name="P2" svg:width="0.0433in" svg:height="0.1925in" svg:x="3.0165in" svg:y="1.9465in">
        <draw:text-box>
          <text:p><text:span text:style-name="T2"><text:s/></text:span></text:p>
        </draw:text-box>
      </draw:frame>
      <draw:frame text:anchor-type="page" text:anchor-page-number="14" draw:z-index="1343" draw:name="Shape4390" draw:style-name="gr1" draw:text-style-name="P2" svg:width="2.2732in" svg:height="0.1776in" svg:x="0.4535in" svg:y="1.9925in">
        <draw:text-box>
          <text:p><text:span text:style-name="T6">SEZIONE 16. Altre informazioni</text:span></text:p>
        </draw:text-box>
      </draw:frame>
      <draw:frame text:anchor-type="page" text:anchor-page-number="12" draw:z-index="1342" draw:name="Shape4051" draw:style-name="gr1" draw:text-style-name="P2" svg:width="0.7787in" svg:height="0.1295in" svg:x="0.3634in" svg:y="2.5055in">
        <draw:text-box>
          <text:p><text:span text:style-name="T1">non applicabile </text:span></text:p>
        </draw:text-box>
      </draw:frame>
      <draw:polygon text:anchor-type="page" text:anchor-page-number="6" draw:z-index="1341" draw:name="Shape1835" draw:style-name="gr4" draw:text-style-name="P5" svg:width="1.1803in" svg:height="0.2232in" svg:x="0.363in" svg:y="1.9382in" svg:viewBox="0 0 2999 568" draw:points="0,0 2999,0 2999,568 0,568">
        <text:p/>
      </draw:polygon>
      <draw:frame text:anchor-type="page" text:anchor-page-number="5" draw:z-index="1340" draw:name="Shape1182" draw:style-name="gr1" draw:text-style-name="P2" svg:width="0.0433in" svg:height="0.1925in" svg:x="0.3634in" svg:y="2.1228in">
        <draw:text-box>
          <text:p><text:span text:style-name="T2"><text:s/></text:span></text:p>
        </draw:text-box>
      </draw:frame>
      <draw:frame text:anchor-type="page" text:anchor-page-number="8" draw:z-index="1339" draw:name="Shape3177" draw:style-name="gr1" draw:text-style-name="P2" svg:width="2.5803in" svg:height="0.1295in" svg:x="0.4535in" svg:y="1.9937in">
        <draw:text-box>
          <text:p><text:span text:style-name="T1">9.2.1. Informazioni relative alle classi di pericoli fisici</text:span></text:p>
        </draw:text-box>
      </draw:frame>
      <draw:frame text:anchor-type="page" text:anchor-page-number="11" draw:z-index="1338" draw:name="Shape3832" draw:style-name="gr1" draw:text-style-name="P2" svg:width="1.9713in" svg:height="0.1295in" svg:x="0.4535in" svg:y="1.802in">
        <draw:text-box>
          <text:p><text:span text:style-name="T1">MASSA DI REAZIONE DI 5-CLORO-2- </text:span></text:p>
        </draw:text-box>
      </draw:frame>
      <draw:frame text:anchor-type="page" text:anchor-page-number="16" draw:z-index="1337" draw:name="Shape5144" draw:style-name="gr1" draw:text-style-name="P2" svg:width="2.1189in" svg:height="0.1295in" svg:x="0.3634in" svg:y="2.3138in">
        <draw:text-box>
          <text:p><text:span text:style-name="T1">- Patty - Industrial Hygiene and Toxicology </text:span></text:p>
        </draw:text-box>
      </draw:frame>
      <draw:frame text:anchor-type="page" text:anchor-page-number="10" draw:z-index="1336" draw:name="Shape3565" draw:style-name="gr1" draw:text-style-name="P2" svg:width="1.9012in" svg:height="0.1295in" svg:x="0.3634in" svg:y="2.3772in">
        <draw:text-box>
          <text:p><text:span text:style-name="T1">TOSSICITÀ PER LA RIPRODUZIONE</text:span></text:p>
        </draw:text-box>
      </draw:frame>
      <draw:polygon text:anchor-type="page" text:anchor-page-number="1" draw:z-index="1335" draw:name="Shape86" draw:style-name="gr5" draw:text-style-name="P6" svg:width="7.4803in" svg:height="0.1764in" svg:x="0.363in" svg:y="2.7583in" svg:viewBox="0 0 19001 449" draw:points="0,0 19001,0 19001,449 0,449">
        <text:p/>
      </draw:polygon>
      <draw:frame text:anchor-type="page" text:anchor-page-number="15" draw:z-index="1334" draw:name="Shape4991" draw:style-name="gr1" draw:text-style-name="P2" svg:width="1.5988in" svg:height="0.1295in" svg:x="1.9866in" svg:y="1.802in">
        <draw:text-box>
          <text:p><text:span text:style-name="T1">dedicata, compresa la pesatura)</text:span></text:p>
        </draw:text-box>
      </draw:frame>
      <draw:polygon text:anchor-type="page" text:anchor-page-number="13" draw:z-index="1333" draw:name="Shape4192" draw:style-name="gr2" draw:text-style-name="P3" svg:width="1.8717in" svg:height="0.1283in" svg:x="0.4114in" svg:y="2.3114in" svg:viewBox="0 0 4755 327" draw:points="0,0 4755,0 4755,327 0,327">
        <text:p/>
      </draw:polygon>
      <draw:polygon text:anchor-type="page" text:anchor-page-number="3" draw:z-index="1332" draw:name="Shape742" draw:style-name="gr2" draw:text-style-name="P3" svg:width="0.9835in" svg:height="0.1913in" svg:x="2.3315in" svg:y="1.8in" svg:viewBox="0 0 2499 487" draw:points="0,0 2499,0 2499,487 0,487">
        <text:p/>
      </draw:polygon>
      <draw:frame text:anchor-type="page" text:anchor-page-number="4" draw:z-index="1331" draw:name="Shape1040" draw:style-name="gr1" draw:text-style-name="P2" svg:width="4.5012in" svg:height="0.1295in" svg:x="0.3634in" svg:y="2.3138in">
        <draw:text-box>
          <text:p><text:span text:style-name="T1">Mezzi da avere a disposizione sul luogo di lavoro per il trattamento specifico ed immediato </text:span></text:p>
        </draw:text-box>
      </draw:frame>
      <draw:frame text:anchor-type="page" text:anchor-page-number="2" draw:z-index="1330" draw:name="Shape413" draw:style-name="gr1" draw:text-style-name="P2" svg:width="0.0433in" svg:height="0.1925in" svg:x="0.411in" svg:y="2.0752in">
        <draw:text-box>
          <text:p><text:span text:style-name="T2"><text:s/></text:span></text:p>
        </draw:text-box>
      </draw:frame>
      <draw:frame text:anchor-type="page" text:anchor-page-number="7" draw:z-index="1329" draw:name="Shape2800" draw:style-name="gr1" draw:text-style-name="P2" svg:width="1.5177in" svg:height="0.1295in" svg:x="0.3634in" svg:y="2.3772in">
        <draw:text-box>
          <text:p><text:span text:style-name="T1">PROTEZIONE DELLA PELLE </text:span></text:p>
        </draw:text-box>
      </draw:frame>
      <draw:polygon text:anchor-type="page" text:anchor-page-number="9" draw:z-index="1328" draw:name="Shape3333" draw:style-name="gr3" draw:text-style-name="P4" svg:width="2.2236in" svg:height="0.0083in" svg:x="0.363in" svg:y="2.4264in" svg:viewBox="0 0 5649 22" draw:points="0,0 5649,0 5649,22 0,22">
        <text:p/>
      </draw:polygon>
      <draw:frame text:anchor-type="page" text:anchor-page-number="7" draw:z-index="1327" draw:name="Shape2799" draw:style-name="gr1" draw:text-style-name="P2" svg:width="0.0433in" svg:height="0.1925in" svg:x="0.3634in" svg:y="2.1862in">
        <draw:text-box>
          <text:p><text:span text:style-name="T2"><text:s/></text:span></text:p>
        </draw:text-box>
      </draw:frame>
      <draw:frame text:anchor-type="page" text:anchor-page-number="6" draw:z-index="1326" draw:name="Shape1828" draw:style-name="gr1" draw:text-style-name="P2" svg:width="1.1449in" svg:height="0.1295in" svg:x="0.4535in" svg:y="1.8008in">
        <draw:text-box>
          <text:p><text:span text:style-name="T3">Valore limite di soglia</text:span></text:p>
        </draw:text-box>
      </draw:frame>
      <draw:polygon text:anchor-type="page" text:anchor-page-number="13" draw:z-index="1325" draw:name="Shape4191" draw:style-name="gr2" draw:text-style-name="P3" svg:width="1.9685in" svg:height="0.5118in" svg:x="0.363in" svg:y="2.3114in" svg:viewBox="0 0 5001 1301" draw:points="0,0 5001,0 5001,1301 0,1301">
        <text:p/>
      </draw:polygon>
      <draw:frame text:anchor-type="page" text:anchor-page-number="1" draw:z-index="1324" draw:name="Shape82" draw:style-name="gr1" draw:text-style-name="P2" svg:width="0.0433in" svg:height="0.1925in" svg:x="4.1335in" svg:y="2.378in">
        <draw:text-box>
          <text:p><text:span text:style-name="T2"><text:s/></text:span></text:p>
        </draw:text-box>
      </draw:frame>
      <draw:frame text:anchor-type="page" text:anchor-page-number="14" draw:z-index="1323" draw:name="Shape4386" draw:style-name="gr1" draw:text-style-name="P2" svg:width="0.0433in" svg:height="0.1925in" svg:x="0.411in" svg:y="1.9835in">
        <draw:text-box>
          <text:p><text:span text:style-name="T2"><text:s/></text:span></text:p>
        </draw:text-box>
      </draw:frame>
      <draw:frame text:anchor-type="page" text:anchor-page-number="12" draw:z-index="1322" draw:name="Shape4050" draw:style-name="gr1" draw:text-style-name="P2" svg:width="0.0433in" svg:height="0.1925in" svg:x="0.3634in" svg:y="2.3146in">
        <draw:text-box>
          <text:p><text:span text:style-name="T2"><text:s/></text:span></text:p>
        </draw:text-box>
      </draw:frame>
      <draw:frame text:anchor-type="page" text:anchor-page-number="2" draw:z-index="1321" draw:name="Shape412" draw:style-name="gr1" draw:text-style-name="P2" svg:width="0.0433in" svg:height="0.1925in" svg:x="0.3634in" svg:y="1.9311in">
        <draw:text-box>
          <text:p><text:span text:style-name="T2"><text:s/></text:span></text:p>
        </draw:text-box>
      </draw:frame>
      <draw:polygon text:anchor-type="page" text:anchor-page-number="11" draw:z-index="1320" draw:name="Shape3833" draw:style-name="gr2" draw:text-style-name="P3" svg:width="2.265in" svg:height="0.1283in" svg:x="0.4114in" svg:y="1.928in" svg:viewBox="0 0 5754 327" draw:points="0,0 5754,0 5754,327 0,327">
        <text:p/>
      </draw:polygon>
      <draw:polygon text:anchor-type="page" text:anchor-page-number="5" draw:z-index="1319" draw:name="Shape1186" draw:style-name="gr5" draw:text-style-name="P6" svg:width="7.3835in" svg:height="0.1752in" svg:x="0.4114in" svg:y="2.3114in" svg:viewBox="0 0 18755 446" draw:points="0,0 18755,0 18755,446 0,446">
        <text:p/>
      </draw:polygon>
      <draw:polygon text:anchor-type="page" text:anchor-page-number="4" draw:z-index="1318" draw:name="Shape1041" draw:style-name="gr3" draw:text-style-name="P4" svg:width="4.4402in" svg:height="0.0083in" svg:x="0.363in" svg:y="2.4264in" svg:viewBox="0 0 11279 22" draw:points="0,0 11279,0 11279,22 0,22">
        <text:p/>
      </draw:polygon>
      <draw:frame text:anchor-type="page" text:anchor-page-number="10" draw:z-index="1317" draw:name="Shape3563" draw:style-name="gr1" draw:text-style-name="P2" svg:width="0.0433in" svg:height="0.1925in" svg:x="0.3634in" svg:y="2.1862in">
        <draw:text-box>
          <text:p><text:span text:style-name="T2"><text:s/></text:span></text:p>
        </draw:text-box>
      </draw:frame>
      <draw:frame text:anchor-type="page" text:anchor-page-number="8" draw:z-index="1316" draw:name="Shape3173" draw:style-name="gr1" draw:text-style-name="P2" svg:width="0.0433in" svg:height="0.1925in" svg:x="0.411in" svg:y="1.9465in">
        <draw:text-box>
          <text:p><text:span text:style-name="T2"><text:s/></text:span></text:p>
        </draw:text-box>
      </draw:frame>
      <draw:frame text:anchor-type="page" text:anchor-page-number="16" draw:z-index="1315" draw:name="Shape5143" draw:style-name="gr1" draw:text-style-name="P2" svg:width="2.4661in" svg:height="0.1295in" svg:x="0.3634in" svg:y="2.1854in">
        <draw:text-box>
          <text:p><text:span text:style-name="T1">- INRS - Fiche Toxicologique (toxicological sheet) </text:span></text:p>
        </draw:text-box>
      </draw:frame>
      <draw:frame text:anchor-type="page" text:anchor-page-number="3" draw:z-index="1314" draw:name="Shape740" draw:style-name="gr1" draw:text-style-name="P2" svg:width="0.7598in" svg:height="0.1295in" svg:x="0.4535in" svg:y="1.802in">
        <draw:text-box>
          <text:p><text:span text:style-name="T1">CE <text:s text:c="2"/>238-877-9</text:span></text:p>
        </draw:text-box>
      </draw:frame>
      <draw:frame text:anchor-type="page" text:anchor-page-number="15" draw:z-index="1313" draw:name="Shape5061" draw:style-name="gr1" draw:text-style-name="P2" svg:width="0.0433in" svg:height="0.1925in" svg:x="0.3634in" svg:y="11.0098in">
        <draw:text-box>
          <text:p><text:span text:style-name="T2"><text:s/></text:span></text:p>
        </draw:text-box>
      </draw:frame>
      <draw:frame text:anchor-type="page" text:anchor-page-number="9" draw:z-index="1312" draw:name="Shape3332" draw:style-name="gr1" draw:text-style-name="P2" svg:width="2.2394in" svg:height="0.1295in" svg:x="0.3634in" svg:y="2.3138in">
        <draw:text-box>
          <text:p><text:span text:style-name="T1">Informazioni sulle vie probabili di esposizione</text:span></text:p>
        </draw:text-box>
      </draw:frame>
      <draw:frame text:anchor-type="page" text:anchor-page-number="1" draw:z-index="1311" draw:name="Shape80" draw:style-name="gr1" draw:text-style-name="P2" svg:width="0.0433in" svg:height="0.1925in" svg:x="5.761in" svg:y="2.2016in">
        <draw:text-box>
          <text:p><text:span text:style-name="T2"><text:s/></text:span></text:p>
        </draw:text-box>
      </draw:frame>
      <draw:frame text:anchor-type="page" text:anchor-page-number="16" draw:z-index="1310" draw:name="Shape5142" draw:style-name="gr1" draw:text-style-name="P2" svg:width="1.3878in" svg:height="0.1295in" svg:x="0.3634in" svg:y="2.0571in">
        <draw:text-box>
          <text:p><text:span text:style-name="T1">- Handling Chemical Safety </text:span></text:p>
        </draw:text-box>
      </draw:frame>
      <draw:frame text:anchor-type="page" text:anchor-page-number="7" draw:z-index="1309" draw:name="Shape2798" draw:style-name="gr1" draw:text-style-name="P2" svg:width="4.6567in" svg:height="0.1295in" svg:x="0.3634in" svg:y="2.0571in">
        <draw:text-box>
          <text:p><text:span text:style-name="T1">La resistenza dei guanti dipende da vari fattori, come la temperatura ed altri fattori ambientali. </text:span></text:p>
        </draw:text-box>
      </draw:frame>
      <draw:frame text:anchor-type="page" text:anchor-page-number="8" draw:z-index="1308" draw:name="Shape3172" draw:style-name="gr1" draw:text-style-name="P2" svg:width="0.0433in" svg:height="0.1925in" svg:x="0.3634in" svg:y="1.8035in">
        <draw:text-box>
          <text:p><text:span text:style-name="T2"><text:s/></text:span></text:p>
        </draw:text-box>
      </draw:frame>
      <draw:frame text:anchor-type="page" text:anchor-page-number="4" draw:z-index="1307" draw:name="Shape1039" draw:style-name="gr1" draw:text-style-name="P2" svg:width="0.0433in" svg:height="0.1925in" svg:x="0.3634in" svg:y="2.1228in">
        <draw:text-box>
          <text:p><text:span text:style-name="T2"><text:s/></text:span></text:p>
        </draw:text-box>
      </draw:frame>
      <draw:frame text:anchor-type="page" text:anchor-page-number="9" draw:z-index="1306" draw:name="Shape3330" draw:style-name="gr1" draw:text-style-name="P2" svg:width="0.0433in" svg:height="0.1925in" svg:x="0.3634in" svg:y="2.1228in">
        <draw:text-box>
          <text:p><text:span text:style-name="T2"><text:s/></text:span></text:p>
        </draw:text-box>
      </draw:frame>
      <draw:frame text:anchor-type="page" text:anchor-page-number="6" draw:z-index="1305" draw:name="Shape1824" draw:style-name="gr1" draw:text-style-name="P2" svg:width="0.0433in" svg:height="0.1925in" svg:x="0.411in" svg:y="1.7535in">
        <draw:text-box>
          <text:p><text:span text:style-name="T2"><text:s/></text:span></text:p>
        </draw:text-box>
      </draw:frame>
      <draw:frame text:anchor-type="page" text:anchor-page-number="3" draw:z-index="1304" draw:name="Shape736" draw:style-name="gr1" draw:text-style-name="P2" svg:width="0.0433in" svg:height="0.1925in" svg:x="0.411in" svg:y="1.7547in">
        <draw:text-box>
          <text:p><text:span text:style-name="T2"><text:s/></text:span></text:p>
        </draw:text-box>
      </draw:frame>
      <draw:frame text:anchor-type="page" text:anchor-page-number="10" draw:z-index="1303" draw:name="Shape3562" draw:style-name="gr1" draw:text-style-name="P2" svg:width="5.2969in" svg:height="0.1295in" svg:x="0.3634in" svg:y="2.0571in">
        <draw:text-box>
          <text:p><text:span text:style-name="T1">non contenente amianto o fibre asbestiformi non è classificabile in quanto tale cancerogenicità (Gruppo 3). </text:span></text:p>
        </draw:text-box>
      </draw:frame>
      <draw:frame text:anchor-type="page" text:anchor-page-number="11" draw:z-index="1302" draw:name="Shape3829" draw:style-name="gr1" draw:text-style-name="P2" svg:width="0.0433in" svg:height="0.1925in" svg:x="0.411in" svg:y="1.7547in">
        <draw:text-box>
          <text:p><text:span text:style-name="T2"><text:s/></text:span></text:p>
        </draw:text-box>
      </draw:frame>
      <draw:polygon text:anchor-type="page" text:anchor-page-number="5" draw:z-index="1301" draw:name="Shape1185" draw:style-name="gr5" draw:text-style-name="P6" svg:width="7.4803in" svg:height="0.1752in" svg:x="0.363in" svg:y="2.3114in" svg:viewBox="0 0 19001 446" draw:points="0,0 19001,0 19001,446 0,446">
        <text:p/>
      </draw:polygon>
      <draw:frame text:anchor-type="page" text:anchor-page-number="12" draw:z-index="1300" draw:name="Shape4049" draw:style-name="gr1" draw:text-style-name="P2" svg:width="0.0433in" svg:height="0.1925in" svg:x="0.3634in" svg:y="2.1228in">
        <draw:text-box>
          <text:p><text:span text:style-name="T2"><text:s/></text:span></text:p>
        </draw:text-box>
      </draw:frame>
      <draw:polygon text:anchor-type="page" text:anchor-page-number="2" draw:z-index="1299" draw:name="Shape417" draw:style-name="gr2" draw:text-style-name="P3" svg:width="2.6583in" svg:height="0.1283in" svg:x="0.4114in" svg:y="2.1197in" svg:viewBox="0 0 6753 327" draw:points="0,0 6753,0 6753,327 0,327">
        <text:p/>
      </draw:polygon>
      <draw:polygon text:anchor-type="page" text:anchor-page-number="15" draw:z-index="1298" draw:name="Shape4990" draw:style-name="gr2" draw:text-style-name="P3" svg:width="4.6264in" svg:height="0.128in" svg:x="1.9866in" svg:y="1.8in" svg:viewBox="0 0 11752 326" draw:points="0,0 11752,0 11752,326 0,326">
        <text:p/>
      </draw:polygon>
      <draw:frame text:anchor-type="page" text:anchor-page-number="13" draw:z-index="1297" draw:name="Shape4185" draw:style-name="gr1" draw:text-style-name="P2" svg:width="1.0213in" svg:height="0.1295in" svg:x="0.3634in" svg:y="1.9937in">
        <draw:text-box>
          <text:p><text:span text:style-name="T1">Sostanze contenute </text:span></text:p>
        </draw:text-box>
      </draw:frame>
      <draw:frame text:anchor-type="page" text:anchor-page-number="14" draw:z-index="1296" draw:name="Shape4385" draw:style-name="gr1" draw:text-style-name="P2" svg:width="0.0433in" svg:height="0.1925in" svg:x="0.3634in" svg:y="1.8035in">
        <draw:text-box>
          <text:p><text:span text:style-name="T2"><text:s/></text:span></text:p>
        </draw:text-box>
      </draw:frame>
      <draw:frame text:anchor-type="page" text:anchor-page-number="16" draw:z-index="1295" draw:name="Shape5141" draw:style-name="gr1" draw:text-style-name="P2" svg:width="1.6524in" svg:height="0.1295in" svg:x="0.3634in" svg:y="1.9307in">
        <draw:text-box>
          <text:p><text:span text:style-name="T1">- The Merck Index. - 10th Edition </text:span></text:p>
        </draw:text-box>
      </draw:frame>
      <draw:polygon text:anchor-type="page" text:anchor-page-number="14" draw:z-index="1294" draw:name="Shape4389" draw:style-name="gr5" draw:text-style-name="P6" svg:width="7.3835in" svg:height="0.1768in" svg:x="0.4114in" svg:y="1.9913in" svg:viewBox="0 0 18755 450" draw:points="0,0 18755,0 18755,450 0,450">
        <text:p/>
      </draw:polygon>
      <draw:frame text:anchor-type="page" text:anchor-page-number="9" draw:z-index="1293" draw:name="Shape3329" draw:style-name="gr1" draw:text-style-name="P2" svg:width="1.3815in" svg:height="0.1295in" svg:x="0.3634in" svg:y="1.9937in">
        <draw:text-box>
          <text:p><text:span text:style-name="T1">Informazioni non disponibili </text:span></text:p>
        </draw:text-box>
      </draw:frame>
      <draw:frame text:anchor-type="page" text:anchor-page-number="4" draw:z-index="1292" draw:name="Shape1038" draw:style-name="gr1" draw:text-style-name="P2" svg:width="3.1398in" svg:height="0.1295in" svg:x="0.3634in" svg:y="1.9937in">
        <draw:text-box>
          <text:p><text:span text:style-name="T1">In caso di sintomi, sia acuti che ritardati, consultare un medico. </text:span></text:p>
        </draw:text-box>
      </draw:frame>
      <draw:frame text:anchor-type="page" text:anchor-page-number="10" draw:z-index="1291" draw:name="Shape3561" draw:style-name="gr1" draw:text-style-name="P2" svg:width="7.4941in" svg:height="0.1295in" svg:x="0.3634in" svg:y="1.9307in">
        <draw:text-box>
          <text:p><text:span text:style-name="T1">Valutazione generale IARC: L'uso perineale di polvere per il corpo a base di talco è probabilmente cancerogeno per l'uomo (Gruppo 2B). Il talco inalato </text:span></text:p>
        </draw:text-box>
      </draw:frame>
      <draw:polygon text:anchor-type="page" text:anchor-page-number="8" draw:z-index="1290" draw:name="Shape3176" draw:style-name="gr2" draw:text-style-name="P3" svg:width="7.3835in" svg:height="0.1283in" svg:x="0.4114in" svg:y="1.9913in" svg:viewBox="0 0 18755 327" draw:points="0,0 18755,0 18755,327 0,327">
        <text:p/>
      </draw:polygon>
      <draw:frame text:anchor-type="page" text:anchor-page-number="1" draw:z-index="1289" draw:name="Shape81" draw:style-name="gr1" draw:text-style-name="P2" svg:width="3.2795in" svg:height="0.1295in" svg:x="2.5047in" svg:y="2.2484in">
        <draw:text-box>
          <text:p><text:span text:style-name="T1">Conforme all'Allegato II del REACH - Regolamento (UE) 2020/878</text:span></text:p>
        </draw:text-box>
      </draw:frame>
      <draw:polygon text:anchor-type="page" text:anchor-page-number="15" draw:z-index="1288" draw:name="Shape4989" draw:style-name="gr2" draw:text-style-name="P3" svg:width="4.7232in" svg:height="0.128in" svg:x="1.9382in" svg:y="1.8in" svg:viewBox="0 0 11998 326" draw:points="0,0 11998,0 11998,326 0,326">
        <text:p/>
      </draw:polygon>
      <draw:frame text:anchor-type="page" text:anchor-page-number="11" draw:z-index="1287" draw:name="Shape3968" draw:style-name="gr1" draw:text-style-name="P2" svg:width="0.0433in" svg:height="0.1925in" svg:x="0.3634in" svg:y="11.0098in">
        <draw:text-box>
          <text:p><text:span text:style-name="T2"><text:s/></text:span></text:p>
        </draw:text-box>
      </draw:frame>
      <draw:frame text:anchor-type="page" text:anchor-page-number="3" draw:z-index="1286" draw:name="Shape958" draw:style-name="gr1" draw:text-style-name="P2" svg:width="0.0433in" svg:height="0.1925in" svg:x="0.3634in" svg:y="11.0098in">
        <draw:text-box>
          <text:p><text:span text:style-name="T2"><text:s/></text:span></text:p>
        </draw:text-box>
      </draw:frame>
      <draw:frame text:anchor-type="page" text:anchor-page-number="12" draw:z-index="1285" draw:name="Shape4048" draw:style-name="gr1" draw:text-style-name="P2" svg:width="1.6976in" svg:height="0.1295in" svg:x="0.3634in" svg:y="1.9925in">
        <draw:text-box>
          <text:p><text:span text:style-name="T3">14.1. Numero ONU o numero ID </text:span></text:p>
        </draw:text-box>
      </draw:frame>
      <draw:polygon text:anchor-type="page" text:anchor-page-number="13" draw:z-index="1284" draw:name="Shape4186" draw:style-name="gr3" draw:text-style-name="P4" svg:width="0.9819in" svg:height="0.0087in" svg:x="0.363in" svg:y="2.1063in" svg:viewBox="0 0 2495 23" draw:points="0,0 2495,0 2495,23 0,23">
        <text:p/>
      </draw:polygon>
      <draw:frame text:anchor-type="page" text:anchor-page-number="5" draw:z-index="1283" draw:name="Shape1181" draw:style-name="gr1" draw:text-style-name="P2" svg:width="0.0433in" svg:height="0.1925in" svg:x="0.3634in" svg:y="1.9311in">
        <draw:text-box>
          <text:p><text:span text:style-name="T2"><text:s/></text:span></text:p>
        </draw:text-box>
      </draw:frame>
      <draw:polygon text:anchor-type="page" text:anchor-page-number="2" draw:z-index="1282" draw:name="Shape416" draw:style-name="gr2" draw:text-style-name="P3" svg:width="2.7551in" svg:height="0.1283in" svg:x="0.363in" svg:y="2.1197in" svg:viewBox="0 0 6999 327" draw:points="0,0 6999,0 6999,327 0,327">
        <text:p/>
      </draw:polygon>
      <draw:frame text:anchor-type="page" text:anchor-page-number="7" draw:z-index="1281" draw:name="Shape2797" draw:style-name="gr1" draw:text-style-name="P2" svg:width="1.5614in" svg:height="0.1295in" svg:x="0.3634in" svg:y="1.9307in">
        <draw:text-box>
          <text:p><text:span text:style-name="T1">Tempo di permeazione: 30 min </text:span></text:p>
        </draw:text-box>
      </draw:frame>
      <draw:frame text:anchor-type="page" text:anchor-page-number="6" draw:z-index="1280" draw:name="Shape2717" draw:style-name="gr1" draw:text-style-name="P2" svg:width="0.0433in" svg:height="0.1925in" svg:x="0.3634in" svg:y="11.0098in">
        <draw:text-box>
          <text:p><text:span text:style-name="T2"><text:s/></text:span></text:p>
        </draw:text-box>
      </draw:frame>
      <draw:frame text:anchor-type="page" text:anchor-page-number="1" draw:z-index="1279" draw:name="Shape79" draw:style-name="gr1" draw:text-style-name="P2" svg:width="0.0433in" svg:height="0.1925in" svg:x="5.5728in" svg:y="2.048in">
        <draw:text-box>
          <text:p><text:span text:style-name="T2"><text:s/></text:span></text:p>
        </draw:text-box>
      </draw:frame>
      <draw:frame text:anchor-type="page" text:anchor-page-number="16" draw:z-index="1278" draw:name="Shape5140" draw:style-name="gr1" draw:text-style-name="P2" svg:width="2.8606in" svg:height="0.1295in" svg:x="0.3634in" svg:y="1.802in">
        <draw:text-box>
          <text:p><text:span text:style-name="T1">26. Regolamento delegato (UE) 2024/197 (XXI Atp. CLP) </text:span></text:p>
        </draw:text-box>
      </draw:frame>
      <draw:frame text:anchor-type="page" text:anchor-page-number="9" draw:z-index="1277" draw:name="Shape3328" draw:style-name="gr1" draw:text-style-name="P2" svg:width="0.0433in" svg:height="0.1925in" svg:x="0.3634in" svg:y="1.8035in">
        <draw:text-box>
          <text:p><text:span text:style-name="T2"><text:s/></text:span></text:p>
        </draw:text-box>
      </draw:frame>
      <draw:polygon text:anchor-type="page" text:anchor-page-number="8" draw:z-index="1276" draw:name="Shape3175" draw:style-name="gr2" draw:text-style-name="P3" svg:width="7.4803in" svg:height="0.1283in" svg:x="0.363in" svg:y="1.9913in" svg:viewBox="0 0 19001 327" draw:points="0,0 19001,0 19001,327 0,327">
        <text:p/>
      </draw:polygon>
      <draw:frame text:anchor-type="page" text:anchor-page-number="4" draw:z-index="1275" draw:name="Shape1037" draw:style-name="gr1" draw:text-style-name="P2" svg:width="0.0433in" svg:height="0.1925in" svg:x="0.3634in" svg:y="1.8035in">
        <draw:text-box>
          <text:p><text:span text:style-name="T2"><text:s/></text:span></text:p>
        </draw:text-box>
      </draw:frame>
      <draw:polygon text:anchor-type="page" text:anchor-page-number="15" draw:z-index="1274" draw:name="Shape4984" draw:style-name="gr2" draw:text-style-name="P3" svg:width="0.7886in" svg:height="0.128in" svg:x="1.15in" svg:y="1.8in" svg:viewBox="0 0 2004 326" draw:points="0,0 2004,0 2004,326 0,326">
        <text:p/>
      </draw:polygon>
      <draw:polygon text:anchor-type="page" text:anchor-page-number="3" draw:z-index="1273" draw:name="Shape739" draw:style-name="gr2" draw:text-style-name="P3" svg:width="1.8717in" svg:height="0.128in" svg:x="0.4114in" svg:y="1.8in" svg:viewBox="0 0 4755 326" draw:points="0,0 4755,0 4755,326 0,326">
        <text:p/>
      </draw:polygon>
      <draw:polygon text:anchor-type="page" text:anchor-page-number="6" draw:z-index="1272" draw:name="Shape1827" draw:style-name="gr4" draw:text-style-name="P5" svg:width="7.3835in" svg:height="0.128in" svg:x="0.4114in" svg:y="1.8in" svg:viewBox="0 0 18755 326" draw:points="0,0 18755,0 18755,326 0,326">
        <text:p/>
      </draw:polygon>
      <draw:frame text:anchor-type="page" text:anchor-page-number="10" draw:z-index="1271" draw:name="Shape3560" draw:style-name="gr1" draw:text-style-name="P2" svg:width="0.3976in" svg:height="0.1295in" svg:x="0.3634in" svg:y="1.802in">
        <draw:text-box>
          <text:p><text:span text:style-name="T1">TALCO </text:span></text:p>
        </draw:text-box>
      </draw:frame>
      <draw:polygon text:anchor-type="page" text:anchor-page-number="14" draw:z-index="1270" draw:name="Shape4388" draw:style-name="gr5" draw:text-style-name="P6" svg:width="7.4803in" svg:height="0.1768in" svg:x="0.363in" svg:y="1.9913in" svg:viewBox="0 0 19001 450" draw:points="0,0 19001,0 19001,450 0,450">
        <text:p/>
      </draw:polygon>
      <draw:frame text:anchor-type="page" text:anchor-page-number="5" draw:z-index="1269" draw:name="Shape1180" draw:style-name="gr1" draw:text-style-name="P2" svg:width="5.4335in" svg:height="0.1295in" svg:x="0.3634in" svg:y="1.802in">
        <draw:text-box>
          <text:p><text:span text:style-name="T1">Eventuali informazioni riguardanti la protezione individuale e lo smaltimento sono riportate alle sezioni 8 e 13. </text:span></text:p>
        </draw:text-box>
      </draw:frame>
      <draw:polygon text:anchor-type="page" text:anchor-page-number="11" draw:z-index="1268" draw:name="Shape3831" draw:style-name="gr2" draw:text-style-name="P3" svg:width="2.265in" svg:height="0.128in" svg:x="0.4114in" svg:y="1.8in" svg:viewBox="0 0 5754 326" draw:points="0,0 5754,0 5754,326 0,326">
        <text:p/>
      </draw:polygon>
      <draw:frame text:anchor-type="page" text:anchor-page-number="12" draw:z-index="1267" draw:name="Shape4047" draw:style-name="gr1" draw:text-style-name="P2" svg:width="0.0433in" svg:height="0.1925in" svg:x="0.3634in" svg:y="1.8035in">
        <draw:text-box>
          <text:p><text:span text:style-name="T2"><text:s/></text:span></text:p>
        </draw:text-box>
      </draw:frame>
      <draw:frame text:anchor-type="page" text:anchor-page-number="2" draw:z-index="1266" draw:name="Shape411" draw:style-name="gr1" draw:text-style-name="P2" svg:width="4.1531in" svg:height="0.1295in" svg:x="0.3634in" svg:y="1.802in">
        <draw:text-box>
          <text:p><text:span text:style-name="T1">sicurezza con informazioni adeguate, in conformità al Regolamento (UE) 2020/878. </text:span></text:p>
        </draw:text-box>
      </draw:frame>
      <draw:frame text:anchor-type="page" text:anchor-page-number="13" draw:z-index="1265" draw:name="Shape4184" draw:style-name="gr1" draw:text-style-name="P2" svg:width="0.0433in" svg:height="0.1925in" svg:x="0.3634in" svg:y="1.8035in">
        <draw:text-box>
          <text:p><text:span text:style-name="T2"><text:s/></text:span></text:p>
        </draw:text-box>
      </draw:frame>
      <draw:frame text:anchor-type="page" text:anchor-page-number="7" draw:z-index="1264" draw:name="Shape2796" draw:style-name="gr1" draw:text-style-name="P2" svg:width="4.9114in" svg:height="0.1295in" svg:x="0.3634in" svg:y="1.802in">
        <draw:text-box>
          <text:p><text:span text:style-name="T1">Lo spessore dei guanti deve essere selezionato in base al tempo di permeazione minimo richiesto. </text:span></text:p>
        </draw:text-box>
      </draw:frame>
      <draw:frame text:anchor-type="page" text:anchor-page-number="16" draw:z-index="1263" draw:name="Shape5166" draw:style-name="gr1" draw:text-style-name="P2" svg:width="0.0433in" svg:height="0.1925in" svg:x="0.3634in" svg:y="11.0098in">
        <draw:text-box>
          <text:p><text:span text:style-name="T2"><text:s/></text:span></text:p>
        </draw:text-box>
      </draw:frame>
      <draw:frame text:anchor-type="page" text:anchor-page-number="4" draw:z-index="1262" draw:name="Shape1101" draw:style-name="gr1" draw:text-style-name="P2" svg:width="0.0433in" svg:height="0.1925in" svg:x="0.3634in" svg:y="11.0098in">
        <draw:text-box>
          <text:p><text:span text:style-name="T2"><text:s/></text:span></text:p>
        </draw:text-box>
      </draw:frame>
      <draw:frame text:anchor-type="page" text:anchor-page-number="5" draw:z-index="1261" draw:name="Shape1745" draw:style-name="gr1" draw:text-style-name="P2" svg:width="0.0433in" svg:height="0.1925in" svg:x="0.3634in" svg:y="11.0098in">
        <draw:text-box>
          <text:p><text:span text:style-name="T2"><text:s/></text:span></text:p>
        </draw:text-box>
      </draw:frame>
      <draw:polygon text:anchor-type="page" text:anchor-page-number="6" draw:z-index="1260" draw:name="Shape1826" draw:style-name="gr4" draw:text-style-name="P5" svg:width="7.4803in" svg:height="0.128in" svg:x="0.363in" svg:y="1.8in" svg:viewBox="0 0 19001 326" draw:points="0,0 19001,0 19001,326 0,326">
        <text:p/>
      </draw:polygon>
      <draw:frame text:anchor-type="page" text:anchor-page-number="7" draw:z-index="1259" draw:name="Shape3093" draw:style-name="gr1" draw:text-style-name="P2" svg:width="0.0433in" svg:height="0.1925in" svg:x="0.3634in" svg:y="11.0098in">
        <draw:text-box>
          <text:p><text:span text:style-name="T2"><text:s/></text:span></text:p>
        </draw:text-box>
      </draw:frame>
      <draw:frame text:anchor-type="page" text:anchor-page-number="8" draw:z-index="1258" draw:name="Shape3249" draw:style-name="gr1" draw:text-style-name="P2" svg:width="0.0433in" svg:height="0.1925in" svg:x="0.3634in" svg:y="11.0098in">
        <draw:text-box>
          <text:p><text:span text:style-name="T2"><text:s/></text:span></text:p>
        </draw:text-box>
      </draw:frame>
      <draw:frame text:anchor-type="page" text:anchor-page-number="1" draw:z-index="1257" draw:name="Shape78" draw:style-name="gr1" draw:text-style-name="P2" svg:width="2.8697in" svg:height="0.2567in" svg:x="2.6953in" svg:y="1.9957in">
        <draw:text-box>
          <text:p><text:span text:style-name="T7">Scheda di Dati di Sicurezza</text:span></text:p>
        </draw:text-box>
      </draw:frame>
      <draw:polygon text:anchor-type="page" text:anchor-page-number="3" draw:z-index="1256" draw:name="Shape738" draw:style-name="gr2" draw:text-style-name="P3" svg:width="1.9685in" svg:height="0.1913in" svg:x="0.363in" svg:y="1.8in" svg:viewBox="0 0 5001 487" draw:points="0,0 5001,0 5001,487 0,487">
        <text:p/>
      </draw:polygon>
      <draw:frame text:anchor-type="page" text:anchor-page-number="2" draw:z-index="1255" draw:name="Shape657" draw:style-name="gr1" draw:text-style-name="P2" svg:width="0.0433in" svg:height="0.1925in" svg:x="0.3634in" svg:y="11.0098in">
        <draw:text-box>
          <text:p><text:span text:style-name="T2"><text:s/></text:span></text:p>
        </draw:text-box>
      </draw:frame>
      <draw:frame text:anchor-type="page" text:anchor-page-number="10" draw:z-index="1254" draw:name="Shape3750" draw:style-name="gr1" draw:text-style-name="P2" svg:width="0.0433in" svg:height="0.1925in" svg:x="0.3634in" svg:y="11.0098in">
        <draw:text-box>
          <text:p><text:span text:style-name="T2"><text:s/></text:span></text:p>
        </draw:text-box>
      </draw:frame>
      <draw:polygon text:anchor-type="page" text:anchor-page-number="11" draw:z-index="1253" draw:name="Shape3830" draw:style-name="gr2" draw:text-style-name="P3" svg:width="2.3618in" svg:height="0.3831in" svg:x="0.363in" svg:y="1.8in" svg:viewBox="0 0 6000 974" draw:points="0,0 6000,0 6000,974 0,974">
        <text:p/>
      </draw:polygon>
      <draw:frame text:anchor-type="page" text:anchor-page-number="12" draw:z-index="1252" draw:name="Shape4105" draw:style-name="gr1" draw:text-style-name="P2" svg:width="0.0433in" svg:height="0.1925in" svg:x="0.3634in" svg:y="11.0098in">
        <draw:text-box>
          <text:p><text:span text:style-name="T2"><text:s/></text:span></text:p>
        </draw:text-box>
      </draw:frame>
      <draw:frame text:anchor-type="page" text:anchor-page-number="13" draw:z-index="1251" draw:name="Shape4306" draw:style-name="gr1" draw:text-style-name="P2" svg:width="0.0433in" svg:height="0.1925in" svg:x="0.3634in" svg:y="11.0098in">
        <draw:text-box>
          <text:p><text:span text:style-name="T2"><text:s/></text:span></text:p>
        </draw:text-box>
      </draw:frame>
      <draw:frame text:anchor-type="page" text:anchor-page-number="14" draw:z-index="1250" draw:name="Shape4901" draw:style-name="gr1" draw:text-style-name="P2" svg:width="0.0433in" svg:height="0.1925in" svg:x="0.3634in" svg:y="11.0098in">
        <draw:text-box>
          <text:p><text:span text:style-name="T2"><text:s/></text:span></text:p>
        </draw:text-box>
      </draw:frame>
      <draw:polygon text:anchor-type="page" text:anchor-page-number="15" draw:z-index="1249" draw:name="Shape4981" draw:style-name="gr2" draw:text-style-name="P3" svg:width="0.7866in" svg:height="0.128in" svg:x="0.363in" svg:y="1.8in" svg:viewBox="0 0 1999 326" draw:points="0,0 1999,0 1999,326 0,326">
        <text:p/>
      </draw:polygon>
      <draw:frame text:anchor-type="page" text:anchor-page-number="9" draw:z-index="1248" draw:name="Shape3481" draw:style-name="gr1" draw:text-style-name="P2" svg:width="0.0433in" svg:height="0.1925in" svg:x="0.3634in" svg:y="11.0098in">
        <draw:text-box>
          <text:p><text:span text:style-name="T2"><text:s/></text:span></text:p>
        </draw:text-box>
      </draw:frame>
      <draw:line text:anchor-type="page" text:anchor-page-number="3" draw:z-index="1247" draw:name="Shape959" draw:style-name="gr6" draw:text-style-name="P2" svg:x1="0.3528in" svg:y1="11.2657in" svg:x2="7.9949in" svg:y2="11.2657in">
        <text:p/>
      </draw:line>
      <draw:line text:anchor-type="page" text:anchor-page-number="2" draw:z-index="1246" draw:name="Shape658" draw:style-name="gr6" draw:text-style-name="P2" svg:x1="0.3528in" svg:y1="11.2657in" svg:x2="7.9949in" svg:y2="11.2657in">
        <text:p/>
      </draw:line>
      <draw:line text:anchor-type="page" text:anchor-page-number="4" draw:z-index="1245" draw:name="Shape1102" draw:style-name="gr6" draw:text-style-name="P2" svg:x1="0.3528in" svg:y1="11.2657in" svg:x2="7.9949in" svg:y2="11.2657in">
        <text:p/>
      </draw:line>
      <draw:frame text:anchor-type="page" text:anchor-page-number="1" draw:z-index="1244" draw:name="Shape77" draw:style-name="gr1" draw:text-style-name="P2" svg:width="0.085in" svg:height="0.1925in" svg:x="0.3634in" svg:y="1.8035in">
        <draw:text-box>
          <text:p><text:span text:style-name="T2"><text:s text:c="2"/></text:span></text:p>
        </draw:text-box>
      </draw:frame>
      <draw:line text:anchor-type="page" text:anchor-page-number="15" draw:z-index="1243" draw:name="Shape5062" draw:style-name="gr6" draw:text-style-name="P2" svg:x1="0.3528in" svg:y1="11.2657in" svg:x2="7.9949in" svg:y2="11.2657in">
        <text:p/>
      </draw:line>
      <draw:line text:anchor-type="page" text:anchor-page-number="14" draw:z-index="1242" draw:name="Shape4902" draw:style-name="gr6" draw:text-style-name="P2" svg:x1="0.3528in" svg:y1="11.2657in" svg:x2="7.9949in" svg:y2="11.2657in">
        <text:p/>
      </draw:line>
      <draw:line text:anchor-type="page" text:anchor-page-number="13" draw:z-index="1241" draw:name="Shape4307" draw:style-name="gr6" draw:text-style-name="P2" svg:x1="0.3528in" svg:y1="11.2657in" svg:x2="7.9949in" svg:y2="11.2657in">
        <text:p/>
      </draw:line>
      <draw:line text:anchor-type="page" text:anchor-page-number="12" draw:z-index="1240" draw:name="Shape4106" draw:style-name="gr6" draw:text-style-name="P2" svg:x1="0.3528in" svg:y1="11.2657in" svg:x2="7.9949in" svg:y2="11.2657in">
        <text:p/>
      </draw:line>
      <draw:line text:anchor-type="page" text:anchor-page-number="11" draw:z-index="1239" draw:name="Shape3969" draw:style-name="gr6" draw:text-style-name="P2" svg:x1="0.3528in" svg:y1="11.2657in" svg:x2="7.9949in" svg:y2="11.2657in">
        <text:p/>
      </draw:line>
      <draw:line text:anchor-type="page" text:anchor-page-number="10" draw:z-index="1238" draw:name="Shape3751" draw:style-name="gr6" draw:text-style-name="P2" svg:x1="0.3528in" svg:y1="11.2657in" svg:x2="7.9949in" svg:y2="11.2657in">
        <text:p/>
      </draw:line>
      <draw:line text:anchor-type="page" text:anchor-page-number="9" draw:z-index="1237" draw:name="Shape3482" draw:style-name="gr6" draw:text-style-name="P2" svg:x1="0.3528in" svg:y1="11.2657in" svg:x2="7.9949in" svg:y2="11.2657in">
        <text:p/>
      </draw:line>
      <draw:line text:anchor-type="page" text:anchor-page-number="8" draw:z-index="1236" draw:name="Shape3250" draw:style-name="gr6" draw:text-style-name="P2" svg:x1="0.3528in" svg:y1="11.2657in" svg:x2="7.9949in" svg:y2="11.2657in">
        <text:p/>
      </draw:line>
      <draw:line text:anchor-type="page" text:anchor-page-number="7" draw:z-index="1235" draw:name="Shape3094" draw:style-name="gr6" draw:text-style-name="P2" svg:x1="0.3528in" svg:y1="11.2657in" svg:x2="7.9949in" svg:y2="11.2657in">
        <text:p/>
      </draw:line>
      <draw:line text:anchor-type="page" text:anchor-page-number="6" draw:z-index="1234" draw:name="Shape2718" draw:style-name="gr6" draw:text-style-name="P2" svg:x1="0.3528in" svg:y1="11.2657in" svg:x2="7.9949in" svg:y2="11.2657in">
        <text:p/>
      </draw:line>
      <draw:line text:anchor-type="page" text:anchor-page-number="5" draw:z-index="1233" draw:name="Shape1746" draw:style-name="gr6" draw:text-style-name="P2" svg:x1="0.3528in" svg:y1="11.2657in" svg:x2="7.9949in" svg:y2="11.2657in">
        <text:p/>
      </draw:line>
      <draw:line text:anchor-type="page" text:anchor-page-number="16" draw:z-index="1232" draw:name="Shape5167" draw:style-name="gr6" draw:text-style-name="P2" svg:x1="0.3528in" svg:y1="11.2657in" svg:x2="7.9949in" svg:y2="11.2657in">
        <text:p/>
      </draw:line>
      <draw:line text:anchor-type="page" text:anchor-page-number="11" draw:z-index="1231" draw:name="Shape3771" draw:style-name="gr6" draw:text-style-name="P2" svg:x1="7.9949in" svg:y1="0.6728in" svg:x2="7.9949in" svg:y2="11.2657in">
        <text:p/>
      </draw:line>
      <draw:line text:anchor-type="page" text:anchor-page-number="16" draw:z-index="1230" draw:name="Shape5082" draw:style-name="gr6" draw:text-style-name="P2" svg:x1="7.9949in" svg:y1="0.6728in" svg:x2="7.9949in" svg:y2="11.2657in">
        <text:p/>
      </draw:line>
      <draw:line text:anchor-type="page" text:anchor-page-number="3" draw:z-index="1229" draw:name="Shape678" draw:style-name="gr6" draw:text-style-name="P2" svg:x1="7.9949in" svg:y1="0.6728in" svg:x2="7.9949in" svg:y2="11.2657in">
        <text:p/>
      </draw:line>
      <draw:line text:anchor-type="page" text:anchor-page-number="10" draw:z-index="1228" draw:name="Shape3502" draw:style-name="gr6" draw:text-style-name="P2" svg:x1="7.9949in" svg:y1="0.6728in" svg:x2="7.9949in" svg:y2="11.2657in">
        <text:p/>
      </draw:line>
      <draw:line text:anchor-type="page" text:anchor-page-number="12" draw:z-index="1227" draw:name="Shape3989" draw:style-name="gr6" draw:text-style-name="P2" svg:x1="7.9949in" svg:y1="0.6728in" svg:x2="7.9949in" svg:y2="11.2657in">
        <text:p/>
      </draw:line>
      <draw:line text:anchor-type="page" text:anchor-page-number="5" draw:z-index="1226" draw:name="Shape1122" draw:style-name="gr6" draw:text-style-name="P2" svg:x1="7.9949in" svg:y1="0.6728in" svg:x2="7.9949in" svg:y2="11.2657in">
        <text:p/>
      </draw:line>
      <draw:line text:anchor-type="page" text:anchor-page-number="9" draw:z-index="1225" draw:name="Shape3270" draw:style-name="gr6" draw:text-style-name="P2" svg:x1="7.9949in" svg:y1="0.6728in" svg:x2="7.9949in" svg:y2="11.2657in">
        <text:p/>
      </draw:line>
      <draw:line text:anchor-type="page" text:anchor-page-number="8" draw:z-index="1224" draw:name="Shape3114" draw:style-name="gr6" draw:text-style-name="P2" svg:x1="7.9949in" svg:y1="0.6728in" svg:x2="7.9949in" svg:y2="11.2657in">
        <text:p/>
      </draw:line>
      <draw:frame text:anchor-type="page" text:anchor-page-number="1" draw:z-index="1223" draw:name="Shape76" draw:style-name="gr1" draw:text-style-name="P2" svg:width="0.0433in" svg:height="0.1925in" svg:x="0.3634in" svg:y="1.611in">
        <draw:text-box>
          <text:p><text:span text:style-name="T2"><text:s/></text:span></text:p>
        </draw:text-box>
      </draw:frame>
      <draw:line text:anchor-type="page" text:anchor-page-number="2" draw:z-index="1222" draw:name="Shape353" draw:style-name="gr6" draw:text-style-name="P2" svg:x1="7.9949in" svg:y1="0.6728in" svg:x2="7.9949in" svg:y2="11.2657in">
        <text:p/>
      </draw:line>
      <draw:line text:anchor-type="page" text:anchor-page-number="15" draw:z-index="1221" draw:name="Shape4922" draw:style-name="gr6" draw:text-style-name="P2" svg:x1="7.9949in" svg:y1="0.6728in" svg:x2="7.9949in" svg:y2="11.2657in">
        <text:p/>
      </draw:line>
      <draw:line text:anchor-type="page" text:anchor-page-number="13" draw:z-index="1220" draw:name="Shape4126" draw:style-name="gr6" draw:text-style-name="P2" svg:x1="7.9949in" svg:y1="0.6728in" svg:x2="7.9949in" svg:y2="11.2657in">
        <text:p/>
      </draw:line>
      <draw:line text:anchor-type="page" text:anchor-page-number="4" draw:z-index="1219" draw:name="Shape979" draw:style-name="gr6" draw:text-style-name="P2" svg:x1="7.9949in" svg:y1="0.6728in" svg:x2="7.9949in" svg:y2="11.2657in">
        <text:p/>
      </draw:line>
      <draw:line text:anchor-type="page" text:anchor-page-number="14" draw:z-index="1218" draw:name="Shape4327" draw:style-name="gr6" draw:text-style-name="P2" svg:x1="7.9949in" svg:y1="0.6728in" svg:x2="7.9949in" svg:y2="11.2657in">
        <text:p/>
      </draw:line>
      <draw:line text:anchor-type="page" text:anchor-page-number="7" draw:z-index="1217" draw:name="Shape2738" draw:style-name="gr6" draw:text-style-name="P2" svg:x1="7.9949in" svg:y1="0.6728in" svg:x2="7.9949in" svg:y2="11.2657in">
        <text:p/>
      </draw:line>
      <draw:line text:anchor-type="page" text:anchor-page-number="6" draw:z-index="1216" draw:name="Shape1766" draw:style-name="gr6" draw:text-style-name="P2" svg:x1="7.9949in" svg:y1="0.6728in" svg:x2="7.9949in" svg:y2="11.2657in">
        <text:p/>
      </draw:line>
      <draw:line text:anchor-type="page" text:anchor-page-number="9" draw:z-index="1215" draw:name="Shape3255" draw:style-name="gr6" draw:text-style-name="P2" svg:x1="0.3528in" svg:y1="0.6728in" svg:x2="0.3528in" svg:y2="11.2657in">
        <text:p/>
      </draw:line>
      <draw:line text:anchor-type="page" text:anchor-page-number="13" draw:z-index="1214" draw:name="Shape4111" draw:style-name="gr6" draw:text-style-name="P2" svg:x1="0.3528in" svg:y1="0.6728in" svg:x2="0.3528in" svg:y2="11.2657in">
        <text:p/>
      </draw:line>
      <draw:line text:anchor-type="page" text:anchor-page-number="10" draw:z-index="1213" draw:name="Shape3487" draw:style-name="gr6" draw:text-style-name="P2" svg:x1="0.3528in" svg:y1="0.6728in" svg:x2="0.3528in" svg:y2="11.2657in">
        <text:p/>
      </draw:line>
      <draw:line text:anchor-type="page" text:anchor-page-number="12" draw:z-index="1212" draw:name="Shape3974" draw:style-name="gr6" draw:text-style-name="P2" svg:x1="0.3528in" svg:y1="0.6728in" svg:x2="0.3528in" svg:y2="11.2657in">
        <text:p/>
      </draw:line>
      <draw:line text:anchor-type="page" text:anchor-page-number="5" draw:z-index="1211" draw:name="Shape1107" draw:style-name="gr6" draw:text-style-name="P2" svg:x1="0.3528in" svg:y1="0.6728in" svg:x2="0.3528in" svg:y2="11.2657in">
        <text:p/>
      </draw:line>
      <draw:line text:anchor-type="page" text:anchor-page-number="4" draw:z-index="1210" draw:name="Shape964" draw:style-name="gr6" draw:text-style-name="P2" svg:x1="0.3528in" svg:y1="0.6728in" svg:x2="0.3528in" svg:y2="11.2657in">
        <text:p/>
      </draw:line>
      <draw:line text:anchor-type="page" text:anchor-page-number="2" draw:z-index="1209" draw:name="Shape338" draw:style-name="gr6" draw:text-style-name="P2" svg:x1="0.3528in" svg:y1="0.6728in" svg:x2="0.3528in" svg:y2="11.2657in">
        <text:p/>
      </draw:line>
      <draw:line text:anchor-type="page" text:anchor-page-number="15" draw:z-index="1208" draw:name="Shape4907" draw:style-name="gr6" draw:text-style-name="P2" svg:x1="0.3528in" svg:y1="0.6728in" svg:x2="0.3528in" svg:y2="11.2657in">
        <text:p/>
      </draw:line>
      <draw:line text:anchor-type="page" text:anchor-page-number="14" draw:z-index="1207" draw:name="Shape4312" draw:style-name="gr6" draw:text-style-name="P2" svg:x1="0.3528in" svg:y1="0.6728in" svg:x2="0.3528in" svg:y2="11.2657in">
        <text:p/>
      </draw:line>
      <draw:line text:anchor-type="page" text:anchor-page-number="16" draw:z-index="1206" draw:name="Shape5067" draw:style-name="gr6" draw:text-style-name="P2" svg:x1="0.3528in" svg:y1="0.6728in" svg:x2="0.3528in" svg:y2="11.2657in">
        <text:p/>
      </draw:line>
      <draw:line text:anchor-type="page" text:anchor-page-number="11" draw:z-index="1205" draw:name="Shape3756" draw:style-name="gr6" draw:text-style-name="P2" svg:x1="0.3528in" svg:y1="0.6728in" svg:x2="0.3528in" svg:y2="11.2657in">
        <text:p/>
      </draw:line>
      <draw:line text:anchor-type="page" text:anchor-page-number="6" draw:z-index="1204" draw:name="Shape1751" draw:style-name="gr6" draw:text-style-name="P2" svg:x1="0.3528in" svg:y1="0.6728in" svg:x2="0.3528in" svg:y2="11.2657in">
        <text:p/>
      </draw:line>
      <draw:line text:anchor-type="page" text:anchor-page-number="3" draw:z-index="1203" draw:name="Shape663" draw:style-name="gr6" draw:text-style-name="P2" svg:x1="0.3528in" svg:y1="0.6728in" svg:x2="0.3528in" svg:y2="11.2657in">
        <text:p/>
      </draw:line>
      <draw:line text:anchor-type="page" text:anchor-page-number="8" draw:z-index="1202" draw:name="Shape3099" draw:style-name="gr6" draw:text-style-name="P2" svg:x1="0.3528in" svg:y1="0.6728in" svg:x2="0.3528in" svg:y2="11.2657in">
        <text:p/>
      </draw:line>
      <draw:line text:anchor-type="page" text:anchor-page-number="1" draw:z-index="1201" draw:name="Shape333" draw:style-name="gr6" draw:text-style-name="P2" svg:x1="0.3528in" svg:y1="11.2657in" svg:x2="7.9949in" svg:y2="11.2657in">
        <text:p/>
      </draw:line>
      <draw:line text:anchor-type="page" text:anchor-page-number="7" draw:z-index="1200" draw:name="Shape2723" draw:style-name="gr6" draw:text-style-name="P2" svg:x1="0.3528in" svg:y1="0.6728in" svg:x2="0.3528in" svg:y2="11.2657in">
        <text:p/>
      </draw:line>
      <draw:frame text:anchor-type="page" text:anchor-page-number="5" draw:z-index="1199" draw:name="Shape1179" draw:style-name="gr1" draw:text-style-name="P2" svg:width="0.0433in" svg:height="0.1925in" svg:x="0.3634in" svg:y="1.611in">
        <draw:text-box>
          <text:p><text:span text:style-name="T2"><text:s/></text:span></text:p>
        </draw:text-box>
      </draw:frame>
      <draw:line text:anchor-type="page" text:anchor-page-number="1" draw:z-index="1198" draw:name="Shape20" draw:style-name="gr6" draw:text-style-name="P2" svg:x1="7.9949in" svg:y1="0.6728in" svg:x2="7.9949in" svg:y2="11.2657in">
        <text:p/>
      </draw:line>
      <draw:frame text:anchor-type="page" text:anchor-page-number="3" draw:z-index="1197" draw:name="Shape735" draw:style-name="gr1" draw:text-style-name="P2" svg:width="0.0433in" svg:height="0.1925in" svg:x="0.3634in" svg:y="1.611in">
        <draw:text-box>
          <text:p><text:span text:style-name="T2"><text:s/></text:span></text:p>
        </draw:text-box>
      </draw:frame>
      <draw:frame text:anchor-type="page" text:anchor-page-number="10" draw:z-index="1196" draw:name="Shape3559" draw:style-name="gr1" draw:text-style-name="P2" svg:width="0.0433in" svg:height="0.1925in" svg:x="0.3634in" svg:y="1.611in">
        <draw:text-box>
          <text:p><text:span text:style-name="T2"><text:s/></text:span></text:p>
        </draw:text-box>
      </draw:frame>
      <draw:frame text:anchor-type="page" text:anchor-page-number="9" draw:z-index="1195" draw:name="Shape3327" draw:style-name="gr1" draw:text-style-name="P2" svg:width="0.0433in" svg:height="0.1925in" svg:x="0.3634in" svg:y="1.611in">
        <draw:text-box>
          <text:p><text:span text:style-name="T2"><text:s/></text:span></text:p>
        </draw:text-box>
      </draw:frame>
      <draw:frame text:anchor-type="page" text:anchor-page-number="8" draw:z-index="1194" draw:name="Shape3171" draw:style-name="gr1" draw:text-style-name="P2" svg:width="0.0433in" svg:height="0.1925in" svg:x="0.3634in" svg:y="1.611in">
        <draw:text-box>
          <text:p><text:span text:style-name="T2"><text:s/></text:span></text:p>
        </draw:text-box>
      </draw:frame>
      <draw:frame text:anchor-type="page" text:anchor-page-number="4" draw:z-index="1193" draw:name="Shape1036" draw:style-name="gr1" draw:text-style-name="P2" svg:width="0.0433in" svg:height="0.1925in" svg:x="0.3634in" svg:y="1.611in">
        <draw:text-box>
          <text:p><text:span text:style-name="T2"><text:s/></text:span></text:p>
        </draw:text-box>
      </draw:frame>
      <draw:frame text:anchor-type="page" text:anchor-page-number="11" draw:z-index="1192" draw:name="Shape3828" draw:style-name="gr1" draw:text-style-name="P2" svg:width="0.0433in" svg:height="0.1925in" svg:x="0.3634in" svg:y="1.611in">
        <draw:text-box>
          <text:p><text:span text:style-name="T2"><text:s/></text:span></text:p>
        </draw:text-box>
      </draw:frame>
      <draw:frame text:anchor-type="page" text:anchor-page-number="14" draw:z-index="1191" draw:name="Shape4384" draw:style-name="gr1" draw:text-style-name="P2" svg:width="0.0433in" svg:height="0.1925in" svg:x="0.3634in" svg:y="1.611in">
        <draw:text-box>
          <text:p><text:span text:style-name="T2"><text:s/></text:span></text:p>
        </draw:text-box>
      </draw:frame>
      <draw:frame text:anchor-type="page" text:anchor-page-number="13" draw:z-index="1190" draw:name="Shape4183" draw:style-name="gr1" draw:text-style-name="P2" svg:width="0.0433in" svg:height="0.1925in" svg:x="0.3634in" svg:y="1.611in">
        <draw:text-box>
          <text:p><text:span text:style-name="T2"><text:s/></text:span></text:p>
        </draw:text-box>
      </draw:frame>
      <draw:frame text:anchor-type="page" text:anchor-page-number="7" draw:z-index="1189" draw:name="Shape2795" draw:style-name="gr1" draw:text-style-name="P2" svg:width="0.0433in" svg:height="0.1925in" svg:x="0.3634in" svg:y="1.611in">
        <draw:text-box>
          <text:p><text:span text:style-name="T2"><text:s/></text:span></text:p>
        </draw:text-box>
      </draw:frame>
      <draw:frame text:anchor-type="page" text:anchor-page-number="6" draw:z-index="1188" draw:name="Shape1823" draw:style-name="gr1" draw:text-style-name="P2" svg:width="0.0433in" svg:height="0.1925in" svg:x="0.3634in" svg:y="1.611in">
        <draw:text-box>
          <text:p><text:span text:style-name="T2"><text:s/></text:span></text:p>
        </draw:text-box>
      </draw:frame>
      <draw:frame text:anchor-type="page" text:anchor-page-number="16" draw:z-index="1187" draw:name="Shape5139" draw:style-name="gr1" draw:text-style-name="P2" svg:width="0.0433in" svg:height="0.1925in" svg:x="0.3634in" svg:y="1.611in">
        <draw:text-box>
          <text:p><text:span text:style-name="T2"><text:s/></text:span></text:p>
        </draw:text-box>
      </draw:frame>
      <draw:frame text:anchor-type="page" text:anchor-page-number="2" draw:z-index="1186" draw:name="Shape410" draw:style-name="gr1" draw:text-style-name="P2" svg:width="0.0433in" svg:height="0.1925in" svg:x="0.3634in" svg:y="1.611in">
        <draw:text-box>
          <text:p><text:span text:style-name="T2"><text:s/></text:span></text:p>
        </draw:text-box>
      </draw:frame>
      <draw:frame text:anchor-type="page" text:anchor-page-number="12" draw:z-index="1185" draw:name="Shape4046" draw:style-name="gr1" draw:text-style-name="P2" svg:width="0.0433in" svg:height="0.1925in" svg:x="0.3634in" svg:y="1.611in">
        <draw:text-box>
          <text:p><text:span text:style-name="T2"><text:s/></text:span></text:p>
        </draw:text-box>
      </draw:frame>
      <draw:frame text:anchor-type="page" text:anchor-page-number="15" draw:z-index="1184" draw:name="Shape4979" draw:style-name="gr1" draw:text-style-name="P2" svg:width="0.0433in" svg:height="0.1925in" svg:x="0.3634in" svg:y="1.611in">
        <draw:text-box>
          <text:p><text:span text:style-name="T2"><text:s/></text:span></text:p>
        </draw:text-box>
      </draw:frame>
      <draw:line text:anchor-type="page" text:anchor-page-number="1" draw:z-index="1183" draw:name="Shape5" draw:style-name="gr6" draw:text-style-name="P2" svg:x1="0.3528in" svg:y1="0.6728in" svg:x2="0.3528in" svg:y2="11.2657in">
        <text:p/>
      </draw:line>
      <draw:frame text:anchor-type="page" text:anchor-page-number="6" draw:z-index="1182" draw:name="Shape1799" draw:style-name="gr1" draw:text-style-name="P2" svg:width="0.0398in" svg:height="0.1776in" svg:x="6.698in" svg:y="1.3634in">
        <draw:text-box>
          <text:p><text:span text:style-name="T8"><text:s/></text:span></text:p>
        </draw:text-box>
      </draw:frame>
      <draw:frame text:anchor-type="page" text:anchor-page-number="11" draw:z-index="1181" draw:name="Shape3804" draw:style-name="gr1" draw:text-style-name="P2" svg:width="0.0398in" svg:height="0.1776in" svg:x="6.7429in" svg:y="1.3634in">
        <draw:text-box>
          <text:p><text:span text:style-name="T8"><text:s/></text:span></text:p>
        </draw:text-box>
      </draw:frame>
      <draw:frame text:anchor-type="page" text:anchor-page-number="5" draw:z-index="1180" draw:name="Shape1155" draw:style-name="gr1" draw:text-style-name="P2" svg:width="0.0398in" svg:height="0.1776in" svg:x="6.698in" svg:y="1.3634in">
        <draw:text-box>
          <text:p><text:span text:style-name="T8"><text:s/></text:span></text:p>
        </draw:text-box>
      </draw:frame>
      <draw:frame text:anchor-type="page" text:anchor-page-number="7" draw:z-index="1179" draw:name="Shape2771" draw:style-name="gr1" draw:text-style-name="P2" svg:width="0.0398in" svg:height="0.1776in" svg:x="6.698in" svg:y="1.3634in">
        <draw:text-box>
          <text:p><text:span text:style-name="T8"><text:s/></text:span></text:p>
        </draw:text-box>
      </draw:frame>
      <draw:frame text:anchor-type="page" text:anchor-page-number="4" draw:z-index="1178" draw:name="Shape1012" draw:style-name="gr1" draw:text-style-name="P2" svg:width="0.0398in" svg:height="0.1776in" svg:x="6.698in" svg:y="1.3634in">
        <draw:text-box>
          <text:p><text:span text:style-name="T8"><text:s/></text:span></text:p>
        </draw:text-box>
      </draw:frame>
      <draw:frame text:anchor-type="page" text:anchor-page-number="15" draw:z-index="1177" draw:name="Shape4955" draw:style-name="gr1" draw:text-style-name="P2" svg:width="0.0398in" svg:height="0.1776in" svg:x="6.7429in" svg:y="1.3634in">
        <draw:text-box>
          <text:p><text:span text:style-name="T8"><text:s/></text:span></text:p>
        </draw:text-box>
      </draw:frame>
      <draw:frame text:anchor-type="page" text:anchor-page-number="9" draw:z-index="1176" draw:name="Shape3303" draw:style-name="gr1" draw:text-style-name="P2" svg:width="0.0398in" svg:height="0.1776in" svg:x="6.698in" svg:y="1.3634in">
        <draw:text-box>
          <text:p><text:span text:style-name="T8"><text:s/></text:span></text:p>
        </draw:text-box>
      </draw:frame>
      <draw:frame text:anchor-type="page" text:anchor-page-number="10" draw:z-index="1175" draw:name="Shape3535" draw:style-name="gr1" draw:text-style-name="P2" svg:width="0.0398in" svg:height="0.1776in" svg:x="6.7429in" svg:y="1.3634in">
        <draw:text-box>
          <text:p><text:span text:style-name="T8"><text:s/></text:span></text:p>
        </draw:text-box>
      </draw:frame>
      <draw:frame text:anchor-type="page" text:anchor-page-number="2" draw:z-index="1174" draw:name="Shape386" draw:style-name="gr1" draw:text-style-name="P2" svg:width="0.0398in" svg:height="0.1776in" svg:x="6.698in" svg:y="1.3634in">
        <draw:text-box>
          <text:p><text:span text:style-name="T8"><text:s/></text:span></text:p>
        </draw:text-box>
      </draw:frame>
      <draw:frame text:anchor-type="page" text:anchor-page-number="3" draw:z-index="1173" draw:name="Shape711" draw:style-name="gr1" draw:text-style-name="P2" svg:width="0.0398in" svg:height="0.1776in" svg:x="6.698in" svg:y="1.3634in">
        <draw:text-box>
          <text:p><text:span text:style-name="T8"><text:s/></text:span></text:p>
        </draw:text-box>
      </draw:frame>
      <draw:frame text:anchor-type="page" text:anchor-page-number="8" draw:z-index="1172" draw:name="Shape3147" draw:style-name="gr1" draw:text-style-name="P2" svg:width="0.0398in" svg:height="0.1776in" svg:x="6.698in" svg:y="1.3634in">
        <draw:text-box>
          <text:p><text:span text:style-name="T8"><text:s/></text:span></text:p>
        </draw:text-box>
      </draw:frame>
      <draw:frame text:anchor-type="page" text:anchor-page-number="14" draw:z-index="1171" draw:name="Shape4360" draw:style-name="gr1" draw:text-style-name="P2" svg:width="0.0398in" svg:height="0.1776in" svg:x="6.7429in" svg:y="1.3634in">
        <draw:text-box>
          <text:p><text:span text:style-name="T8"><text:s/></text:span></text:p>
        </draw:text-box>
      </draw:frame>
      <draw:frame text:anchor-type="page" text:anchor-page-number="16" draw:z-index="1170" draw:name="Shape5115" draw:style-name="gr1" draw:text-style-name="P2" svg:width="0.0398in" svg:height="0.1776in" svg:x="6.7429in" svg:y="1.3634in">
        <draw:text-box>
          <text:p><text:span text:style-name="T8"><text:s/></text:span></text:p>
        </draw:text-box>
      </draw:frame>
      <draw:frame text:anchor-type="page" text:anchor-page-number="12" draw:z-index="1169" draw:name="Shape4022" draw:style-name="gr1" draw:text-style-name="P2" svg:width="0.0398in" svg:height="0.1776in" svg:x="6.7429in" svg:y="1.3634in">
        <draw:text-box>
          <text:p><text:span text:style-name="T8"><text:s/></text:span></text:p>
        </draw:text-box>
      </draw:frame>
      <draw:frame text:anchor-type="page" text:anchor-page-number="13" draw:z-index="1168" draw:name="Shape4159" draw:style-name="gr1" draw:text-style-name="P2" svg:width="0.0398in" svg:height="0.1776in" svg:x="6.7429in" svg:y="1.3634in">
        <draw:text-box>
          <text:p><text:span text:style-name="T8"><text:s/></text:span></text:p>
        </draw:text-box>
      </draw:frame>
      <draw:polygon text:anchor-type="page" text:anchor-page-number="15" draw:z-index="1167" draw:name="Shape4978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6" draw:z-index="1166" draw:name="Shape1822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10" draw:z-index="1165" draw:name="Shape3558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3" draw:z-index="1164" draw:name="Shape734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16" draw:z-index="1163" draw:name="Shape5138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7" draw:z-index="1162" draw:name="Shape2794" draw:style-name="gr3" draw:text-style-name="P4" svg:width="0.0098in" svg:height="0.0102in" svg:x="7.9965in" svg:y="1.598in" svg:viewBox="0 0 26 27" draw:points="0,0 26,0 26,27 0,27">
        <text:p/>
      </draw:polygon>
      <draw:frame text:anchor-type="page" text:anchor-page-number="1" draw:z-index="1161" draw:name="Shape55" draw:style-name="gr1" draw:text-style-name="P2" svg:width="0.0398in" svg:height="0.1776in" svg:x="6.698in" svg:y="1.3634in">
        <draw:text-box>
          <text:p><text:span text:style-name="T8"><text:s/></text:span></text:p>
        </draw:text-box>
      </draw:frame>
      <draw:polygon text:anchor-type="page" text:anchor-page-number="8" draw:z-index="1160" draw:name="Shape3170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9" draw:z-index="1159" draw:name="Shape3326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13" draw:z-index="1158" draw:name="Shape4182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5" draw:z-index="1157" draw:name="Shape1178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14" draw:z-index="1156" draw:name="Shape4383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4" draw:z-index="1155" draw:name="Shape1035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2" draw:z-index="1154" draw:name="Shape409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11" draw:z-index="1153" draw:name="Shape3827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12" draw:z-index="1152" draw:name="Shape4045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8" draw:z-index="1151" draw:name="Shape3169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2" draw:z-index="1150" draw:name="Shape408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16" draw:z-index="1149" draw:name="Shape5137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9" draw:z-index="1148" draw:name="Shape3325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12" draw:z-index="1147" draw:name="Shape4044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5" draw:z-index="1146" draw:name="Shape1177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3" draw:z-index="1145" draw:name="Shape733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6" draw:z-index="1144" draw:name="Shape1821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1" draw:z-index="1143" draw:name="Shape75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13" draw:z-index="1142" draw:name="Shape4181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7" draw:z-index="1141" draw:name="Shape2793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4" draw:z-index="1140" draw:name="Shape1034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14" draw:z-index="1139" draw:name="Shape4382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10" draw:z-index="1138" draw:name="Shape3557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11" draw:z-index="1137" draw:name="Shape3826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15" draw:z-index="1136" draw:name="Shape4977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16" draw:z-index="1135" draw:name="Shape5131" draw:style-name="gr3" draw:text-style-name="P4" svg:width="0.0098in" svg:height="0.1748in" svg:x="7.9965in" svg:y="1.4232in" svg:viewBox="0 0 26 445" draw:points="0,0 26,0 26,445 0,445">
        <text:p/>
      </draw:polygon>
      <draw:polygon text:anchor-type="page" text:anchor-page-number="4" draw:z-index="1134" draw:name="Shape1028" draw:style-name="gr3" draw:text-style-name="P4" svg:width="0.0098in" svg:height="0.1748in" svg:x="7.9965in" svg:y="1.4232in" svg:viewBox="0 0 26 445" draw:points="0,0 26,0 26,445 0,445">
        <text:p/>
      </draw:polygon>
      <draw:polygon text:anchor-type="page" text:anchor-page-number="14" draw:z-index="1133" draw:name="Shape4376" draw:style-name="gr3" draw:text-style-name="P4" svg:width="0.0098in" svg:height="0.1748in" svg:x="7.9965in" svg:y="1.4232in" svg:viewBox="0 0 26 445" draw:points="0,0 26,0 26,445 0,445">
        <text:p/>
      </draw:polygon>
      <draw:polygon text:anchor-type="page" text:anchor-page-number="11" draw:z-index="1132" draw:name="Shape3820" draw:style-name="gr3" draw:text-style-name="P4" svg:width="0.0098in" svg:height="0.1748in" svg:x="7.9965in" svg:y="1.4232in" svg:viewBox="0 0 26 445" draw:points="0,0 26,0 26,445 0,445">
        <text:p/>
      </draw:polygon>
      <draw:polygon text:anchor-type="page" text:anchor-page-number="9" draw:z-index="1131" draw:name="Shape3319" draw:style-name="gr3" draw:text-style-name="P4" svg:width="0.0098in" svg:height="0.1748in" svg:x="7.9965in" svg:y="1.4232in" svg:viewBox="0 0 26 445" draw:points="0,0 26,0 26,445 0,445">
        <text:p/>
      </draw:polygon>
      <draw:polygon text:anchor-type="page" text:anchor-page-number="8" draw:z-index="1130" draw:name="Shape3163" draw:style-name="gr3" draw:text-style-name="P4" svg:width="0.0098in" svg:height="0.1748in" svg:x="7.9965in" svg:y="1.4232in" svg:viewBox="0 0 26 445" draw:points="0,0 26,0 26,445 0,445">
        <text:p/>
      </draw:polygon>
      <draw:polygon text:anchor-type="page" text:anchor-page-number="12" draw:z-index="1129" draw:name="Shape4038" draw:style-name="gr3" draw:text-style-name="P4" svg:width="0.0098in" svg:height="0.1748in" svg:x="7.9965in" svg:y="1.4232in" svg:viewBox="0 0 26 445" draw:points="0,0 26,0 26,445 0,445">
        <text:p/>
      </draw:polygon>
      <draw:polygon text:anchor-type="page" text:anchor-page-number="2" draw:z-index="1128" draw:name="Shape402" draw:style-name="gr3" draw:text-style-name="P4" svg:width="0.0098in" svg:height="0.1748in" svg:x="7.9965in" svg:y="1.4232in" svg:viewBox="0 0 26 445" draw:points="0,0 26,0 26,445 0,445">
        <text:p/>
      </draw:polygon>
      <draw:polygon text:anchor-type="page" text:anchor-page-number="15" draw:z-index="1127" draw:name="Shape4971" draw:style-name="gr3" draw:text-style-name="P4" svg:width="0.0098in" svg:height="0.1748in" svg:x="7.9965in" svg:y="1.4232in" svg:viewBox="0 0 26 445" draw:points="0,0 26,0 26,445 0,445">
        <text:p/>
      </draw:polygon>
      <draw:polygon text:anchor-type="page" text:anchor-page-number="5" draw:z-index="1126" draw:name="Shape1171" draw:style-name="gr3" draw:text-style-name="P4" svg:width="0.0098in" svg:height="0.1748in" svg:x="7.9965in" svg:y="1.4232in" svg:viewBox="0 0 26 445" draw:points="0,0 26,0 26,445 0,445">
        <text:p/>
      </draw:polygon>
      <draw:polygon text:anchor-type="page" text:anchor-page-number="13" draw:z-index="1125" draw:name="Shape4175" draw:style-name="gr3" draw:text-style-name="P4" svg:width="0.0098in" svg:height="0.1748in" svg:x="7.9965in" svg:y="1.4232in" svg:viewBox="0 0 26 445" draw:points="0,0 26,0 26,445 0,445">
        <text:p/>
      </draw:polygon>
      <draw:polygon text:anchor-type="page" text:anchor-page-number="7" draw:z-index="1124" draw:name="Shape2787" draw:style-name="gr3" draw:text-style-name="P4" svg:width="0.0098in" svg:height="0.1748in" svg:x="7.9965in" svg:y="1.4232in" svg:viewBox="0 0 26 445" draw:points="0,0 26,0 26,445 0,445">
        <text:p/>
      </draw:polygon>
      <draw:polygon text:anchor-type="page" text:anchor-page-number="3" draw:z-index="1123" draw:name="Shape727" draw:style-name="gr3" draw:text-style-name="P4" svg:width="0.0098in" svg:height="0.1748in" svg:x="7.9965in" svg:y="1.4232in" svg:viewBox="0 0 26 445" draw:points="0,0 26,0 26,445 0,445">
        <text:p/>
      </draw:polygon>
      <draw:polygon text:anchor-type="page" text:anchor-page-number="1" draw:z-index="1122" draw:name="Shape74" draw:style-name="gr3" draw:text-style-name="P4" svg:width="0.0098in" svg:height="0.0102in" svg:x="7.9965in" svg:y="1.598in" svg:viewBox="0 0 26 27" draw:points="0,0 26,0 26,27 0,27">
        <text:p/>
      </draw:polygon>
      <draw:polygon text:anchor-type="page" text:anchor-page-number="10" draw:z-index="1121" draw:name="Shape3551" draw:style-name="gr3" draw:text-style-name="P4" svg:width="0.0098in" svg:height="0.1748in" svg:x="7.9965in" svg:y="1.4232in" svg:viewBox="0 0 26 445" draw:points="0,0 26,0 26,445 0,445">
        <text:p/>
      </draw:polygon>
      <draw:polygon text:anchor-type="page" text:anchor-page-number="6" draw:z-index="1120" draw:name="Shape1815" draw:style-name="gr3" draw:text-style-name="P4" svg:width="0.0098in" svg:height="0.1748in" svg:x="7.9965in" svg:y="1.4232in" svg:viewBox="0 0 26 445" draw:points="0,0 26,0 26,445 0,445">
        <text:p/>
      </draw:polygon>
      <draw:polygon text:anchor-type="page" text:anchor-page-number="6" draw:z-index="1119" draw:name="Shape1820" draw:style-name="gr3" draw:text-style-name="P4" svg:width="1.8799in" svg:height="0.0102in" svg:x="6.1165in" svg:y="1.598in" svg:viewBox="0 0 4776 27" draw:points="0,0 4776,0 4776,27 0,27">
        <text:p/>
      </draw:polygon>
      <draw:polygon text:anchor-type="page" text:anchor-page-number="1" draw:z-index="1118" draw:name="Shape68" draw:style-name="gr3" draw:text-style-name="P4" svg:width="0.0098in" svg:height="0.1748in" svg:x="7.9965in" svg:y="1.4232in" svg:viewBox="0 0 26 445" draw:points="0,0 26,0 26,445 0,445">
        <text:p/>
      </draw:polygon>
      <draw:polygon text:anchor-type="page" text:anchor-page-number="14" draw:z-index="1117" draw:name="Shape4381" draw:style-name="gr3" draw:text-style-name="P4" svg:width="1.8799in" svg:height="0.0102in" svg:x="6.1165in" svg:y="1.598in" svg:viewBox="0 0 4776 27" draw:points="0,0 4776,0 4776,27 0,27">
        <text:p/>
      </draw:polygon>
      <draw:polygon text:anchor-type="page" text:anchor-page-number="16" draw:z-index="1116" draw:name="Shape5136" draw:style-name="gr3" draw:text-style-name="P4" svg:width="1.8799in" svg:height="0.0102in" svg:x="6.1165in" svg:y="1.598in" svg:viewBox="0 0 4776 27" draw:points="0,0 4776,0 4776,27 0,27">
        <text:p/>
      </draw:polygon>
      <draw:polygon text:anchor-type="page" text:anchor-page-number="2" draw:z-index="1115" draw:name="Shape407" draw:style-name="gr3" draw:text-style-name="P4" svg:width="1.8799in" svg:height="0.0102in" svg:x="6.1165in" svg:y="1.598in" svg:viewBox="0 0 4776 27" draw:points="0,0 4776,0 4776,27 0,27">
        <text:p/>
      </draw:polygon>
      <draw:polygon text:anchor-type="page" text:anchor-page-number="13" draw:z-index="1114" draw:name="Shape4180" draw:style-name="gr3" draw:text-style-name="P4" svg:width="1.8799in" svg:height="0.0102in" svg:x="6.1165in" svg:y="1.598in" svg:viewBox="0 0 4776 27" draw:points="0,0 4776,0 4776,27 0,27">
        <text:p/>
      </draw:polygon>
      <draw:polygon text:anchor-type="page" text:anchor-page-number="4" draw:z-index="1113" draw:name="Shape1033" draw:style-name="gr3" draw:text-style-name="P4" svg:width="1.8799in" svg:height="0.0102in" svg:x="6.1165in" svg:y="1.598in" svg:viewBox="0 0 4776 27" draw:points="0,0 4776,0 4776,27 0,27">
        <text:p/>
      </draw:polygon>
      <draw:polygon text:anchor-type="page" text:anchor-page-number="7" draw:z-index="1112" draw:name="Shape2792" draw:style-name="gr3" draw:text-style-name="P4" svg:width="1.8799in" svg:height="0.0102in" svg:x="6.1165in" svg:y="1.598in" svg:viewBox="0 0 4776 27" draw:points="0,0 4776,0 4776,27 0,27">
        <text:p/>
      </draw:polygon>
      <draw:polygon text:anchor-type="page" text:anchor-page-number="8" draw:z-index="1111" draw:name="Shape3168" draw:style-name="gr3" draw:text-style-name="P4" svg:width="1.8799in" svg:height="0.0102in" svg:x="6.1165in" svg:y="1.598in" svg:viewBox="0 0 4776 27" draw:points="0,0 4776,0 4776,27 0,27">
        <text:p/>
      </draw:polygon>
      <draw:polygon text:anchor-type="page" text:anchor-page-number="12" draw:z-index="1110" draw:name="Shape4043" draw:style-name="gr3" draw:text-style-name="P4" svg:width="1.8799in" svg:height="0.0102in" svg:x="6.1165in" svg:y="1.598in" svg:viewBox="0 0 4776 27" draw:points="0,0 4776,0 4776,27 0,27">
        <text:p/>
      </draw:polygon>
      <draw:polygon text:anchor-type="page" text:anchor-page-number="5" draw:z-index="1109" draw:name="Shape1176" draw:style-name="gr3" draw:text-style-name="P4" svg:width="1.8799in" svg:height="0.0102in" svg:x="6.1165in" svg:y="1.598in" svg:viewBox="0 0 4776 27" draw:points="0,0 4776,0 4776,27 0,27">
        <text:p/>
      </draw:polygon>
      <draw:polygon text:anchor-type="page" text:anchor-page-number="15" draw:z-index="1108" draw:name="Shape4976" draw:style-name="gr3" draw:text-style-name="P4" svg:width="1.8799in" svg:height="0.0102in" svg:x="6.1165in" svg:y="1.598in" svg:viewBox="0 0 4776 27" draw:points="0,0 4776,0 4776,27 0,27">
        <text:p/>
      </draw:polygon>
      <draw:polygon text:anchor-type="page" text:anchor-page-number="3" draw:z-index="1107" draw:name="Shape732" draw:style-name="gr3" draw:text-style-name="P4" svg:width="1.8799in" svg:height="0.0102in" svg:x="6.1165in" svg:y="1.598in" svg:viewBox="0 0 4776 27" draw:points="0,0 4776,0 4776,27 0,27">
        <text:p/>
      </draw:polygon>
      <draw:polygon text:anchor-type="page" text:anchor-page-number="10" draw:z-index="1106" draw:name="Shape3556" draw:style-name="gr3" draw:text-style-name="P4" svg:width="1.8799in" svg:height="0.0102in" svg:x="6.1165in" svg:y="1.598in" svg:viewBox="0 0 4776 27" draw:points="0,0 4776,0 4776,27 0,27">
        <text:p/>
      </draw:polygon>
      <draw:polygon text:anchor-type="page" text:anchor-page-number="11" draw:z-index="1105" draw:name="Shape3825" draw:style-name="gr3" draw:text-style-name="P4" svg:width="1.8799in" svg:height="0.0102in" svg:x="6.1165in" svg:y="1.598in" svg:viewBox="0 0 4776 27" draw:points="0,0 4776,0 4776,27 0,27">
        <text:p/>
      </draw:polygon>
      <draw:polygon text:anchor-type="page" text:anchor-page-number="9" draw:z-index="1104" draw:name="Shape3324" draw:style-name="gr3" draw:text-style-name="P4" svg:width="1.8799in" svg:height="0.0102in" svg:x="6.1165in" svg:y="1.598in" svg:viewBox="0 0 4776 27" draw:points="0,0 4776,0 4776,27 0,27">
        <text:p/>
      </draw:polygon>
      <draw:polygon text:anchor-type="page" text:anchor-page-number="5" draw:z-index="1103" draw:name="Shape1175" draw:style-name="gr3" draw:text-style-name="P4" svg:width="0.0102in" svg:height="0.0102in" svg:x="6.1063in" svg:y="1.598in" svg:viewBox="0 0 27 27" draw:points="0,0 27,0 27,27 0,27">
        <text:p/>
      </draw:polygon>
      <draw:polygon text:anchor-type="page" text:anchor-page-number="1" draw:z-index="1102" draw:name="Shape73" draw:style-name="gr3" draw:text-style-name="P4" svg:width="1.8799in" svg:height="0.0102in" svg:x="6.1165in" svg:y="1.598in" svg:viewBox="0 0 4776 27" draw:points="0,0 4776,0 4776,27 0,27">
        <text:p/>
      </draw:polygon>
      <draw:polygon text:anchor-type="page" text:anchor-page-number="7" draw:z-index="1101" draw:name="Shape2791" draw:style-name="gr3" draw:text-style-name="P4" svg:width="0.0102in" svg:height="0.0102in" svg:x="6.1063in" svg:y="1.598in" svg:viewBox="0 0 27 27" draw:points="0,0 27,0 27,27 0,27">
        <text:p/>
      </draw:polygon>
      <draw:polygon text:anchor-type="page" text:anchor-page-number="3" draw:z-index="1100" draw:name="Shape731" draw:style-name="gr3" draw:text-style-name="P4" svg:width="0.0102in" svg:height="0.0102in" svg:x="6.1063in" svg:y="1.598in" svg:viewBox="0 0 27 27" draw:points="0,0 27,0 27,27 0,27">
        <text:p/>
      </draw:polygon>
      <draw:polygon text:anchor-type="page" text:anchor-page-number="10" draw:z-index="1099" draw:name="Shape3555" draw:style-name="gr3" draw:text-style-name="P4" svg:width="0.0102in" svg:height="0.0102in" svg:x="6.1063in" svg:y="1.598in" svg:viewBox="0 0 27 27" draw:points="0,0 27,0 27,27 0,27">
        <text:p/>
      </draw:polygon>
      <draw:polygon text:anchor-type="page" text:anchor-page-number="6" draw:z-index="1098" draw:name="Shape1819" draw:style-name="gr3" draw:text-style-name="P4" svg:width="0.0102in" svg:height="0.0102in" svg:x="6.1063in" svg:y="1.598in" svg:viewBox="0 0 27 27" draw:points="0,0 27,0 27,27 0,27">
        <text:p/>
      </draw:polygon>
      <draw:polygon text:anchor-type="page" text:anchor-page-number="11" draw:z-index="1097" draw:name="Shape3824" draw:style-name="gr3" draw:text-style-name="P4" svg:width="0.0102in" svg:height="0.0102in" svg:x="6.1063in" svg:y="1.598in" svg:viewBox="0 0 27 27" draw:points="0,0 27,0 27,27 0,27">
        <text:p/>
      </draw:polygon>
      <draw:polygon text:anchor-type="page" text:anchor-page-number="9" draw:z-index="1096" draw:name="Shape3323" draw:style-name="gr3" draw:text-style-name="P4" svg:width="0.0102in" svg:height="0.0102in" svg:x="6.1063in" svg:y="1.598in" svg:viewBox="0 0 27 27" draw:points="0,0 27,0 27,27 0,27">
        <text:p/>
      </draw:polygon>
      <draw:polygon text:anchor-type="page" text:anchor-page-number="16" draw:z-index="1095" draw:name="Shape5135" draw:style-name="gr3" draw:text-style-name="P4" svg:width="0.0102in" svg:height="0.0102in" svg:x="6.1063in" svg:y="1.598in" svg:viewBox="0 0 27 27" draw:points="0,0 27,0 27,27 0,27">
        <text:p/>
      </draw:polygon>
      <draw:polygon text:anchor-type="page" text:anchor-page-number="2" draw:z-index="1094" draw:name="Shape406" draw:style-name="gr3" draw:text-style-name="P4" svg:width="0.0102in" svg:height="0.0102in" svg:x="6.1063in" svg:y="1.598in" svg:viewBox="0 0 27 27" draw:points="0,0 27,0 27,27 0,27">
        <text:p/>
      </draw:polygon>
      <draw:polygon text:anchor-type="page" text:anchor-page-number="4" draw:z-index="1093" draw:name="Shape1032" draw:style-name="gr3" draw:text-style-name="P4" svg:width="0.0102in" svg:height="0.0102in" svg:x="6.1063in" svg:y="1.598in" svg:viewBox="0 0 27 27" draw:points="0,0 27,0 27,27 0,27">
        <text:p/>
      </draw:polygon>
      <draw:polygon text:anchor-type="page" text:anchor-page-number="15" draw:z-index="1092" draw:name="Shape4975" draw:style-name="gr3" draw:text-style-name="P4" svg:width="0.0102in" svg:height="0.0102in" svg:x="6.1063in" svg:y="1.598in" svg:viewBox="0 0 27 27" draw:points="0,0 27,0 27,27 0,27">
        <text:p/>
      </draw:polygon>
      <draw:polygon text:anchor-type="page" text:anchor-page-number="14" draw:z-index="1091" draw:name="Shape4380" draw:style-name="gr3" draw:text-style-name="P4" svg:width="0.0102in" svg:height="0.0102in" svg:x="6.1063in" svg:y="1.598in" svg:viewBox="0 0 27 27" draw:points="0,0 27,0 27,27 0,27">
        <text:p/>
      </draw:polygon>
      <draw:polygon text:anchor-type="page" text:anchor-page-number="8" draw:z-index="1090" draw:name="Shape3167" draw:style-name="gr3" draw:text-style-name="P4" svg:width="0.0102in" svg:height="0.0102in" svg:x="6.1063in" svg:y="1.598in" svg:viewBox="0 0 27 27" draw:points="0,0 27,0 27,27 0,27">
        <text:p/>
      </draw:polygon>
      <draw:polygon text:anchor-type="page" text:anchor-page-number="12" draw:z-index="1089" draw:name="Shape4042" draw:style-name="gr3" draw:text-style-name="P4" svg:width="0.0102in" svg:height="0.0102in" svg:x="6.1063in" svg:y="1.598in" svg:viewBox="0 0 27 27" draw:points="0,0 27,0 27,27 0,27">
        <text:p/>
      </draw:polygon>
      <draw:polygon text:anchor-type="page" text:anchor-page-number="13" draw:z-index="1088" draw:name="Shape4179" draw:style-name="gr3" draw:text-style-name="P4" svg:width="0.0102in" svg:height="0.0102in" svg:x="6.1063in" svg:y="1.598in" svg:viewBox="0 0 27 27" draw:points="0,0 27,0 27,27 0,27">
        <text:p/>
      </draw:polygon>
      <draw:polygon text:anchor-type="page" text:anchor-page-number="14" draw:z-index="1087" draw:name="Shape4367" draw:style-name="gr3" draw:text-style-name="P4" svg:width="0.0102in" svg:height="0.1748in" svg:x="6.1063in" svg:y="1.4232in" svg:viewBox="0 0 27 445" draw:points="0,0 27,0 27,445 0,445">
        <text:p/>
      </draw:polygon>
      <draw:polygon text:anchor-type="page" text:anchor-page-number="11" draw:z-index="1086" draw:name="Shape3811" draw:style-name="gr3" draw:text-style-name="P4" svg:width="0.0102in" svg:height="0.1748in" svg:x="6.1063in" svg:y="1.4232in" svg:viewBox="0 0 27 445" draw:points="0,0 27,0 27,445 0,445">
        <text:p/>
      </draw:polygon>
      <draw:polygon text:anchor-type="page" text:anchor-page-number="4" draw:z-index="1085" draw:name="Shape1019" draw:style-name="gr3" draw:text-style-name="P4" svg:width="0.0102in" svg:height="0.1748in" svg:x="6.1063in" svg:y="1.4232in" svg:viewBox="0 0 27 445" draw:points="0,0 27,0 27,445 0,445">
        <text:p/>
      </draw:polygon>
      <draw:polygon text:anchor-type="page" text:anchor-page-number="5" draw:z-index="1084" draw:name="Shape1162" draw:style-name="gr3" draw:text-style-name="P4" svg:width="0.0102in" svg:height="0.1748in" svg:x="6.1063in" svg:y="1.4232in" svg:viewBox="0 0 27 445" draw:points="0,0 27,0 27,445 0,445">
        <text:p/>
      </draw:polygon>
      <draw:polygon text:anchor-type="page" text:anchor-page-number="7" draw:z-index="1083" draw:name="Shape2778" draw:style-name="gr3" draw:text-style-name="P4" svg:width="0.0102in" svg:height="0.1748in" svg:x="6.1063in" svg:y="1.4232in" svg:viewBox="0 0 27 445" draw:points="0,0 27,0 27,445 0,445">
        <text:p/>
      </draw:polygon>
      <draw:polygon text:anchor-type="page" text:anchor-page-number="10" draw:z-index="1082" draw:name="Shape3542" draw:style-name="gr3" draw:text-style-name="P4" svg:width="0.0102in" svg:height="0.1748in" svg:x="6.1063in" svg:y="1.4232in" svg:viewBox="0 0 27 445" draw:points="0,0 27,0 27,445 0,445">
        <text:p/>
      </draw:polygon>
      <draw:polygon text:anchor-type="page" text:anchor-page-number="9" draw:z-index="1081" draw:name="Shape3310" draw:style-name="gr3" draw:text-style-name="P4" svg:width="0.0102in" svg:height="0.1748in" svg:x="6.1063in" svg:y="1.4232in" svg:viewBox="0 0 27 445" draw:points="0,0 27,0 27,445 0,445">
        <text:p/>
      </draw:polygon>
      <draw:polygon text:anchor-type="page" text:anchor-page-number="8" draw:z-index="1080" draw:name="Shape3154" draw:style-name="gr3" draw:text-style-name="P4" svg:width="0.0102in" svg:height="0.1748in" svg:x="6.1063in" svg:y="1.4232in" svg:viewBox="0 0 27 445" draw:points="0,0 27,0 27,445 0,445">
        <text:p/>
      </draw:polygon>
      <draw:polygon text:anchor-type="page" text:anchor-page-number="12" draw:z-index="1079" draw:name="Shape4029" draw:style-name="gr3" draw:text-style-name="P4" svg:width="0.0102in" svg:height="0.1748in" svg:x="6.1063in" svg:y="1.4232in" svg:viewBox="0 0 27 445" draw:points="0,0 27,0 27,445 0,445">
        <text:p/>
      </draw:polygon>
      <draw:polygon text:anchor-type="page" text:anchor-page-number="6" draw:z-index="1078" draw:name="Shape1806" draw:style-name="gr3" draw:text-style-name="P4" svg:width="0.0102in" svg:height="0.1748in" svg:x="6.1063in" svg:y="1.4232in" svg:viewBox="0 0 27 445" draw:points="0,0 27,0 27,445 0,445">
        <text:p/>
      </draw:polygon>
      <draw:polygon text:anchor-type="page" text:anchor-page-number="2" draw:z-index="1077" draw:name="Shape393" draw:style-name="gr3" draw:text-style-name="P4" svg:width="0.0102in" svg:height="0.1748in" svg:x="6.1063in" svg:y="1.4232in" svg:viewBox="0 0 27 445" draw:points="0,0 27,0 27,445 0,445">
        <text:p/>
      </draw:polygon>
      <draw:polygon text:anchor-type="page" text:anchor-page-number="15" draw:z-index="1076" draw:name="Shape4962" draw:style-name="gr3" draw:text-style-name="P4" svg:width="0.0102in" svg:height="0.1748in" svg:x="6.1063in" svg:y="1.4232in" svg:viewBox="0 0 27 445" draw:points="0,0 27,0 27,445 0,445">
        <text:p/>
      </draw:polygon>
      <draw:polygon text:anchor-type="page" text:anchor-page-number="13" draw:z-index="1075" draw:name="Shape4166" draw:style-name="gr3" draw:text-style-name="P4" svg:width="0.0102in" svg:height="0.1748in" svg:x="6.1063in" svg:y="1.4232in" svg:viewBox="0 0 27 445" draw:points="0,0 27,0 27,445 0,445">
        <text:p/>
      </draw:polygon>
      <draw:polygon text:anchor-type="page" text:anchor-page-number="3" draw:z-index="1074" draw:name="Shape718" draw:style-name="gr3" draw:text-style-name="P4" svg:width="0.0102in" svg:height="0.1748in" svg:x="6.1063in" svg:y="1.4232in" svg:viewBox="0 0 27 445" draw:points="0,0 27,0 27,445 0,445">
        <text:p/>
      </draw:polygon>
      <draw:polygon text:anchor-type="page" text:anchor-page-number="16" draw:z-index="1073" draw:name="Shape5122" draw:style-name="gr3" draw:text-style-name="P4" svg:width="0.0102in" svg:height="0.1748in" svg:x="6.1063in" svg:y="1.4232in" svg:viewBox="0 0 27 445" draw:points="0,0 27,0 27,445 0,445">
        <text:p/>
      </draw:polygon>
      <draw:polygon text:anchor-type="page" text:anchor-page-number="1" draw:z-index="1072" draw:name="Shape72" draw:style-name="gr3" draw:text-style-name="P4" svg:width="0.0102in" svg:height="0.0102in" svg:x="6.1063in" svg:y="1.598in" svg:viewBox="0 0 27 27" draw:points="0,0 27,0 27,27 0,27">
        <text:p/>
      </draw:polygon>
      <draw:polygon text:anchor-type="page" text:anchor-page-number="3" draw:z-index="1071" draw:name="Shape730" draw:style-name="gr3" draw:text-style-name="P4" svg:width="5.7382in" svg:height="0.0102in" svg:x="0.3681in" svg:y="1.598in" svg:viewBox="0 0 14576 27" draw:points="0,0 14576,0 14576,27 0,27">
        <text:p/>
      </draw:polygon>
      <draw:polygon text:anchor-type="page" text:anchor-page-number="10" draw:z-index="1070" draw:name="Shape3554" draw:style-name="gr3" draw:text-style-name="P4" svg:width="5.7382in" svg:height="0.0102in" svg:x="0.3681in" svg:y="1.598in" svg:viewBox="0 0 14576 27" draw:points="0,0 14576,0 14576,27 0,27">
        <text:p/>
      </draw:polygon>
      <draw:polygon text:anchor-type="page" text:anchor-page-number="7" draw:z-index="1069" draw:name="Shape2790" draw:style-name="gr3" draw:text-style-name="P4" svg:width="5.7382in" svg:height="0.0102in" svg:x="0.3681in" svg:y="1.598in" svg:viewBox="0 0 14576 27" draw:points="0,0 14576,0 14576,27 0,27">
        <text:p/>
      </draw:polygon>
      <draw:polygon text:anchor-type="page" text:anchor-page-number="1" draw:z-index="1068" draw:name="Shape62" draw:style-name="gr3" draw:text-style-name="P4" svg:width="0.0102in" svg:height="0.1748in" svg:x="6.1063in" svg:y="1.4232in" svg:viewBox="0 0 27 445" draw:points="0,0 27,0 27,445 0,445">
        <text:p/>
      </draw:polygon>
      <draw:polygon text:anchor-type="page" text:anchor-page-number="11" draw:z-index="1067" draw:name="Shape3823" draw:style-name="gr3" draw:text-style-name="P4" svg:width="5.7382in" svg:height="0.0102in" svg:x="0.3681in" svg:y="1.598in" svg:viewBox="0 0 14576 27" draw:points="0,0 14576,0 14576,27 0,27">
        <text:p/>
      </draw:polygon>
      <draw:polygon text:anchor-type="page" text:anchor-page-number="2" draw:z-index="1066" draw:name="Shape405" draw:style-name="gr3" draw:text-style-name="P4" svg:width="5.7382in" svg:height="0.0102in" svg:x="0.3681in" svg:y="1.598in" svg:viewBox="0 0 14576 27" draw:points="0,0 14576,0 14576,27 0,27">
        <text:p/>
      </draw:polygon>
      <draw:polygon text:anchor-type="page" text:anchor-page-number="13" draw:z-index="1065" draw:name="Shape4178" draw:style-name="gr3" draw:text-style-name="P4" svg:width="5.7382in" svg:height="0.0102in" svg:x="0.3681in" svg:y="1.598in" svg:viewBox="0 0 14576 27" draw:points="0,0 14576,0 14576,27 0,27">
        <text:p/>
      </draw:polygon>
      <draw:polygon text:anchor-type="page" text:anchor-page-number="16" draw:z-index="1064" draw:name="Shape5134" draw:style-name="gr3" draw:text-style-name="P4" svg:width="5.7382in" svg:height="0.0102in" svg:x="0.3681in" svg:y="1.598in" svg:viewBox="0 0 14576 27" draw:points="0,0 14576,0 14576,27 0,27">
        <text:p/>
      </draw:polygon>
      <draw:polygon text:anchor-type="page" text:anchor-page-number="12" draw:z-index="1063" draw:name="Shape4041" draw:style-name="gr3" draw:text-style-name="P4" svg:width="5.7382in" svg:height="0.0102in" svg:x="0.3681in" svg:y="1.598in" svg:viewBox="0 0 14576 27" draw:points="0,0 14576,0 14576,27 0,27">
        <text:p/>
      </draw:polygon>
      <draw:polygon text:anchor-type="page" text:anchor-page-number="4" draw:z-index="1062" draw:name="Shape1031" draw:style-name="gr3" draw:text-style-name="P4" svg:width="5.7382in" svg:height="0.0102in" svg:x="0.3681in" svg:y="1.598in" svg:viewBox="0 0 14576 27" draw:points="0,0 14576,0 14576,27 0,27">
        <text:p/>
      </draw:polygon>
      <draw:polygon text:anchor-type="page" text:anchor-page-number="15" draw:z-index="1061" draw:name="Shape4974" draw:style-name="gr3" draw:text-style-name="P4" svg:width="5.7382in" svg:height="0.0102in" svg:x="0.3681in" svg:y="1.598in" svg:viewBox="0 0 14576 27" draw:points="0,0 14576,0 14576,27 0,27">
        <text:p/>
      </draw:polygon>
      <draw:polygon text:anchor-type="page" text:anchor-page-number="9" draw:z-index="1060" draw:name="Shape3322" draw:style-name="gr3" draw:text-style-name="P4" svg:width="5.7382in" svg:height="0.0102in" svg:x="0.3681in" svg:y="1.598in" svg:viewBox="0 0 14576 27" draw:points="0,0 14576,0 14576,27 0,27">
        <text:p/>
      </draw:polygon>
      <draw:polygon text:anchor-type="page" text:anchor-page-number="8" draw:z-index="1059" draw:name="Shape3166" draw:style-name="gr3" draw:text-style-name="P4" svg:width="5.7382in" svg:height="0.0102in" svg:x="0.3681in" svg:y="1.598in" svg:viewBox="0 0 14576 27" draw:points="0,0 14576,0 14576,27 0,27">
        <text:p/>
      </draw:polygon>
      <draw:polygon text:anchor-type="page" text:anchor-page-number="5" draw:z-index="1058" draw:name="Shape1174" draw:style-name="gr3" draw:text-style-name="P4" svg:width="5.7382in" svg:height="0.0102in" svg:x="0.3681in" svg:y="1.598in" svg:viewBox="0 0 14576 27" draw:points="0,0 14576,0 14576,27 0,27">
        <text:p/>
      </draw:polygon>
      <draw:polygon text:anchor-type="page" text:anchor-page-number="6" draw:z-index="1057" draw:name="Shape1818" draw:style-name="gr3" draw:text-style-name="P4" svg:width="5.7382in" svg:height="0.0102in" svg:x="0.3681in" svg:y="1.598in" svg:viewBox="0 0 14576 27" draw:points="0,0 14576,0 14576,27 0,27">
        <text:p/>
      </draw:polygon>
      <draw:polygon text:anchor-type="page" text:anchor-page-number="14" draw:z-index="1056" draw:name="Shape4379" draw:style-name="gr3" draw:text-style-name="P4" svg:width="5.7382in" svg:height="0.0102in" svg:x="0.3681in" svg:y="1.598in" svg:viewBox="0 0 14576 27" draw:points="0,0 14576,0 14576,27 0,27">
        <text:p/>
      </draw:polygon>
      <draw:polygon text:anchor-type="page" text:anchor-page-number="10" draw:z-index="1055" draw:name="Shape3553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4" draw:z-index="1054" draw:name="Shape1030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11" draw:z-index="1053" draw:name="Shape3822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8" draw:z-index="1052" draw:name="Shape3165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5" draw:z-index="1051" draw:name="Shape1173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14" draw:z-index="1050" draw:name="Shape4378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15" draw:z-index="1049" draw:name="Shape4973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3" draw:z-index="1048" draw:name="Shape729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16" draw:z-index="1047" draw:name="Shape5133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13" draw:z-index="1046" draw:name="Shape4177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12" draw:z-index="1045" draw:name="Shape4040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6" draw:z-index="1044" draw:name="Shape1817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7" draw:z-index="1043" draw:name="Shape2789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1" draw:z-index="1042" draw:name="Shape71" draw:style-name="gr3" draw:text-style-name="P4" svg:width="5.7382in" svg:height="0.0102in" svg:x="0.3681in" svg:y="1.598in" svg:viewBox="0 0 14576 27" draw:points="0,0 14576,0 14576,27 0,27">
        <text:p/>
      </draw:polygon>
      <draw:polygon text:anchor-type="page" text:anchor-page-number="2" draw:z-index="1041" draw:name="Shape404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9" draw:z-index="1040" draw:name="Shape3321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4" draw:z-index="1039" draw:name="Shape1029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9" draw:z-index="1038" draw:name="Shape3320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16" draw:z-index="1037" draw:name="Shape5132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8" draw:z-index="1036" draw:name="Shape3164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6" draw:z-index="1035" draw:name="Shape1816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1" draw:z-index="1034" draw:name="Shape70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14" draw:z-index="1033" draw:name="Shape4377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3" draw:z-index="1032" draw:name="Shape728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13" draw:z-index="1031" draw:name="Shape4176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7" draw:z-index="1030" draw:name="Shape2788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10" draw:z-index="1029" draw:name="Shape3552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2" draw:z-index="1028" draw:name="Shape403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11" draw:z-index="1027" draw:name="Shape3821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5" draw:z-index="1026" draw:name="Shape1172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15" draw:z-index="1025" draw:name="Shape4972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12" draw:z-index="1024" draw:name="Shape4039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2" draw:z-index="1023" draw:name="Shape387" draw:style-name="gr3" draw:text-style-name="P4" svg:width="0.0098in" svg:height="0.1748in" svg:x="0.3583in" svg:y="1.4232in" svg:viewBox="0 0 26 445" draw:points="0,0 26,0 26,445 0,445">
        <text:p/>
      </draw:polygon>
      <draw:polygon text:anchor-type="page" text:anchor-page-number="1" draw:z-index="1022" draw:name="Shape69" draw:style-name="gr3" draw:text-style-name="P4" svg:width="0.0098in" svg:height="0.0102in" svg:x="0.3583in" svg:y="1.598in" svg:viewBox="0 0 26 27" draw:points="0,0 26,0 26,27 0,27">
        <text:p/>
      </draw:polygon>
      <draw:polygon text:anchor-type="page" text:anchor-page-number="13" draw:z-index="1021" draw:name="Shape4160" draw:style-name="gr3" draw:text-style-name="P4" svg:width="0.0098in" svg:height="0.1748in" svg:x="0.3583in" svg:y="1.4232in" svg:viewBox="0 0 26 445" draw:points="0,0 26,0 26,445 0,445">
        <text:p/>
      </draw:polygon>
      <draw:polygon text:anchor-type="page" text:anchor-page-number="15" draw:z-index="1020" draw:name="Shape4956" draw:style-name="gr3" draw:text-style-name="P4" svg:width="0.0098in" svg:height="0.1748in" svg:x="0.3583in" svg:y="1.4232in" svg:viewBox="0 0 26 445" draw:points="0,0 26,0 26,445 0,445">
        <text:p/>
      </draw:polygon>
      <draw:polygon text:anchor-type="page" text:anchor-page-number="14" draw:z-index="1019" draw:name="Shape4361" draw:style-name="gr3" draw:text-style-name="P4" svg:width="0.0098in" svg:height="0.1748in" svg:x="0.3583in" svg:y="1.4232in" svg:viewBox="0 0 26 445" draw:points="0,0 26,0 26,445 0,445">
        <text:p/>
      </draw:polygon>
      <draw:polygon text:anchor-type="page" text:anchor-page-number="6" draw:z-index="1018" draw:name="Shape1800" draw:style-name="gr3" draw:text-style-name="P4" svg:width="0.0098in" svg:height="0.1748in" svg:x="0.3583in" svg:y="1.4232in" svg:viewBox="0 0 26 445" draw:points="0,0 26,0 26,445 0,445">
        <text:p/>
      </draw:polygon>
      <draw:polygon text:anchor-type="page" text:anchor-page-number="12" draw:z-index="1017" draw:name="Shape4023" draw:style-name="gr3" draw:text-style-name="P4" svg:width="0.0098in" svg:height="0.1748in" svg:x="0.3583in" svg:y="1.4232in" svg:viewBox="0 0 26 445" draw:points="0,0 26,0 26,445 0,445">
        <text:p/>
      </draw:polygon>
      <draw:polygon text:anchor-type="page" text:anchor-page-number="8" draw:z-index="1016" draw:name="Shape3148" draw:style-name="gr3" draw:text-style-name="P4" svg:width="0.0098in" svg:height="0.1748in" svg:x="0.3583in" svg:y="1.4232in" svg:viewBox="0 0 26 445" draw:points="0,0 26,0 26,445 0,445">
        <text:p/>
      </draw:polygon>
      <draw:polygon text:anchor-type="page" text:anchor-page-number="9" draw:z-index="1015" draw:name="Shape3304" draw:style-name="gr3" draw:text-style-name="P4" svg:width="0.0098in" svg:height="0.1748in" svg:x="0.3583in" svg:y="1.4232in" svg:viewBox="0 0 26 445" draw:points="0,0 26,0 26,445 0,445">
        <text:p/>
      </draw:polygon>
      <draw:polygon text:anchor-type="page" text:anchor-page-number="11" draw:z-index="1014" draw:name="Shape3805" draw:style-name="gr3" draw:text-style-name="P4" svg:width="0.0098in" svg:height="0.1748in" svg:x="0.3583in" svg:y="1.4232in" svg:viewBox="0 0 26 445" draw:points="0,0 26,0 26,445 0,445">
        <text:p/>
      </draw:polygon>
      <draw:polygon text:anchor-type="page" text:anchor-page-number="5" draw:z-index="1013" draw:name="Shape1156" draw:style-name="gr3" draw:text-style-name="P4" svg:width="0.0098in" svg:height="0.1748in" svg:x="0.3583in" svg:y="1.4232in" svg:viewBox="0 0 26 445" draw:points="0,0 26,0 26,445 0,445">
        <text:p/>
      </draw:polygon>
      <draw:polygon text:anchor-type="page" text:anchor-page-number="10" draw:z-index="1012" draw:name="Shape3536" draw:style-name="gr3" draw:text-style-name="P4" svg:width="0.0098in" svg:height="0.1748in" svg:x="0.3583in" svg:y="1.4232in" svg:viewBox="0 0 26 445" draw:points="0,0 26,0 26,445 0,445">
        <text:p/>
      </draw:polygon>
      <draw:polygon text:anchor-type="page" text:anchor-page-number="16" draw:z-index="1011" draw:name="Shape5116" draw:style-name="gr3" draw:text-style-name="P4" svg:width="0.0098in" svg:height="0.1748in" svg:x="0.3583in" svg:y="1.4232in" svg:viewBox="0 0 26 445" draw:points="0,0 26,0 26,445 0,445">
        <text:p/>
      </draw:polygon>
      <draw:polygon text:anchor-type="page" text:anchor-page-number="7" draw:z-index="1010" draw:name="Shape2772" draw:style-name="gr3" draw:text-style-name="P4" svg:width="0.0098in" svg:height="0.1748in" svg:x="0.3583in" svg:y="1.4232in" svg:viewBox="0 0 26 445" draw:points="0,0 26,0 26,445 0,445">
        <text:p/>
      </draw:polygon>
      <draw:polygon text:anchor-type="page" text:anchor-page-number="3" draw:z-index="1009" draw:name="Shape712" draw:style-name="gr3" draw:text-style-name="P4" svg:width="0.0098in" svg:height="0.1748in" svg:x="0.3583in" svg:y="1.4232in" svg:viewBox="0 0 26 445" draw:points="0,0 26,0 26,445 0,445">
        <text:p/>
      </draw:polygon>
      <draw:polygon text:anchor-type="page" text:anchor-page-number="4" draw:z-index="1008" draw:name="Shape1013" draw:style-name="gr3" draw:text-style-name="P4" svg:width="0.0098in" svg:height="0.1748in" svg:x="0.3583in" svg:y="1.4232in" svg:viewBox="0 0 26 445" draw:points="0,0 26,0 26,445 0,445">
        <text:p/>
      </draw:polygon>
      <draw:frame text:anchor-type="page" text:anchor-page-number="8" draw:z-index="1007" draw:name="Shape3160" draw:style-name="gr1" draw:text-style-name="P2" svg:width="0.5394in" svg:height="0.0976in" svg:x="6.1598in" svg:y="1.4244in">
        <draw:text-box>
          <text:p><text:span text:style-name="T9">Pagina n. 8/16</text:span></text:p>
        </draw:text-box>
      </draw:frame>
      <draw:frame text:anchor-type="page" text:anchor-page-number="2" draw:z-index="1006" draw:name="Shape399" draw:style-name="gr1" draw:text-style-name="P2" svg:width="0.5394in" svg:height="0.0976in" svg:x="6.1598in" svg:y="1.4244in">
        <draw:text-box>
          <text:p><text:span text:style-name="T9">Pagina n. 2/16</text:span></text:p>
        </draw:text-box>
      </draw:frame>
      <draw:polygon text:anchor-type="page" text:anchor-page-number="1" draw:z-index="1005" draw:name="Shape56" draw:style-name="gr3" draw:text-style-name="P4" svg:width="0.0098in" svg:height="0.1748in" svg:x="0.3583in" svg:y="1.4232in" svg:viewBox="0 0 26 445" draw:points="0,0 26,0 26,445 0,445">
        <text:p/>
      </draw:polygon>
      <draw:frame text:anchor-type="page" text:anchor-page-number="5" draw:z-index="1004" draw:name="Shape1168" draw:style-name="gr1" draw:text-style-name="P2" svg:width="0.5394in" svg:height="0.0976in" svg:x="6.1598in" svg:y="1.4244in">
        <draw:text-box>
          <text:p><text:span text:style-name="T9">Pagina n. 5/16</text:span></text:p>
        </draw:text-box>
      </draw:frame>
      <draw:frame text:anchor-type="page" text:anchor-page-number="12" draw:z-index="1003" draw:name="Shape4035" draw:style-name="gr1" draw:text-style-name="P2" svg:width="0.5858in" svg:height="0.0976in" svg:x="6.1598in" svg:y="1.4244in">
        <draw:text-box>
          <text:p><text:span text:style-name="T9">Pagina n. 12/16</text:span></text:p>
        </draw:text-box>
      </draw:frame>
      <draw:frame text:anchor-type="page" text:anchor-page-number="11" draw:z-index="1002" draw:name="Shape3817" draw:style-name="gr1" draw:text-style-name="P2" svg:width="0.5795in" svg:height="0.0976in" svg:x="6.1598in" svg:y="1.4244in">
        <draw:text-box>
          <text:p><text:span text:style-name="T9">Pagina n. 11/16</text:span></text:p>
        </draw:text-box>
      </draw:frame>
      <draw:frame text:anchor-type="page" text:anchor-page-number="15" draw:z-index="1001" draw:name="Shape4968" draw:style-name="gr1" draw:text-style-name="P2" svg:width="0.5858in" svg:height="0.0976in" svg:x="6.1598in" svg:y="1.4244in">
        <draw:text-box>
          <text:p><text:span text:style-name="T9">Pagina n. 15/16</text:span></text:p>
        </draw:text-box>
      </draw:frame>
      <draw:frame text:anchor-type="page" text:anchor-page-number="14" draw:z-index="1000" draw:name="Shape4373" draw:style-name="gr1" draw:text-style-name="P2" svg:width="0.5858in" svg:height="0.0976in" svg:x="6.1598in" svg:y="1.4244in">
        <draw:text-box>
          <text:p><text:span text:style-name="T9">Pagina n. 14/16</text:span></text:p>
        </draw:text-box>
      </draw:frame>
      <draw:frame text:anchor-type="page" text:anchor-page-number="9" draw:z-index="999" draw:name="Shape3316" draw:style-name="gr1" draw:text-style-name="P2" svg:width="0.5394in" svg:height="0.0976in" svg:x="6.1598in" svg:y="1.4244in">
        <draw:text-box>
          <text:p><text:span text:style-name="T9">Pagina n. 9/16</text:span></text:p>
        </draw:text-box>
      </draw:frame>
      <draw:frame text:anchor-type="page" text:anchor-page-number="4" draw:z-index="998" draw:name="Shape1025" draw:style-name="gr1" draw:text-style-name="P2" svg:width="0.5394in" svg:height="0.0976in" svg:x="6.1598in" svg:y="1.4244in">
        <draw:text-box>
          <text:p><text:span text:style-name="T9">Pagina n. 4/16</text:span></text:p>
        </draw:text-box>
      </draw:frame>
      <draw:frame text:anchor-type="page" text:anchor-page-number="13" draw:z-index="997" draw:name="Shape4172" draw:style-name="gr1" draw:text-style-name="P2" svg:width="0.5858in" svg:height="0.0976in" svg:x="6.1598in" svg:y="1.4244in">
        <draw:text-box>
          <text:p><text:span text:style-name="T9">Pagina n. 13/16</text:span></text:p>
        </draw:text-box>
      </draw:frame>
      <draw:frame text:anchor-type="page" text:anchor-page-number="6" draw:z-index="996" draw:name="Shape1812" draw:style-name="gr1" draw:text-style-name="P2" svg:width="0.5394in" svg:height="0.0976in" svg:x="6.1598in" svg:y="1.4244in">
        <draw:text-box>
          <text:p><text:span text:style-name="T9">Pagina n. 6/16</text:span></text:p>
        </draw:text-box>
      </draw:frame>
      <draw:frame text:anchor-type="page" text:anchor-page-number="16" draw:z-index="995" draw:name="Shape5128" draw:style-name="gr1" draw:text-style-name="P2" svg:width="0.5858in" svg:height="0.0976in" svg:x="6.1598in" svg:y="1.4244in">
        <draw:text-box>
          <text:p><text:span text:style-name="T9">Pagina n. 16/16</text:span></text:p>
        </draw:text-box>
      </draw:frame>
      <draw:frame text:anchor-type="page" text:anchor-page-number="7" draw:z-index="994" draw:name="Shape2784" draw:style-name="gr1" draw:text-style-name="P2" svg:width="0.5394in" svg:height="0.0976in" svg:x="6.1598in" svg:y="1.4244in">
        <draw:text-box>
          <text:p><text:span text:style-name="T9">Pagina n. 7/16</text:span></text:p>
        </draw:text-box>
      </draw:frame>
      <draw:frame text:anchor-type="page" text:anchor-page-number="10" draw:z-index="993" draw:name="Shape3548" draw:style-name="gr1" draw:text-style-name="P2" svg:width="0.5858in" svg:height="0.0976in" svg:x="6.1598in" svg:y="1.4244in">
        <draw:text-box>
          <text:p><text:span text:style-name="T9">Pagina n. 10/16</text:span></text:p>
        </draw:text-box>
      </draw:frame>
      <draw:frame text:anchor-type="page" text:anchor-page-number="3" draw:z-index="992" draw:name="Shape724" draw:style-name="gr1" draw:text-style-name="P2" svg:width="0.5394in" svg:height="0.0976in" svg:x="6.1598in" svg:y="1.4244in">
        <draw:text-box>
          <text:p><text:span text:style-name="T9">Pagina n. 3/16</text:span></text:p>
        </draw:text-box>
      </draw:frame>
      <draw:frame text:anchor-type="page" text:anchor-page-number="13" draw:z-index="991" draw:name="Shape4173" draw:style-name="gr1" draw:text-style-name="P2" svg:width="0.0787in" svg:height="0.1776in" svg:x="0.411in" svg:y="1.4252in">
        <draw:text-box>
          <text:p><text:span text:style-name="T8"><text:s text:c="2"/></text:span></text:p>
        </draw:text-box>
      </draw:frame>
      <draw:frame text:anchor-type="page" text:anchor-page-number="1" draw:z-index="990" draw:name="Shape66" draw:style-name="gr1" draw:text-style-name="P2" svg:width="0.5394in" svg:height="0.0976in" svg:x="6.1598in" svg:y="1.4244in">
        <draw:text-box>
          <text:p><text:span text:style-name="T9">Pagina n. 1/16</text:span></text:p>
        </draw:text-box>
      </draw:frame>
      <draw:frame text:anchor-type="page" text:anchor-page-number="11" draw:z-index="989" draw:name="Shape3818" draw:style-name="gr1" draw:text-style-name="P2" svg:width="0.0787in" svg:height="0.1776in" svg:x="0.411in" svg:y="1.4252in">
        <draw:text-box>
          <text:p><text:span text:style-name="T8"><text:s text:c="2"/></text:span></text:p>
        </draw:text-box>
      </draw:frame>
      <draw:frame text:anchor-type="page" text:anchor-page-number="3" draw:z-index="988" draw:name="Shape725" draw:style-name="gr1" draw:text-style-name="P2" svg:width="0.0787in" svg:height="0.1776in" svg:x="0.411in" svg:y="1.4252in">
        <draw:text-box>
          <text:p><text:span text:style-name="T8"><text:s text:c="2"/></text:span></text:p>
        </draw:text-box>
      </draw:frame>
      <draw:frame text:anchor-type="page" text:anchor-page-number="6" draw:z-index="987" draw:name="Shape1813" draw:style-name="gr1" draw:text-style-name="P2" svg:width="0.0787in" svg:height="0.1776in" svg:x="0.411in" svg:y="1.4252in">
        <draw:text-box>
          <text:p><text:span text:style-name="T8"><text:s text:c="2"/></text:span></text:p>
        </draw:text-box>
      </draw:frame>
      <draw:frame text:anchor-type="page" text:anchor-page-number="5" draw:z-index="986" draw:name="Shape1169" draw:style-name="gr1" draw:text-style-name="P2" svg:width="0.0787in" svg:height="0.1776in" svg:x="0.411in" svg:y="1.4252in">
        <draw:text-box>
          <text:p><text:span text:style-name="T8"><text:s text:c="2"/></text:span></text:p>
        </draw:text-box>
      </draw:frame>
      <draw:frame text:anchor-type="page" text:anchor-page-number="15" draw:z-index="985" draw:name="Shape4969" draw:style-name="gr1" draw:text-style-name="P2" svg:width="0.0787in" svg:height="0.1776in" svg:x="0.411in" svg:y="1.4252in">
        <draw:text-box>
          <text:p><text:span text:style-name="T8"><text:s text:c="2"/></text:span></text:p>
        </draw:text-box>
      </draw:frame>
      <draw:frame text:anchor-type="page" text:anchor-page-number="7" draw:z-index="984" draw:name="Shape2785" draw:style-name="gr1" draw:text-style-name="P2" svg:width="0.0787in" svg:height="0.1776in" svg:x="0.411in" svg:y="1.4252in">
        <draw:text-box>
          <text:p><text:span text:style-name="T8"><text:s text:c="2"/></text:span></text:p>
        </draw:text-box>
      </draw:frame>
      <draw:frame text:anchor-type="page" text:anchor-page-number="10" draw:z-index="983" draw:name="Shape3549" draw:style-name="gr1" draw:text-style-name="P2" svg:width="0.0787in" svg:height="0.1776in" svg:x="0.411in" svg:y="1.4252in">
        <draw:text-box>
          <text:p><text:span text:style-name="T8"><text:s text:c="2"/></text:span></text:p>
        </draw:text-box>
      </draw:frame>
      <draw:frame text:anchor-type="page" text:anchor-page-number="4" draw:z-index="982" draw:name="Shape1026" draw:style-name="gr1" draw:text-style-name="P2" svg:width="0.0787in" svg:height="0.1776in" svg:x="0.411in" svg:y="1.4252in">
        <draw:text-box>
          <text:p><text:span text:style-name="T8"><text:s text:c="2"/></text:span></text:p>
        </draw:text-box>
      </draw:frame>
      <draw:frame text:anchor-type="page" text:anchor-page-number="9" draw:z-index="981" draw:name="Shape3317" draw:style-name="gr1" draw:text-style-name="P2" svg:width="0.0787in" svg:height="0.1776in" svg:x="0.411in" svg:y="1.4252in">
        <draw:text-box>
          <text:p><text:span text:style-name="T8"><text:s text:c="2"/></text:span></text:p>
        </draw:text-box>
      </draw:frame>
      <draw:frame text:anchor-type="page" text:anchor-page-number="8" draw:z-index="980" draw:name="Shape3161" draw:style-name="gr1" draw:text-style-name="P2" svg:width="0.0787in" svg:height="0.1776in" svg:x="0.411in" svg:y="1.4252in">
        <draw:text-box>
          <text:p><text:span text:style-name="T8"><text:s text:c="2"/></text:span></text:p>
        </draw:text-box>
      </draw:frame>
      <draw:frame text:anchor-type="page" text:anchor-page-number="12" draw:z-index="979" draw:name="Shape4036" draw:style-name="gr1" draw:text-style-name="P2" svg:width="0.0787in" svg:height="0.1776in" svg:x="0.411in" svg:y="1.4252in">
        <draw:text-box>
          <text:p><text:span text:style-name="T8"><text:s text:c="2"/></text:span></text:p>
        </draw:text-box>
      </draw:frame>
      <draw:frame text:anchor-type="page" text:anchor-page-number="16" draw:z-index="978" draw:name="Shape5129" draw:style-name="gr1" draw:text-style-name="P2" svg:width="0.0787in" svg:height="0.1776in" svg:x="0.411in" svg:y="1.4252in">
        <draw:text-box>
          <text:p><text:span text:style-name="T8"><text:s text:c="2"/></text:span></text:p>
        </draw:text-box>
      </draw:frame>
      <draw:frame text:anchor-type="page" text:anchor-page-number="2" draw:z-index="977" draw:name="Shape400" draw:style-name="gr1" draw:text-style-name="P2" svg:width="0.0787in" svg:height="0.1776in" svg:x="0.411in" svg:y="1.4252in">
        <draw:text-box>
          <text:p><text:span text:style-name="T8"><text:s text:c="2"/></text:span></text:p>
        </draw:text-box>
      </draw:frame>
      <draw:frame text:anchor-type="page" text:anchor-page-number="14" draw:z-index="976" draw:name="Shape4374" draw:style-name="gr1" draw:text-style-name="P2" svg:width="0.0787in" svg:height="0.1776in" svg:x="0.411in" svg:y="1.4252in">
        <draw:text-box>
          <text:p><text:span text:style-name="T8"><text:s text:c="2"/></text:span></text:p>
        </draw:text-box>
      </draw:frame>
      <draw:polygon text:anchor-type="page" text:anchor-page-number="13" draw:z-index="975" draw:name="Shape4174" draw:style-name="gr2" draw:text-style-name="P3" svg:width="1.7917in" svg:height="0.0949in" svg:x="6.1598in" svg:y="1.4232in" svg:viewBox="0 0 4552 242" draw:points="0,0 4552,0 4552,242 0,242">
        <text:p/>
      </draw:polygon>
      <draw:polygon text:anchor-type="page" text:anchor-page-number="4" draw:z-index="974" draw:name="Shape1027" draw:style-name="gr2" draw:text-style-name="P3" svg:width="1.7917in" svg:height="0.0949in" svg:x="6.1598in" svg:y="1.4232in" svg:viewBox="0 0 4552 242" draw:points="0,0 4552,0 4552,242 0,242">
        <text:p/>
      </draw:polygon>
      <draw:polygon text:anchor-type="page" text:anchor-page-number="12" draw:z-index="973" draw:name="Shape4037" draw:style-name="gr2" draw:text-style-name="P3" svg:width="1.7917in" svg:height="0.0949in" svg:x="6.1598in" svg:y="1.4232in" svg:viewBox="0 0 4552 242" draw:points="0,0 4552,0 4552,242 0,242">
        <text:p/>
      </draw:polygon>
      <draw:frame text:anchor-type="page" text:anchor-page-number="1" draw:z-index="972" draw:name="Shape67" draw:style-name="gr1" draw:text-style-name="P2" svg:width="0.0787in" svg:height="0.1776in" svg:x="0.411in" svg:y="1.4252in">
        <draw:text-box>
          <text:p><text:span text:style-name="T8"><text:s text:c="2"/></text:span></text:p>
        </draw:text-box>
      </draw:frame>
      <draw:polygon text:anchor-type="page" text:anchor-page-number="16" draw:z-index="971" draw:name="Shape5130" draw:style-name="gr2" draw:text-style-name="P3" svg:width="1.7917in" svg:height="0.0949in" svg:x="6.1598in" svg:y="1.4232in" svg:viewBox="0 0 4552 242" draw:points="0,0 4552,0 4552,242 0,242">
        <text:p/>
      </draw:polygon>
      <draw:polygon text:anchor-type="page" text:anchor-page-number="11" draw:z-index="970" draw:name="Shape3819" draw:style-name="gr2" draw:text-style-name="P3" svg:width="1.7917in" svg:height="0.0949in" svg:x="6.1598in" svg:y="1.4232in" svg:viewBox="0 0 4552 242" draw:points="0,0 4552,0 4552,242 0,242">
        <text:p/>
      </draw:polygon>
      <draw:polygon text:anchor-type="page" text:anchor-page-number="6" draw:z-index="969" draw:name="Shape1814" draw:style-name="gr2" draw:text-style-name="P3" svg:width="1.7917in" svg:height="0.0949in" svg:x="6.1598in" svg:y="1.4232in" svg:viewBox="0 0 4552 242" draw:points="0,0 4552,0 4552,242 0,242">
        <text:p/>
      </draw:polygon>
      <draw:polygon text:anchor-type="page" text:anchor-page-number="3" draw:z-index="968" draw:name="Shape726" draw:style-name="gr2" draw:text-style-name="P3" svg:width="1.7917in" svg:height="0.0949in" svg:x="6.1598in" svg:y="1.4232in" svg:viewBox="0 0 4552 242" draw:points="0,0 4552,0 4552,242 0,242">
        <text:p/>
      </draw:polygon>
      <draw:polygon text:anchor-type="page" text:anchor-page-number="14" draw:z-index="967" draw:name="Shape4375" draw:style-name="gr2" draw:text-style-name="P3" svg:width="1.7917in" svg:height="0.0949in" svg:x="6.1598in" svg:y="1.4232in" svg:viewBox="0 0 4552 242" draw:points="0,0 4552,0 4552,242 0,242">
        <text:p/>
      </draw:polygon>
      <draw:polygon text:anchor-type="page" text:anchor-page-number="5" draw:z-index="966" draw:name="Shape1170" draw:style-name="gr2" draw:text-style-name="P3" svg:width="1.7917in" svg:height="0.0949in" svg:x="6.1598in" svg:y="1.4232in" svg:viewBox="0 0 4552 242" draw:points="0,0 4552,0 4552,242 0,242">
        <text:p/>
      </draw:polygon>
      <draw:polygon text:anchor-type="page" text:anchor-page-number="10" draw:z-index="965" draw:name="Shape3550" draw:style-name="gr2" draw:text-style-name="P3" svg:width="1.7917in" svg:height="0.0949in" svg:x="6.1598in" svg:y="1.4232in" svg:viewBox="0 0 4552 242" draw:points="0,0 4552,0 4552,242 0,242">
        <text:p/>
      </draw:polygon>
      <draw:polygon text:anchor-type="page" text:anchor-page-number="2" draw:z-index="964" draw:name="Shape401" draw:style-name="gr2" draw:text-style-name="P3" svg:width="1.7917in" svg:height="0.0949in" svg:x="6.1598in" svg:y="1.4232in" svg:viewBox="0 0 4552 242" draw:points="0,0 4552,0 4552,242 0,242">
        <text:p/>
      </draw:polygon>
      <draw:polygon text:anchor-type="page" text:anchor-page-number="7" draw:z-index="963" draw:name="Shape2786" draw:style-name="gr2" draw:text-style-name="P3" svg:width="1.7917in" svg:height="0.0949in" svg:x="6.1598in" svg:y="1.4232in" svg:viewBox="0 0 4552 242" draw:points="0,0 4552,0 4552,242 0,242">
        <text:p/>
      </draw:polygon>
      <draw:polygon text:anchor-type="page" text:anchor-page-number="8" draw:z-index="962" draw:name="Shape3162" draw:style-name="gr2" draw:text-style-name="P3" svg:width="1.7917in" svg:height="0.0949in" svg:x="6.1598in" svg:y="1.4232in" svg:viewBox="0 0 4552 242" draw:points="0,0 4552,0 4552,242 0,242">
        <text:p/>
      </draw:polygon>
      <draw:polygon text:anchor-type="page" text:anchor-page-number="15" draw:z-index="961" draw:name="Shape4970" draw:style-name="gr2" draw:text-style-name="P3" svg:width="1.7917in" svg:height="0.0949in" svg:x="6.1598in" svg:y="1.4232in" svg:viewBox="0 0 4552 242" draw:points="0,0 4552,0 4552,242 0,242">
        <text:p/>
      </draw:polygon>
      <draw:polygon text:anchor-type="page" text:anchor-page-number="9" draw:z-index="960" draw:name="Shape3318" draw:style-name="gr2" draw:text-style-name="P3" svg:width="1.7917in" svg:height="0.0949in" svg:x="6.1598in" svg:y="1.4232in" svg:viewBox="0 0 4552 242" draw:points="0,0 4552,0 4552,242 0,242">
        <text:p/>
      </draw:polygon>
      <draw:polygon text:anchor-type="page" text:anchor-page-number="13" draw:z-index="959" draw:name="Shape4171" draw:style-name="gr2" draw:text-style-name="P3" svg:width="1.8799in" svg:height="0.1748in" svg:x="6.1165in" svg:y="1.4232in" svg:viewBox="0 0 4776 445" draw:points="0,0 4776,0 4776,445 0,445">
        <text:p/>
      </draw:polygon>
      <draw:polygon text:anchor-type="page" text:anchor-page-number="6" draw:z-index="958" draw:name="Shape1811" draw:style-name="gr2" draw:text-style-name="P3" svg:width="1.8799in" svg:height="0.1748in" svg:x="6.1165in" svg:y="1.4232in" svg:viewBox="0 0 4776 445" draw:points="0,0 4776,0 4776,445 0,445">
        <text:p/>
      </draw:polygon>
      <draw:polygon text:anchor-type="page" text:anchor-page-number="9" draw:z-index="957" draw:name="Shape3315" draw:style-name="gr2" draw:text-style-name="P3" svg:width="1.8799in" svg:height="0.1748in" svg:x="6.1165in" svg:y="1.4232in" svg:viewBox="0 0 4776 445" draw:points="0,0 4776,0 4776,445 0,445">
        <text:p/>
      </draw:polygon>
      <draw:polygon text:anchor-type="page" text:anchor-page-number="16" draw:z-index="956" draw:name="Shape5127" draw:style-name="gr2" draw:text-style-name="P3" svg:width="1.8799in" svg:height="0.1748in" svg:x="6.1165in" svg:y="1.4232in" svg:viewBox="0 0 4776 445" draw:points="0,0 4776,0 4776,445 0,445">
        <text:p/>
      </draw:polygon>
      <draw:polygon text:anchor-type="page" text:anchor-page-number="7" draw:z-index="955" draw:name="Shape2783" draw:style-name="gr2" draw:text-style-name="P3" svg:width="1.8799in" svg:height="0.1748in" svg:x="6.1165in" svg:y="1.4232in" svg:viewBox="0 0 4776 445" draw:points="0,0 4776,0 4776,445 0,445">
        <text:p/>
      </draw:polygon>
      <draw:polygon text:anchor-type="page" text:anchor-page-number="3" draw:z-index="954" draw:name="Shape723" draw:style-name="gr2" draw:text-style-name="P3" svg:width="1.8799in" svg:height="0.1748in" svg:x="6.1165in" svg:y="1.4232in" svg:viewBox="0 0 4776 445" draw:points="0,0 4776,0 4776,445 0,445">
        <text:p/>
      </draw:polygon>
      <draw:polygon text:anchor-type="page" text:anchor-page-number="11" draw:z-index="953" draw:name="Shape3816" draw:style-name="gr2" draw:text-style-name="P3" svg:width="1.8799in" svg:height="0.1748in" svg:x="6.1165in" svg:y="1.4232in" svg:viewBox="0 0 4776 445" draw:points="0,0 4776,0 4776,445 0,445">
        <text:p/>
      </draw:polygon>
      <draw:polygon text:anchor-type="page" text:anchor-page-number="1" draw:z-index="952" draw:name="Shape65" draw:style-name="gr2" draw:text-style-name="P3" svg:width="1.7917in" svg:height="0.0949in" svg:x="6.1598in" svg:y="1.4232in" svg:viewBox="0 0 4552 242" draw:points="0,0 4552,0 4552,242 0,242">
        <text:p/>
      </draw:polygon>
      <draw:polygon text:anchor-type="page" text:anchor-page-number="5" draw:z-index="951" draw:name="Shape1167" draw:style-name="gr2" draw:text-style-name="P3" svg:width="1.8799in" svg:height="0.1748in" svg:x="6.1165in" svg:y="1.4232in" svg:viewBox="0 0 4776 445" draw:points="0,0 4776,0 4776,445 0,445">
        <text:p/>
      </draw:polygon>
      <draw:polygon text:anchor-type="page" text:anchor-page-number="4" draw:z-index="950" draw:name="Shape1024" draw:style-name="gr2" draw:text-style-name="P3" svg:width="1.8799in" svg:height="0.1748in" svg:x="6.1165in" svg:y="1.4232in" svg:viewBox="0 0 4776 445" draw:points="0,0 4776,0 4776,445 0,445">
        <text:p/>
      </draw:polygon>
      <draw:polygon text:anchor-type="page" text:anchor-page-number="14" draw:z-index="949" draw:name="Shape4372" draw:style-name="gr2" draw:text-style-name="P3" svg:width="1.8799in" svg:height="0.1748in" svg:x="6.1165in" svg:y="1.4232in" svg:viewBox="0 0 4776 445" draw:points="0,0 4776,0 4776,445 0,445">
        <text:p/>
      </draw:polygon>
      <draw:polygon text:anchor-type="page" text:anchor-page-number="8" draw:z-index="948" draw:name="Shape3159" draw:style-name="gr2" draw:text-style-name="P3" svg:width="1.8799in" svg:height="0.1748in" svg:x="6.1165in" svg:y="1.4232in" svg:viewBox="0 0 4776 445" draw:points="0,0 4776,0 4776,445 0,445">
        <text:p/>
      </draw:polygon>
      <draw:polygon text:anchor-type="page" text:anchor-page-number="15" draw:z-index="947" draw:name="Shape4967" draw:style-name="gr2" draw:text-style-name="P3" svg:width="1.8799in" svg:height="0.1748in" svg:x="6.1165in" svg:y="1.4232in" svg:viewBox="0 0 4776 445" draw:points="0,0 4776,0 4776,445 0,445">
        <text:p/>
      </draw:polygon>
      <draw:polygon text:anchor-type="page" text:anchor-page-number="2" draw:z-index="946" draw:name="Shape398" draw:style-name="gr2" draw:text-style-name="P3" svg:width="1.8799in" svg:height="0.1748in" svg:x="6.1165in" svg:y="1.4232in" svg:viewBox="0 0 4776 445" draw:points="0,0 4776,0 4776,445 0,445">
        <text:p/>
      </draw:polygon>
      <draw:polygon text:anchor-type="page" text:anchor-page-number="10" draw:z-index="945" draw:name="Shape3547" draw:style-name="gr2" draw:text-style-name="P3" svg:width="1.8799in" svg:height="0.1748in" svg:x="6.1165in" svg:y="1.4232in" svg:viewBox="0 0 4776 445" draw:points="0,0 4776,0 4776,445 0,445">
        <text:p/>
      </draw:polygon>
      <draw:polygon text:anchor-type="page" text:anchor-page-number="12" draw:z-index="944" draw:name="Shape4034" draw:style-name="gr2" draw:text-style-name="P3" svg:width="1.8799in" svg:height="0.1748in" svg:x="6.1165in" svg:y="1.4232in" svg:viewBox="0 0 4776 445" draw:points="0,0 4776,0 4776,445 0,445">
        <text:p/>
      </draw:polygon>
      <draw:frame text:anchor-type="page" text:anchor-page-number="5" draw:z-index="943" draw:name="Shape1143" draw:style-name="gr1" draw:text-style-name="P2" svg:width="0.0398in" svg:height="0.1776in" svg:x="7.0165in" svg:y="0.9953in">
        <draw:text-box>
          <text:p><text:span text:style-name="T8"><text:s/></text:span></text:p>
        </draw:text-box>
      </draw:frame>
      <draw:frame text:anchor-type="page" text:anchor-page-number="2" draw:z-index="942" draw:name="Shape374" draw:style-name="gr1" draw:text-style-name="P2" svg:width="0.0398in" svg:height="0.1776in" svg:x="7.0165in" svg:y="0.9953in">
        <draw:text-box>
          <text:p><text:span text:style-name="T8"><text:s/></text:span></text:p>
        </draw:text-box>
      </draw:frame>
      <draw:frame text:anchor-type="page" text:anchor-page-number="3" draw:z-index="941" draw:name="Shape699" draw:style-name="gr1" draw:text-style-name="P2" svg:width="0.0398in" svg:height="0.1776in" svg:x="7.0165in" svg:y="0.9953in">
        <draw:text-box>
          <text:p><text:span text:style-name="T8"><text:s/></text:span></text:p>
        </draw:text-box>
      </draw:frame>
      <draw:frame text:anchor-type="page" text:anchor-page-number="8" draw:z-index="940" draw:name="Shape3135" draw:style-name="gr1" draw:text-style-name="P2" svg:width="0.0398in" svg:height="0.1776in" svg:x="7.0165in" svg:y="0.9953in">
        <draw:text-box>
          <text:p><text:span text:style-name="T8"><text:s/></text:span></text:p>
        </draw:text-box>
      </draw:frame>
      <draw:frame text:anchor-type="page" text:anchor-page-number="10" draw:z-index="939" draw:name="Shape3523" draw:style-name="gr1" draw:text-style-name="P2" svg:width="0.0398in" svg:height="0.1776in" svg:x="7.0165in" svg:y="0.9953in">
        <draw:text-box>
          <text:p><text:span text:style-name="T8"><text:s/></text:span></text:p>
        </draw:text-box>
      </draw:frame>
      <draw:frame text:anchor-type="page" text:anchor-page-number="16" draw:z-index="938" draw:name="Shape5103" draw:style-name="gr1" draw:text-style-name="P2" svg:width="0.0398in" svg:height="0.1776in" svg:x="7.0165in" svg:y="0.9953in">
        <draw:text-box>
          <text:p><text:span text:style-name="T8"><text:s/></text:span></text:p>
        </draw:text-box>
      </draw:frame>
      <draw:frame text:anchor-type="page" text:anchor-page-number="9" draw:z-index="937" draw:name="Shape3291" draw:style-name="gr1" draw:text-style-name="P2" svg:width="0.0398in" svg:height="0.1776in" svg:x="7.0165in" svg:y="0.9953in">
        <draw:text-box>
          <text:p><text:span text:style-name="T8"><text:s/></text:span></text:p>
        </draw:text-box>
      </draw:frame>
      <draw:frame text:anchor-type="page" text:anchor-page-number="14" draw:z-index="936" draw:name="Shape4348" draw:style-name="gr1" draw:text-style-name="P2" svg:width="0.0398in" svg:height="0.1776in" svg:x="7.0165in" svg:y="0.9953in">
        <draw:text-box>
          <text:p><text:span text:style-name="T8"><text:s/></text:span></text:p>
        </draw:text-box>
      </draw:frame>
      <draw:frame text:anchor-type="page" text:anchor-page-number="6" draw:z-index="935" draw:name="Shape1787" draw:style-name="gr1" draw:text-style-name="P2" svg:width="0.0398in" svg:height="0.1776in" svg:x="7.0165in" svg:y="0.9953in">
        <draw:text-box>
          <text:p><text:span text:style-name="T8"><text:s/></text:span></text:p>
        </draw:text-box>
      </draw:frame>
      <draw:polygon text:anchor-type="page" text:anchor-page-number="1" draw:z-index="934" draw:name="Shape64" draw:style-name="gr2" draw:text-style-name="P3" svg:width="1.8799in" svg:height="0.1748in" svg:x="6.1165in" svg:y="1.4232in" svg:viewBox="0 0 4776 445" draw:points="0,0 4776,0 4776,445 0,445">
        <text:p/>
      </draw:polygon>
      <draw:frame text:anchor-type="page" text:anchor-page-number="15" draw:z-index="933" draw:name="Shape4943" draw:style-name="gr1" draw:text-style-name="P2" svg:width="0.0398in" svg:height="0.1776in" svg:x="7.0165in" svg:y="0.9953in">
        <draw:text-box>
          <text:p><text:span text:style-name="T8"><text:s/></text:span></text:p>
        </draw:text-box>
      </draw:frame>
      <draw:frame text:anchor-type="page" text:anchor-page-number="7" draw:z-index="932" draw:name="Shape2759" draw:style-name="gr1" draw:text-style-name="P2" svg:width="0.0398in" svg:height="0.1776in" svg:x="7.0165in" svg:y="0.9953in">
        <draw:text-box>
          <text:p><text:span text:style-name="T8"><text:s/></text:span></text:p>
        </draw:text-box>
      </draw:frame>
      <draw:frame text:anchor-type="page" text:anchor-page-number="12" draw:z-index="931" draw:name="Shape4010" draw:style-name="gr1" draw:text-style-name="P2" svg:width="0.0398in" svg:height="0.1776in" svg:x="7.0165in" svg:y="0.9953in">
        <draw:text-box>
          <text:p><text:span text:style-name="T8"><text:s/></text:span></text:p>
        </draw:text-box>
      </draw:frame>
      <draw:frame text:anchor-type="page" text:anchor-page-number="4" draw:z-index="930" draw:name="Shape1000" draw:style-name="gr1" draw:text-style-name="P2" svg:width="0.0398in" svg:height="0.1776in" svg:x="7.0165in" svg:y="0.9953in">
        <draw:text-box>
          <text:p><text:span text:style-name="T8"><text:s/></text:span></text:p>
        </draw:text-box>
      </draw:frame>
      <draw:frame text:anchor-type="page" text:anchor-page-number="11" draw:z-index="929" draw:name="Shape3792" draw:style-name="gr1" draw:text-style-name="P2" svg:width="0.0398in" svg:height="0.1776in" svg:x="7.0165in" svg:y="0.9953in">
        <draw:text-box>
          <text:p><text:span text:style-name="T8"><text:s/></text:span></text:p>
        </draw:text-box>
      </draw:frame>
      <draw:frame text:anchor-type="page" text:anchor-page-number="13" draw:z-index="928" draw:name="Shape4147" draw:style-name="gr1" draw:text-style-name="P2" svg:width="0.0398in" svg:height="0.1776in" svg:x="7.0165in" svg:y="0.9953in">
        <draw:text-box>
          <text:p><text:span text:style-name="T8"><text:s/></text:span></text:p>
        </draw:text-box>
      </draw:frame>
      <draw:polygon text:anchor-type="page" text:anchor-page-number="3" draw:z-index="927" draw:name="Shape717" draw:style-name="gr2" draw:text-style-name="P3" svg:width="5.6516in" svg:height="0.1748in" svg:x="0.4114in" svg:y="1.4232in" svg:viewBox="0 0 14356 445" draw:points="0,0 14356,0 14356,445 0,445">
        <text:p/>
      </draw:polygon>
      <draw:polygon text:anchor-type="page" text:anchor-page-number="11" draw:z-index="926" draw:name="Shape3810" draw:style-name="gr2" draw:text-style-name="P3" svg:width="5.6516in" svg:height="0.1748in" svg:x="0.4114in" svg:y="1.4232in" svg:viewBox="0 0 14356 445" draw:points="0,0 14356,0 14356,445 0,445">
        <text:p/>
      </draw:polygon>
      <draw:polygon text:anchor-type="page" text:anchor-page-number="9" draw:z-index="925" draw:name="Shape3309" draw:style-name="gr2" draw:text-style-name="P3" svg:width="5.6516in" svg:height="0.1748in" svg:x="0.4114in" svg:y="1.4232in" svg:viewBox="0 0 14356 445" draw:points="0,0 14356,0 14356,445 0,445">
        <text:p/>
      </draw:polygon>
      <draw:polygon text:anchor-type="page" text:anchor-page-number="14" draw:z-index="924" draw:name="Shape4366" draw:style-name="gr2" draw:text-style-name="P3" svg:width="5.6516in" svg:height="0.1748in" svg:x="0.4114in" svg:y="1.4232in" svg:viewBox="0 0 14356 445" draw:points="0,0 14356,0 14356,445 0,445">
        <text:p/>
      </draw:polygon>
      <draw:polygon text:anchor-type="page" text:anchor-page-number="7" draw:z-index="923" draw:name="Shape2777" draw:style-name="gr2" draw:text-style-name="P3" svg:width="5.6516in" svg:height="0.1748in" svg:x="0.4114in" svg:y="1.4232in" svg:viewBox="0 0 14356 445" draw:points="0,0 14356,0 14356,445 0,445">
        <text:p/>
      </draw:polygon>
      <draw:polygon text:anchor-type="page" text:anchor-page-number="15" draw:z-index="922" draw:name="Shape4961" draw:style-name="gr2" draw:text-style-name="P3" svg:width="5.6516in" svg:height="0.1748in" svg:x="0.4114in" svg:y="1.4232in" svg:viewBox="0 0 14356 445" draw:points="0,0 14356,0 14356,445 0,445">
        <text:p/>
      </draw:polygon>
      <draw:polygon text:anchor-type="page" text:anchor-page-number="8" draw:z-index="921" draw:name="Shape3153" draw:style-name="gr2" draw:text-style-name="P3" svg:width="5.6516in" svg:height="0.1748in" svg:x="0.4114in" svg:y="1.4232in" svg:viewBox="0 0 14356 445" draw:points="0,0 14356,0 14356,445 0,445">
        <text:p/>
      </draw:polygon>
      <draw:polygon text:anchor-type="page" text:anchor-page-number="2" draw:z-index="920" draw:name="Shape392" draw:style-name="gr2" draw:text-style-name="P3" svg:width="5.6516in" svg:height="0.1748in" svg:x="0.4114in" svg:y="1.4232in" svg:viewBox="0 0 14356 445" draw:points="0,0 14356,0 14356,445 0,445">
        <text:p/>
      </draw:polygon>
      <draw:polygon text:anchor-type="page" text:anchor-page-number="16" draw:z-index="919" draw:name="Shape5121" draw:style-name="gr2" draw:text-style-name="P3" svg:width="5.6516in" svg:height="0.1748in" svg:x="0.4114in" svg:y="1.4232in" svg:viewBox="0 0 14356 445" draw:points="0,0 14356,0 14356,445 0,445">
        <text:p/>
      </draw:polygon>
      <draw:polygon text:anchor-type="page" text:anchor-page-number="5" draw:z-index="918" draw:name="Shape1161" draw:style-name="gr2" draw:text-style-name="P3" svg:width="5.6516in" svg:height="0.1748in" svg:x="0.4114in" svg:y="1.4232in" svg:viewBox="0 0 14356 445" draw:points="0,0 14356,0 14356,445 0,445">
        <text:p/>
      </draw:polygon>
      <draw:polygon text:anchor-type="page" text:anchor-page-number="4" draw:z-index="917" draw:name="Shape1018" draw:style-name="gr2" draw:text-style-name="P3" svg:width="5.6516in" svg:height="0.1748in" svg:x="0.4114in" svg:y="1.4232in" svg:viewBox="0 0 14356 445" draw:points="0,0 14356,0 14356,445 0,445">
        <text:p/>
      </draw:polygon>
      <draw:polygon text:anchor-type="page" text:anchor-page-number="10" draw:z-index="916" draw:name="Shape3541" draw:style-name="gr2" draw:text-style-name="P3" svg:width="5.6516in" svg:height="0.1748in" svg:x="0.4114in" svg:y="1.4232in" svg:viewBox="0 0 14356 445" draw:points="0,0 14356,0 14356,445 0,445">
        <text:p/>
      </draw:polygon>
      <draw:polygon text:anchor-type="page" text:anchor-page-number="6" draw:z-index="915" draw:name="Shape1805" draw:style-name="gr2" draw:text-style-name="P3" svg:width="5.6516in" svg:height="0.1748in" svg:x="0.4114in" svg:y="1.4232in" svg:viewBox="0 0 14356 445" draw:points="0,0 14356,0 14356,445 0,445">
        <text:p/>
      </draw:polygon>
      <draw:polygon text:anchor-type="page" text:anchor-page-number="13" draw:z-index="914" draw:name="Shape4165" draw:style-name="gr2" draw:text-style-name="P3" svg:width="5.6516in" svg:height="0.1748in" svg:x="0.4114in" svg:y="1.4232in" svg:viewBox="0 0 14356 445" draw:points="0,0 14356,0 14356,445 0,445">
        <text:p/>
      </draw:polygon>
      <draw:polygon text:anchor-type="page" text:anchor-page-number="12" draw:z-index="913" draw:name="Shape4028" draw:style-name="gr2" draw:text-style-name="P3" svg:width="5.6516in" svg:height="0.1748in" svg:x="0.4114in" svg:y="1.4232in" svg:viewBox="0 0 14356 445" draw:points="0,0 14356,0 14356,445 0,445">
        <text:p/>
      </draw:polygon>
      <draw:frame text:anchor-type="page" text:anchor-page-number="1" draw:z-index="912" draw:name="Shape41" draw:style-name="gr1" draw:text-style-name="P2" svg:width="0.0398in" svg:height="0.1776in" svg:x="7.0165in" svg:y="0.9953in">
        <draw:text-box>
          <text:p><text:span text:style-name="T8"><text:s/></text:span></text:p>
        </draw:text-box>
      </draw:frame>
      <draw:polygon text:anchor-type="page" text:anchor-page-number="4" draw:z-index="911" draw:name="Shape1014" draw:style-name="gr2" draw:text-style-name="P3" svg:width="5.7398in" svg:height="0.1748in" svg:x="0.3665in" svg:y="1.4232in" svg:viewBox="0 0 14580 445" draw:points="0,0 14580,0 14580,445 0,445">
        <text:p/>
      </draw:polygon>
      <draw:polygon text:anchor-type="page" text:anchor-page-number="6" draw:z-index="910" draw:name="Shape1801" draw:style-name="gr2" draw:text-style-name="P3" svg:width="5.7398in" svg:height="0.1748in" svg:x="0.3665in" svg:y="1.4232in" svg:viewBox="0 0 14580 445" draw:points="0,0 14580,0 14580,445 0,445">
        <text:p/>
      </draw:polygon>
      <draw:polygon text:anchor-type="page" text:anchor-page-number="11" draw:z-index="909" draw:name="Shape3806" draw:style-name="gr2" draw:text-style-name="P3" svg:width="5.7398in" svg:height="0.1748in" svg:x="0.3665in" svg:y="1.4232in" svg:viewBox="0 0 14580 445" draw:points="0,0 14580,0 14580,445 0,445">
        <text:p/>
      </draw:polygon>
      <draw:polygon text:anchor-type="page" text:anchor-page-number="13" draw:z-index="908" draw:name="Shape4161" draw:style-name="gr2" draw:text-style-name="P3" svg:width="5.7398in" svg:height="0.1748in" svg:x="0.3665in" svg:y="1.4232in" svg:viewBox="0 0 14580 445" draw:points="0,0 14580,0 14580,445 0,445">
        <text:p/>
      </draw:polygon>
      <draw:polygon text:anchor-type="page" text:anchor-page-number="1" draw:z-index="907" draw:name="Shape61" draw:style-name="gr2" draw:text-style-name="P3" svg:width="5.6516in" svg:height="0.1748in" svg:x="0.4114in" svg:y="1.4232in" svg:viewBox="0 0 14356 445" draw:points="0,0 14356,0 14356,445 0,445">
        <text:p/>
      </draw:polygon>
      <draw:polygon text:anchor-type="page" text:anchor-page-number="2" draw:z-index="906" draw:name="Shape388" draw:style-name="gr2" draw:text-style-name="P3" svg:width="5.7398in" svg:height="0.1748in" svg:x="0.3665in" svg:y="1.4232in" svg:viewBox="0 0 14580 445" draw:points="0,0 14580,0 14580,445 0,445">
        <text:p/>
      </draw:polygon>
      <draw:polygon text:anchor-type="page" text:anchor-page-number="16" draw:z-index="905" draw:name="Shape5117" draw:style-name="gr2" draw:text-style-name="P3" svg:width="5.7398in" svg:height="0.1748in" svg:x="0.3665in" svg:y="1.4232in" svg:viewBox="0 0 14580 445" draw:points="0,0 14580,0 14580,445 0,445">
        <text:p/>
      </draw:polygon>
      <draw:polygon text:anchor-type="page" text:anchor-page-number="8" draw:z-index="904" draw:name="Shape3149" draw:style-name="gr2" draw:text-style-name="P3" svg:width="5.7398in" svg:height="0.1748in" svg:x="0.3665in" svg:y="1.4232in" svg:viewBox="0 0 14580 445" draw:points="0,0 14580,0 14580,445 0,445">
        <text:p/>
      </draw:polygon>
      <draw:polygon text:anchor-type="page" text:anchor-page-number="14" draw:z-index="903" draw:name="Shape4362" draw:style-name="gr2" draw:text-style-name="P3" svg:width="5.7398in" svg:height="0.1748in" svg:x="0.3665in" svg:y="1.4232in" svg:viewBox="0 0 14580 445" draw:points="0,0 14580,0 14580,445 0,445">
        <text:p/>
      </draw:polygon>
      <draw:polygon text:anchor-type="page" text:anchor-page-number="5" draw:z-index="902" draw:name="Shape1157" draw:style-name="gr2" draw:text-style-name="P3" svg:width="5.7398in" svg:height="0.1748in" svg:x="0.3665in" svg:y="1.4232in" svg:viewBox="0 0 14580 445" draw:points="0,0 14580,0 14580,445 0,445">
        <text:p/>
      </draw:polygon>
      <draw:polygon text:anchor-type="page" text:anchor-page-number="15" draw:z-index="901" draw:name="Shape4957" draw:style-name="gr2" draw:text-style-name="P3" svg:width="5.7398in" svg:height="0.1748in" svg:x="0.3665in" svg:y="1.4232in" svg:viewBox="0 0 14580 445" draw:points="0,0 14580,0 14580,445 0,445">
        <text:p/>
      </draw:polygon>
      <draw:polygon text:anchor-type="page" text:anchor-page-number="3" draw:z-index="900" draw:name="Shape713" draw:style-name="gr2" draw:text-style-name="P3" svg:width="5.7398in" svg:height="0.1748in" svg:x="0.3665in" svg:y="1.4232in" svg:viewBox="0 0 14580 445" draw:points="0,0 14580,0 14580,445 0,445">
        <text:p/>
      </draw:polygon>
      <draw:polygon text:anchor-type="page" text:anchor-page-number="10" draw:z-index="899" draw:name="Shape3537" draw:style-name="gr2" draw:text-style-name="P3" svg:width="5.7398in" svg:height="0.1748in" svg:x="0.3665in" svg:y="1.4232in" svg:viewBox="0 0 14580 445" draw:points="0,0 14580,0 14580,445 0,445">
        <text:p/>
      </draw:polygon>
      <draw:polygon text:anchor-type="page" text:anchor-page-number="7" draw:z-index="898" draw:name="Shape2773" draw:style-name="gr2" draw:text-style-name="P3" svg:width="5.7398in" svg:height="0.1748in" svg:x="0.3665in" svg:y="1.4232in" svg:viewBox="0 0 14580 445" draw:points="0,0 14580,0 14580,445 0,445">
        <text:p/>
      </draw:polygon>
      <draw:polygon text:anchor-type="page" text:anchor-page-number="9" draw:z-index="897" draw:name="Shape3305" draw:style-name="gr2" draw:text-style-name="P3" svg:width="5.7398in" svg:height="0.1748in" svg:x="0.3665in" svg:y="1.4232in" svg:viewBox="0 0 14580 445" draw:points="0,0 14580,0 14580,445 0,445">
        <text:p/>
      </draw:polygon>
      <draw:polygon text:anchor-type="page" text:anchor-page-number="12" draw:z-index="896" draw:name="Shape4024" draw:style-name="gr2" draw:text-style-name="P3" svg:width="5.7398in" svg:height="0.1748in" svg:x="0.3665in" svg:y="1.4232in" svg:viewBox="0 0 14580 445" draw:points="0,0 14580,0 14580,445 0,445">
        <text:p/>
      </draw:polygon>
      <draw:polygon text:anchor-type="page" text:anchor-page-number="4" draw:z-index="895" draw:name="Shape1011" draw:style-name="gr3" draw:text-style-name="P4" svg:width="0.0098in" svg:height="0.3685in" svg:x="7.9965in" svg:y="1.0547in" svg:viewBox="0 0 26 937" draw:points="0,0 26,0 26,937 0,937">
        <text:p/>
      </draw:polygon>
      <draw:polygon text:anchor-type="page" text:anchor-page-number="1" draw:z-index="894" draw:name="Shape57" draw:style-name="gr2" draw:text-style-name="P3" svg:width="5.7398in" svg:height="0.1748in" svg:x="0.3665in" svg:y="1.4232in" svg:viewBox="0 0 14580 445" draw:points="0,0 14580,0 14580,445 0,445">
        <text:p/>
      </draw:polygon>
      <draw:polygon text:anchor-type="page" text:anchor-page-number="16" draw:z-index="893" draw:name="Shape5114" draw:style-name="gr3" draw:text-style-name="P4" svg:width="0.0098in" svg:height="0.3685in" svg:x="7.9965in" svg:y="1.0547in" svg:viewBox="0 0 26 937" draw:points="0,0 26,0 26,937 0,937">
        <text:p/>
      </draw:polygon>
      <draw:polygon text:anchor-type="page" text:anchor-page-number="6" draw:z-index="892" draw:name="Shape1798" draw:style-name="gr3" draw:text-style-name="P4" svg:width="0.0098in" svg:height="0.3685in" svg:x="7.9965in" svg:y="1.0547in" svg:viewBox="0 0 26 937" draw:points="0,0 26,0 26,937 0,937">
        <text:p/>
      </draw:polygon>
      <draw:polygon text:anchor-type="page" text:anchor-page-number="12" draw:z-index="891" draw:name="Shape4021" draw:style-name="gr3" draw:text-style-name="P4" svg:width="0.0098in" svg:height="0.3685in" svg:x="7.9965in" svg:y="1.0547in" svg:viewBox="0 0 26 937" draw:points="0,0 26,0 26,937 0,937">
        <text:p/>
      </draw:polygon>
      <draw:polygon text:anchor-type="page" text:anchor-page-number="8" draw:z-index="890" draw:name="Shape3146" draw:style-name="gr3" draw:text-style-name="P4" svg:width="0.0098in" svg:height="0.3685in" svg:x="7.9965in" svg:y="1.0547in" svg:viewBox="0 0 26 937" draw:points="0,0 26,0 26,937 0,937">
        <text:p/>
      </draw:polygon>
      <draw:polygon text:anchor-type="page" text:anchor-page-number="3" draw:z-index="889" draw:name="Shape710" draw:style-name="gr3" draw:text-style-name="P4" svg:width="0.0098in" svg:height="0.3685in" svg:x="7.9965in" svg:y="1.0547in" svg:viewBox="0 0 26 937" draw:points="0,0 26,0 26,937 0,937">
        <text:p/>
      </draw:polygon>
      <draw:polygon text:anchor-type="page" text:anchor-page-number="15" draw:z-index="888" draw:name="Shape4954" draw:style-name="gr3" draw:text-style-name="P4" svg:width="0.0098in" svg:height="0.3685in" svg:x="7.9965in" svg:y="1.0547in" svg:viewBox="0 0 26 937" draw:points="0,0 26,0 26,937 0,937">
        <text:p/>
      </draw:polygon>
      <draw:polygon text:anchor-type="page" text:anchor-page-number="13" draw:z-index="887" draw:name="Shape4158" draw:style-name="gr3" draw:text-style-name="P4" svg:width="0.0098in" svg:height="0.3685in" svg:x="7.9965in" svg:y="1.0547in" svg:viewBox="0 0 26 937" draw:points="0,0 26,0 26,937 0,937">
        <text:p/>
      </draw:polygon>
      <draw:polygon text:anchor-type="page" text:anchor-page-number="5" draw:z-index="886" draw:name="Shape1154" draw:style-name="gr3" draw:text-style-name="P4" svg:width="0.0098in" svg:height="0.3685in" svg:x="7.9965in" svg:y="1.0547in" svg:viewBox="0 0 26 937" draw:points="0,0 26,0 26,937 0,937">
        <text:p/>
      </draw:polygon>
      <draw:polygon text:anchor-type="page" text:anchor-page-number="7" draw:z-index="885" draw:name="Shape2770" draw:style-name="gr3" draw:text-style-name="P4" svg:width="0.0098in" svg:height="0.3685in" svg:x="7.9965in" svg:y="1.0547in" svg:viewBox="0 0 26 937" draw:points="0,0 26,0 26,937 0,937">
        <text:p/>
      </draw:polygon>
      <draw:polygon text:anchor-type="page" text:anchor-page-number="11" draw:z-index="884" draw:name="Shape3803" draw:style-name="gr3" draw:text-style-name="P4" svg:width="0.0098in" svg:height="0.3685in" svg:x="7.9965in" svg:y="1.0547in" svg:viewBox="0 0 26 937" draw:points="0,0 26,0 26,937 0,937">
        <text:p/>
      </draw:polygon>
      <draw:polygon text:anchor-type="page" text:anchor-page-number="2" draw:z-index="883" draw:name="Shape385" draw:style-name="gr3" draw:text-style-name="P4" svg:width="0.0098in" svg:height="0.3685in" svg:x="7.9965in" svg:y="1.0547in" svg:viewBox="0 0 26 937" draw:points="0,0 26,0 26,937 0,937">
        <text:p/>
      </draw:polygon>
      <draw:polygon text:anchor-type="page" text:anchor-page-number="10" draw:z-index="882" draw:name="Shape3534" draw:style-name="gr3" draw:text-style-name="P4" svg:width="0.0098in" svg:height="0.3685in" svg:x="7.9965in" svg:y="1.0547in" svg:viewBox="0 0 26 937" draw:points="0,0 26,0 26,937 0,937">
        <text:p/>
      </draw:polygon>
      <draw:polygon text:anchor-type="page" text:anchor-page-number="14" draw:z-index="881" draw:name="Shape4359" draw:style-name="gr3" draw:text-style-name="P4" svg:width="0.0098in" svg:height="0.3685in" svg:x="7.9965in" svg:y="1.0547in" svg:viewBox="0 0 26 937" draw:points="0,0 26,0 26,937 0,937">
        <text:p/>
      </draw:polygon>
      <draw:polygon text:anchor-type="page" text:anchor-page-number="9" draw:z-index="880" draw:name="Shape3302" draw:style-name="gr3" draw:text-style-name="P4" svg:width="0.0098in" svg:height="0.3685in" svg:x="7.9965in" svg:y="1.0547in" svg:viewBox="0 0 26 937" draw:points="0,0 26,0 26,937 0,937">
        <text:p/>
      </draw:polygon>
      <draw:polygon text:anchor-type="page" text:anchor-page-number="7" draw:z-index="879" draw:name="Shape2767" draw:style-name="gr3" draw:text-style-name="P4" svg:width="0.0102in" svg:height="0.3685in" svg:x="6.1063in" svg:y="1.0547in" svg:viewBox="0 0 27 937" draw:points="0,0 27,0 27,937 0,937">
        <text:p/>
      </draw:polygon>
      <draw:polygon text:anchor-type="page" text:anchor-page-number="5" draw:z-index="878" draw:name="Shape1151" draw:style-name="gr3" draw:text-style-name="P4" svg:width="0.0102in" svg:height="0.3685in" svg:x="6.1063in" svg:y="1.0547in" svg:viewBox="0 0 27 937" draw:points="0,0 27,0 27,937 0,937">
        <text:p/>
      </draw:polygon>
      <draw:polygon text:anchor-type="page" text:anchor-page-number="12" draw:z-index="877" draw:name="Shape4018" draw:style-name="gr3" draw:text-style-name="P4" svg:width="0.0102in" svg:height="0.3685in" svg:x="6.1063in" svg:y="1.0547in" svg:viewBox="0 0 27 937" draw:points="0,0 27,0 27,937 0,937">
        <text:p/>
      </draw:polygon>
      <draw:polygon text:anchor-type="page" text:anchor-page-number="16" draw:z-index="876" draw:name="Shape5111" draw:style-name="gr3" draw:text-style-name="P4" svg:width="0.0102in" svg:height="0.3685in" svg:x="6.1063in" svg:y="1.0547in" svg:viewBox="0 0 27 937" draw:points="0,0 27,0 27,937 0,937">
        <text:p/>
      </draw:polygon>
      <draw:polygon text:anchor-type="page" text:anchor-page-number="10" draw:z-index="875" draw:name="Shape3531" draw:style-name="gr3" draw:text-style-name="P4" svg:width="0.0102in" svg:height="0.3685in" svg:x="6.1063in" svg:y="1.0547in" svg:viewBox="0 0 27 937" draw:points="0,0 27,0 27,937 0,937">
        <text:p/>
      </draw:polygon>
      <draw:polygon text:anchor-type="page" text:anchor-page-number="9" draw:z-index="874" draw:name="Shape3299" draw:style-name="gr3" draw:text-style-name="P4" svg:width="0.0102in" svg:height="0.3685in" svg:x="6.1063in" svg:y="1.0547in" svg:viewBox="0 0 27 937" draw:points="0,0 27,0 27,937 0,937">
        <text:p/>
      </draw:polygon>
      <draw:polygon text:anchor-type="page" text:anchor-page-number="11" draw:z-index="873" draw:name="Shape3800" draw:style-name="gr3" draw:text-style-name="P4" svg:width="0.0102in" svg:height="0.3685in" svg:x="6.1063in" svg:y="1.0547in" svg:viewBox="0 0 27 937" draw:points="0,0 27,0 27,937 0,937">
        <text:p/>
      </draw:polygon>
      <draw:polygon text:anchor-type="page" text:anchor-page-number="14" draw:z-index="872" draw:name="Shape4356" draw:style-name="gr3" draw:text-style-name="P4" svg:width="0.0102in" svg:height="0.3685in" svg:x="6.1063in" svg:y="1.0547in" svg:viewBox="0 0 27 937" draw:points="0,0 27,0 27,937 0,937">
        <text:p/>
      </draw:polygon>
      <draw:polygon text:anchor-type="page" text:anchor-page-number="4" draw:z-index="871" draw:name="Shape1008" draw:style-name="gr3" draw:text-style-name="P4" svg:width="0.0102in" svg:height="0.3685in" svg:x="6.1063in" svg:y="1.0547in" svg:viewBox="0 0 27 937" draw:points="0,0 27,0 27,937 0,937">
        <text:p/>
      </draw:polygon>
      <draw:polygon text:anchor-type="page" text:anchor-page-number="13" draw:z-index="870" draw:name="Shape4155" draw:style-name="gr3" draw:text-style-name="P4" svg:width="0.0102in" svg:height="0.3685in" svg:x="6.1063in" svg:y="1.0547in" svg:viewBox="0 0 27 937" draw:points="0,0 27,0 27,937 0,937">
        <text:p/>
      </draw:polygon>
      <draw:polygon text:anchor-type="page" text:anchor-page-number="1" draw:z-index="869" draw:name="Shape54" draw:style-name="gr3" draw:text-style-name="P4" svg:width="0.0098in" svg:height="0.3685in" svg:x="7.9965in" svg:y="1.0547in" svg:viewBox="0 0 26 937" draw:points="0,0 26,0 26,937 0,937">
        <text:p/>
      </draw:polygon>
      <draw:polygon text:anchor-type="page" text:anchor-page-number="15" draw:z-index="868" draw:name="Shape4951" draw:style-name="gr3" draw:text-style-name="P4" svg:width="0.0102in" svg:height="0.3685in" svg:x="6.1063in" svg:y="1.0547in" svg:viewBox="0 0 27 937" draw:points="0,0 27,0 27,937 0,937">
        <text:p/>
      </draw:polygon>
      <draw:polygon text:anchor-type="page" text:anchor-page-number="8" draw:z-index="867" draw:name="Shape3143" draw:style-name="gr3" draw:text-style-name="P4" svg:width="0.0102in" svg:height="0.3685in" svg:x="6.1063in" svg:y="1.0547in" svg:viewBox="0 0 27 937" draw:points="0,0 27,0 27,937 0,937">
        <text:p/>
      </draw:polygon>
      <draw:polygon text:anchor-type="page" text:anchor-page-number="3" draw:z-index="866" draw:name="Shape707" draw:style-name="gr3" draw:text-style-name="P4" svg:width="0.0102in" svg:height="0.3685in" svg:x="6.1063in" svg:y="1.0547in" svg:viewBox="0 0 27 937" draw:points="0,0 27,0 27,937 0,937">
        <text:p/>
      </draw:polygon>
      <draw:polygon text:anchor-type="page" text:anchor-page-number="6" draw:z-index="865" draw:name="Shape1795" draw:style-name="gr3" draw:text-style-name="P4" svg:width="0.0102in" svg:height="0.3685in" svg:x="6.1063in" svg:y="1.0547in" svg:viewBox="0 0 27 937" draw:points="0,0 27,0 27,937 0,937">
        <text:p/>
      </draw:polygon>
      <draw:polygon text:anchor-type="page" text:anchor-page-number="2" draw:z-index="864" draw:name="Shape382" draw:style-name="gr3" draw:text-style-name="P4" svg:width="0.0102in" svg:height="0.3685in" svg:x="6.1063in" svg:y="1.0547in" svg:viewBox="0 0 27 937" draw:points="0,0 27,0 27,937 0,937">
        <text:p/>
      </draw:polygon>
      <draw:polygon text:anchor-type="page" text:anchor-page-number="4" draw:z-index="863" draw:name="Shape1002" draw:style-name="gr3" draw:text-style-name="P4" svg:width="0.0098in" svg:height="0.3685in" svg:x="0.3583in" svg:y="1.0547in" svg:viewBox="0 0 26 937" draw:points="0,0 26,0 26,937 0,937">
        <text:p/>
      </draw:polygon>
      <draw:polygon text:anchor-type="page" text:anchor-page-number="9" draw:z-index="862" draw:name="Shape3293" draw:style-name="gr3" draw:text-style-name="P4" svg:width="0.0098in" svg:height="0.3685in" svg:x="0.3583in" svg:y="1.0547in" svg:viewBox="0 0 26 937" draw:points="0,0 26,0 26,937 0,937">
        <text:p/>
      </draw:polygon>
      <draw:polygon text:anchor-type="page" text:anchor-page-number="15" draw:z-index="861" draw:name="Shape4945" draw:style-name="gr3" draw:text-style-name="P4" svg:width="0.0098in" svg:height="0.3685in" svg:x="0.3583in" svg:y="1.0547in" svg:viewBox="0 0 26 937" draw:points="0,0 26,0 26,937 0,937">
        <text:p/>
      </draw:polygon>
      <draw:polygon text:anchor-type="page" text:anchor-page-number="14" draw:z-index="860" draw:name="Shape4350" draw:style-name="gr3" draw:text-style-name="P4" svg:width="0.0098in" svg:height="0.3685in" svg:x="0.3583in" svg:y="1.0547in" svg:viewBox="0 0 26 937" draw:points="0,0 26,0 26,937 0,937">
        <text:p/>
      </draw:polygon>
      <draw:polygon text:anchor-type="page" text:anchor-page-number="5" draw:z-index="859" draw:name="Shape1145" draw:style-name="gr3" draw:text-style-name="P4" svg:width="0.0098in" svg:height="0.3685in" svg:x="0.3583in" svg:y="1.0547in" svg:viewBox="0 0 26 937" draw:points="0,0 26,0 26,937 0,937">
        <text:p/>
      </draw:polygon>
      <draw:polygon text:anchor-type="page" text:anchor-page-number="13" draw:z-index="858" draw:name="Shape4149" draw:style-name="gr3" draw:text-style-name="P4" svg:width="0.0098in" svg:height="0.3685in" svg:x="0.3583in" svg:y="1.0547in" svg:viewBox="0 0 26 937" draw:points="0,0 26,0 26,937 0,937">
        <text:p/>
      </draw:polygon>
      <draw:polygon text:anchor-type="page" text:anchor-page-number="11" draw:z-index="857" draw:name="Shape3794" draw:style-name="gr3" draw:text-style-name="P4" svg:width="0.0098in" svg:height="0.3685in" svg:x="0.3583in" svg:y="1.0547in" svg:viewBox="0 0 26 937" draw:points="0,0 26,0 26,937 0,937">
        <text:p/>
      </draw:polygon>
      <draw:polygon text:anchor-type="page" text:anchor-page-number="10" draw:z-index="856" draw:name="Shape3525" draw:style-name="gr3" draw:text-style-name="P4" svg:width="0.0098in" svg:height="0.3685in" svg:x="0.3583in" svg:y="1.0547in" svg:viewBox="0 0 26 937" draw:points="0,0 26,0 26,937 0,937">
        <text:p/>
      </draw:polygon>
      <draw:polygon text:anchor-type="page" text:anchor-page-number="1" draw:z-index="855" draw:name="Shape49" draw:style-name="gr3" draw:text-style-name="P4" svg:width="0.0102in" svg:height="0.3685in" svg:x="6.1063in" svg:y="1.0547in" svg:viewBox="0 0 27 937" draw:points="0,0 27,0 27,937 0,937">
        <text:p/>
      </draw:polygon>
      <draw:polygon text:anchor-type="page" text:anchor-page-number="6" draw:z-index="854" draw:name="Shape1789" draw:style-name="gr3" draw:text-style-name="P4" svg:width="0.0098in" svg:height="0.3685in" svg:x="0.3583in" svg:y="1.0547in" svg:viewBox="0 0 26 937" draw:points="0,0 26,0 26,937 0,937">
        <text:p/>
      </draw:polygon>
      <draw:polygon text:anchor-type="page" text:anchor-page-number="3" draw:z-index="853" draw:name="Shape701" draw:style-name="gr3" draw:text-style-name="P4" svg:width="0.0098in" svg:height="0.3685in" svg:x="0.3583in" svg:y="1.0547in" svg:viewBox="0 0 26 937" draw:points="0,0 26,0 26,937 0,937">
        <text:p/>
      </draw:polygon>
      <draw:polygon text:anchor-type="page" text:anchor-page-number="8" draw:z-index="852" draw:name="Shape3137" draw:style-name="gr3" draw:text-style-name="P4" svg:width="0.0098in" svg:height="0.3685in" svg:x="0.3583in" svg:y="1.0547in" svg:viewBox="0 0 26 937" draw:points="0,0 26,0 26,937 0,937">
        <text:p/>
      </draw:polygon>
      <draw:polygon text:anchor-type="page" text:anchor-page-number="7" draw:z-index="851" draw:name="Shape2761" draw:style-name="gr3" draw:text-style-name="P4" svg:width="0.0098in" svg:height="0.3685in" svg:x="0.3583in" svg:y="1.0547in" svg:viewBox="0 0 26 937" draw:points="0,0 26,0 26,937 0,937">
        <text:p/>
      </draw:polygon>
      <draw:polygon text:anchor-type="page" text:anchor-page-number="12" draw:z-index="850" draw:name="Shape4012" draw:style-name="gr3" draw:text-style-name="P4" svg:width="0.0098in" svg:height="0.3685in" svg:x="0.3583in" svg:y="1.0547in" svg:viewBox="0 0 26 937" draw:points="0,0 26,0 26,937 0,937">
        <text:p/>
      </draw:polygon>
      <draw:polygon text:anchor-type="page" text:anchor-page-number="16" draw:z-index="849" draw:name="Shape5105" draw:style-name="gr3" draw:text-style-name="P4" svg:width="0.0098in" svg:height="0.3685in" svg:x="0.3583in" svg:y="1.0547in" svg:viewBox="0 0 26 937" draw:points="0,0 26,0 26,937 0,937">
        <text:p/>
      </draw:polygon>
      <draw:polygon text:anchor-type="page" text:anchor-page-number="2" draw:z-index="848" draw:name="Shape376" draw:style-name="gr3" draw:text-style-name="P4" svg:width="0.0098in" svg:height="0.3685in" svg:x="0.3583in" svg:y="1.0547in" svg:viewBox="0 0 26 937" draw:points="0,0 26,0 26,937 0,937">
        <text:p/>
      </draw:polygon>
      <draw:polygon text:anchor-type="page" text:anchor-page-number="12" draw:z-index="847" draw:name="Shape4020" draw:style-name="gr3" draw:text-style-name="P4" svg:width="0.0098in" svg:height="0.0098in" svg:x="7.9965in" svg:y="1.0449in" svg:viewBox="0 0 26 26" draw:points="0,0 26,0 26,26 0,26">
        <text:p/>
      </draw:polygon>
      <draw:polygon text:anchor-type="page" text:anchor-page-number="5" draw:z-index="846" draw:name="Shape1153" draw:style-name="gr3" draw:text-style-name="P4" svg:width="0.0098in" svg:height="0.0098in" svg:x="7.9965in" svg:y="1.0449in" svg:viewBox="0 0 26 26" draw:points="0,0 26,0 26,26 0,26">
        <text:p/>
      </draw:polygon>
      <draw:polygon text:anchor-type="page" text:anchor-page-number="2" draw:z-index="845" draw:name="Shape384" draw:style-name="gr3" draw:text-style-name="P4" svg:width="0.0098in" svg:height="0.0098in" svg:x="7.9965in" svg:y="1.0449in" svg:viewBox="0 0 26 26" draw:points="0,0 26,0 26,26 0,26">
        <text:p/>
      </draw:polygon>
      <draw:polygon text:anchor-type="page" text:anchor-page-number="6" draw:z-index="844" draw:name="Shape1797" draw:style-name="gr3" draw:text-style-name="P4" svg:width="0.0098in" svg:height="0.0098in" svg:x="7.9965in" svg:y="1.0449in" svg:viewBox="0 0 26 26" draw:points="0,0 26,0 26,26 0,26">
        <text:p/>
      </draw:polygon>
      <draw:polygon text:anchor-type="page" text:anchor-page-number="7" draw:z-index="843" draw:name="Shape2769" draw:style-name="gr3" draw:text-style-name="P4" svg:width="0.0098in" svg:height="0.0098in" svg:x="7.9965in" svg:y="1.0449in" svg:viewBox="0 0 26 26" draw:points="0,0 26,0 26,26 0,26">
        <text:p/>
      </draw:polygon>
      <draw:polygon text:anchor-type="page" text:anchor-page-number="10" draw:z-index="842" draw:name="Shape3533" draw:style-name="gr3" draw:text-style-name="P4" svg:width="0.0098in" svg:height="0.0098in" svg:x="7.9965in" svg:y="1.0449in" svg:viewBox="0 0 26 26" draw:points="0,0 26,0 26,26 0,26">
        <text:p/>
      </draw:polygon>
      <draw:polygon text:anchor-type="page" text:anchor-page-number="9" draw:z-index="841" draw:name="Shape3301" draw:style-name="gr3" draw:text-style-name="P4" svg:width="0.0098in" svg:height="0.0098in" svg:x="7.9965in" svg:y="1.0449in" svg:viewBox="0 0 26 26" draw:points="0,0 26,0 26,26 0,26">
        <text:p/>
      </draw:polygon>
      <draw:polygon text:anchor-type="page" text:anchor-page-number="11" draw:z-index="840" draw:name="Shape3802" draw:style-name="gr3" draw:text-style-name="P4" svg:width="0.0098in" svg:height="0.0098in" svg:x="7.9965in" svg:y="1.0449in" svg:viewBox="0 0 26 26" draw:points="0,0 26,0 26,26 0,26">
        <text:p/>
      </draw:polygon>
      <draw:polygon text:anchor-type="page" text:anchor-page-number="15" draw:z-index="839" draw:name="Shape4953" draw:style-name="gr3" draw:text-style-name="P4" svg:width="0.0098in" svg:height="0.0098in" svg:x="7.9965in" svg:y="1.0449in" svg:viewBox="0 0 26 26" draw:points="0,0 26,0 26,26 0,26">
        <text:p/>
      </draw:polygon>
      <draw:polygon text:anchor-type="page" text:anchor-page-number="13" draw:z-index="838" draw:name="Shape4157" draw:style-name="gr3" draw:text-style-name="P4" svg:width="0.0098in" svg:height="0.0098in" svg:x="7.9965in" svg:y="1.0449in" svg:viewBox="0 0 26 26" draw:points="0,0 26,0 26,26 0,26">
        <text:p/>
      </draw:polygon>
      <draw:polygon text:anchor-type="page" text:anchor-page-number="3" draw:z-index="837" draw:name="Shape709" draw:style-name="gr3" draw:text-style-name="P4" svg:width="0.0098in" svg:height="0.0098in" svg:x="7.9965in" svg:y="1.0449in" svg:viewBox="0 0 26 26" draw:points="0,0 26,0 26,26 0,26">
        <text:p/>
      </draw:polygon>
      <draw:polygon text:anchor-type="page" text:anchor-page-number="16" draw:z-index="836" draw:name="Shape5113" draw:style-name="gr3" draw:text-style-name="P4" svg:width="0.0098in" svg:height="0.0098in" svg:x="7.9965in" svg:y="1.0449in" svg:viewBox="0 0 26 26" draw:points="0,0 26,0 26,26 0,26">
        <text:p/>
      </draw:polygon>
      <draw:polygon text:anchor-type="page" text:anchor-page-number="4" draw:z-index="835" draw:name="Shape1010" draw:style-name="gr3" draw:text-style-name="P4" svg:width="0.0098in" svg:height="0.0098in" svg:x="7.9965in" svg:y="1.0449in" svg:viewBox="0 0 26 26" draw:points="0,0 26,0 26,26 0,26">
        <text:p/>
      </draw:polygon>
      <draw:polygon text:anchor-type="page" text:anchor-page-number="14" draw:z-index="834" draw:name="Shape4358" draw:style-name="gr3" draw:text-style-name="P4" svg:width="0.0098in" svg:height="0.0098in" svg:x="7.9965in" svg:y="1.0449in" svg:viewBox="0 0 26 26" draw:points="0,0 26,0 26,26 0,26">
        <text:p/>
      </draw:polygon>
      <draw:polygon text:anchor-type="page" text:anchor-page-number="8" draw:z-index="833" draw:name="Shape3145" draw:style-name="gr3" draw:text-style-name="P4" svg:width="0.0098in" svg:height="0.0098in" svg:x="7.9965in" svg:y="1.0449in" svg:viewBox="0 0 26 26" draw:points="0,0 26,0 26,26 0,26">
        <text:p/>
      </draw:polygon>
      <draw:polygon text:anchor-type="page" text:anchor-page-number="1" draw:z-index="832" draw:name="Shape43" draw:style-name="gr3" draw:text-style-name="P4" svg:width="0.0098in" svg:height="0.3685in" svg:x="0.3583in" svg:y="1.0547in" svg:viewBox="0 0 26 937" draw:points="0,0 26,0 26,937 0,937">
        <text:p/>
      </draw:polygon>
      <draw:polygon text:anchor-type="page" text:anchor-page-number="9" draw:z-index="831" draw:name="Shape3300" draw:style-name="gr2" draw:text-style-name="P3" svg:width="1.8799in" svg:height="0.0098in" svg:x="6.1165in" svg:y="1.0449in" svg:viewBox="0 0 4776 26" draw:points="0,0 4776,0 4776,26 0,26">
        <text:p/>
      </draw:polygon>
      <draw:polygon text:anchor-type="page" text:anchor-page-number="16" draw:z-index="830" draw:name="Shape5112" draw:style-name="gr2" draw:text-style-name="P3" svg:width="1.8799in" svg:height="0.0098in" svg:x="6.1165in" svg:y="1.0449in" svg:viewBox="0 0 4776 26" draw:points="0,0 4776,0 4776,26 0,26">
        <text:p/>
      </draw:polygon>
      <draw:polygon text:anchor-type="page" text:anchor-page-number="1" draw:z-index="829" draw:name="Shape52" draw:style-name="gr3" draw:text-style-name="P4" svg:width="0.0098in" svg:height="0.0098in" svg:x="7.9965in" svg:y="1.0449in" svg:viewBox="0 0 26 26" draw:points="0,0 26,0 26,26 0,26">
        <text:p/>
      </draw:polygon>
      <draw:polygon text:anchor-type="page" text:anchor-page-number="8" draw:z-index="828" draw:name="Shape3144" draw:style-name="gr2" draw:text-style-name="P3" svg:width="1.8799in" svg:height="0.0098in" svg:x="6.1165in" svg:y="1.0449in" svg:viewBox="0 0 4776 26" draw:points="0,0 4776,0 4776,26 0,26">
        <text:p/>
      </draw:polygon>
      <draw:polygon text:anchor-type="page" text:anchor-page-number="11" draw:z-index="827" draw:name="Shape3801" draw:style-name="gr2" draw:text-style-name="P3" svg:width="1.8799in" svg:height="0.0098in" svg:x="6.1165in" svg:y="1.0449in" svg:viewBox="0 0 4776 26" draw:points="0,0 4776,0 4776,26 0,26">
        <text:p/>
      </draw:polygon>
      <draw:polygon text:anchor-type="page" text:anchor-page-number="3" draw:z-index="826" draw:name="Shape708" draw:style-name="gr2" draw:text-style-name="P3" svg:width="1.8799in" svg:height="0.0098in" svg:x="6.1165in" svg:y="1.0449in" svg:viewBox="0 0 4776 26" draw:points="0,0 4776,0 4776,26 0,26">
        <text:p/>
      </draw:polygon>
      <draw:polygon text:anchor-type="page" text:anchor-page-number="6" draw:z-index="825" draw:name="Shape1796" draw:style-name="gr2" draw:text-style-name="P3" svg:width="1.8799in" svg:height="0.0098in" svg:x="6.1165in" svg:y="1.0449in" svg:viewBox="0 0 4776 26" draw:points="0,0 4776,0 4776,26 0,26">
        <text:p/>
      </draw:polygon>
      <draw:polygon text:anchor-type="page" text:anchor-page-number="5" draw:z-index="824" draw:name="Shape1152" draw:style-name="gr2" draw:text-style-name="P3" svg:width="1.8799in" svg:height="0.0098in" svg:x="6.1165in" svg:y="1.0449in" svg:viewBox="0 0 4776 26" draw:points="0,0 4776,0 4776,26 0,26">
        <text:p/>
      </draw:polygon>
      <draw:polygon text:anchor-type="page" text:anchor-page-number="14" draw:z-index="823" draw:name="Shape4357" draw:style-name="gr2" draw:text-style-name="P3" svg:width="1.8799in" svg:height="0.0098in" svg:x="6.1165in" svg:y="1.0449in" svg:viewBox="0 0 4776 26" draw:points="0,0 4776,0 4776,26 0,26">
        <text:p/>
      </draw:polygon>
      <draw:polygon text:anchor-type="page" text:anchor-page-number="15" draw:z-index="822" draw:name="Shape4952" draw:style-name="gr2" draw:text-style-name="P3" svg:width="1.8799in" svg:height="0.0098in" svg:x="6.1165in" svg:y="1.0449in" svg:viewBox="0 0 4776 26" draw:points="0,0 4776,0 4776,26 0,26">
        <text:p/>
      </draw:polygon>
      <draw:polygon text:anchor-type="page" text:anchor-page-number="7" draw:z-index="821" draw:name="Shape2768" draw:style-name="gr2" draw:text-style-name="P3" svg:width="1.8799in" svg:height="0.0098in" svg:x="6.1165in" svg:y="1.0449in" svg:viewBox="0 0 4776 26" draw:points="0,0 4776,0 4776,26 0,26">
        <text:p/>
      </draw:polygon>
      <draw:polygon text:anchor-type="page" text:anchor-page-number="13" draw:z-index="820" draw:name="Shape4156" draw:style-name="gr2" draw:text-style-name="P3" svg:width="1.8799in" svg:height="0.0098in" svg:x="6.1165in" svg:y="1.0449in" svg:viewBox="0 0 4776 26" draw:points="0,0 4776,0 4776,26 0,26">
        <text:p/>
      </draw:polygon>
      <draw:polygon text:anchor-type="page" text:anchor-page-number="10" draw:z-index="819" draw:name="Shape3532" draw:style-name="gr2" draw:text-style-name="P3" svg:width="1.8799in" svg:height="0.0098in" svg:x="6.1165in" svg:y="1.0449in" svg:viewBox="0 0 4776 26" draw:points="0,0 4776,0 4776,26 0,26">
        <text:p/>
      </draw:polygon>
      <draw:polygon text:anchor-type="page" text:anchor-page-number="12" draw:z-index="818" draw:name="Shape4019" draw:style-name="gr2" draw:text-style-name="P3" svg:width="1.8799in" svg:height="0.0098in" svg:x="6.1165in" svg:y="1.0449in" svg:viewBox="0 0 4776 26" draw:points="0,0 4776,0 4776,26 0,26">
        <text:p/>
      </draw:polygon>
      <draw:polygon text:anchor-type="page" text:anchor-page-number="2" draw:z-index="817" draw:name="Shape383" draw:style-name="gr2" draw:text-style-name="P3" svg:width="1.8799in" svg:height="0.0098in" svg:x="6.1165in" svg:y="1.0449in" svg:viewBox="0 0 4776 26" draw:points="0,0 4776,0 4776,26 0,26">
        <text:p/>
      </draw:polygon>
      <draw:polygon text:anchor-type="page" text:anchor-page-number="4" draw:z-index="816" draw:name="Shape1009" draw:style-name="gr2" draw:text-style-name="P3" svg:width="1.8799in" svg:height="0.0098in" svg:x="6.1165in" svg:y="1.0449in" svg:viewBox="0 0 4776 26" draw:points="0,0 4776,0 4776,26 0,26">
        <text:p/>
      </draw:polygon>
      <draw:polygon text:anchor-type="page" text:anchor-page-number="2" draw:z-index="815" draw:name="Shape380" draw:style-name="gr3" draw:text-style-name="P4" svg:width="0.0102in" svg:height="0.0098in" svg:x="6.1063in" svg:y="1.0449in" svg:viewBox="0 0 27 26" draw:points="0,0 27,0 27,26 0,26">
        <text:p/>
      </draw:polygon>
      <draw:polygon text:anchor-type="page" text:anchor-page-number="12" draw:z-index="814" draw:name="Shape4016" draw:style-name="gr3" draw:text-style-name="P4" svg:width="0.0102in" svg:height="0.0098in" svg:x="6.1063in" svg:y="1.0449in" svg:viewBox="0 0 27 26" draw:points="0,0 27,0 27,26 0,26">
        <text:p/>
      </draw:polygon>
      <draw:polygon text:anchor-type="page" text:anchor-page-number="14" draw:z-index="813" draw:name="Shape4354" draw:style-name="gr3" draw:text-style-name="P4" svg:width="0.0102in" svg:height="0.0098in" svg:x="6.1063in" svg:y="1.0449in" svg:viewBox="0 0 27 26" draw:points="0,0 27,0 27,26 0,26">
        <text:p/>
      </draw:polygon>
      <draw:polygon text:anchor-type="page" text:anchor-page-number="16" draw:z-index="812" draw:name="Shape5109" draw:style-name="gr3" draw:text-style-name="P4" svg:width="0.0102in" svg:height="0.0098in" svg:x="6.1063in" svg:y="1.0449in" svg:viewBox="0 0 27 26" draw:points="0,0 27,0 27,26 0,26">
        <text:p/>
      </draw:polygon>
      <draw:polygon text:anchor-type="page" text:anchor-page-number="1" draw:z-index="811" draw:name="Shape50" draw:style-name="gr2" draw:text-style-name="P3" svg:width="1.8799in" svg:height="0.0098in" svg:x="6.1165in" svg:y="1.0449in" svg:viewBox="0 0 4776 26" draw:points="0,0 4776,0 4776,26 0,26">
        <text:p/>
      </draw:polygon>
      <draw:polygon text:anchor-type="page" text:anchor-page-number="10" draw:z-index="810" draw:name="Shape3529" draw:style-name="gr3" draw:text-style-name="P4" svg:width="0.0102in" svg:height="0.0098in" svg:x="6.1063in" svg:y="1.0449in" svg:viewBox="0 0 27 26" draw:points="0,0 27,0 27,26 0,26">
        <text:p/>
      </draw:polygon>
      <draw:polygon text:anchor-type="page" text:anchor-page-number="8" draw:z-index="809" draw:name="Shape3141" draw:style-name="gr3" draw:text-style-name="P4" svg:width="0.0102in" svg:height="0.0098in" svg:x="6.1063in" svg:y="1.0449in" svg:viewBox="0 0 27 26" draw:points="0,0 27,0 27,26 0,26">
        <text:p/>
      </draw:polygon>
      <draw:polygon text:anchor-type="page" text:anchor-page-number="11" draw:z-index="808" draw:name="Shape3798" draw:style-name="gr3" draw:text-style-name="P4" svg:width="0.0102in" svg:height="0.0098in" svg:x="6.1063in" svg:y="1.0449in" svg:viewBox="0 0 27 26" draw:points="0,0 27,0 27,26 0,26">
        <text:p/>
      </draw:polygon>
      <draw:polygon text:anchor-type="page" text:anchor-page-number="3" draw:z-index="807" draw:name="Shape705" draw:style-name="gr3" draw:text-style-name="P4" svg:width="0.0102in" svg:height="0.0098in" svg:x="6.1063in" svg:y="1.0449in" svg:viewBox="0 0 27 26" draw:points="0,0 27,0 27,26 0,26">
        <text:p/>
      </draw:polygon>
      <draw:polygon text:anchor-type="page" text:anchor-page-number="5" draw:z-index="806" draw:name="Shape1149" draw:style-name="gr3" draw:text-style-name="P4" svg:width="0.0102in" svg:height="0.0098in" svg:x="6.1063in" svg:y="1.0449in" svg:viewBox="0 0 27 26" draw:points="0,0 27,0 27,26 0,26">
        <text:p/>
      </draw:polygon>
      <draw:polygon text:anchor-type="page" text:anchor-page-number="7" draw:z-index="805" draw:name="Shape2765" draw:style-name="gr3" draw:text-style-name="P4" svg:width="0.0102in" svg:height="0.0098in" svg:x="6.1063in" svg:y="1.0449in" svg:viewBox="0 0 27 26" draw:points="0,0 27,0 27,26 0,26">
        <text:p/>
      </draw:polygon>
      <draw:polygon text:anchor-type="page" text:anchor-page-number="13" draw:z-index="804" draw:name="Shape4153" draw:style-name="gr3" draw:text-style-name="P4" svg:width="0.0102in" svg:height="0.0098in" svg:x="6.1063in" svg:y="1.0449in" svg:viewBox="0 0 27 26" draw:points="0,0 27,0 27,26 0,26">
        <text:p/>
      </draw:polygon>
      <draw:polygon text:anchor-type="page" text:anchor-page-number="6" draw:z-index="803" draw:name="Shape1793" draw:style-name="gr3" draw:text-style-name="P4" svg:width="0.0102in" svg:height="0.0098in" svg:x="6.1063in" svg:y="1.0449in" svg:viewBox="0 0 27 26" draw:points="0,0 27,0 27,26 0,26">
        <text:p/>
      </draw:polygon>
      <draw:polygon text:anchor-type="page" text:anchor-page-number="9" draw:z-index="802" draw:name="Shape3297" draw:style-name="gr3" draw:text-style-name="P4" svg:width="0.0102in" svg:height="0.0098in" svg:x="6.1063in" svg:y="1.0449in" svg:viewBox="0 0 27 26" draw:points="0,0 27,0 27,26 0,26">
        <text:p/>
      </draw:polygon>
      <draw:polygon text:anchor-type="page" text:anchor-page-number="4" draw:z-index="801" draw:name="Shape1006" draw:style-name="gr3" draw:text-style-name="P4" svg:width="0.0102in" svg:height="0.0098in" svg:x="6.1063in" svg:y="1.0449in" svg:viewBox="0 0 27 26" draw:points="0,0 27,0 27,26 0,26">
        <text:p/>
      </draw:polygon>
      <draw:polygon text:anchor-type="page" text:anchor-page-number="15" draw:z-index="800" draw:name="Shape4949" draw:style-name="gr3" draw:text-style-name="P4" svg:width="0.0102in" svg:height="0.0098in" svg:x="6.1063in" svg:y="1.0449in" svg:viewBox="0 0 27 26" draw:points="0,0 27,0 27,26 0,26">
        <text:p/>
      </draw:polygon>
      <draw:polygon text:anchor-type="page" text:anchor-page-number="7" draw:z-index="799" draw:name="Shape2763" draw:style-name="gr3" draw:text-style-name="P4" svg:width="5.7382in" svg:height="0.0098in" svg:x="0.3681in" svg:y="1.0449in" svg:viewBox="0 0 14576 26" draw:points="0,0 14576,0 14576,26 0,26">
        <text:p/>
      </draw:polygon>
      <draw:polygon text:anchor-type="page" text:anchor-page-number="1" draw:z-index="798" draw:name="Shape47" draw:style-name="gr3" draw:text-style-name="P4" svg:width="0.0102in" svg:height="0.0098in" svg:x="6.1063in" svg:y="1.0449in" svg:viewBox="0 0 27 26" draw:points="0,0 27,0 27,26 0,26">
        <text:p/>
      </draw:polygon>
      <draw:polygon text:anchor-type="page" text:anchor-page-number="3" draw:z-index="797" draw:name="Shape703" draw:style-name="gr3" draw:text-style-name="P4" svg:width="5.7382in" svg:height="0.0098in" svg:x="0.3681in" svg:y="1.0449in" svg:viewBox="0 0 14576 26" draw:points="0,0 14576,0 14576,26 0,26">
        <text:p/>
      </draw:polygon>
      <draw:polygon text:anchor-type="page" text:anchor-page-number="16" draw:z-index="796" draw:name="Shape5107" draw:style-name="gr3" draw:text-style-name="P4" svg:width="5.7382in" svg:height="0.0098in" svg:x="0.3681in" svg:y="1.0449in" svg:viewBox="0 0 14576 26" draw:points="0,0 14576,0 14576,26 0,26">
        <text:p/>
      </draw:polygon>
      <draw:polygon text:anchor-type="page" text:anchor-page-number="9" draw:z-index="795" draw:name="Shape3295" draw:style-name="gr3" draw:text-style-name="P4" svg:width="5.7382in" svg:height="0.0098in" svg:x="0.3681in" svg:y="1.0449in" svg:viewBox="0 0 14576 26" draw:points="0,0 14576,0 14576,26 0,26">
        <text:p/>
      </draw:polygon>
      <draw:polygon text:anchor-type="page" text:anchor-page-number="4" draw:z-index="794" draw:name="Shape1004" draw:style-name="gr3" draw:text-style-name="P4" svg:width="5.7382in" svg:height="0.0098in" svg:x="0.3681in" svg:y="1.0449in" svg:viewBox="0 0 14576 26" draw:points="0,0 14576,0 14576,26 0,26">
        <text:p/>
      </draw:polygon>
      <draw:polygon text:anchor-type="page" text:anchor-page-number="13" draw:z-index="793" draw:name="Shape4151" draw:style-name="gr3" draw:text-style-name="P4" svg:width="5.7382in" svg:height="0.0098in" svg:x="0.3681in" svg:y="1.0449in" svg:viewBox="0 0 14576 26" draw:points="0,0 14576,0 14576,26 0,26">
        <text:p/>
      </draw:polygon>
      <draw:polygon text:anchor-type="page" text:anchor-page-number="6" draw:z-index="792" draw:name="Shape1791" draw:style-name="gr3" draw:text-style-name="P4" svg:width="5.7382in" svg:height="0.0098in" svg:x="0.3681in" svg:y="1.0449in" svg:viewBox="0 0 14576 26" draw:points="0,0 14576,0 14576,26 0,26">
        <text:p/>
      </draw:polygon>
      <draw:polygon text:anchor-type="page" text:anchor-page-number="11" draw:z-index="791" draw:name="Shape3796" draw:style-name="gr3" draw:text-style-name="P4" svg:width="5.7382in" svg:height="0.0098in" svg:x="0.3681in" svg:y="1.0449in" svg:viewBox="0 0 14576 26" draw:points="0,0 14576,0 14576,26 0,26">
        <text:p/>
      </draw:polygon>
      <draw:polygon text:anchor-type="page" text:anchor-page-number="2" draw:z-index="790" draw:name="Shape378" draw:style-name="gr3" draw:text-style-name="P4" svg:width="5.7382in" svg:height="0.0098in" svg:x="0.3681in" svg:y="1.0449in" svg:viewBox="0 0 14576 26" draw:points="0,0 14576,0 14576,26 0,26">
        <text:p/>
      </draw:polygon>
      <draw:polygon text:anchor-type="page" text:anchor-page-number="14" draw:z-index="789" draw:name="Shape4352" draw:style-name="gr3" draw:text-style-name="P4" svg:width="5.7382in" svg:height="0.0098in" svg:x="0.3681in" svg:y="1.0449in" svg:viewBox="0 0 14576 26" draw:points="0,0 14576,0 14576,26 0,26">
        <text:p/>
      </draw:polygon>
      <draw:polygon text:anchor-type="page" text:anchor-page-number="12" draw:z-index="788" draw:name="Shape4014" draw:style-name="gr3" draw:text-style-name="P4" svg:width="5.7382in" svg:height="0.0098in" svg:x="0.3681in" svg:y="1.0449in" svg:viewBox="0 0 14576 26" draw:points="0,0 14576,0 14576,26 0,26">
        <text:p/>
      </draw:polygon>
      <draw:polygon text:anchor-type="page" text:anchor-page-number="8" draw:z-index="787" draw:name="Shape3139" draw:style-name="gr3" draw:text-style-name="P4" svg:width="5.7382in" svg:height="0.0098in" svg:x="0.3681in" svg:y="1.0449in" svg:viewBox="0 0 14576 26" draw:points="0,0 14576,0 14576,26 0,26">
        <text:p/>
      </draw:polygon>
      <draw:polygon text:anchor-type="page" text:anchor-page-number="5" draw:z-index="786" draw:name="Shape1147" draw:style-name="gr3" draw:text-style-name="P4" svg:width="5.7382in" svg:height="0.0098in" svg:x="0.3681in" svg:y="1.0449in" svg:viewBox="0 0 14576 26" draw:points="0,0 14576,0 14576,26 0,26">
        <text:p/>
      </draw:polygon>
      <draw:polygon text:anchor-type="page" text:anchor-page-number="15" draw:z-index="785" draw:name="Shape4947" draw:style-name="gr3" draw:text-style-name="P4" svg:width="5.7382in" svg:height="0.0098in" svg:x="0.3681in" svg:y="1.0449in" svg:viewBox="0 0 14576 26" draw:points="0,0 14576,0 14576,26 0,26">
        <text:p/>
      </draw:polygon>
      <draw:polygon text:anchor-type="page" text:anchor-page-number="10" draw:z-index="784" draw:name="Shape3527" draw:style-name="gr3" draw:text-style-name="P4" svg:width="5.7382in" svg:height="0.0098in" svg:x="0.3681in" svg:y="1.0449in" svg:viewBox="0 0 14576 26" draw:points="0,0 14576,0 14576,26 0,26">
        <text:p/>
      </draw:polygon>
      <draw:polygon text:anchor-type="page" text:anchor-page-number="3" draw:z-index="783" draw:name="Shape700" draw:style-name="gr3" draw:text-style-name="P4" svg:width="0.0098in" svg:height="0.0098in" svg:x="0.3583in" svg:y="1.0449in" svg:viewBox="0 0 26 26" draw:points="0,0 26,0 26,26 0,26">
        <text:p/>
      </draw:polygon>
      <draw:polygon text:anchor-type="page" text:anchor-page-number="1" draw:z-index="782" draw:name="Shape45" draw:style-name="gr3" draw:text-style-name="P4" svg:width="5.7382in" svg:height="0.0098in" svg:x="0.3681in" svg:y="1.0449in" svg:viewBox="0 0 14576 26" draw:points="0,0 14576,0 14576,26 0,26">
        <text:p/>
      </draw:polygon>
      <draw:polygon text:anchor-type="page" text:anchor-page-number="6" draw:z-index="781" draw:name="Shape1788" draw:style-name="gr3" draw:text-style-name="P4" svg:width="0.0098in" svg:height="0.0098in" svg:x="0.3583in" svg:y="1.0449in" svg:viewBox="0 0 26 26" draw:points="0,0 26,0 26,26 0,26">
        <text:p/>
      </draw:polygon>
      <draw:polygon text:anchor-type="page" text:anchor-page-number="15" draw:z-index="780" draw:name="Shape4944" draw:style-name="gr3" draw:text-style-name="P4" svg:width="0.0098in" svg:height="0.0098in" svg:x="0.3583in" svg:y="1.0449in" svg:viewBox="0 0 26 26" draw:points="0,0 26,0 26,26 0,26">
        <text:p/>
      </draw:polygon>
      <draw:polygon text:anchor-type="page" text:anchor-page-number="7" draw:z-index="779" draw:name="Shape2760" draw:style-name="gr3" draw:text-style-name="P4" svg:width="0.0098in" svg:height="0.0098in" svg:x="0.3583in" svg:y="1.0449in" svg:viewBox="0 0 26 26" draw:points="0,0 26,0 26,26 0,26">
        <text:p/>
      </draw:polygon>
      <draw:polygon text:anchor-type="page" text:anchor-page-number="2" draw:z-index="778" draw:name="Shape375" draw:style-name="gr3" draw:text-style-name="P4" svg:width="0.0098in" svg:height="0.0098in" svg:x="0.3583in" svg:y="1.0449in" svg:viewBox="0 0 26 26" draw:points="0,0 26,0 26,26 0,26">
        <text:p/>
      </draw:polygon>
      <draw:polygon text:anchor-type="page" text:anchor-page-number="16" draw:z-index="777" draw:name="Shape5104" draw:style-name="gr3" draw:text-style-name="P4" svg:width="0.0098in" svg:height="0.0098in" svg:x="0.3583in" svg:y="1.0449in" svg:viewBox="0 0 26 26" draw:points="0,0 26,0 26,26 0,26">
        <text:p/>
      </draw:polygon>
      <draw:polygon text:anchor-type="page" text:anchor-page-number="13" draw:z-index="776" draw:name="Shape4148" draw:style-name="gr3" draw:text-style-name="P4" svg:width="0.0098in" svg:height="0.0098in" svg:x="0.3583in" svg:y="1.0449in" svg:viewBox="0 0 26 26" draw:points="0,0 26,0 26,26 0,26">
        <text:p/>
      </draw:polygon>
      <draw:polygon text:anchor-type="page" text:anchor-page-number="5" draw:z-index="775" draw:name="Shape1144" draw:style-name="gr3" draw:text-style-name="P4" svg:width="0.0098in" svg:height="0.0098in" svg:x="0.3583in" svg:y="1.0449in" svg:viewBox="0 0 26 26" draw:points="0,0 26,0 26,26 0,26">
        <text:p/>
      </draw:polygon>
      <draw:polygon text:anchor-type="page" text:anchor-page-number="14" draw:z-index="774" draw:name="Shape4349" draw:style-name="gr3" draw:text-style-name="P4" svg:width="0.0098in" svg:height="0.0098in" svg:x="0.3583in" svg:y="1.0449in" svg:viewBox="0 0 26 26" draw:points="0,0 26,0 26,26 0,26">
        <text:p/>
      </draw:polygon>
      <draw:polygon text:anchor-type="page" text:anchor-page-number="8" draw:z-index="773" draw:name="Shape3136" draw:style-name="gr3" draw:text-style-name="P4" svg:width="0.0098in" svg:height="0.0098in" svg:x="0.3583in" svg:y="1.0449in" svg:viewBox="0 0 26 26" draw:points="0,0 26,0 26,26 0,26">
        <text:p/>
      </draw:polygon>
      <draw:polygon text:anchor-type="page" text:anchor-page-number="11" draw:z-index="772" draw:name="Shape3793" draw:style-name="gr3" draw:text-style-name="P4" svg:width="0.0098in" svg:height="0.0098in" svg:x="0.3583in" svg:y="1.0449in" svg:viewBox="0 0 26 26" draw:points="0,0 26,0 26,26 0,26">
        <text:p/>
      </draw:polygon>
      <draw:polygon text:anchor-type="page" text:anchor-page-number="9" draw:z-index="771" draw:name="Shape3292" draw:style-name="gr3" draw:text-style-name="P4" svg:width="0.0098in" svg:height="0.0098in" svg:x="0.3583in" svg:y="1.0449in" svg:viewBox="0 0 26 26" draw:points="0,0 26,0 26,26 0,26">
        <text:p/>
      </draw:polygon>
      <draw:polygon text:anchor-type="page" text:anchor-page-number="10" draw:z-index="770" draw:name="Shape3524" draw:style-name="gr3" draw:text-style-name="P4" svg:width="0.0098in" svg:height="0.0098in" svg:x="0.3583in" svg:y="1.0449in" svg:viewBox="0 0 26 26" draw:points="0,0 26,0 26,26 0,26">
        <text:p/>
      </draw:polygon>
      <draw:polygon text:anchor-type="page" text:anchor-page-number="12" draw:z-index="769" draw:name="Shape4011" draw:style-name="gr3" draw:text-style-name="P4" svg:width="0.0098in" svg:height="0.0098in" svg:x="0.3583in" svg:y="1.0449in" svg:viewBox="0 0 26 26" draw:points="0,0 26,0 26,26 0,26">
        <text:p/>
      </draw:polygon>
      <draw:polygon text:anchor-type="page" text:anchor-page-number="4" draw:z-index="768" draw:name="Shape1001" draw:style-name="gr3" draw:text-style-name="P4" svg:width="0.0098in" svg:height="0.0098in" svg:x="0.3583in" svg:y="1.0449in" svg:viewBox="0 0 26 26" draw:points="0,0 26,0 26,26 0,26">
        <text:p/>
      </draw:polygon>
      <draw:frame text:anchor-type="page" text:anchor-page-number="2" draw:z-index="767" draw:name="Shape396" draw:style-name="gr1" draw:text-style-name="P2" svg:width="0.8587in" svg:height="0.0976in" svg:x="6.1598in" svg:y="1.0563in">
        <draw:text-box>
          <text:p><text:span text:style-name="T9">Stampata il 21/02/2025</text:span></text:p>
        </draw:text-box>
      </draw:frame>
      <draw:frame text:anchor-type="page" text:anchor-page-number="12" draw:z-index="766" draw:name="Shape4032" draw:style-name="gr1" draw:text-style-name="P2" svg:width="0.8587in" svg:height="0.0976in" svg:x="6.1598in" svg:y="1.0563in">
        <draw:text-box>
          <text:p><text:span text:style-name="T9">Stampata il 21/02/2025</text:span></text:p>
        </draw:text-box>
      </draw:frame>
      <draw:frame text:anchor-type="page" text:anchor-page-number="11" draw:z-index="765" draw:name="Shape3814" draw:style-name="gr1" draw:text-style-name="P2" svg:width="0.8587in" svg:height="0.0976in" svg:x="6.1598in" svg:y="1.0563in">
        <draw:text-box>
          <text:p><text:span text:style-name="T9">Stampata il 21/02/2025</text:span></text:p>
        </draw:text-box>
      </draw:frame>
      <draw:frame text:anchor-type="page" text:anchor-page-number="16" draw:z-index="764" draw:name="Shape5125" draw:style-name="gr1" draw:text-style-name="P2" svg:width="0.8587in" svg:height="0.0976in" svg:x="6.1598in" svg:y="1.0563in">
        <draw:text-box>
          <text:p><text:span text:style-name="T9">Stampata il 21/02/2025</text:span></text:p>
        </draw:text-box>
      </draw:frame>
      <draw:frame text:anchor-type="page" text:anchor-page-number="4" draw:z-index="763" draw:name="Shape1022" draw:style-name="gr1" draw:text-style-name="P2" svg:width="0.8587in" svg:height="0.0976in" svg:x="6.1598in" svg:y="1.0563in">
        <draw:text-box>
          <text:p><text:span text:style-name="T9">Stampata il 21/02/2025</text:span></text:p>
        </draw:text-box>
      </draw:frame>
      <draw:frame text:anchor-type="page" text:anchor-page-number="6" draw:z-index="762" draw:name="Shape1809" draw:style-name="gr1" draw:text-style-name="P2" svg:width="0.8587in" svg:height="0.0976in" svg:x="6.1598in" svg:y="1.0563in">
        <draw:text-box>
          <text:p><text:span text:style-name="T9">Stampata il 21/02/2025</text:span></text:p>
        </draw:text-box>
      </draw:frame>
      <draw:frame text:anchor-type="page" text:anchor-page-number="13" draw:z-index="761" draw:name="Shape4169" draw:style-name="gr1" draw:text-style-name="P2" svg:width="0.8587in" svg:height="0.0976in" svg:x="6.1598in" svg:y="1.0563in">
        <draw:text-box>
          <text:p><text:span text:style-name="T9">Stampata il 21/02/2025</text:span></text:p>
        </draw:text-box>
      </draw:frame>
      <draw:frame text:anchor-type="page" text:anchor-page-number="3" draw:z-index="760" draw:name="Shape721" draw:style-name="gr1" draw:text-style-name="P2" svg:width="0.8587in" svg:height="0.0976in" svg:x="6.1598in" svg:y="1.0563in">
        <draw:text-box>
          <text:p><text:span text:style-name="T9">Stampata il 21/02/2025</text:span></text:p>
        </draw:text-box>
      </draw:frame>
      <draw:frame text:anchor-type="page" text:anchor-page-number="8" draw:z-index="759" draw:name="Shape3157" draw:style-name="gr1" draw:text-style-name="P2" svg:width="0.8587in" svg:height="0.0976in" svg:x="6.1598in" svg:y="1.0563in">
        <draw:text-box>
          <text:p><text:span text:style-name="T9">Stampata il 21/02/2025</text:span></text:p>
        </draw:text-box>
      </draw:frame>
      <draw:frame text:anchor-type="page" text:anchor-page-number="5" draw:z-index="758" draw:name="Shape1165" draw:style-name="gr1" draw:text-style-name="P2" svg:width="0.8587in" svg:height="0.0976in" svg:x="6.1598in" svg:y="1.0563in">
        <draw:text-box>
          <text:p><text:span text:style-name="T9">Stampata il 21/02/2025</text:span></text:p>
        </draw:text-box>
      </draw:frame>
      <draw:frame text:anchor-type="page" text:anchor-page-number="7" draw:z-index="757" draw:name="Shape2781" draw:style-name="gr1" draw:text-style-name="P2" svg:width="0.8587in" svg:height="0.0976in" svg:x="6.1598in" svg:y="1.0563in">
        <draw:text-box>
          <text:p><text:span text:style-name="T9">Stampata il 21/02/2025</text:span></text:p>
        </draw:text-box>
      </draw:frame>
      <draw:polygon text:anchor-type="page" text:anchor-page-number="1" draw:z-index="756" draw:name="Shape42" draw:style-name="gr3" draw:text-style-name="P4" svg:width="0.0098in" svg:height="0.0098in" svg:x="0.3583in" svg:y="1.0449in" svg:viewBox="0 0 26 26" draw:points="0,0 26,0 26,26 0,26">
        <text:p/>
      </draw:polygon>
      <draw:frame text:anchor-type="page" text:anchor-page-number="10" draw:z-index="755" draw:name="Shape3545" draw:style-name="gr1" draw:text-style-name="P2" svg:width="0.8587in" svg:height="0.0976in" svg:x="6.1598in" svg:y="1.0563in">
        <draw:text-box>
          <text:p><text:span text:style-name="T9">Stampata il 21/02/2025</text:span></text:p>
        </draw:text-box>
      </draw:frame>
      <draw:frame text:anchor-type="page" text:anchor-page-number="9" draw:z-index="754" draw:name="Shape3313" draw:style-name="gr1" draw:text-style-name="P2" svg:width="0.8587in" svg:height="0.0976in" svg:x="6.1598in" svg:y="1.0563in">
        <draw:text-box>
          <text:p><text:span text:style-name="T9">Stampata il 21/02/2025</text:span></text:p>
        </draw:text-box>
      </draw:frame>
      <draw:frame text:anchor-type="page" text:anchor-page-number="14" draw:z-index="753" draw:name="Shape4370" draw:style-name="gr1" draw:text-style-name="P2" svg:width="0.8587in" svg:height="0.0976in" svg:x="6.1598in" svg:y="1.0563in">
        <draw:text-box>
          <text:p><text:span text:style-name="T9">Stampata il 21/02/2025</text:span></text:p>
        </draw:text-box>
      </draw:frame>
      <draw:frame text:anchor-type="page" text:anchor-page-number="15" draw:z-index="752" draw:name="Shape4965" draw:style-name="gr1" draw:text-style-name="P2" svg:width="0.8587in" svg:height="0.0976in" svg:x="6.1598in" svg:y="1.0563in">
        <draw:text-box>
          <text:p><text:span text:style-name="T9">Stampata il 21/02/2025</text:span></text:p>
        </draw:text-box>
      </draw:frame>
      <draw:frame text:anchor-type="page" text:anchor-page-number="12" draw:z-index="751" draw:name="Shape4033" draw:style-name="gr1" draw:text-style-name="P2" svg:width="0.0398in" svg:height="0.1776in" svg:x="3.9465in" svg:y="1.25in">
        <draw:text-box>
          <text:p><text:span text:style-name="T8"><text:s/></text:span></text:p>
        </draw:text-box>
      </draw:frame>
      <draw:frame text:anchor-type="page" text:anchor-page-number="11" draw:z-index="750" draw:name="Shape3815" draw:style-name="gr1" draw:text-style-name="P2" svg:width="0.0398in" svg:height="0.1776in" svg:x="3.9465in" svg:y="1.25in">
        <draw:text-box>
          <text:p><text:span text:style-name="T8"><text:s/></text:span></text:p>
        </draw:text-box>
      </draw:frame>
      <draw:frame text:anchor-type="page" text:anchor-page-number="3" draw:z-index="749" draw:name="Shape722" draw:style-name="gr1" draw:text-style-name="P2" svg:width="0.0398in" svg:height="0.1776in" svg:x="3.9465in" svg:y="1.25in">
        <draw:text-box>
          <text:p><text:span text:style-name="T8"><text:s/></text:span></text:p>
        </draw:text-box>
      </draw:frame>
      <draw:frame text:anchor-type="page" text:anchor-page-number="16" draw:z-index="748" draw:name="Shape5126" draw:style-name="gr1" draw:text-style-name="P2" svg:width="0.0398in" svg:height="0.1776in" svg:x="3.9465in" svg:y="1.25in">
        <draw:text-box>
          <text:p><text:span text:style-name="T8"><text:s/></text:span></text:p>
        </draw:text-box>
      </draw:frame>
      <draw:frame text:anchor-type="page" text:anchor-page-number="13" draw:z-index="747" draw:name="Shape4170" draw:style-name="gr1" draw:text-style-name="P2" svg:width="0.0398in" svg:height="0.1776in" svg:x="3.9465in" svg:y="1.25in">
        <draw:text-box>
          <text:p><text:span text:style-name="T8"><text:s/></text:span></text:p>
        </draw:text-box>
      </draw:frame>
      <draw:frame text:anchor-type="page" text:anchor-page-number="14" draw:z-index="746" draw:name="Shape4371" draw:style-name="gr1" draw:text-style-name="P2" svg:width="0.0398in" svg:height="0.1776in" svg:x="3.9465in" svg:y="1.25in">
        <draw:text-box>
          <text:p><text:span text:style-name="T8"><text:s/></text:span></text:p>
        </draw:text-box>
      </draw:frame>
      <draw:frame text:anchor-type="page" text:anchor-page-number="9" draw:z-index="745" draw:name="Shape3314" draw:style-name="gr1" draw:text-style-name="P2" svg:width="0.0398in" svg:height="0.1776in" svg:x="3.9465in" svg:y="1.25in">
        <draw:text-box>
          <text:p><text:span text:style-name="T8"><text:s/></text:span></text:p>
        </draw:text-box>
      </draw:frame>
      <draw:frame text:anchor-type="page" text:anchor-page-number="4" draw:z-index="744" draw:name="Shape1023" draw:style-name="gr1" draw:text-style-name="P2" svg:width="0.0398in" svg:height="0.1776in" svg:x="3.9465in" svg:y="1.25in">
        <draw:text-box>
          <text:p><text:span text:style-name="T8"><text:s/></text:span></text:p>
        </draw:text-box>
      </draw:frame>
      <draw:frame text:anchor-type="page" text:anchor-page-number="10" draw:z-index="743" draw:name="Shape3546" draw:style-name="gr1" draw:text-style-name="P2" svg:width="0.0398in" svg:height="0.1776in" svg:x="3.9465in" svg:y="1.25in">
        <draw:text-box>
          <text:p><text:span text:style-name="T8"><text:s/></text:span></text:p>
        </draw:text-box>
      </draw:frame>
      <draw:frame text:anchor-type="page" text:anchor-page-number="8" draw:z-index="742" draw:name="Shape3158" draw:style-name="gr1" draw:text-style-name="P2" svg:width="0.0398in" svg:height="0.1776in" svg:x="3.9465in" svg:y="1.25in">
        <draw:text-box>
          <text:p><text:span text:style-name="T8"><text:s/></text:span></text:p>
        </draw:text-box>
      </draw:frame>
      <draw:frame text:anchor-type="page" text:anchor-page-number="6" draw:z-index="741" draw:name="Shape1810" draw:style-name="gr1" draw:text-style-name="P2" svg:width="0.0398in" svg:height="0.1776in" svg:x="3.9465in" svg:y="1.25in">
        <draw:text-box>
          <text:p><text:span text:style-name="T8"><text:s/></text:span></text:p>
        </draw:text-box>
      </draw:frame>
      <draw:frame text:anchor-type="page" text:anchor-page-number="2" draw:z-index="740" draw:name="Shape397" draw:style-name="gr1" draw:text-style-name="P2" svg:width="0.0398in" svg:height="0.1776in" svg:x="3.9465in" svg:y="1.25in">
        <draw:text-box>
          <text:p><text:span text:style-name="T8"><text:s/></text:span></text:p>
        </draw:text-box>
      </draw:frame>
      <draw:frame text:anchor-type="page" text:anchor-page-number="1" draw:z-index="739" draw:name="Shape53" draw:style-name="gr1" draw:text-style-name="P2" svg:width="0.8587in" svg:height="0.0976in" svg:x="6.1598in" svg:y="1.0563in">
        <draw:text-box>
          <text:p><text:span text:style-name="T9">Stampata il 21/02/2025</text:span></text:p>
        </draw:text-box>
      </draw:frame>
      <draw:frame text:anchor-type="page" text:anchor-page-number="7" draw:z-index="738" draw:name="Shape2782" draw:style-name="gr1" draw:text-style-name="P2" svg:width="0.0398in" svg:height="0.1776in" svg:x="3.9465in" svg:y="1.25in">
        <draw:text-box>
          <text:p><text:span text:style-name="T8"><text:s/></text:span></text:p>
        </draw:text-box>
      </draw:frame>
      <draw:frame text:anchor-type="page" text:anchor-page-number="15" draw:z-index="737" draw:name="Shape4966" draw:style-name="gr1" draw:text-style-name="P2" svg:width="0.0398in" svg:height="0.1776in" svg:x="3.9465in" svg:y="1.25in">
        <draw:text-box>
          <text:p><text:span text:style-name="T8"><text:s/></text:span></text:p>
        </draw:text-box>
      </draw:frame>
      <draw:frame text:anchor-type="page" text:anchor-page-number="5" draw:z-index="736" draw:name="Shape1166" draw:style-name="gr1" draw:text-style-name="P2" svg:width="0.0398in" svg:height="0.1776in" svg:x="3.9465in" svg:y="1.25in">
        <draw:text-box>
          <text:p><text:span text:style-name="T8"><text:s/></text:span></text:p>
        </draw:text-box>
      </draw:frame>
      <draw:polygon text:anchor-type="page" text:anchor-page-number="13" draw:z-index="735" draw:name="Shape4168" draw:style-name="gr2" draw:text-style-name="P3" svg:width="1.7917in" svg:height="0.0969in" svg:x="6.1598in" svg:y="1.0547in" svg:viewBox="0 0 4552 247" draw:points="0,0 4552,0 4552,247 0,247">
        <text:p/>
      </draw:polygon>
      <draw:polygon text:anchor-type="page" text:anchor-page-number="3" draw:z-index="734" draw:name="Shape720" draw:style-name="gr2" draw:text-style-name="P3" svg:width="1.7917in" svg:height="0.0969in" svg:x="6.1598in" svg:y="1.0547in" svg:viewBox="0 0 4552 247" draw:points="0,0 4552,0 4552,247 0,247">
        <text:p/>
      </draw:polygon>
      <draw:polygon text:anchor-type="page" text:anchor-page-number="10" draw:z-index="733" draw:name="Shape3544" draw:style-name="gr2" draw:text-style-name="P3" svg:width="1.7917in" svg:height="0.0969in" svg:x="6.1598in" svg:y="1.0547in" svg:viewBox="0 0 4552 247" draw:points="0,0 4552,0 4552,247 0,247">
        <text:p/>
      </draw:polygon>
      <draw:polygon text:anchor-type="page" text:anchor-page-number="4" draw:z-index="732" draw:name="Shape1021" draw:style-name="gr2" draw:text-style-name="P3" svg:width="1.7917in" svg:height="0.0969in" svg:x="6.1598in" svg:y="1.0547in" svg:viewBox="0 0 4552 247" draw:points="0,0 4552,0 4552,247 0,247">
        <text:p/>
      </draw:polygon>
      <draw:polygon text:anchor-type="page" text:anchor-page-number="7" draw:z-index="731" draw:name="Shape2780" draw:style-name="gr2" draw:text-style-name="P3" svg:width="1.7917in" svg:height="0.0969in" svg:x="6.1598in" svg:y="1.0547in" svg:viewBox="0 0 4552 247" draw:points="0,0 4552,0 4552,247 0,247">
        <text:p/>
      </draw:polygon>
      <draw:polygon text:anchor-type="page" text:anchor-page-number="12" draw:z-index="730" draw:name="Shape4031" draw:style-name="gr2" draw:text-style-name="P3" svg:width="1.7917in" svg:height="0.0969in" svg:x="6.1598in" svg:y="1.0547in" svg:viewBox="0 0 4552 247" draw:points="0,0 4552,0 4552,247 0,247">
        <text:p/>
      </draw:polygon>
      <draw:polygon text:anchor-type="page" text:anchor-page-number="2" draw:z-index="729" draw:name="Shape395" draw:style-name="gr2" draw:text-style-name="P3" svg:width="1.7917in" svg:height="0.0969in" svg:x="6.1598in" svg:y="1.0547in" svg:viewBox="0 0 4552 247" draw:points="0,0 4552,0 4552,247 0,247">
        <text:p/>
      </draw:polygon>
      <draw:polygon text:anchor-type="page" text:anchor-page-number="9" draw:z-index="728" draw:name="Shape3312" draw:style-name="gr2" draw:text-style-name="P3" svg:width="1.7917in" svg:height="0.0969in" svg:x="6.1598in" svg:y="1.0547in" svg:viewBox="0 0 4552 247" draw:points="0,0 4552,0 4552,247 0,247">
        <text:p/>
      </draw:polygon>
      <draw:polygon text:anchor-type="page" text:anchor-page-number="5" draw:z-index="727" draw:name="Shape1164" draw:style-name="gr2" draw:text-style-name="P3" svg:width="1.7917in" svg:height="0.0969in" svg:x="6.1598in" svg:y="1.0547in" svg:viewBox="0 0 4552 247" draw:points="0,0 4552,0 4552,247 0,247">
        <text:p/>
      </draw:polygon>
      <draw:polygon text:anchor-type="page" text:anchor-page-number="16" draw:z-index="726" draw:name="Shape5124" draw:style-name="gr2" draw:text-style-name="P3" svg:width="1.7917in" svg:height="0.0969in" svg:x="6.1598in" svg:y="1.0547in" svg:viewBox="0 0 4552 247" draw:points="0,0 4552,0 4552,247 0,247">
        <text:p/>
      </draw:polygon>
      <draw:polygon text:anchor-type="page" text:anchor-page-number="14" draw:z-index="725" draw:name="Shape4369" draw:style-name="gr2" draw:text-style-name="P3" svg:width="1.7917in" svg:height="0.0969in" svg:x="6.1598in" svg:y="1.0547in" svg:viewBox="0 0 4552 247" draw:points="0,0 4552,0 4552,247 0,247">
        <text:p/>
      </draw:polygon>
      <draw:polygon text:anchor-type="page" text:anchor-page-number="6" draw:z-index="724" draw:name="Shape1808" draw:style-name="gr2" draw:text-style-name="P3" svg:width="1.7917in" svg:height="0.0969in" svg:x="6.1598in" svg:y="1.0547in" svg:viewBox="0 0 4552 247" draw:points="0,0 4552,0 4552,247 0,247">
        <text:p/>
      </draw:polygon>
      <draw:frame text:anchor-type="page" text:anchor-page-number="1" draw:z-index="723" draw:name="Shape60" draw:style-name="gr1" draw:text-style-name="P2" svg:width="0.0398in" svg:height="0.1776in" svg:x="3.9264in" svg:y="1.25in">
        <draw:text-box>
          <text:p><text:span text:style-name="T8"><text:s/></text:span></text:p>
        </draw:text-box>
      </draw:frame>
      <draw:polygon text:anchor-type="page" text:anchor-page-number="11" draw:z-index="722" draw:name="Shape3813" draw:style-name="gr2" draw:text-style-name="P3" svg:width="1.7917in" svg:height="0.0969in" svg:x="6.1598in" svg:y="1.0547in" svg:viewBox="0 0 4552 247" draw:points="0,0 4552,0 4552,247 0,247">
        <text:p/>
      </draw:polygon>
      <draw:polygon text:anchor-type="page" text:anchor-page-number="15" draw:z-index="721" draw:name="Shape4964" draw:style-name="gr2" draw:text-style-name="P3" svg:width="1.7917in" svg:height="0.0969in" svg:x="6.1598in" svg:y="1.0547in" svg:viewBox="0 0 4552 247" draw:points="0,0 4552,0 4552,247 0,247">
        <text:p/>
      </draw:polygon>
      <draw:polygon text:anchor-type="page" text:anchor-page-number="8" draw:z-index="720" draw:name="Shape3156" draw:style-name="gr2" draw:text-style-name="P3" svg:width="1.7917in" svg:height="0.0969in" svg:x="6.1598in" svg:y="1.0547in" svg:viewBox="0 0 4552 247" draw:points="0,0 4552,0 4552,247 0,247">
        <text:p/>
      </draw:polygon>
      <draw:polygon text:anchor-type="page" text:anchor-page-number="5" draw:z-index="719" draw:name="Shape1163" draw:style-name="gr2" draw:text-style-name="P3" svg:width="1.8799in" svg:height="0.3685in" svg:x="6.1165in" svg:y="1.0547in" svg:viewBox="0 0 4776 937" draw:points="0,0 4776,0 4776,937 0,937">
        <text:p/>
      </draw:polygon>
      <draw:polygon text:anchor-type="page" text:anchor-page-number="14" draw:z-index="718" draw:name="Shape4368" draw:style-name="gr2" draw:text-style-name="P3" svg:width="1.8799in" svg:height="0.3685in" svg:x="6.1165in" svg:y="1.0547in" svg:viewBox="0 0 4776 937" draw:points="0,0 4776,0 4776,937 0,937">
        <text:p/>
      </draw:polygon>
      <draw:polygon text:anchor-type="page" text:anchor-page-number="13" draw:z-index="717" draw:name="Shape4167" draw:style-name="gr2" draw:text-style-name="P3" svg:width="1.8799in" svg:height="0.3685in" svg:x="6.1165in" svg:y="1.0547in" svg:viewBox="0 0 4776 937" draw:points="0,0 4776,0 4776,937 0,937">
        <text:p/>
      </draw:polygon>
      <draw:polygon text:anchor-type="page" text:anchor-page-number="2" draw:z-index="716" draw:name="Shape394" draw:style-name="gr2" draw:text-style-name="P3" svg:width="1.8799in" svg:height="0.3685in" svg:x="6.1165in" svg:y="1.0547in" svg:viewBox="0 0 4776 937" draw:points="0,0 4776,0 4776,937 0,937">
        <text:p/>
      </draw:polygon>
      <draw:polygon text:anchor-type="page" text:anchor-page-number="10" draw:z-index="715" draw:name="Shape3543" draw:style-name="gr2" draw:text-style-name="P3" svg:width="1.8799in" svg:height="0.3685in" svg:x="6.1165in" svg:y="1.0547in" svg:viewBox="0 0 4776 937" draw:points="0,0 4776,0 4776,937 0,937">
        <text:p/>
      </draw:polygon>
      <draw:polygon text:anchor-type="page" text:anchor-page-number="4" draw:z-index="714" draw:name="Shape1020" draw:style-name="gr2" draw:text-style-name="P3" svg:width="1.8799in" svg:height="0.3685in" svg:x="6.1165in" svg:y="1.0547in" svg:viewBox="0 0 4776 937" draw:points="0,0 4776,0 4776,937 0,937">
        <text:p/>
      </draw:polygon>
      <draw:polygon text:anchor-type="page" text:anchor-page-number="6" draw:z-index="713" draw:name="Shape1807" draw:style-name="gr2" draw:text-style-name="P3" svg:width="1.8799in" svg:height="0.3685in" svg:x="6.1165in" svg:y="1.0547in" svg:viewBox="0 0 4776 937" draw:points="0,0 4776,0 4776,937 0,937">
        <text:p/>
      </draw:polygon>
      <draw:polygon text:anchor-type="page" text:anchor-page-number="9" draw:z-index="712" draw:name="Shape3311" draw:style-name="gr2" draw:text-style-name="P3" svg:width="1.8799in" svg:height="0.3685in" svg:x="6.1165in" svg:y="1.0547in" svg:viewBox="0 0 4776 937" draw:points="0,0 4776,0 4776,937 0,937">
        <text:p/>
      </draw:polygon>
      <draw:polygon text:anchor-type="page" text:anchor-page-number="16" draw:z-index="711" draw:name="Shape5123" draw:style-name="gr2" draw:text-style-name="P3" svg:width="1.8799in" svg:height="0.3685in" svg:x="6.1165in" svg:y="1.0547in" svg:viewBox="0 0 4776 937" draw:points="0,0 4776,0 4776,937 0,937">
        <text:p/>
      </draw:polygon>
      <draw:polygon text:anchor-type="page" text:anchor-page-number="15" draw:z-index="710" draw:name="Shape4963" draw:style-name="gr2" draw:text-style-name="P3" svg:width="1.8799in" svg:height="0.3685in" svg:x="6.1165in" svg:y="1.0547in" svg:viewBox="0 0 4776 937" draw:points="0,0 4776,0 4776,937 0,937">
        <text:p/>
      </draw:polygon>
      <draw:polygon text:anchor-type="page" text:anchor-page-number="8" draw:z-index="709" draw:name="Shape3155" draw:style-name="gr2" draw:text-style-name="P3" svg:width="1.8799in" svg:height="0.3685in" svg:x="6.1165in" svg:y="1.0547in" svg:viewBox="0 0 4776 937" draw:points="0,0 4776,0 4776,937 0,937">
        <text:p/>
      </draw:polygon>
      <draw:polygon text:anchor-type="page" text:anchor-page-number="11" draw:z-index="708" draw:name="Shape3812" draw:style-name="gr2" draw:text-style-name="P3" svg:width="1.8799in" svg:height="0.3685in" svg:x="6.1165in" svg:y="1.0547in" svg:viewBox="0 0 4776 937" draw:points="0,0 4776,0 4776,937 0,937">
        <text:p/>
      </draw:polygon>
      <draw:polygon text:anchor-type="page" text:anchor-page-number="3" draw:z-index="707" draw:name="Shape719" draw:style-name="gr2" draw:text-style-name="P3" svg:width="1.8799in" svg:height="0.3685in" svg:x="6.1165in" svg:y="1.0547in" svg:viewBox="0 0 4776 937" draw:points="0,0 4776,0 4776,937 0,937">
        <text:p/>
      </draw:polygon>
      <draw:polygon text:anchor-type="page" text:anchor-page-number="1" draw:z-index="706" draw:name="Shape51" draw:style-name="gr2" draw:text-style-name="P3" svg:width="1.7917in" svg:height="0.0969in" svg:x="6.1598in" svg:y="1.0547in" svg:viewBox="0 0 4552 247" draw:points="0,0 4552,0 4552,247 0,247">
        <text:p/>
      </draw:polygon>
      <draw:polygon text:anchor-type="page" text:anchor-page-number="7" draw:z-index="705" draw:name="Shape2779" draw:style-name="gr2" draw:text-style-name="P3" svg:width="1.8799in" svg:height="0.3685in" svg:x="6.1165in" svg:y="1.0547in" svg:viewBox="0 0 4776 937" draw:points="0,0 4776,0 4776,937 0,937">
        <text:p/>
      </draw:polygon>
      <draw:polygon text:anchor-type="page" text:anchor-page-number="12" draw:z-index="704" draw:name="Shape4030" draw:style-name="gr2" draw:text-style-name="P3" svg:width="1.8799in" svg:height="0.3685in" svg:x="6.1165in" svg:y="1.0547in" svg:viewBox="0 0 4776 937" draw:points="0,0 4776,0 4776,937 0,937">
        <text:p/>
      </draw:polygon>
      <draw:frame text:anchor-type="page" text:anchor-page-number="11" draw:z-index="703" draw:name="Shape3808" draw:style-name="gr1" draw:text-style-name="P2" svg:width="1.3815in" svg:height="0.1925in" svg:x="2.5665in" svg:y="1.2362in">
        <draw:text-box>
          <text:p><text:span text:style-name="T10">TYRKYS BIANCO</text:span></text:p>
        </draw:text-box>
      </draw:frame>
      <draw:frame text:anchor-type="page" text:anchor-page-number="2" draw:z-index="702" draw:name="Shape390" draw:style-name="gr1" draw:text-style-name="P2" svg:width="1.3815in" svg:height="0.1925in" svg:x="2.5665in" svg:y="1.2362in">
        <draw:text-box>
          <text:p><text:span text:style-name="T10">TYRKYS BIANCO</text:span></text:p>
        </draw:text-box>
      </draw:frame>
      <draw:frame text:anchor-type="page" text:anchor-page-number="16" draw:z-index="701" draw:name="Shape5119" draw:style-name="gr1" draw:text-style-name="P2" svg:width="1.3815in" svg:height="0.1925in" svg:x="2.5665in" svg:y="1.2362in">
        <draw:text-box>
          <text:p><text:span text:style-name="T10">TYRKYS BIANCO</text:span></text:p>
        </draw:text-box>
      </draw:frame>
      <draw:frame text:anchor-type="page" text:anchor-page-number="14" draw:z-index="700" draw:name="Shape4364" draw:style-name="gr1" draw:text-style-name="P2" svg:width="1.3815in" svg:height="0.1925in" svg:x="2.5665in" svg:y="1.2362in">
        <draw:text-box>
          <text:p><text:span text:style-name="T10">TYRKYS BIANCO</text:span></text:p>
        </draw:text-box>
      </draw:frame>
      <draw:frame text:anchor-type="page" text:anchor-page-number="10" draw:z-index="699" draw:name="Shape3539" draw:style-name="gr1" draw:text-style-name="P2" svg:width="1.3815in" svg:height="0.1925in" svg:x="2.5665in" svg:y="1.2362in">
        <draw:text-box>
          <text:p><text:span text:style-name="T10">TYRKYS BIANCO</text:span></text:p>
        </draw:text-box>
      </draw:frame>
      <draw:frame text:anchor-type="page" text:anchor-page-number="3" draw:z-index="698" draw:name="Shape715" draw:style-name="gr1" draw:text-style-name="P2" svg:width="1.3815in" svg:height="0.1925in" svg:x="2.5665in" svg:y="1.2362in">
        <draw:text-box>
          <text:p><text:span text:style-name="T10">TYRKYS BIANCO</text:span></text:p>
        </draw:text-box>
      </draw:frame>
      <draw:frame text:anchor-type="page" text:anchor-page-number="15" draw:z-index="697" draw:name="Shape4959" draw:style-name="gr1" draw:text-style-name="P2" svg:width="1.3815in" svg:height="0.1925in" svg:x="2.5665in" svg:y="1.2362in">
        <draw:text-box>
          <text:p><text:span text:style-name="T10">TYRKYS BIANCO</text:span></text:p>
        </draw:text-box>
      </draw:frame>
      <draw:frame text:anchor-type="page" text:anchor-page-number="13" draw:z-index="696" draw:name="Shape4163" draw:style-name="gr1" draw:text-style-name="P2" svg:width="1.3815in" svg:height="0.1925in" svg:x="2.5665in" svg:y="1.2362in">
        <draw:text-box>
          <text:p><text:span text:style-name="T10">TYRKYS BIANCO</text:span></text:p>
        </draw:text-box>
      </draw:frame>
      <draw:frame text:anchor-type="page" text:anchor-page-number="7" draw:z-index="695" draw:name="Shape2775" draw:style-name="gr1" draw:text-style-name="P2" svg:width="1.3815in" svg:height="0.1925in" svg:x="2.5665in" svg:y="1.2362in">
        <draw:text-box>
          <text:p><text:span text:style-name="T10">TYRKYS BIANCO</text:span></text:p>
        </draw:text-box>
      </draw:frame>
      <draw:frame text:anchor-type="page" text:anchor-page-number="9" draw:z-index="694" draw:name="Shape3307" draw:style-name="gr1" draw:text-style-name="P2" svg:width="1.3815in" svg:height="0.1925in" svg:x="2.5665in" svg:y="1.2362in">
        <draw:text-box>
          <text:p><text:span text:style-name="T10">TYRKYS BIANCO</text:span></text:p>
        </draw:text-box>
      </draw:frame>
      <draw:polygon text:anchor-type="page" text:anchor-page-number="1" draw:z-index="693" draw:name="Shape63" draw:style-name="gr2" draw:text-style-name="P3" svg:width="1.8799in" svg:height="0.3685in" svg:x="6.1165in" svg:y="1.0547in" svg:viewBox="0 0 4776 937" draw:points="0,0 4776,0 4776,937 0,937">
        <text:p/>
      </draw:polygon>
      <draw:frame text:anchor-type="page" text:anchor-page-number="5" draw:z-index="692" draw:name="Shape1159" draw:style-name="gr1" draw:text-style-name="P2" svg:width="1.3815in" svg:height="0.1925in" svg:x="2.5665in" svg:y="1.2362in">
        <draw:text-box>
          <text:p><text:span text:style-name="T10">TYRKYS BIANCO</text:span></text:p>
        </draw:text-box>
      </draw:frame>
      <draw:frame text:anchor-type="page" text:anchor-page-number="12" draw:z-index="691" draw:name="Shape4026" draw:style-name="gr1" draw:text-style-name="P2" svg:width="1.3815in" svg:height="0.1925in" svg:x="2.5665in" svg:y="1.2362in">
        <draw:text-box>
          <text:p><text:span text:style-name="T10">TYRKYS BIANCO</text:span></text:p>
        </draw:text-box>
      </draw:frame>
      <draw:frame text:anchor-type="page" text:anchor-page-number="6" draw:z-index="690" draw:name="Shape1803" draw:style-name="gr1" draw:text-style-name="P2" svg:width="1.3815in" svg:height="0.1925in" svg:x="2.5665in" svg:y="1.2362in">
        <draw:text-box>
          <text:p><text:span text:style-name="T10">TYRKYS BIANCO</text:span></text:p>
        </draw:text-box>
      </draw:frame>
      <draw:frame text:anchor-type="page" text:anchor-page-number="8" draw:z-index="689" draw:name="Shape3151" draw:style-name="gr1" draw:text-style-name="P2" svg:width="1.3815in" svg:height="0.1925in" svg:x="2.5665in" svg:y="1.2362in">
        <draw:text-box>
          <text:p><text:span text:style-name="T10">TYRKYS BIANCO</text:span></text:p>
        </draw:text-box>
      </draw:frame>
      <draw:frame text:anchor-type="page" text:anchor-page-number="4" draw:z-index="688" draw:name="Shape1016" draw:style-name="gr1" draw:text-style-name="P2" svg:width="1.3815in" svg:height="0.1925in" svg:x="2.5665in" svg:y="1.2362in">
        <draw:text-box>
          <text:p><text:span text:style-name="T10">TYRKYS BIANCO</text:span></text:p>
        </draw:text-box>
      </draw:frame>
      <draw:frame text:anchor-type="page" text:anchor-page-number="10" draw:z-index="687" draw:name="Shape3540" draw:style-name="gr1" draw:text-style-name="P2" svg:width="0.0398in" svg:height="0.1776in" svg:x="2.528in" svg:y="1.25in">
        <draw:text-box>
          <text:p><text:span text:style-name="T8"><text:s/></text:span></text:p>
        </draw:text-box>
      </draw:frame>
      <draw:frame text:anchor-type="page" text:anchor-page-number="9" draw:z-index="686" draw:name="Shape3308" draw:style-name="gr1" draw:text-style-name="P2" svg:width="0.0398in" svg:height="0.1776in" svg:x="2.528in" svg:y="1.25in">
        <draw:text-box>
          <text:p><text:span text:style-name="T8"><text:s/></text:span></text:p>
        </draw:text-box>
      </draw:frame>
      <draw:frame text:anchor-type="page" text:anchor-page-number="4" draw:z-index="685" draw:name="Shape1017" draw:style-name="gr1" draw:text-style-name="P2" svg:width="0.0398in" svg:height="0.1776in" svg:x="2.528in" svg:y="1.25in">
        <draw:text-box>
          <text:p><text:span text:style-name="T8"><text:s/></text:span></text:p>
        </draw:text-box>
      </draw:frame>
      <draw:frame text:anchor-type="page" text:anchor-page-number="16" draw:z-index="684" draw:name="Shape5120" draw:style-name="gr1" draw:text-style-name="P2" svg:width="0.0398in" svg:height="0.1776in" svg:x="2.528in" svg:y="1.25in">
        <draw:text-box>
          <text:p><text:span text:style-name="T8"><text:s/></text:span></text:p>
        </draw:text-box>
      </draw:frame>
      <draw:frame text:anchor-type="page" text:anchor-page-number="15" draw:z-index="683" draw:name="Shape4960" draw:style-name="gr1" draw:text-style-name="P2" svg:width="0.0398in" svg:height="0.1776in" svg:x="2.528in" svg:y="1.25in">
        <draw:text-box>
          <text:p><text:span text:style-name="T8"><text:s/></text:span></text:p>
        </draw:text-box>
      </draw:frame>
      <draw:frame text:anchor-type="page" text:anchor-page-number="11" draw:z-index="682" draw:name="Shape3809" draw:style-name="gr1" draw:text-style-name="P2" svg:width="0.0398in" svg:height="0.1776in" svg:x="2.528in" svg:y="1.25in">
        <draw:text-box>
          <text:p><text:span text:style-name="T8"><text:s/></text:span></text:p>
        </draw:text-box>
      </draw:frame>
      <draw:frame text:anchor-type="page" text:anchor-page-number="2" draw:z-index="681" draw:name="Shape391" draw:style-name="gr1" draw:text-style-name="P2" svg:width="0.0398in" svg:height="0.1776in" svg:x="2.528in" svg:y="1.25in">
        <draw:text-box>
          <text:p><text:span text:style-name="T8"><text:s/></text:span></text:p>
        </draw:text-box>
      </draw:frame>
      <draw:frame text:anchor-type="page" text:anchor-page-number="7" draw:z-index="680" draw:name="Shape2776" draw:style-name="gr1" draw:text-style-name="P2" svg:width="0.0398in" svg:height="0.1776in" svg:x="2.528in" svg:y="1.25in">
        <draw:text-box>
          <text:p><text:span text:style-name="T8"><text:s/></text:span></text:p>
        </draw:text-box>
      </draw:frame>
      <draw:frame text:anchor-type="page" text:anchor-page-number="5" draw:z-index="679" draw:name="Shape1160" draw:style-name="gr1" draw:text-style-name="P2" svg:width="0.0398in" svg:height="0.1776in" svg:x="2.528in" svg:y="1.25in">
        <draw:text-box>
          <text:p><text:span text:style-name="T8"><text:s/></text:span></text:p>
        </draw:text-box>
      </draw:frame>
      <draw:frame text:anchor-type="page" text:anchor-page-number="1" draw:z-index="678" draw:name="Shape59" draw:style-name="gr1" draw:text-style-name="P2" svg:width="1.3815in" svg:height="0.1925in" svg:x="2.5465in" svg:y="1.2362in">
        <draw:text-box>
          <text:p><text:span text:style-name="T10">TYRKYS BIANCO</text:span></text:p>
        </draw:text-box>
      </draw:frame>
      <draw:frame text:anchor-type="page" text:anchor-page-number="3" draw:z-index="677" draw:name="Shape716" draw:style-name="gr1" draw:text-style-name="P2" svg:width="0.0398in" svg:height="0.1776in" svg:x="2.528in" svg:y="1.25in">
        <draw:text-box>
          <text:p><text:span text:style-name="T8"><text:s/></text:span></text:p>
        </draw:text-box>
      </draw:frame>
      <draw:frame text:anchor-type="page" text:anchor-page-number="12" draw:z-index="676" draw:name="Shape4027" draw:style-name="gr1" draw:text-style-name="P2" svg:width="0.0398in" svg:height="0.1776in" svg:x="2.528in" svg:y="1.25in">
        <draw:text-box>
          <text:p><text:span text:style-name="T8"><text:s/></text:span></text:p>
        </draw:text-box>
      </draw:frame>
      <draw:frame text:anchor-type="page" text:anchor-page-number="6" draw:z-index="675" draw:name="Shape1804" draw:style-name="gr1" draw:text-style-name="P2" svg:width="0.0398in" svg:height="0.1776in" svg:x="2.528in" svg:y="1.25in">
        <draw:text-box>
          <text:p><text:span text:style-name="T8"><text:s/></text:span></text:p>
        </draw:text-box>
      </draw:frame>
      <draw:frame text:anchor-type="page" text:anchor-page-number="13" draw:z-index="674" draw:name="Shape4164" draw:style-name="gr1" draw:text-style-name="P2" svg:width="0.0398in" svg:height="0.1776in" svg:x="2.528in" svg:y="1.25in">
        <draw:text-box>
          <text:p><text:span text:style-name="T8"><text:s/></text:span></text:p>
        </draw:text-box>
      </draw:frame>
      <draw:frame text:anchor-type="page" text:anchor-page-number="14" draw:z-index="673" draw:name="Shape4365" draw:style-name="gr1" draw:text-style-name="P2" svg:width="0.0398in" svg:height="0.1776in" svg:x="2.528in" svg:y="1.25in">
        <draw:text-box>
          <text:p><text:span text:style-name="T8"><text:s/></text:span></text:p>
        </draw:text-box>
      </draw:frame>
      <draw:frame text:anchor-type="page" text:anchor-page-number="8" draw:z-index="672" draw:name="Shape3152" draw:style-name="gr1" draw:text-style-name="P2" svg:width="0.0398in" svg:height="0.1776in" svg:x="2.528in" svg:y="1.25in">
        <draw:text-box>
          <text:p><text:span text:style-name="T8"><text:s/></text:span></text:p>
        </draw:text-box>
      </draw:frame>
      <draw:frame text:anchor-type="page" text:anchor-page-number="12" draw:z-index="671" draw:name="Shape4017" draw:style-name="gr1" draw:text-style-name="P2" svg:width="0.0398in" svg:height="0.1776in" svg:x="3.2366in" svg:y="1.0571in">
        <draw:text-box>
          <text:p><text:span text:style-name="T8"><text:s/></text:span></text:p>
        </draw:text-box>
      </draw:frame>
      <draw:frame text:anchor-type="page" text:anchor-page-number="7" draw:z-index="670" draw:name="Shape2766" draw:style-name="gr1" draw:text-style-name="P2" svg:width="0.0398in" svg:height="0.1776in" svg:x="3.2366in" svg:y="1.0571in">
        <draw:text-box>
          <text:p><text:span text:style-name="T8"><text:s/></text:span></text:p>
        </draw:text-box>
      </draw:frame>
      <draw:frame text:anchor-type="page" text:anchor-page-number="11" draw:z-index="669" draw:name="Shape3799" draw:style-name="gr1" draw:text-style-name="P2" svg:width="0.0398in" svg:height="0.1776in" svg:x="3.2366in" svg:y="1.0571in">
        <draw:text-box>
          <text:p><text:span text:style-name="T8"><text:s/></text:span></text:p>
        </draw:text-box>
      </draw:frame>
      <draw:frame text:anchor-type="page" text:anchor-page-number="10" draw:z-index="668" draw:name="Shape3530" draw:style-name="gr1" draw:text-style-name="P2" svg:width="0.0398in" svg:height="0.1776in" svg:x="3.2366in" svg:y="1.0571in">
        <draw:text-box>
          <text:p><text:span text:style-name="T8"><text:s/></text:span></text:p>
        </draw:text-box>
      </draw:frame>
      <draw:frame text:anchor-type="page" text:anchor-page-number="15" draw:z-index="667" draw:name="Shape4950" draw:style-name="gr1" draw:text-style-name="P2" svg:width="0.0398in" svg:height="0.1776in" svg:x="3.2366in" svg:y="1.0571in">
        <draw:text-box>
          <text:p><text:span text:style-name="T8"><text:s/></text:span></text:p>
        </draw:text-box>
      </draw:frame>
      <draw:frame text:anchor-type="page" text:anchor-page-number="4" draw:z-index="666" draw:name="Shape1007" draw:style-name="gr1" draw:text-style-name="P2" svg:width="0.0398in" svg:height="0.1776in" svg:x="3.2366in" svg:y="1.0571in">
        <draw:text-box>
          <text:p><text:span text:style-name="T8"><text:s/></text:span></text:p>
        </draw:text-box>
      </draw:frame>
      <draw:frame text:anchor-type="page" text:anchor-page-number="6" draw:z-index="665" draw:name="Shape1794" draw:style-name="gr1" draw:text-style-name="P2" svg:width="0.0398in" svg:height="0.1776in" svg:x="3.2366in" svg:y="1.0571in">
        <draw:text-box>
          <text:p><text:span text:style-name="T8"><text:s/></text:span></text:p>
        </draw:text-box>
      </draw:frame>
      <draw:frame text:anchor-type="page" text:anchor-page-number="5" draw:z-index="664" draw:name="Shape1150" draw:style-name="gr1" draw:text-style-name="P2" svg:width="0.0398in" svg:height="0.1776in" svg:x="3.2366in" svg:y="1.0571in">
        <draw:text-box>
          <text:p><text:span text:style-name="T8"><text:s/></text:span></text:p>
        </draw:text-box>
      </draw:frame>
      <draw:frame text:anchor-type="page" text:anchor-page-number="1" draw:z-index="663" draw:name="Shape48" draw:style-name="gr1" draw:text-style-name="P2" svg:width="0.0787in" svg:height="0.1776in" svg:x="3.2366in" svg:y="1.0571in">
        <draw:text-box>
          <text:p><text:span text:style-name="T8"><text:s text:c="2"/></text:span></text:p>
        </draw:text-box>
      </draw:frame>
      <draw:frame text:anchor-type="page" text:anchor-page-number="2" draw:z-index="662" draw:name="Shape381" draw:style-name="gr1" draw:text-style-name="P2" svg:width="0.0398in" svg:height="0.1776in" svg:x="3.2366in" svg:y="1.0571in">
        <draw:text-box>
          <text:p><text:span text:style-name="T8"><text:s/></text:span></text:p>
        </draw:text-box>
      </draw:frame>
      <draw:frame text:anchor-type="page" text:anchor-page-number="14" draw:z-index="661" draw:name="Shape4355" draw:style-name="gr1" draw:text-style-name="P2" svg:width="0.0398in" svg:height="0.1776in" svg:x="3.2366in" svg:y="1.0571in">
        <draw:text-box>
          <text:p><text:span text:style-name="T8"><text:s/></text:span></text:p>
        </draw:text-box>
      </draw:frame>
      <draw:frame text:anchor-type="page" text:anchor-page-number="13" draw:z-index="660" draw:name="Shape4154" draw:style-name="gr1" draw:text-style-name="P2" svg:width="0.0398in" svg:height="0.1776in" svg:x="3.2366in" svg:y="1.0571in">
        <draw:text-box>
          <text:p><text:span text:style-name="T8"><text:s/></text:span></text:p>
        </draw:text-box>
      </draw:frame>
      <draw:frame text:anchor-type="page" text:anchor-page-number="16" draw:z-index="659" draw:name="Shape5110" draw:style-name="gr1" draw:text-style-name="P2" svg:width="0.0398in" svg:height="0.1776in" svg:x="3.2366in" svg:y="1.0571in">
        <draw:text-box>
          <text:p><text:span text:style-name="T8"><text:s/></text:span></text:p>
        </draw:text-box>
      </draw:frame>
      <draw:frame text:anchor-type="page" text:anchor-page-number="3" draw:z-index="658" draw:name="Shape706" draw:style-name="gr1" draw:text-style-name="P2" svg:width="0.0398in" svg:height="0.1776in" svg:x="3.2366in" svg:y="1.0571in">
        <draw:text-box>
          <text:p><text:span text:style-name="T8"><text:s/></text:span></text:p>
        </draw:text-box>
      </draw:frame>
      <draw:frame text:anchor-type="page" text:anchor-page-number="8" draw:z-index="657" draw:name="Shape3142" draw:style-name="gr1" draw:text-style-name="P2" svg:width="0.0398in" svg:height="0.1776in" svg:x="3.2366in" svg:y="1.0571in">
        <draw:text-box>
          <text:p><text:span text:style-name="T8"><text:s/></text:span></text:p>
        </draw:text-box>
      </draw:frame>
      <draw:frame text:anchor-type="page" text:anchor-page-number="9" draw:z-index="656" draw:name="Shape3298" draw:style-name="gr1" draw:text-style-name="P2" svg:width="0.0398in" svg:height="0.1776in" svg:x="3.2366in" svg:y="1.0571in">
        <draw:text-box>
          <text:p><text:span text:style-name="T8"><text:s/></text:span></text:p>
        </draw:text-box>
      </draw:frame>
      <draw:polygon text:anchor-type="page" text:anchor-page-number="14" draw:z-index="655" draw:name="Shape4363" draw:style-name="gr2" draw:text-style-name="P3" svg:width="5.6516in" svg:height="0.1917in" svg:x="0.4114in" svg:y="1.2315in" svg:viewBox="0 0 14356 488" draw:points="0,0 14356,0 14356,488 0,488">
        <text:p/>
      </draw:polygon>
      <draw:polygon text:anchor-type="page" text:anchor-page-number="13" draw:z-index="654" draw:name="Shape4162" draw:style-name="gr2" draw:text-style-name="P3" svg:width="5.6516in" svg:height="0.1917in" svg:x="0.4114in" svg:y="1.2315in" svg:viewBox="0 0 14356 488" draw:points="0,0 14356,0 14356,488 0,488">
        <text:p/>
      </draw:polygon>
      <draw:polygon text:anchor-type="page" text:anchor-page-number="15" draw:z-index="653" draw:name="Shape4958" draw:style-name="gr2" draw:text-style-name="P3" svg:width="5.6516in" svg:height="0.1917in" svg:x="0.4114in" svg:y="1.2315in" svg:viewBox="0 0 14356 488" draw:points="0,0 14356,0 14356,488 0,488">
        <text:p/>
      </draw:polygon>
      <draw:polygon text:anchor-type="page" text:anchor-page-number="5" draw:z-index="652" draw:name="Shape1158" draw:style-name="gr2" draw:text-style-name="P3" svg:width="5.6516in" svg:height="0.1917in" svg:x="0.4114in" svg:y="1.2315in" svg:viewBox="0 0 14356 488" draw:points="0,0 14356,0 14356,488 0,488">
        <text:p/>
      </draw:polygon>
      <draw:polygon text:anchor-type="page" text:anchor-page-number="2" draw:z-index="651" draw:name="Shape389" draw:style-name="gr2" draw:text-style-name="P3" svg:width="5.6516in" svg:height="0.1917in" svg:x="0.4114in" svg:y="1.2315in" svg:viewBox="0 0 14356 488" draw:points="0,0 14356,0 14356,488 0,488">
        <text:p/>
      </draw:polygon>
      <draw:polygon text:anchor-type="page" text:anchor-page-number="6" draw:z-index="650" draw:name="Shape1802" draw:style-name="gr2" draw:text-style-name="P3" svg:width="5.6516in" svg:height="0.1917in" svg:x="0.4114in" svg:y="1.2315in" svg:viewBox="0 0 14356 488" draw:points="0,0 14356,0 14356,488 0,488">
        <text:p/>
      </draw:polygon>
      <draw:polygon text:anchor-type="page" text:anchor-page-number="16" draw:z-index="649" draw:name="Shape5118" draw:style-name="gr2" draw:text-style-name="P3" svg:width="5.6516in" svg:height="0.1917in" svg:x="0.4114in" svg:y="1.2315in" svg:viewBox="0 0 14356 488" draw:points="0,0 14356,0 14356,488 0,488">
        <text:p/>
      </draw:polygon>
      <draw:polygon text:anchor-type="page" text:anchor-page-number="10" draw:z-index="648" draw:name="Shape3538" draw:style-name="gr2" draw:text-style-name="P3" svg:width="5.6516in" svg:height="0.1917in" svg:x="0.4114in" svg:y="1.2315in" svg:viewBox="0 0 14356 488" draw:points="0,0 14356,0 14356,488 0,488">
        <text:p/>
      </draw:polygon>
      <draw:polygon text:anchor-type="page" text:anchor-page-number="1" draw:z-index="647" draw:name="Shape58" draw:style-name="gr2" draw:text-style-name="P3" svg:width="5.6516in" svg:height="0.1917in" svg:x="0.4114in" svg:y="1.2315in" svg:viewBox="0 0 14356 488" draw:points="0,0 14356,0 14356,488 0,488">
        <text:p/>
      </draw:polygon>
      <draw:polygon text:anchor-type="page" text:anchor-page-number="12" draw:z-index="646" draw:name="Shape4025" draw:style-name="gr2" draw:text-style-name="P3" svg:width="5.6516in" svg:height="0.1917in" svg:x="0.4114in" svg:y="1.2315in" svg:viewBox="0 0 14356 488" draw:points="0,0 14356,0 14356,488 0,488">
        <text:p/>
      </draw:polygon>
      <draw:polygon text:anchor-type="page" text:anchor-page-number="3" draw:z-index="645" draw:name="Shape714" draw:style-name="gr2" draw:text-style-name="P3" svg:width="5.6516in" svg:height="0.1917in" svg:x="0.4114in" svg:y="1.2315in" svg:viewBox="0 0 14356 488" draw:points="0,0 14356,0 14356,488 0,488">
        <text:p/>
      </draw:polygon>
      <draw:polygon text:anchor-type="page" text:anchor-page-number="8" draw:z-index="644" draw:name="Shape3150" draw:style-name="gr2" draw:text-style-name="P3" svg:width="5.6516in" svg:height="0.1917in" svg:x="0.4114in" svg:y="1.2315in" svg:viewBox="0 0 14356 488" draw:points="0,0 14356,0 14356,488 0,488">
        <text:p/>
      </draw:polygon>
      <draw:polygon text:anchor-type="page" text:anchor-page-number="7" draw:z-index="643" draw:name="Shape2774" draw:style-name="gr2" draw:text-style-name="P3" svg:width="5.6516in" svg:height="0.1917in" svg:x="0.4114in" svg:y="1.2315in" svg:viewBox="0 0 14356 488" draw:points="0,0 14356,0 14356,488 0,488">
        <text:p/>
      </draw:polygon>
      <draw:polygon text:anchor-type="page" text:anchor-page-number="11" draw:z-index="642" draw:name="Shape3807" draw:style-name="gr2" draw:text-style-name="P3" svg:width="5.6516in" svg:height="0.1917in" svg:x="0.4114in" svg:y="1.2315in" svg:viewBox="0 0 14356 488" draw:points="0,0 14356,0 14356,488 0,488">
        <text:p/>
      </draw:polygon>
      <draw:polygon text:anchor-type="page" text:anchor-page-number="9" draw:z-index="641" draw:name="Shape3306" draw:style-name="gr2" draw:text-style-name="P3" svg:width="5.6516in" svg:height="0.1917in" svg:x="0.4114in" svg:y="1.2315in" svg:viewBox="0 0 14356 488" draw:points="0,0 14356,0 14356,488 0,488">
        <text:p/>
      </draw:polygon>
      <draw:polygon text:anchor-type="page" text:anchor-page-number="4" draw:z-index="640" draw:name="Shape1015" draw:style-name="gr2" draw:text-style-name="P3" svg:width="5.6516in" svg:height="0.1917in" svg:x="0.4114in" svg:y="1.2315in" svg:viewBox="0 0 14356 488" draw:points="0,0 14356,0 14356,488 0,488">
        <text:p/>
      </draw:polygon>
      <draw:frame text:anchor-type="page" text:anchor-page-number="11" draw:z-index="639" draw:name="Shape3782" draw:style-name="gr1" draw:text-style-name="P2" svg:width="0.0398in" svg:height="0.1776in" svg:x="6.8in" svg:y="0.8098in">
        <draw:text-box>
          <text:p><text:span text:style-name="T8"><text:s/></text:span></text:p>
        </draw:text-box>
      </draw:frame>
      <draw:frame text:anchor-type="page" text:anchor-page-number="15" draw:z-index="638" draw:name="Shape4933" draw:style-name="gr1" draw:text-style-name="P2" svg:width="0.0398in" svg:height="0.1776in" svg:x="6.8in" svg:y="0.8098in">
        <draw:text-box>
          <text:p><text:span text:style-name="T8"><text:s/></text:span></text:p>
        </draw:text-box>
      </draw:frame>
      <draw:frame text:anchor-type="page" text:anchor-page-number="1" draw:z-index="637" draw:name="Shape31" draw:style-name="gr1" draw:text-style-name="P2" svg:width="0.0398in" svg:height="0.1776in" svg:x="6.8in" svg:y="0.8098in">
        <draw:text-box>
          <text:p><text:span text:style-name="T8"><text:s/></text:span></text:p>
        </draw:text-box>
      </draw:frame>
      <draw:frame text:anchor-type="page" text:anchor-page-number="2" draw:z-index="636" draw:name="Shape364" draw:style-name="gr1" draw:text-style-name="P2" svg:width="0.0398in" svg:height="0.1776in" svg:x="6.8in" svg:y="0.8098in">
        <draw:text-box>
          <text:p><text:span text:style-name="T8"><text:s/></text:span></text:p>
        </draw:text-box>
      </draw:frame>
      <draw:frame text:anchor-type="page" text:anchor-page-number="5" draw:z-index="635" draw:name="Shape1133" draw:style-name="gr1" draw:text-style-name="P2" svg:width="0.0398in" svg:height="0.1776in" svg:x="6.8in" svg:y="0.8098in">
        <draw:text-box>
          <text:p><text:span text:style-name="T8"><text:s/></text:span></text:p>
        </draw:text-box>
      </draw:frame>
      <draw:frame text:anchor-type="page" text:anchor-page-number="4" draw:z-index="634" draw:name="Shape990" draw:style-name="gr1" draw:text-style-name="P2" svg:width="0.0398in" svg:height="0.1776in" svg:x="6.8in" svg:y="0.8098in">
        <draw:text-box>
          <text:p><text:span text:style-name="T8"><text:s/></text:span></text:p>
        </draw:text-box>
      </draw:frame>
      <draw:frame text:anchor-type="page" text:anchor-page-number="12" draw:z-index="633" draw:name="Shape4000" draw:style-name="gr1" draw:text-style-name="P2" svg:width="0.0398in" svg:height="0.1776in" svg:x="6.8in" svg:y="0.8098in">
        <draw:text-box>
          <text:p><text:span text:style-name="T8"><text:s/></text:span></text:p>
        </draw:text-box>
      </draw:frame>
      <draw:frame text:anchor-type="page" text:anchor-page-number="3" draw:z-index="632" draw:name="Shape689" draw:style-name="gr1" draw:text-style-name="P2" svg:width="0.0398in" svg:height="0.1776in" svg:x="6.8in" svg:y="0.8098in">
        <draw:text-box>
          <text:p><text:span text:style-name="T8"><text:s/></text:span></text:p>
        </draw:text-box>
      </draw:frame>
      <draw:frame text:anchor-type="page" text:anchor-page-number="7" draw:z-index="631" draw:name="Shape2749" draw:style-name="gr1" draw:text-style-name="P2" svg:width="0.0398in" svg:height="0.1776in" svg:x="6.8in" svg:y="0.8098in">
        <draw:text-box>
          <text:p><text:span text:style-name="T8"><text:s/></text:span></text:p>
        </draw:text-box>
      </draw:frame>
      <draw:frame text:anchor-type="page" text:anchor-page-number="9" draw:z-index="630" draw:name="Shape3281" draw:style-name="gr1" draw:text-style-name="P2" svg:width="0.0398in" svg:height="0.1776in" svg:x="6.8in" svg:y="0.8098in">
        <draw:text-box>
          <text:p><text:span text:style-name="T8"><text:s/></text:span></text:p>
        </draw:text-box>
      </draw:frame>
      <draw:frame text:anchor-type="page" text:anchor-page-number="13" draw:z-index="629" draw:name="Shape4137" draw:style-name="gr1" draw:text-style-name="P2" svg:width="0.0398in" svg:height="0.1776in" svg:x="6.8in" svg:y="0.8098in">
        <draw:text-box>
          <text:p><text:span text:style-name="T8"><text:s/></text:span></text:p>
        </draw:text-box>
      </draw:frame>
      <draw:frame text:anchor-type="page" text:anchor-page-number="10" draw:z-index="628" draw:name="Shape3513" draw:style-name="gr1" draw:text-style-name="P2" svg:width="0.0398in" svg:height="0.1776in" svg:x="6.8in" svg:y="0.8098in">
        <draw:text-box>
          <text:p><text:span text:style-name="T8"><text:s/></text:span></text:p>
        </draw:text-box>
      </draw:frame>
      <draw:frame text:anchor-type="page" text:anchor-page-number="14" draw:z-index="627" draw:name="Shape4338" draw:style-name="gr1" draw:text-style-name="P2" svg:width="0.0398in" svg:height="0.1776in" svg:x="6.8in" svg:y="0.8098in">
        <draw:text-box>
          <text:p><text:span text:style-name="T8"><text:s/></text:span></text:p>
        </draw:text-box>
      </draw:frame>
      <draw:frame text:anchor-type="page" text:anchor-page-number="8" draw:z-index="626" draw:name="Shape3125" draw:style-name="gr1" draw:text-style-name="P2" svg:width="0.0398in" svg:height="0.1776in" svg:x="6.8in" svg:y="0.8098in">
        <draw:text-box>
          <text:p><text:span text:style-name="T8"><text:s/></text:span></text:p>
        </draw:text-box>
      </draw:frame>
      <draw:frame text:anchor-type="page" text:anchor-page-number="16" draw:z-index="625" draw:name="Shape5093" draw:style-name="gr1" draw:text-style-name="P2" svg:width="0.0398in" svg:height="0.1776in" svg:x="6.8in" svg:y="0.8098in">
        <draw:text-box>
          <text:p><text:span text:style-name="T8"><text:s/></text:span></text:p>
        </draw:text-box>
      </draw:frame>
      <draw:frame text:anchor-type="page" text:anchor-page-number="6" draw:z-index="624" draw:name="Shape1777" draw:style-name="gr1" draw:text-style-name="P2" svg:width="0.0398in" svg:height="0.1776in" svg:x="6.8in" svg:y="0.8098in">
        <draw:text-box>
          <text:p><text:span text:style-name="T8"><text:s/></text:span></text:p>
        </draw:text-box>
      </draw:frame>
      <draw:polygon text:anchor-type="page" text:anchor-page-number="15" draw:z-index="623" draw:name="Shape4948" draw:style-name="gr2" draw:text-style-name="P3" svg:width="5.6516in" svg:height="0.1768in" svg:x="0.4114in" svg:y="1.0547in" svg:viewBox="0 0 14356 450" draw:points="0,0 14356,0 14356,450 0,450">
        <text:p/>
      </draw:polygon>
      <draw:polygon text:anchor-type="page" text:anchor-page-number="14" draw:z-index="622" draw:name="Shape4353" draw:style-name="gr2" draw:text-style-name="P3" svg:width="5.6516in" svg:height="0.1768in" svg:x="0.4114in" svg:y="1.0547in" svg:viewBox="0 0 14356 450" draw:points="0,0 14356,0 14356,450 0,450">
        <text:p/>
      </draw:polygon>
      <draw:polygon text:anchor-type="page" text:anchor-page-number="11" draw:z-index="621" draw:name="Shape3797" draw:style-name="gr2" draw:text-style-name="P3" svg:width="5.6516in" svg:height="0.1768in" svg:x="0.4114in" svg:y="1.0547in" svg:viewBox="0 0 14356 450" draw:points="0,0 14356,0 14356,450 0,450">
        <text:p/>
      </draw:polygon>
      <draw:polygon text:anchor-type="page" text:anchor-page-number="8" draw:z-index="620" draw:name="Shape3140" draw:style-name="gr2" draw:text-style-name="P3" svg:width="5.6516in" svg:height="0.1768in" svg:x="0.4114in" svg:y="1.0547in" svg:viewBox="0 0 14356 450" draw:points="0,0 14356,0 14356,450 0,450">
        <text:p/>
      </draw:polygon>
      <draw:polygon text:anchor-type="page" text:anchor-page-number="7" draw:z-index="619" draw:name="Shape2764" draw:style-name="gr2" draw:text-style-name="P3" svg:width="5.6516in" svg:height="0.1768in" svg:x="0.4114in" svg:y="1.0547in" svg:viewBox="0 0 14356 450" draw:points="0,0 14356,0 14356,450 0,450">
        <text:p/>
      </draw:polygon>
      <draw:polygon text:anchor-type="page" text:anchor-page-number="10" draw:z-index="618" draw:name="Shape3528" draw:style-name="gr2" draw:text-style-name="P3" svg:width="5.6516in" svg:height="0.1768in" svg:x="0.4114in" svg:y="1.0547in" svg:viewBox="0 0 14356 450" draw:points="0,0 14356,0 14356,450 0,450">
        <text:p/>
      </draw:polygon>
      <draw:polygon text:anchor-type="page" text:anchor-page-number="3" draw:z-index="617" draw:name="Shape704" draw:style-name="gr2" draw:text-style-name="P3" svg:width="5.6516in" svg:height="0.1768in" svg:x="0.4114in" svg:y="1.0547in" svg:viewBox="0 0 14356 450" draw:points="0,0 14356,0 14356,450 0,450">
        <text:p/>
      </draw:polygon>
      <draw:polygon text:anchor-type="page" text:anchor-page-number="1" draw:z-index="616" draw:name="Shape46" draw:style-name="gr2" draw:text-style-name="P3" svg:width="5.6516in" svg:height="0.1768in" svg:x="0.4114in" svg:y="1.0547in" svg:viewBox="0 0 14356 450" draw:points="0,0 14356,0 14356,450 0,450">
        <text:p/>
      </draw:polygon>
      <draw:polygon text:anchor-type="page" text:anchor-page-number="2" draw:z-index="615" draw:name="Shape379" draw:style-name="gr2" draw:text-style-name="P3" svg:width="5.6516in" svg:height="0.1768in" svg:x="0.4114in" svg:y="1.0547in" svg:viewBox="0 0 14356 450" draw:points="0,0 14356,0 14356,450 0,450">
        <text:p/>
      </draw:polygon>
      <draw:polygon text:anchor-type="page" text:anchor-page-number="9" draw:z-index="614" draw:name="Shape3296" draw:style-name="gr2" draw:text-style-name="P3" svg:width="5.6516in" svg:height="0.1768in" svg:x="0.4114in" svg:y="1.0547in" svg:viewBox="0 0 14356 450" draw:points="0,0 14356,0 14356,450 0,450">
        <text:p/>
      </draw:polygon>
      <draw:polygon text:anchor-type="page" text:anchor-page-number="6" draw:z-index="613" draw:name="Shape1792" draw:style-name="gr2" draw:text-style-name="P3" svg:width="5.6516in" svg:height="0.1768in" svg:x="0.4114in" svg:y="1.0547in" svg:viewBox="0 0 14356 450" draw:points="0,0 14356,0 14356,450 0,450">
        <text:p/>
      </draw:polygon>
      <draw:polygon text:anchor-type="page" text:anchor-page-number="12" draw:z-index="612" draw:name="Shape4015" draw:style-name="gr2" draw:text-style-name="P3" svg:width="5.6516in" svg:height="0.1768in" svg:x="0.4114in" svg:y="1.0547in" svg:viewBox="0 0 14356 450" draw:points="0,0 14356,0 14356,450 0,450">
        <text:p/>
      </draw:polygon>
      <draw:polygon text:anchor-type="page" text:anchor-page-number="4" draw:z-index="611" draw:name="Shape1005" draw:style-name="gr2" draw:text-style-name="P3" svg:width="5.6516in" svg:height="0.1768in" svg:x="0.4114in" svg:y="1.0547in" svg:viewBox="0 0 14356 450" draw:points="0,0 14356,0 14356,450 0,450">
        <text:p/>
      </draw:polygon>
      <draw:polygon text:anchor-type="page" text:anchor-page-number="16" draw:z-index="610" draw:name="Shape5108" draw:style-name="gr2" draw:text-style-name="P3" svg:width="5.6516in" svg:height="0.1768in" svg:x="0.4114in" svg:y="1.0547in" svg:viewBox="0 0 14356 450" draw:points="0,0 14356,0 14356,450 0,450">
        <text:p/>
      </draw:polygon>
      <draw:polygon text:anchor-type="page" text:anchor-page-number="13" draw:z-index="609" draw:name="Shape4152" draw:style-name="gr2" draw:text-style-name="P3" svg:width="5.6516in" svg:height="0.1768in" svg:x="0.4114in" svg:y="1.0547in" svg:viewBox="0 0 14356 450" draw:points="0,0 14356,0 14356,450 0,450">
        <text:p/>
      </draw:polygon>
      <draw:polygon text:anchor-type="page" text:anchor-page-number="5" draw:z-index="608" draw:name="Shape1148" draw:style-name="gr2" draw:text-style-name="P3" svg:width="5.6516in" svg:height="0.1768in" svg:x="0.4114in" svg:y="1.0547in" svg:viewBox="0 0 14356 450" draw:points="0,0 14356,0 14356,450 0,450">
        <text:p/>
      </draw:polygon>
      <draw:polygon text:anchor-type="page" text:anchor-page-number="9" draw:z-index="607" draw:name="Shape3294" draw:style-name="gr2" draw:text-style-name="P3" svg:width="5.7449in" svg:height="0.3685in" svg:x="0.3665in" svg:y="1.0547in" svg:viewBox="0 0 14593 937" draw:points="0,0 14593,0 14593,937 0,937">
        <text:p/>
      </draw:polygon>
      <draw:polygon text:anchor-type="page" text:anchor-page-number="10" draw:z-index="606" draw:name="Shape3526" draw:style-name="gr2" draw:text-style-name="P3" svg:width="5.7449in" svg:height="0.3685in" svg:x="0.3665in" svg:y="1.0547in" svg:viewBox="0 0 14593 937" draw:points="0,0 14593,0 14593,937 0,937">
        <text:p/>
      </draw:polygon>
      <draw:polygon text:anchor-type="page" text:anchor-page-number="15" draw:z-index="605" draw:name="Shape4946" draw:style-name="gr2" draw:text-style-name="P3" svg:width="5.7449in" svg:height="0.3685in" svg:x="0.3665in" svg:y="1.0547in" svg:viewBox="0 0 14593 937" draw:points="0,0 14593,0 14593,937 0,937">
        <text:p/>
      </draw:polygon>
      <draw:polygon text:anchor-type="page" text:anchor-page-number="5" draw:z-index="604" draw:name="Shape1146" draw:style-name="gr2" draw:text-style-name="P3" svg:width="5.7449in" svg:height="0.3685in" svg:x="0.3665in" svg:y="1.0547in" svg:viewBox="0 0 14593 937" draw:points="0,0 14593,0 14593,937 0,937">
        <text:p/>
      </draw:polygon>
      <draw:polygon text:anchor-type="page" text:anchor-page-number="7" draw:z-index="603" draw:name="Shape2762" draw:style-name="gr2" draw:text-style-name="P3" svg:width="5.7449in" svg:height="0.3685in" svg:x="0.3665in" svg:y="1.0547in" svg:viewBox="0 0 14593 937" draw:points="0,0 14593,0 14593,937 0,937">
        <text:p/>
      </draw:polygon>
      <draw:polygon text:anchor-type="page" text:anchor-page-number="1" draw:z-index="602" draw:name="Shape44" draw:style-name="gr2" draw:text-style-name="P3" svg:width="5.7449in" svg:height="0.3685in" svg:x="0.3665in" svg:y="1.0547in" svg:viewBox="0 0 14593 937" draw:points="0,0 14593,0 14593,937 0,937">
        <text:p/>
      </draw:polygon>
      <draw:polygon text:anchor-type="page" text:anchor-page-number="12" draw:z-index="601" draw:name="Shape4013" draw:style-name="gr2" draw:text-style-name="P3" svg:width="5.7449in" svg:height="0.3685in" svg:x="0.3665in" svg:y="1.0547in" svg:viewBox="0 0 14593 937" draw:points="0,0 14593,0 14593,937 0,937">
        <text:p/>
      </draw:polygon>
      <draw:polygon text:anchor-type="page" text:anchor-page-number="11" draw:z-index="600" draw:name="Shape3795" draw:style-name="gr2" draw:text-style-name="P3" svg:width="5.7449in" svg:height="0.3685in" svg:x="0.3665in" svg:y="1.0547in" svg:viewBox="0 0 14593 937" draw:points="0,0 14593,0 14593,937 0,937">
        <text:p/>
      </draw:polygon>
      <draw:polygon text:anchor-type="page" text:anchor-page-number="8" draw:z-index="599" draw:name="Shape3138" draw:style-name="gr2" draw:text-style-name="P3" svg:width="5.7449in" svg:height="0.3685in" svg:x="0.3665in" svg:y="1.0547in" svg:viewBox="0 0 14593 937" draw:points="0,0 14593,0 14593,937 0,937">
        <text:p/>
      </draw:polygon>
      <draw:polygon text:anchor-type="page" text:anchor-page-number="3" draw:z-index="598" draw:name="Shape702" draw:style-name="gr2" draw:text-style-name="P3" svg:width="5.7449in" svg:height="0.3685in" svg:x="0.3665in" svg:y="1.0547in" svg:viewBox="0 0 14593 937" draw:points="0,0 14593,0 14593,937 0,937">
        <text:p/>
      </draw:polygon>
      <draw:polygon text:anchor-type="page" text:anchor-page-number="6" draw:z-index="597" draw:name="Shape1790" draw:style-name="gr2" draw:text-style-name="P3" svg:width="5.7449in" svg:height="0.3685in" svg:x="0.3665in" svg:y="1.0547in" svg:viewBox="0 0 14593 937" draw:points="0,0 14593,0 14593,937 0,937">
        <text:p/>
      </draw:polygon>
      <draw:polygon text:anchor-type="page" text:anchor-page-number="16" draw:z-index="596" draw:name="Shape5106" draw:style-name="gr2" draw:text-style-name="P3" svg:width="5.7449in" svg:height="0.3685in" svg:x="0.3665in" svg:y="1.0547in" svg:viewBox="0 0 14593 937" draw:points="0,0 14593,0 14593,937 0,937">
        <text:p/>
      </draw:polygon>
      <draw:polygon text:anchor-type="page" text:anchor-page-number="13" draw:z-index="595" draw:name="Shape4150" draw:style-name="gr2" draw:text-style-name="P3" svg:width="5.7449in" svg:height="0.3685in" svg:x="0.3665in" svg:y="1.0547in" svg:viewBox="0 0 14593 937" draw:points="0,0 14593,0 14593,937 0,937">
        <text:p/>
      </draw:polygon>
      <draw:polygon text:anchor-type="page" text:anchor-page-number="14" draw:z-index="594" draw:name="Shape4351" draw:style-name="gr2" draw:text-style-name="P3" svg:width="5.7449in" svg:height="0.3685in" svg:x="0.3665in" svg:y="1.0547in" svg:viewBox="0 0 14593 937" draw:points="0,0 14593,0 14593,937 0,937">
        <text:p/>
      </draw:polygon>
      <draw:polygon text:anchor-type="page" text:anchor-page-number="4" draw:z-index="593" draw:name="Shape1003" draw:style-name="gr2" draw:text-style-name="P3" svg:width="5.7449in" svg:height="0.3685in" svg:x="0.3665in" svg:y="1.0547in" svg:viewBox="0 0 14593 937" draw:points="0,0 14593,0 14593,937 0,937">
        <text:p/>
      </draw:polygon>
      <draw:polygon text:anchor-type="page" text:anchor-page-number="2" draw:z-index="592" draw:name="Shape377" draw:style-name="gr2" draw:text-style-name="P3" svg:width="5.7449in" svg:height="0.3685in" svg:x="0.3665in" svg:y="1.0547in" svg:viewBox="0 0 14593 937" draw:points="0,0 14593,0 14593,937 0,937">
        <text:p/>
      </draw:polygon>
      <draw:polygon text:anchor-type="page" text:anchor-page-number="14" draw:z-index="591" draw:name="Shape4347" draw:style-name="gr3" draw:text-style-name="P4" svg:width="0.0098in" svg:height="0.1752in" svg:x="7.9965in" svg:y="0.8697in" svg:viewBox="0 0 26 446" draw:points="0,0 26,0 26,446 0,446">
        <text:p/>
      </draw:polygon>
      <draw:polygon text:anchor-type="page" text:anchor-page-number="2" draw:z-index="590" draw:name="Shape373" draw:style-name="gr3" draw:text-style-name="P4" svg:width="0.0098in" svg:height="0.1752in" svg:x="7.9965in" svg:y="0.8697in" svg:viewBox="0 0 26 446" draw:points="0,0 26,0 26,446 0,446">
        <text:p/>
      </draw:polygon>
      <draw:polygon text:anchor-type="page" text:anchor-page-number="8" draw:z-index="589" draw:name="Shape3134" draw:style-name="gr3" draw:text-style-name="P4" svg:width="0.0098in" svg:height="0.1752in" svg:x="7.9965in" svg:y="0.8697in" svg:viewBox="0 0 26 446" draw:points="0,0 26,0 26,446 0,446">
        <text:p/>
      </draw:polygon>
      <draw:polygon text:anchor-type="page" text:anchor-page-number="11" draw:z-index="588" draw:name="Shape3791" draw:style-name="gr3" draw:text-style-name="P4" svg:width="0.0098in" svg:height="0.1752in" svg:x="7.9965in" svg:y="0.8697in" svg:viewBox="0 0 26 446" draw:points="0,0 26,0 26,446 0,446">
        <text:p/>
      </draw:polygon>
      <draw:polygon text:anchor-type="page" text:anchor-page-number="6" draw:z-index="587" draw:name="Shape1786" draw:style-name="gr3" draw:text-style-name="P4" svg:width="0.0098in" svg:height="0.1752in" svg:x="7.9965in" svg:y="0.8697in" svg:viewBox="0 0 26 446" draw:points="0,0 26,0 26,446 0,446">
        <text:p/>
      </draw:polygon>
      <draw:polygon text:anchor-type="page" text:anchor-page-number="10" draw:z-index="586" draw:name="Shape3522" draw:style-name="gr3" draw:text-style-name="P4" svg:width="0.0098in" svg:height="0.1752in" svg:x="7.9965in" svg:y="0.8697in" svg:viewBox="0 0 26 446" draw:points="0,0 26,0 26,446 0,446">
        <text:p/>
      </draw:polygon>
      <draw:polygon text:anchor-type="page" text:anchor-page-number="15" draw:z-index="585" draw:name="Shape4942" draw:style-name="gr3" draw:text-style-name="P4" svg:width="0.0098in" svg:height="0.1752in" svg:x="7.9965in" svg:y="0.8697in" svg:viewBox="0 0 26 446" draw:points="0,0 26,0 26,446 0,446">
        <text:p/>
      </draw:polygon>
      <draw:polygon text:anchor-type="page" text:anchor-page-number="9" draw:z-index="584" draw:name="Shape3290" draw:style-name="gr3" draw:text-style-name="P4" svg:width="0.0098in" svg:height="0.1752in" svg:x="7.9965in" svg:y="0.8697in" svg:viewBox="0 0 26 446" draw:points="0,0 26,0 26,446 0,446">
        <text:p/>
      </draw:polygon>
      <draw:polygon text:anchor-type="page" text:anchor-page-number="1" draw:z-index="583" draw:name="Shape40" draw:style-name="gr3" draw:text-style-name="P4" svg:width="0.0098in" svg:height="0.1752in" svg:x="7.9965in" svg:y="0.8697in" svg:viewBox="0 0 26 446" draw:points="0,0 26,0 26,446 0,446">
        <text:p/>
      </draw:polygon>
      <draw:polygon text:anchor-type="page" text:anchor-page-number="5" draw:z-index="582" draw:name="Shape1142" draw:style-name="gr3" draw:text-style-name="P4" svg:width="0.0098in" svg:height="0.1752in" svg:x="7.9965in" svg:y="0.8697in" svg:viewBox="0 0 26 446" draw:points="0,0 26,0 26,446 0,446">
        <text:p/>
      </draw:polygon>
      <draw:polygon text:anchor-type="page" text:anchor-page-number="4" draw:z-index="581" draw:name="Shape999" draw:style-name="gr3" draw:text-style-name="P4" svg:width="0.0098in" svg:height="0.1752in" svg:x="7.9965in" svg:y="0.8697in" svg:viewBox="0 0 26 446" draw:points="0,0 26,0 26,446 0,446">
        <text:p/>
      </draw:polygon>
      <draw:polygon text:anchor-type="page" text:anchor-page-number="12" draw:z-index="580" draw:name="Shape4009" draw:style-name="gr3" draw:text-style-name="P4" svg:width="0.0098in" svg:height="0.1752in" svg:x="7.9965in" svg:y="0.8697in" svg:viewBox="0 0 26 446" draw:points="0,0 26,0 26,446 0,446">
        <text:p/>
      </draw:polygon>
      <draw:polygon text:anchor-type="page" text:anchor-page-number="13" draw:z-index="579" draw:name="Shape4146" draw:style-name="gr3" draw:text-style-name="P4" svg:width="0.0098in" svg:height="0.1752in" svg:x="7.9965in" svg:y="0.8697in" svg:viewBox="0 0 26 446" draw:points="0,0 26,0 26,446 0,446">
        <text:p/>
      </draw:polygon>
      <draw:polygon text:anchor-type="page" text:anchor-page-number="3" draw:z-index="578" draw:name="Shape698" draw:style-name="gr3" draw:text-style-name="P4" svg:width="0.0098in" svg:height="0.1752in" svg:x="7.9965in" svg:y="0.8697in" svg:viewBox="0 0 26 446" draw:points="0,0 26,0 26,446 0,446">
        <text:p/>
      </draw:polygon>
      <draw:polygon text:anchor-type="page" text:anchor-page-number="16" draw:z-index="577" draw:name="Shape5102" draw:style-name="gr3" draw:text-style-name="P4" svg:width="0.0098in" svg:height="0.1752in" svg:x="7.9965in" svg:y="0.8697in" svg:viewBox="0 0 26 446" draw:points="0,0 26,0 26,446 0,446">
        <text:p/>
      </draw:polygon>
      <draw:polygon text:anchor-type="page" text:anchor-page-number="7" draw:z-index="576" draw:name="Shape2758" draw:style-name="gr3" draw:text-style-name="P4" svg:width="0.0098in" svg:height="0.1752in" svg:x="7.9965in" svg:y="0.8697in" svg:viewBox="0 0 26 446" draw:points="0,0 26,0 26,446 0,446">
        <text:p/>
      </draw:polygon>
      <draw:polygon text:anchor-type="page" text:anchor-page-number="9" draw:z-index="575" draw:name="Shape3285" draw:style-name="gr3" draw:text-style-name="P4" svg:width="0.0102in" svg:height="0.1752in" svg:x="6.1063in" svg:y="0.8697in" svg:viewBox="0 0 27 446" draw:points="0,0 27,0 27,446 0,446">
        <text:p/>
      </draw:polygon>
      <draw:polygon text:anchor-type="page" text:anchor-page-number="2" draw:z-index="574" draw:name="Shape368" draw:style-name="gr3" draw:text-style-name="P4" svg:width="0.0102in" svg:height="0.1752in" svg:x="6.1063in" svg:y="0.8697in" svg:viewBox="0 0 27 446" draw:points="0,0 27,0 27,446 0,446">
        <text:p/>
      </draw:polygon>
      <draw:polygon text:anchor-type="page" text:anchor-page-number="14" draw:z-index="573" draw:name="Shape4342" draw:style-name="gr3" draw:text-style-name="P4" svg:width="0.0102in" svg:height="0.1752in" svg:x="6.1063in" svg:y="0.8697in" svg:viewBox="0 0 27 446" draw:points="0,0 27,0 27,446 0,446">
        <text:p/>
      </draw:polygon>
      <draw:polygon text:anchor-type="page" text:anchor-page-number="10" draw:z-index="572" draw:name="Shape3517" draw:style-name="gr3" draw:text-style-name="P4" svg:width="0.0102in" svg:height="0.1752in" svg:x="6.1063in" svg:y="0.8697in" svg:viewBox="0 0 27 446" draw:points="0,0 27,0 27,446 0,446">
        <text:p/>
      </draw:polygon>
      <draw:polygon text:anchor-type="page" text:anchor-page-number="7" draw:z-index="571" draw:name="Shape2753" draw:style-name="gr3" draw:text-style-name="P4" svg:width="0.0102in" svg:height="0.1752in" svg:x="6.1063in" svg:y="0.8697in" svg:viewBox="0 0 27 446" draw:points="0,0 27,0 27,446 0,446">
        <text:p/>
      </draw:polygon>
      <draw:polygon text:anchor-type="page" text:anchor-page-number="3" draw:z-index="570" draw:name="Shape693" draw:style-name="gr3" draw:text-style-name="P4" svg:width="0.0102in" svg:height="0.1752in" svg:x="6.1063in" svg:y="0.8697in" svg:viewBox="0 0 27 446" draw:points="0,0 27,0 27,446 0,446">
        <text:p/>
      </draw:polygon>
      <draw:polygon text:anchor-type="page" text:anchor-page-number="8" draw:z-index="569" draw:name="Shape3129" draw:style-name="gr3" draw:text-style-name="P4" svg:width="0.0102in" svg:height="0.1752in" svg:x="6.1063in" svg:y="0.8697in" svg:viewBox="0 0 27 446" draw:points="0,0 27,0 27,446 0,446">
        <text:p/>
      </draw:polygon>
      <draw:polygon text:anchor-type="page" text:anchor-page-number="1" draw:z-index="568" draw:name="Shape35" draw:style-name="gr3" draw:text-style-name="P4" svg:width="0.0102in" svg:height="0.1752in" svg:x="6.1063in" svg:y="0.8697in" svg:viewBox="0 0 27 446" draw:points="0,0 27,0 27,446 0,446">
        <text:p/>
      </draw:polygon>
      <draw:polygon text:anchor-type="page" text:anchor-page-number="12" draw:z-index="567" draw:name="Shape4004" draw:style-name="gr3" draw:text-style-name="P4" svg:width="0.0102in" svg:height="0.1752in" svg:x="6.1063in" svg:y="0.8697in" svg:viewBox="0 0 27 446" draw:points="0,0 27,0 27,446 0,446">
        <text:p/>
      </draw:polygon>
      <draw:polygon text:anchor-type="page" text:anchor-page-number="16" draw:z-index="566" draw:name="Shape5097" draw:style-name="gr3" draw:text-style-name="P4" svg:width="0.0102in" svg:height="0.1752in" svg:x="6.1063in" svg:y="0.8697in" svg:viewBox="0 0 27 446" draw:points="0,0 27,0 27,446 0,446">
        <text:p/>
      </draw:polygon>
      <draw:polygon text:anchor-type="page" text:anchor-page-number="5" draw:z-index="565" draw:name="Shape1137" draw:style-name="gr3" draw:text-style-name="P4" svg:width="0.0102in" svg:height="0.1752in" svg:x="6.1063in" svg:y="0.8697in" svg:viewBox="0 0 27 446" draw:points="0,0 27,0 27,446 0,446">
        <text:p/>
      </draw:polygon>
      <draw:polygon text:anchor-type="page" text:anchor-page-number="4" draw:z-index="564" draw:name="Shape994" draw:style-name="gr3" draw:text-style-name="P4" svg:width="0.0102in" svg:height="0.1752in" svg:x="6.1063in" svg:y="0.8697in" svg:viewBox="0 0 27 446" draw:points="0,0 27,0 27,446 0,446">
        <text:p/>
      </draw:polygon>
      <draw:polygon text:anchor-type="page" text:anchor-page-number="6" draw:z-index="563" draw:name="Shape1781" draw:style-name="gr3" draw:text-style-name="P4" svg:width="0.0102in" svg:height="0.1752in" svg:x="6.1063in" svg:y="0.8697in" svg:viewBox="0 0 27 446" draw:points="0,0 27,0 27,446 0,446">
        <text:p/>
      </draw:polygon>
      <draw:polygon text:anchor-type="page" text:anchor-page-number="13" draw:z-index="562" draw:name="Shape4141" draw:style-name="gr3" draw:text-style-name="P4" svg:width="0.0102in" svg:height="0.1752in" svg:x="6.1063in" svg:y="0.8697in" svg:viewBox="0 0 27 446" draw:points="0,0 27,0 27,446 0,446">
        <text:p/>
      </draw:polygon>
      <draw:polygon text:anchor-type="page" text:anchor-page-number="15" draw:z-index="561" draw:name="Shape4937" draw:style-name="gr3" draw:text-style-name="P4" svg:width="0.0102in" svg:height="0.1752in" svg:x="6.1063in" svg:y="0.8697in" svg:viewBox="0 0 27 446" draw:points="0,0 27,0 27,446 0,446">
        <text:p/>
      </draw:polygon>
      <draw:polygon text:anchor-type="page" text:anchor-page-number="11" draw:z-index="560" draw:name="Shape3786" draw:style-name="gr3" draw:text-style-name="P4" svg:width="0.0102in" svg:height="0.1752in" svg:x="6.1063in" svg:y="0.8697in" svg:viewBox="0 0 27 446" draw:points="0,0 27,0 27,446 0,446">
        <text:p/>
      </draw:polygon>
      <draw:polygon text:anchor-type="page" text:anchor-page-number="12" draw:z-index="559" draw:name="Shape4001" draw:style-name="gr3" draw:text-style-name="P4" svg:width="0.0098in" svg:height="0.1752in" svg:x="0.3583in" svg:y="0.8697in" svg:viewBox="0 0 26 446" draw:points="0,0 26,0 26,446 0,446">
        <text:p/>
      </draw:polygon>
      <draw:polygon text:anchor-type="page" text:anchor-page-number="14" draw:z-index="558" draw:name="Shape4339" draw:style-name="gr3" draw:text-style-name="P4" svg:width="0.0098in" svg:height="0.1752in" svg:x="0.3583in" svg:y="0.8697in" svg:viewBox="0 0 26 446" draw:points="0,0 26,0 26,446 0,446">
        <text:p/>
      </draw:polygon>
      <draw:polygon text:anchor-type="page" text:anchor-page-number="13" draw:z-index="557" draw:name="Shape4138" draw:style-name="gr3" draw:text-style-name="P4" svg:width="0.0098in" svg:height="0.1752in" svg:x="0.3583in" svg:y="0.8697in" svg:viewBox="0 0 26 446" draw:points="0,0 26,0 26,446 0,446">
        <text:p/>
      </draw:polygon>
      <draw:polygon text:anchor-type="page" text:anchor-page-number="1" draw:z-index="556" draw:name="Shape32" draw:style-name="gr3" draw:text-style-name="P4" svg:width="0.0098in" svg:height="0.1752in" svg:x="0.3583in" svg:y="0.8697in" svg:viewBox="0 0 26 446" draw:points="0,0 26,0 26,446 0,446">
        <text:p/>
      </draw:polygon>
      <draw:polygon text:anchor-type="page" text:anchor-page-number="7" draw:z-index="555" draw:name="Shape2750" draw:style-name="gr3" draw:text-style-name="P4" svg:width="0.0098in" svg:height="0.1752in" svg:x="0.3583in" svg:y="0.8697in" svg:viewBox="0 0 26 446" draw:points="0,0 26,0 26,446 0,446">
        <text:p/>
      </draw:polygon>
      <draw:polygon text:anchor-type="page" text:anchor-page-number="9" draw:z-index="554" draw:name="Shape3282" draw:style-name="gr3" draw:text-style-name="P4" svg:width="0.0098in" svg:height="0.1752in" svg:x="0.3583in" svg:y="0.8697in" svg:viewBox="0 0 26 446" draw:points="0,0 26,0 26,446 0,446">
        <text:p/>
      </draw:polygon>
      <draw:polygon text:anchor-type="page" text:anchor-page-number="3" draw:z-index="553" draw:name="Shape690" draw:style-name="gr3" draw:text-style-name="P4" svg:width="0.0098in" svg:height="0.1752in" svg:x="0.3583in" svg:y="0.8697in" svg:viewBox="0 0 26 446" draw:points="0,0 26,0 26,446 0,446">
        <text:p/>
      </draw:polygon>
      <draw:polygon text:anchor-type="page" text:anchor-page-number="8" draw:z-index="552" draw:name="Shape3126" draw:style-name="gr3" draw:text-style-name="P4" svg:width="0.0098in" svg:height="0.1752in" svg:x="0.3583in" svg:y="0.8697in" svg:viewBox="0 0 26 446" draw:points="0,0 26,0 26,446 0,446">
        <text:p/>
      </draw:polygon>
      <draw:polygon text:anchor-type="page" text:anchor-page-number="2" draw:z-index="551" draw:name="Shape365" draw:style-name="gr3" draw:text-style-name="P4" svg:width="0.0098in" svg:height="0.1752in" svg:x="0.3583in" svg:y="0.8697in" svg:viewBox="0 0 26 446" draw:points="0,0 26,0 26,446 0,446">
        <text:p/>
      </draw:polygon>
      <draw:polygon text:anchor-type="page" text:anchor-page-number="6" draw:z-index="550" draw:name="Shape1778" draw:style-name="gr3" draw:text-style-name="P4" svg:width="0.0098in" svg:height="0.1752in" svg:x="0.3583in" svg:y="0.8697in" svg:viewBox="0 0 26 446" draw:points="0,0 26,0 26,446 0,446">
        <text:p/>
      </draw:polygon>
      <draw:polygon text:anchor-type="page" text:anchor-page-number="11" draw:z-index="549" draw:name="Shape3783" draw:style-name="gr3" draw:text-style-name="P4" svg:width="0.0098in" svg:height="0.1752in" svg:x="0.3583in" svg:y="0.8697in" svg:viewBox="0 0 26 446" draw:points="0,0 26,0 26,446 0,446">
        <text:p/>
      </draw:polygon>
      <draw:polygon text:anchor-type="page" text:anchor-page-number="4" draw:z-index="548" draw:name="Shape991" draw:style-name="gr3" draw:text-style-name="P4" svg:width="0.0098in" svg:height="0.1752in" svg:x="0.3583in" svg:y="0.8697in" svg:viewBox="0 0 26 446" draw:points="0,0 26,0 26,446 0,446">
        <text:p/>
      </draw:polygon>
      <draw:polygon text:anchor-type="page" text:anchor-page-number="16" draw:z-index="547" draw:name="Shape5094" draw:style-name="gr3" draw:text-style-name="P4" svg:width="0.0098in" svg:height="0.1752in" svg:x="0.3583in" svg:y="0.8697in" svg:viewBox="0 0 26 446" draw:points="0,0 26,0 26,446 0,446">
        <text:p/>
      </draw:polygon>
      <draw:polygon text:anchor-type="page" text:anchor-page-number="5" draw:z-index="546" draw:name="Shape1134" draw:style-name="gr3" draw:text-style-name="P4" svg:width="0.0098in" svg:height="0.1752in" svg:x="0.3583in" svg:y="0.8697in" svg:viewBox="0 0 26 446" draw:points="0,0 26,0 26,446 0,446">
        <text:p/>
      </draw:polygon>
      <draw:polygon text:anchor-type="page" text:anchor-page-number="15" draw:z-index="545" draw:name="Shape4934" draw:style-name="gr3" draw:text-style-name="P4" svg:width="0.0098in" svg:height="0.1752in" svg:x="0.3583in" svg:y="0.8697in" svg:viewBox="0 0 26 446" draw:points="0,0 26,0 26,446 0,446">
        <text:p/>
      </draw:polygon>
      <draw:polygon text:anchor-type="page" text:anchor-page-number="10" draw:z-index="544" draw:name="Shape3514" draw:style-name="gr3" draw:text-style-name="P4" svg:width="0.0098in" svg:height="0.1752in" svg:x="0.3583in" svg:y="0.8697in" svg:viewBox="0 0 26 446" draw:points="0,0 26,0 26,446 0,446">
        <text:p/>
      </draw:polygon>
      <draw:frame text:anchor-type="page" text:anchor-page-number="14" draw:z-index="543" draw:name="Shape4345" draw:style-name="gr1" draw:text-style-name="P2" svg:width="0.6406in" svg:height="0.0976in" svg:x="6.1598in" svg:y="0.8709in">
        <draw:text-box>
          <text:p><text:span text:style-name="T9">Nuova emissione</text:span></text:p>
        </draw:text-box>
      </draw:frame>
      <draw:frame text:anchor-type="page" text:anchor-page-number="16" draw:z-index="542" draw:name="Shape5100" draw:style-name="gr1" draw:text-style-name="P2" svg:width="0.6406in" svg:height="0.0976in" svg:x="6.1598in" svg:y="0.8709in">
        <draw:text-box>
          <text:p><text:span text:style-name="T9">Nuova emissione</text:span></text:p>
        </draw:text-box>
      </draw:frame>
      <draw:frame text:anchor-type="page" text:anchor-page-number="5" draw:z-index="541" draw:name="Shape1140" draw:style-name="gr1" draw:text-style-name="P2" svg:width="0.6406in" svg:height="0.0976in" svg:x="6.1598in" svg:y="0.8709in">
        <draw:text-box>
          <text:p><text:span text:style-name="T9">Nuova emissione</text:span></text:p>
        </draw:text-box>
      </draw:frame>
      <draw:frame text:anchor-type="page" text:anchor-page-number="1" draw:z-index="540" draw:name="Shape38" draw:style-name="gr1" draw:text-style-name="P2" svg:width="0.6406in" svg:height="0.0976in" svg:x="6.1598in" svg:y="0.8709in">
        <draw:text-box>
          <text:p><text:span text:style-name="T9">Nuova emissione</text:span></text:p>
        </draw:text-box>
      </draw:frame>
      <draw:frame text:anchor-type="page" text:anchor-page-number="6" draw:z-index="539" draw:name="Shape1784" draw:style-name="gr1" draw:text-style-name="P2" svg:width="0.6406in" svg:height="0.0976in" svg:x="6.1598in" svg:y="0.8709in">
        <draw:text-box>
          <text:p><text:span text:style-name="T9">Nuova emissione</text:span></text:p>
        </draw:text-box>
      </draw:frame>
      <draw:frame text:anchor-type="page" text:anchor-page-number="3" draw:z-index="538" draw:name="Shape696" draw:style-name="gr1" draw:text-style-name="P2" svg:width="0.6406in" svg:height="0.0976in" svg:x="6.1598in" svg:y="0.8709in">
        <draw:text-box>
          <text:p><text:span text:style-name="T9">Nuova emissione</text:span></text:p>
        </draw:text-box>
      </draw:frame>
      <draw:frame text:anchor-type="page" text:anchor-page-number="2" draw:z-index="537" draw:name="Shape371" draw:style-name="gr1" draw:text-style-name="P2" svg:width="0.6406in" svg:height="0.0976in" svg:x="6.1598in" svg:y="0.8709in">
        <draw:text-box>
          <text:p><text:span text:style-name="T9">Nuova emissione</text:span></text:p>
        </draw:text-box>
      </draw:frame>
      <draw:frame text:anchor-type="page" text:anchor-page-number="7" draw:z-index="536" draw:name="Shape2756" draw:style-name="gr1" draw:text-style-name="P2" svg:width="0.6406in" svg:height="0.0976in" svg:x="6.1598in" svg:y="0.8709in">
        <draw:text-box>
          <text:p><text:span text:style-name="T9">Nuova emissione</text:span></text:p>
        </draw:text-box>
      </draw:frame>
      <draw:frame text:anchor-type="page" text:anchor-page-number="8" draw:z-index="535" draw:name="Shape3132" draw:style-name="gr1" draw:text-style-name="P2" svg:width="0.6406in" svg:height="0.0976in" svg:x="6.1598in" svg:y="0.8709in">
        <draw:text-box>
          <text:p><text:span text:style-name="T9">Nuova emissione</text:span></text:p>
        </draw:text-box>
      </draw:frame>
      <draw:frame text:anchor-type="page" text:anchor-page-number="4" draw:z-index="534" draw:name="Shape997" draw:style-name="gr1" draw:text-style-name="P2" svg:width="0.6406in" svg:height="0.0976in" svg:x="6.1598in" svg:y="0.8709in">
        <draw:text-box>
          <text:p><text:span text:style-name="T9">Nuova emissione</text:span></text:p>
        </draw:text-box>
      </draw:frame>
      <draw:frame text:anchor-type="page" text:anchor-page-number="12" draw:z-index="533" draw:name="Shape4007" draw:style-name="gr1" draw:text-style-name="P2" svg:width="0.6406in" svg:height="0.0976in" svg:x="6.1598in" svg:y="0.8709in">
        <draw:text-box>
          <text:p><text:span text:style-name="T9">Nuova emissione</text:span></text:p>
        </draw:text-box>
      </draw:frame>
      <draw:frame text:anchor-type="page" text:anchor-page-number="9" draw:z-index="532" draw:name="Shape3288" draw:style-name="gr1" draw:text-style-name="P2" svg:width="0.6406in" svg:height="0.0976in" svg:x="6.1598in" svg:y="0.8709in">
        <draw:text-box>
          <text:p><text:span text:style-name="T9">Nuova emissione</text:span></text:p>
        </draw:text-box>
      </draw:frame>
      <draw:frame text:anchor-type="page" text:anchor-page-number="13" draw:z-index="531" draw:name="Shape4144" draw:style-name="gr1" draw:text-style-name="P2" svg:width="0.6406in" svg:height="0.0976in" svg:x="6.1598in" svg:y="0.8709in">
        <draw:text-box>
          <text:p><text:span text:style-name="T9">Nuova emissione</text:span></text:p>
        </draw:text-box>
      </draw:frame>
      <draw:frame text:anchor-type="page" text:anchor-page-number="11" draw:z-index="530" draw:name="Shape3789" draw:style-name="gr1" draw:text-style-name="P2" svg:width="0.6406in" svg:height="0.0976in" svg:x="6.1598in" svg:y="0.8709in">
        <draw:text-box>
          <text:p><text:span text:style-name="T9">Nuova emissione</text:span></text:p>
        </draw:text-box>
      </draw:frame>
      <draw:frame text:anchor-type="page" text:anchor-page-number="10" draw:z-index="529" draw:name="Shape3520" draw:style-name="gr1" draw:text-style-name="P2" svg:width="0.6406in" svg:height="0.0976in" svg:x="6.1598in" svg:y="0.8709in">
        <draw:text-box>
          <text:p><text:span text:style-name="T9">Nuova emissione</text:span></text:p>
        </draw:text-box>
      </draw:frame>
      <draw:frame text:anchor-type="page" text:anchor-page-number="15" draw:z-index="528" draw:name="Shape4940" draw:style-name="gr1" draw:text-style-name="P2" svg:width="0.6406in" svg:height="0.0976in" svg:x="6.1598in" svg:y="0.8709in">
        <draw:text-box>
          <text:p><text:span text:style-name="T9">Nuova emissione</text:span></text:p>
        </draw:text-box>
      </draw:frame>
      <draw:frame text:anchor-type="page" text:anchor-page-number="4" draw:z-index="527" draw:name="Shape998" draw:style-name="gr1" draw:text-style-name="P2" svg:width="0.0787in" svg:height="0.1776in" svg:x="0.411in" svg:y="0.8717in">
        <draw:text-box>
          <text:p><text:span text:style-name="T8"><text:s text:c="2"/></text:span></text:p>
        </draw:text-box>
      </draw:frame>
      <draw:frame text:anchor-type="page" text:anchor-page-number="12" draw:z-index="526" draw:name="Shape4008" draw:style-name="gr1" draw:text-style-name="P2" svg:width="0.0787in" svg:height="0.1776in" svg:x="0.411in" svg:y="0.8717in">
        <draw:text-box>
          <text:p><text:span text:style-name="T8"><text:s text:c="2"/></text:span></text:p>
        </draw:text-box>
      </draw:frame>
      <draw:frame text:anchor-type="page" text:anchor-page-number="9" draw:z-index="525" draw:name="Shape3289" draw:style-name="gr1" draw:text-style-name="P2" svg:width="0.0787in" svg:height="0.1776in" svg:x="0.411in" svg:y="0.8717in">
        <draw:text-box>
          <text:p><text:span text:style-name="T8"><text:s text:c="2"/></text:span></text:p>
        </draw:text-box>
      </draw:frame>
      <draw:frame text:anchor-type="page" text:anchor-page-number="14" draw:z-index="524" draw:name="Shape4346" draw:style-name="gr1" draw:text-style-name="P2" svg:width="0.0787in" svg:height="0.1776in" svg:x="0.411in" svg:y="0.8717in">
        <draw:text-box>
          <text:p><text:span text:style-name="T8"><text:s text:c="2"/></text:span></text:p>
        </draw:text-box>
      </draw:frame>
      <draw:frame text:anchor-type="page" text:anchor-page-number="15" draw:z-index="523" draw:name="Shape4941" draw:style-name="gr1" draw:text-style-name="P2" svg:width="0.0787in" svg:height="0.1776in" svg:x="0.411in" svg:y="0.8717in">
        <draw:text-box>
          <text:p><text:span text:style-name="T8"><text:s text:c="2"/></text:span></text:p>
        </draw:text-box>
      </draw:frame>
      <draw:frame text:anchor-type="page" text:anchor-page-number="7" draw:z-index="522" draw:name="Shape2757" draw:style-name="gr1" draw:text-style-name="P2" svg:width="0.0787in" svg:height="0.1776in" svg:x="0.411in" svg:y="0.8717in">
        <draw:text-box>
          <text:p><text:span text:style-name="T8"><text:s text:c="2"/></text:span></text:p>
        </draw:text-box>
      </draw:frame>
      <draw:frame text:anchor-type="page" text:anchor-page-number="8" draw:z-index="521" draw:name="Shape3133" draw:style-name="gr1" draw:text-style-name="P2" svg:width="0.0787in" svg:height="0.1776in" svg:x="0.411in" svg:y="0.8717in">
        <draw:text-box>
          <text:p><text:span text:style-name="T8"><text:s text:c="2"/></text:span></text:p>
        </draw:text-box>
      </draw:frame>
      <draw:frame text:anchor-type="page" text:anchor-page-number="5" draw:z-index="520" draw:name="Shape1141" draw:style-name="gr1" draw:text-style-name="P2" svg:width="0.0787in" svg:height="0.1776in" svg:x="0.411in" svg:y="0.8717in">
        <draw:text-box>
          <text:p><text:span text:style-name="T8"><text:s text:c="2"/></text:span></text:p>
        </draw:text-box>
      </draw:frame>
      <draw:frame text:anchor-type="page" text:anchor-page-number="11" draw:z-index="519" draw:name="Shape3790" draw:style-name="gr1" draw:text-style-name="P2" svg:width="0.0787in" svg:height="0.1776in" svg:x="0.411in" svg:y="0.8717in">
        <draw:text-box>
          <text:p><text:span text:style-name="T8"><text:s text:c="2"/></text:span></text:p>
        </draw:text-box>
      </draw:frame>
      <draw:frame text:anchor-type="page" text:anchor-page-number="3" draw:z-index="518" draw:name="Shape697" draw:style-name="gr1" draw:text-style-name="P2" svg:width="0.0787in" svg:height="0.1776in" svg:x="0.411in" svg:y="0.8717in">
        <draw:text-box>
          <text:p><text:span text:style-name="T8"><text:s text:c="2"/></text:span></text:p>
        </draw:text-box>
      </draw:frame>
      <draw:frame text:anchor-type="page" text:anchor-page-number="6" draw:z-index="517" draw:name="Shape1785" draw:style-name="gr1" draw:text-style-name="P2" svg:width="0.0787in" svg:height="0.1776in" svg:x="0.411in" svg:y="0.8717in">
        <draw:text-box>
          <text:p><text:span text:style-name="T8"><text:s text:c="2"/></text:span></text:p>
        </draw:text-box>
      </draw:frame>
      <draw:frame text:anchor-type="page" text:anchor-page-number="2" draw:z-index="516" draw:name="Shape372" draw:style-name="gr1" draw:text-style-name="P2" svg:width="0.0787in" svg:height="0.1776in" svg:x="0.411in" svg:y="0.8717in">
        <draw:text-box>
          <text:p><text:span text:style-name="T8"><text:s text:c="2"/></text:span></text:p>
        </draw:text-box>
      </draw:frame>
      <draw:frame text:anchor-type="page" text:anchor-page-number="13" draw:z-index="515" draw:name="Shape4145" draw:style-name="gr1" draw:text-style-name="P2" svg:width="0.0787in" svg:height="0.1776in" svg:x="0.411in" svg:y="0.8717in">
        <draw:text-box>
          <text:p><text:span text:style-name="T8"><text:s text:c="2"/></text:span></text:p>
        </draw:text-box>
      </draw:frame>
      <draw:frame text:anchor-type="page" text:anchor-page-number="1" draw:z-index="514" draw:name="Shape39" draw:style-name="gr1" draw:text-style-name="P2" svg:width="0.0787in" svg:height="0.1776in" svg:x="0.411in" svg:y="0.8717in">
        <draw:text-box>
          <text:p><text:span text:style-name="T8"><text:s text:c="2"/></text:span></text:p>
        </draw:text-box>
      </draw:frame>
      <draw:frame text:anchor-type="page" text:anchor-page-number="16" draw:z-index="513" draw:name="Shape5101" draw:style-name="gr1" draw:text-style-name="P2" svg:width="0.0787in" svg:height="0.1776in" svg:x="0.411in" svg:y="0.8717in">
        <draw:text-box>
          <text:p><text:span text:style-name="T8"><text:s text:c="2"/></text:span></text:p>
        </draw:text-box>
      </draw:frame>
      <draw:frame text:anchor-type="page" text:anchor-page-number="10" draw:z-index="512" draw:name="Shape3521" draw:style-name="gr1" draw:text-style-name="P2" svg:width="0.0787in" svg:height="0.1776in" svg:x="0.411in" svg:y="0.8717in">
        <draw:text-box>
          <text:p><text:span text:style-name="T8"><text:s text:c="2"/></text:span></text:p>
        </draw:text-box>
      </draw:frame>
      <draw:polygon text:anchor-type="page" text:anchor-page-number="10" draw:z-index="511" draw:name="Shape3519" draw:style-name="gr2" draw:text-style-name="P3" svg:width="1.7917in" svg:height="0.0953in" svg:x="6.1598in" svg:y="0.8697in" svg:viewBox="0 0 4552 243" draw:points="0,0 4552,0 4552,243 0,243">
        <text:p/>
      </draw:polygon>
      <draw:polygon text:anchor-type="page" text:anchor-page-number="11" draw:z-index="510" draw:name="Shape3788" draw:style-name="gr2" draw:text-style-name="P3" svg:width="1.7917in" svg:height="0.0953in" svg:x="6.1598in" svg:y="0.8697in" svg:viewBox="0 0 4552 243" draw:points="0,0 4552,0 4552,243 0,243">
        <text:p/>
      </draw:polygon>
      <draw:polygon text:anchor-type="page" text:anchor-page-number="1" draw:z-index="509" draw:name="Shape37" draw:style-name="gr2" draw:text-style-name="P3" svg:width="1.7917in" svg:height="0.0953in" svg:x="6.1598in" svg:y="0.8697in" svg:viewBox="0 0 4552 243" draw:points="0,0 4552,0 4552,243 0,243">
        <text:p/>
      </draw:polygon>
      <draw:polygon text:anchor-type="page" text:anchor-page-number="3" draw:z-index="508" draw:name="Shape695" draw:style-name="gr2" draw:text-style-name="P3" svg:width="1.7917in" svg:height="0.0953in" svg:x="6.1598in" svg:y="0.8697in" svg:viewBox="0 0 4552 243" draw:points="0,0 4552,0 4552,243 0,243">
        <text:p/>
      </draw:polygon>
      <draw:polygon text:anchor-type="page" text:anchor-page-number="6" draw:z-index="507" draw:name="Shape1783" draw:style-name="gr2" draw:text-style-name="P3" svg:width="1.7917in" svg:height="0.0953in" svg:x="6.1598in" svg:y="0.8697in" svg:viewBox="0 0 4552 243" draw:points="0,0 4552,0 4552,243 0,243">
        <text:p/>
      </draw:polygon>
      <draw:polygon text:anchor-type="page" text:anchor-page-number="8" draw:z-index="506" draw:name="Shape3131" draw:style-name="gr2" draw:text-style-name="P3" svg:width="1.7917in" svg:height="0.0953in" svg:x="6.1598in" svg:y="0.8697in" svg:viewBox="0 0 4552 243" draw:points="0,0 4552,0 4552,243 0,243">
        <text:p/>
      </draw:polygon>
      <draw:polygon text:anchor-type="page" text:anchor-page-number="12" draw:z-index="505" draw:name="Shape4006" draw:style-name="gr2" draw:text-style-name="P3" svg:width="1.7917in" svg:height="0.0953in" svg:x="6.1598in" svg:y="0.8697in" svg:viewBox="0 0 4552 243" draw:points="0,0 4552,0 4552,243 0,243">
        <text:p/>
      </draw:polygon>
      <draw:polygon text:anchor-type="page" text:anchor-page-number="13" draw:z-index="504" draw:name="Shape4143" draw:style-name="gr2" draw:text-style-name="P3" svg:width="1.7917in" svg:height="0.0953in" svg:x="6.1598in" svg:y="0.8697in" svg:viewBox="0 0 4552 243" draw:points="0,0 4552,0 4552,243 0,243">
        <text:p/>
      </draw:polygon>
      <draw:polygon text:anchor-type="page" text:anchor-page-number="14" draw:z-index="503" draw:name="Shape4344" draw:style-name="gr2" draw:text-style-name="P3" svg:width="1.7917in" svg:height="0.0953in" svg:x="6.1598in" svg:y="0.8697in" svg:viewBox="0 0 4552 243" draw:points="0,0 4552,0 4552,243 0,243">
        <text:p/>
      </draw:polygon>
      <draw:polygon text:anchor-type="page" text:anchor-page-number="2" draw:z-index="502" draw:name="Shape370" draw:style-name="gr2" draw:text-style-name="P3" svg:width="1.7917in" svg:height="0.0953in" svg:x="6.1598in" svg:y="0.8697in" svg:viewBox="0 0 4552 243" draw:points="0,0 4552,0 4552,243 0,243">
        <text:p/>
      </draw:polygon>
      <draw:polygon text:anchor-type="page" text:anchor-page-number="9" draw:z-index="501" draw:name="Shape3287" draw:style-name="gr2" draw:text-style-name="P3" svg:width="1.7917in" svg:height="0.0953in" svg:x="6.1598in" svg:y="0.8697in" svg:viewBox="0 0 4552 243" draw:points="0,0 4552,0 4552,243 0,243">
        <text:p/>
      </draw:polygon>
      <draw:polygon text:anchor-type="page" text:anchor-page-number="16" draw:z-index="500" draw:name="Shape5099" draw:style-name="gr2" draw:text-style-name="P3" svg:width="1.7917in" svg:height="0.0953in" svg:x="6.1598in" svg:y="0.8697in" svg:viewBox="0 0 4552 243" draw:points="0,0 4552,0 4552,243 0,243">
        <text:p/>
      </draw:polygon>
      <draw:polygon text:anchor-type="page" text:anchor-page-number="5" draw:z-index="499" draw:name="Shape1139" draw:style-name="gr2" draw:text-style-name="P3" svg:width="1.7917in" svg:height="0.0953in" svg:x="6.1598in" svg:y="0.8697in" svg:viewBox="0 0 4552 243" draw:points="0,0 4552,0 4552,243 0,243">
        <text:p/>
      </draw:polygon>
      <draw:polygon text:anchor-type="page" text:anchor-page-number="4" draw:z-index="498" draw:name="Shape996" draw:style-name="gr2" draw:text-style-name="P3" svg:width="1.7917in" svg:height="0.0953in" svg:x="6.1598in" svg:y="0.8697in" svg:viewBox="0 0 4552 243" draw:points="0,0 4552,0 4552,243 0,243">
        <text:p/>
      </draw:polygon>
      <draw:polygon text:anchor-type="page" text:anchor-page-number="15" draw:z-index="497" draw:name="Shape4939" draw:style-name="gr2" draw:text-style-name="P3" svg:width="1.7917in" svg:height="0.0953in" svg:x="6.1598in" svg:y="0.8697in" svg:viewBox="0 0 4552 243" draw:points="0,0 4552,0 4552,243 0,243">
        <text:p/>
      </draw:polygon>
      <draw:polygon text:anchor-type="page" text:anchor-page-number="7" draw:z-index="496" draw:name="Shape2755" draw:style-name="gr2" draw:text-style-name="P3" svg:width="1.7917in" svg:height="0.0953in" svg:x="6.1598in" svg:y="0.8697in" svg:viewBox="0 0 4552 243" draw:points="0,0 4552,0 4552,243 0,243">
        <text:p/>
      </draw:polygon>
      <draw:polygon text:anchor-type="page" text:anchor-page-number="13" draw:z-index="495" draw:name="Shape4142" draw:style-name="gr2" draw:text-style-name="P3" svg:width="1.8799in" svg:height="0.1752in" svg:x="6.1165in" svg:y="0.8697in" svg:viewBox="0 0 4776 446" draw:points="0,0 4776,0 4776,446 0,446">
        <text:p/>
      </draw:polygon>
      <draw:polygon text:anchor-type="page" text:anchor-page-number="11" draw:z-index="494" draw:name="Shape3787" draw:style-name="gr2" draw:text-style-name="P3" svg:width="1.8799in" svg:height="0.1752in" svg:x="6.1165in" svg:y="0.8697in" svg:viewBox="0 0 4776 446" draw:points="0,0 4776,0 4776,446 0,446">
        <text:p/>
      </draw:polygon>
      <draw:polygon text:anchor-type="page" text:anchor-page-number="4" draw:z-index="493" draw:name="Shape995" draw:style-name="gr2" draw:text-style-name="P3" svg:width="1.8799in" svg:height="0.1752in" svg:x="6.1165in" svg:y="0.8697in" svg:viewBox="0 0 4776 446" draw:points="0,0 4776,0 4776,446 0,446">
        <text:p/>
      </draw:polygon>
      <draw:polygon text:anchor-type="page" text:anchor-page-number="5" draw:z-index="492" draw:name="Shape1138" draw:style-name="gr2" draw:text-style-name="P3" svg:width="1.8799in" svg:height="0.1752in" svg:x="6.1165in" svg:y="0.8697in" svg:viewBox="0 0 4776 446" draw:points="0,0 4776,0 4776,446 0,446">
        <text:p/>
      </draw:polygon>
      <draw:polygon text:anchor-type="page" text:anchor-page-number="7" draw:z-index="491" draw:name="Shape2754" draw:style-name="gr2" draw:text-style-name="P3" svg:width="1.8799in" svg:height="0.1752in" svg:x="6.1165in" svg:y="0.8697in" svg:viewBox="0 0 4776 446" draw:points="0,0 4776,0 4776,446 0,446">
        <text:p/>
      </draw:polygon>
      <draw:polygon text:anchor-type="page" text:anchor-page-number="15" draw:z-index="490" draw:name="Shape4938" draw:style-name="gr2" draw:text-style-name="P3" svg:width="1.8799in" svg:height="0.1752in" svg:x="6.1165in" svg:y="0.8697in" svg:viewBox="0 0 4776 446" draw:points="0,0 4776,0 4776,446 0,446">
        <text:p/>
      </draw:polygon>
      <draw:polygon text:anchor-type="page" text:anchor-page-number="6" draw:z-index="489" draw:name="Shape1782" draw:style-name="gr2" draw:text-style-name="P3" svg:width="1.8799in" svg:height="0.1752in" svg:x="6.1165in" svg:y="0.8697in" svg:viewBox="0 0 4776 446" draw:points="0,0 4776,0 4776,446 0,446">
        <text:p/>
      </draw:polygon>
      <draw:polygon text:anchor-type="page" text:anchor-page-number="16" draw:z-index="488" draw:name="Shape5098" draw:style-name="gr2" draw:text-style-name="P3" svg:width="1.8799in" svg:height="0.1752in" svg:x="6.1165in" svg:y="0.8697in" svg:viewBox="0 0 4776 446" draw:points="0,0 4776,0 4776,446 0,446">
        <text:p/>
      </draw:polygon>
      <draw:polygon text:anchor-type="page" text:anchor-page-number="14" draw:z-index="487" draw:name="Shape4343" draw:style-name="gr2" draw:text-style-name="P3" svg:width="1.8799in" svg:height="0.1752in" svg:x="6.1165in" svg:y="0.8697in" svg:viewBox="0 0 4776 446" draw:points="0,0 4776,0 4776,446 0,446">
        <text:p/>
      </draw:polygon>
      <draw:polygon text:anchor-type="page" text:anchor-page-number="1" draw:z-index="486" draw:name="Shape36" draw:style-name="gr2" draw:text-style-name="P3" svg:width="1.8799in" svg:height="0.1752in" svg:x="6.1165in" svg:y="0.8697in" svg:viewBox="0 0 4776 446" draw:points="0,0 4776,0 4776,446 0,446">
        <text:p/>
      </draw:polygon>
      <draw:polygon text:anchor-type="page" text:anchor-page-number="12" draw:z-index="485" draw:name="Shape4005" draw:style-name="gr2" draw:text-style-name="P3" svg:width="1.8799in" svg:height="0.1752in" svg:x="6.1165in" svg:y="0.8697in" svg:viewBox="0 0 4776 446" draw:points="0,0 4776,0 4776,446 0,446">
        <text:p/>
      </draw:polygon>
      <draw:polygon text:anchor-type="page" text:anchor-page-number="2" draw:z-index="484" draw:name="Shape369" draw:style-name="gr2" draw:text-style-name="P3" svg:width="1.8799in" svg:height="0.1752in" svg:x="6.1165in" svg:y="0.8697in" svg:viewBox="0 0 4776 446" draw:points="0,0 4776,0 4776,446 0,446">
        <text:p/>
      </draw:polygon>
      <draw:polygon text:anchor-type="page" text:anchor-page-number="3" draw:z-index="483" draw:name="Shape694" draw:style-name="gr2" draw:text-style-name="P3" svg:width="1.8799in" svg:height="0.1752in" svg:x="6.1165in" svg:y="0.8697in" svg:viewBox="0 0 4776 446" draw:points="0,0 4776,0 4776,446 0,446">
        <text:p/>
      </draw:polygon>
      <draw:polygon text:anchor-type="page" text:anchor-page-number="10" draw:z-index="482" draw:name="Shape3518" draw:style-name="gr2" draw:text-style-name="P3" svg:width="1.8799in" svg:height="0.1752in" svg:x="6.1165in" svg:y="0.8697in" svg:viewBox="0 0 4776 446" draw:points="0,0 4776,0 4776,446 0,446">
        <text:p/>
      </draw:polygon>
      <draw:polygon text:anchor-type="page" text:anchor-page-number="9" draw:z-index="481" draw:name="Shape3286" draw:style-name="gr2" draw:text-style-name="P3" svg:width="1.8799in" svg:height="0.1752in" svg:x="6.1165in" svg:y="0.8697in" svg:viewBox="0 0 4776 446" draw:points="0,0 4776,0 4776,446 0,446">
        <text:p/>
      </draw:polygon>
      <draw:polygon text:anchor-type="page" text:anchor-page-number="8" draw:z-index="480" draw:name="Shape3130" draw:style-name="gr2" draw:text-style-name="P3" svg:width="1.8799in" svg:height="0.1752in" svg:x="6.1165in" svg:y="0.8697in" svg:viewBox="0 0 4776 446" draw:points="0,0 4776,0 4776,446 0,446">
        <text:p/>
      </draw:polygon>
      <draw:frame text:anchor-type="page" text:anchor-page-number="3" draw:z-index="479" draw:name="Shape677" draw:style-name="gr1" draw:text-style-name="P2" svg:width="0.0398in" svg:height="0.1776in" svg:x="7.1335in" svg:y="0.6181in">
        <draw:text-box>
          <text:p><text:span text:style-name="T8"><text:s/></text:span></text:p>
        </draw:text-box>
      </draw:frame>
      <draw:frame text:anchor-type="page" text:anchor-page-number="2" draw:z-index="478" draw:name="Shape352" draw:style-name="gr1" draw:text-style-name="P2" svg:width="0.0398in" svg:height="0.1776in" svg:x="7.1335in" svg:y="0.6181in">
        <draw:text-box>
          <text:p><text:span text:style-name="T8"><text:s/></text:span></text:p>
        </draw:text-box>
      </draw:frame>
      <draw:frame text:anchor-type="page" text:anchor-page-number="8" draw:z-index="477" draw:name="Shape3113" draw:style-name="gr1" draw:text-style-name="P2" svg:width="0.0398in" svg:height="0.1776in" svg:x="7.1335in" svg:y="0.6181in">
        <draw:text-box>
          <text:p><text:span text:style-name="T8"><text:s/></text:span></text:p>
        </draw:text-box>
      </draw:frame>
      <draw:frame text:anchor-type="page" text:anchor-page-number="9" draw:z-index="476" draw:name="Shape3269" draw:style-name="gr1" draw:text-style-name="P2" svg:width="0.0398in" svg:height="0.1776in" svg:x="7.1335in" svg:y="0.6181in">
        <draw:text-box>
          <text:p><text:span text:style-name="T8"><text:s/></text:span></text:p>
        </draw:text-box>
      </draw:frame>
      <draw:frame text:anchor-type="page" text:anchor-page-number="16" draw:z-index="475" draw:name="Shape5081" draw:style-name="gr1" draw:text-style-name="P2" svg:width="0.0398in" svg:height="0.1776in" svg:x="7.1335in" svg:y="0.6181in">
        <draw:text-box>
          <text:p><text:span text:style-name="T8"><text:s/></text:span></text:p>
        </draw:text-box>
      </draw:frame>
      <draw:frame text:anchor-type="page" text:anchor-page-number="11" draw:z-index="474" draw:name="Shape3770" draw:style-name="gr1" draw:text-style-name="P2" svg:width="0.0398in" svg:height="0.1776in" svg:x="7.1335in" svg:y="0.6181in">
        <draw:text-box>
          <text:p><text:span text:style-name="T8"><text:s/></text:span></text:p>
        </draw:text-box>
      </draw:frame>
      <draw:frame text:anchor-type="page" text:anchor-page-number="13" draw:z-index="473" draw:name="Shape4125" draw:style-name="gr1" draw:text-style-name="P2" svg:width="0.0398in" svg:height="0.1776in" svg:x="7.1335in" svg:y="0.6181in">
        <draw:text-box>
          <text:p><text:span text:style-name="T8"><text:s/></text:span></text:p>
        </draw:text-box>
      </draw:frame>
      <draw:frame text:anchor-type="page" text:anchor-page-number="12" draw:z-index="472" draw:name="Shape3988" draw:style-name="gr1" draw:text-style-name="P2" svg:width="0.0398in" svg:height="0.1776in" svg:x="7.1335in" svg:y="0.6181in">
        <draw:text-box>
          <text:p><text:span text:style-name="T8"><text:s/></text:span></text:p>
        </draw:text-box>
      </draw:frame>
      <draw:frame text:anchor-type="page" text:anchor-page-number="5" draw:z-index="471" draw:name="Shape1121" draw:style-name="gr1" draw:text-style-name="P2" svg:width="0.0398in" svg:height="0.1776in" svg:x="7.1335in" svg:y="0.6181in">
        <draw:text-box>
          <text:p><text:span text:style-name="T8"><text:s/></text:span></text:p>
        </draw:text-box>
      </draw:frame>
      <draw:frame text:anchor-type="page" text:anchor-page-number="1" draw:z-index="470" draw:name="Shape19" draw:style-name="gr1" draw:text-style-name="P2" svg:width="0.0398in" svg:height="0.1776in" svg:x="7.1335in" svg:y="0.6181in">
        <draw:text-box>
          <text:p><text:span text:style-name="T8"><text:s/></text:span></text:p>
        </draw:text-box>
      </draw:frame>
      <draw:frame text:anchor-type="page" text:anchor-page-number="7" draw:z-index="469" draw:name="Shape2737" draw:style-name="gr1" draw:text-style-name="P2" svg:width="0.0398in" svg:height="0.1776in" svg:x="7.1335in" svg:y="0.6181in">
        <draw:text-box>
          <text:p><text:span text:style-name="T8"><text:s/></text:span></text:p>
        </draw:text-box>
      </draw:frame>
      <draw:frame text:anchor-type="page" text:anchor-page-number="15" draw:z-index="468" draw:name="Shape4921" draw:style-name="gr1" draw:text-style-name="P2" svg:width="0.0398in" svg:height="0.1776in" svg:x="7.1335in" svg:y="0.6181in">
        <draw:text-box>
          <text:p><text:span text:style-name="T8"><text:s/></text:span></text:p>
        </draw:text-box>
      </draw:frame>
      <draw:frame text:anchor-type="page" text:anchor-page-number="6" draw:z-index="467" draw:name="Shape1765" draw:style-name="gr1" draw:text-style-name="P2" svg:width="0.0398in" svg:height="0.1776in" svg:x="7.1335in" svg:y="0.6181in">
        <draw:text-box>
          <text:p><text:span text:style-name="T8"><text:s/></text:span></text:p>
        </draw:text-box>
      </draw:frame>
      <draw:frame text:anchor-type="page" text:anchor-page-number="10" draw:z-index="466" draw:name="Shape3501" draw:style-name="gr1" draw:text-style-name="P2" svg:width="0.0398in" svg:height="0.1776in" svg:x="7.1335in" svg:y="0.6181in">
        <draw:text-box>
          <text:p><text:span text:style-name="T8"><text:s/></text:span></text:p>
        </draw:text-box>
      </draw:frame>
      <draw:frame text:anchor-type="page" text:anchor-page-number="4" draw:z-index="465" draw:name="Shape978" draw:style-name="gr1" draw:text-style-name="P2" svg:width="0.0398in" svg:height="0.1776in" svg:x="7.1335in" svg:y="0.6181in">
        <draw:text-box>
          <text:p><text:span text:style-name="T8"><text:s/></text:span></text:p>
        </draw:text-box>
      </draw:frame>
      <draw:frame text:anchor-type="page" text:anchor-page-number="14" draw:z-index="464" draw:name="Shape4326" draw:style-name="gr1" draw:text-style-name="P2" svg:width="0.0398in" svg:height="0.1776in" svg:x="7.1335in" svg:y="0.6181in">
        <draw:text-box>
          <text:p><text:span text:style-name="T8"><text:s/></text:span></text:p>
        </draw:text-box>
      </draw:frame>
      <draw:polygon text:anchor-type="page" text:anchor-page-number="13" draw:z-index="463" draw:name="Shape4140" draw:style-name="gr2" draw:text-style-name="P3" svg:width="5.6516in" svg:height="0.1752in" svg:x="0.4114in" svg:y="0.8697in" svg:viewBox="0 0 14356 446" draw:points="0,0 14356,0 14356,446 0,446">
        <text:p/>
      </draw:polygon>
      <draw:polygon text:anchor-type="page" text:anchor-page-number="16" draw:z-index="462" draw:name="Shape5096" draw:style-name="gr2" draw:text-style-name="P3" svg:width="5.6516in" svg:height="0.1752in" svg:x="0.4114in" svg:y="0.8697in" svg:viewBox="0 0 14356 446" draw:points="0,0 14356,0 14356,446 0,446">
        <text:p/>
      </draw:polygon>
      <draw:polygon text:anchor-type="page" text:anchor-page-number="15" draw:z-index="461" draw:name="Shape4936" draw:style-name="gr2" draw:text-style-name="P3" svg:width="5.6516in" svg:height="0.1752in" svg:x="0.4114in" svg:y="0.8697in" svg:viewBox="0 0 14356 446" draw:points="0,0 14356,0 14356,446 0,446">
        <text:p/>
      </draw:polygon>
      <draw:polygon text:anchor-type="page" text:anchor-page-number="1" draw:z-index="460" draw:name="Shape34" draw:style-name="gr2" draw:text-style-name="P3" svg:width="5.6516in" svg:height="0.1752in" svg:x="0.4114in" svg:y="0.8697in" svg:viewBox="0 0 14356 446" draw:points="0,0 14356,0 14356,446 0,446">
        <text:p/>
      </draw:polygon>
      <draw:polygon text:anchor-type="page" text:anchor-page-number="12" draw:z-index="459" draw:name="Shape4003" draw:style-name="gr2" draw:text-style-name="P3" svg:width="5.6516in" svg:height="0.1752in" svg:x="0.4114in" svg:y="0.8697in" svg:viewBox="0 0 14356 446" draw:points="0,0 14356,0 14356,446 0,446">
        <text:p/>
      </draw:polygon>
      <draw:polygon text:anchor-type="page" text:anchor-page-number="7" draw:z-index="458" draw:name="Shape2752" draw:style-name="gr2" draw:text-style-name="P3" svg:width="5.6516in" svg:height="0.1752in" svg:x="0.4114in" svg:y="0.8697in" svg:viewBox="0 0 14356 446" draw:points="0,0 14356,0 14356,446 0,446">
        <text:p/>
      </draw:polygon>
      <draw:polygon text:anchor-type="page" text:anchor-page-number="8" draw:z-index="457" draw:name="Shape3128" draw:style-name="gr2" draw:text-style-name="P3" svg:width="5.6516in" svg:height="0.1752in" svg:x="0.4114in" svg:y="0.8697in" svg:viewBox="0 0 14356 446" draw:points="0,0 14356,0 14356,446 0,446">
        <text:p/>
      </draw:polygon>
      <draw:polygon text:anchor-type="page" text:anchor-page-number="3" draw:z-index="456" draw:name="Shape692" draw:style-name="gr2" draw:text-style-name="P3" svg:width="5.6516in" svg:height="0.1752in" svg:x="0.4114in" svg:y="0.8697in" svg:viewBox="0 0 14356 446" draw:points="0,0 14356,0 14356,446 0,446">
        <text:p/>
      </draw:polygon>
      <draw:polygon text:anchor-type="page" text:anchor-page-number="10" draw:z-index="455" draw:name="Shape3516" draw:style-name="gr2" draw:text-style-name="P3" svg:width="5.6516in" svg:height="0.1752in" svg:x="0.4114in" svg:y="0.8697in" svg:viewBox="0 0 14356 446" draw:points="0,0 14356,0 14356,446 0,446">
        <text:p/>
      </draw:polygon>
      <draw:polygon text:anchor-type="page" text:anchor-page-number="9" draw:z-index="454" draw:name="Shape3284" draw:style-name="gr2" draw:text-style-name="P3" svg:width="5.6516in" svg:height="0.1752in" svg:x="0.4114in" svg:y="0.8697in" svg:viewBox="0 0 14356 446" draw:points="0,0 14356,0 14356,446 0,446">
        <text:p/>
      </draw:polygon>
      <draw:polygon text:anchor-type="page" text:anchor-page-number="14" draw:z-index="453" draw:name="Shape4341" draw:style-name="gr2" draw:text-style-name="P3" svg:width="5.6516in" svg:height="0.1752in" svg:x="0.4114in" svg:y="0.8697in" svg:viewBox="0 0 14356 446" draw:points="0,0 14356,0 14356,446 0,446">
        <text:p/>
      </draw:polygon>
      <draw:polygon text:anchor-type="page" text:anchor-page-number="2" draw:z-index="452" draw:name="Shape367" draw:style-name="gr2" draw:text-style-name="P3" svg:width="5.6516in" svg:height="0.1752in" svg:x="0.4114in" svg:y="0.8697in" svg:viewBox="0 0 14356 446" draw:points="0,0 14356,0 14356,446 0,446">
        <text:p/>
      </draw:polygon>
      <draw:polygon text:anchor-type="page" text:anchor-page-number="5" draw:z-index="451" draw:name="Shape1136" draw:style-name="gr2" draw:text-style-name="P3" svg:width="5.6516in" svg:height="0.1752in" svg:x="0.4114in" svg:y="0.8697in" svg:viewBox="0 0 14356 446" draw:points="0,0 14356,0 14356,446 0,446">
        <text:p/>
      </draw:polygon>
      <draw:polygon text:anchor-type="page" text:anchor-page-number="4" draw:z-index="450" draw:name="Shape993" draw:style-name="gr2" draw:text-style-name="P3" svg:width="5.6516in" svg:height="0.1752in" svg:x="0.4114in" svg:y="0.8697in" svg:viewBox="0 0 14356 446" draw:points="0,0 14356,0 14356,446 0,446">
        <text:p/>
      </draw:polygon>
      <draw:polygon text:anchor-type="page" text:anchor-page-number="6" draw:z-index="449" draw:name="Shape1780" draw:style-name="gr2" draw:text-style-name="P3" svg:width="5.6516in" svg:height="0.1752in" svg:x="0.4114in" svg:y="0.8697in" svg:viewBox="0 0 14356 446" draw:points="0,0 14356,0 14356,446 0,446">
        <text:p/>
      </draw:polygon>
      <draw:polygon text:anchor-type="page" text:anchor-page-number="11" draw:z-index="448" draw:name="Shape3785" draw:style-name="gr2" draw:text-style-name="P3" svg:width="5.6516in" svg:height="0.1752in" svg:x="0.4114in" svg:y="0.8697in" svg:viewBox="0 0 14356 446" draw:points="0,0 14356,0 14356,446 0,446">
        <text:p/>
      </draw:polygon>
      <draw:polygon text:anchor-type="page" text:anchor-page-number="7" draw:z-index="447" draw:name="Shape2751" draw:style-name="gr2" draw:text-style-name="P3" svg:width="5.7398in" svg:height="0.1752in" svg:x="0.3665in" svg:y="0.8697in" svg:viewBox="0 0 14580 446" draw:points="0,0 14580,0 14580,446 0,446">
        <text:p/>
      </draw:polygon>
      <draw:polygon text:anchor-type="page" text:anchor-page-number="13" draw:z-index="446" draw:name="Shape4139" draw:style-name="gr2" draw:text-style-name="P3" svg:width="5.7398in" svg:height="0.1752in" svg:x="0.3665in" svg:y="0.8697in" svg:viewBox="0 0 14580 446" draw:points="0,0 14580,0 14580,446 0,446">
        <text:p/>
      </draw:polygon>
      <draw:polygon text:anchor-type="page" text:anchor-page-number="1" draw:z-index="445" draw:name="Shape33" draw:style-name="gr2" draw:text-style-name="P3" svg:width="5.7398in" svg:height="0.1752in" svg:x="0.3665in" svg:y="0.8697in" svg:viewBox="0 0 14580 446" draw:points="0,0 14580,0 14580,446 0,446">
        <text:p/>
      </draw:polygon>
      <draw:polygon text:anchor-type="page" text:anchor-page-number="6" draw:z-index="444" draw:name="Shape1779" draw:style-name="gr2" draw:text-style-name="P3" svg:width="5.7398in" svg:height="0.1752in" svg:x="0.3665in" svg:y="0.8697in" svg:viewBox="0 0 14580 446" draw:points="0,0 14580,0 14580,446 0,446">
        <text:p/>
      </draw:polygon>
      <draw:polygon text:anchor-type="page" text:anchor-page-number="16" draw:z-index="443" draw:name="Shape5095" draw:style-name="gr2" draw:text-style-name="P3" svg:width="5.7398in" svg:height="0.1752in" svg:x="0.3665in" svg:y="0.8697in" svg:viewBox="0 0 14580 446" draw:points="0,0 14580,0 14580,446 0,446">
        <text:p/>
      </draw:polygon>
      <draw:polygon text:anchor-type="page" text:anchor-page-number="11" draw:z-index="442" draw:name="Shape3784" draw:style-name="gr2" draw:text-style-name="P3" svg:width="5.7398in" svg:height="0.1752in" svg:x="0.3665in" svg:y="0.8697in" svg:viewBox="0 0 14580 446" draw:points="0,0 14580,0 14580,446 0,446">
        <text:p/>
      </draw:polygon>
      <draw:polygon text:anchor-type="page" text:anchor-page-number="15" draw:z-index="441" draw:name="Shape4935" draw:style-name="gr2" draw:text-style-name="P3" svg:width="5.7398in" svg:height="0.1752in" svg:x="0.3665in" svg:y="0.8697in" svg:viewBox="0 0 14580 446" draw:points="0,0 14580,0 14580,446 0,446">
        <text:p/>
      </draw:polygon>
      <draw:polygon text:anchor-type="page" text:anchor-page-number="3" draw:z-index="440" draw:name="Shape691" draw:style-name="gr2" draw:text-style-name="P3" svg:width="5.7398in" svg:height="0.1752in" svg:x="0.3665in" svg:y="0.8697in" svg:viewBox="0 0 14580 446" draw:points="0,0 14580,0 14580,446 0,446">
        <text:p/>
      </draw:polygon>
      <draw:polygon text:anchor-type="page" text:anchor-page-number="12" draw:z-index="439" draw:name="Shape4002" draw:style-name="gr2" draw:text-style-name="P3" svg:width="5.7398in" svg:height="0.1752in" svg:x="0.3665in" svg:y="0.8697in" svg:viewBox="0 0 14580 446" draw:points="0,0 14580,0 14580,446 0,446">
        <text:p/>
      </draw:polygon>
      <draw:polygon text:anchor-type="page" text:anchor-page-number="5" draw:z-index="438" draw:name="Shape1135" draw:style-name="gr2" draw:text-style-name="P3" svg:width="5.7398in" svg:height="0.1752in" svg:x="0.3665in" svg:y="0.8697in" svg:viewBox="0 0 14580 446" draw:points="0,0 14580,0 14580,446 0,446">
        <text:p/>
      </draw:polygon>
      <draw:polygon text:anchor-type="page" text:anchor-page-number="9" draw:z-index="437" draw:name="Shape3283" draw:style-name="gr2" draw:text-style-name="P3" svg:width="5.7398in" svg:height="0.1752in" svg:x="0.3665in" svg:y="0.8697in" svg:viewBox="0 0 14580 446" draw:points="0,0 14580,0 14580,446 0,446">
        <text:p/>
      </draw:polygon>
      <draw:polygon text:anchor-type="page" text:anchor-page-number="10" draw:z-index="436" draw:name="Shape3515" draw:style-name="gr2" draw:text-style-name="P3" svg:width="5.7398in" svg:height="0.1752in" svg:x="0.3665in" svg:y="0.8697in" svg:viewBox="0 0 14580 446" draw:points="0,0 14580,0 14580,446 0,446">
        <text:p/>
      </draw:polygon>
      <draw:polygon text:anchor-type="page" text:anchor-page-number="14" draw:z-index="435" draw:name="Shape4340" draw:style-name="gr2" draw:text-style-name="P3" svg:width="5.7398in" svg:height="0.1752in" svg:x="0.3665in" svg:y="0.8697in" svg:viewBox="0 0 14580 446" draw:points="0,0 14580,0 14580,446 0,446">
        <text:p/>
      </draw:polygon>
      <draw:polygon text:anchor-type="page" text:anchor-page-number="4" draw:z-index="434" draw:name="Shape992" draw:style-name="gr2" draw:text-style-name="P3" svg:width="5.7398in" svg:height="0.1752in" svg:x="0.3665in" svg:y="0.8697in" svg:viewBox="0 0 14580 446" draw:points="0,0 14580,0 14580,446 0,446">
        <text:p/>
      </draw:polygon>
      <draw:polygon text:anchor-type="page" text:anchor-page-number="8" draw:z-index="433" draw:name="Shape3127" draw:style-name="gr2" draw:text-style-name="P3" svg:width="5.7398in" svg:height="0.1752in" svg:x="0.3665in" svg:y="0.8697in" svg:viewBox="0 0 14580 446" draw:points="0,0 14580,0 14580,446 0,446">
        <text:p/>
      </draw:polygon>
      <draw:polygon text:anchor-type="page" text:anchor-page-number="2" draw:z-index="432" draw:name="Shape366" draw:style-name="gr2" draw:text-style-name="P3" svg:width="5.7398in" svg:height="0.1752in" svg:x="0.3665in" svg:y="0.8697in" svg:viewBox="0 0 14580 446" draw:points="0,0 14580,0 14580,446 0,446">
        <text:p/>
      </draw:polygon>
      <draw:polygon text:anchor-type="page" text:anchor-page-number="5" draw:z-index="431" draw:name="Shape1131" draw:style-name="gr3" draw:text-style-name="P4" svg:width="0.0098in" svg:height="0.1917in" svg:x="7.9965in" svg:y="0.678in" svg:viewBox="0 0 26 488" draw:points="0,0 26,0 26,488 0,488">
        <text:p/>
      </draw:polygon>
      <draw:polygon text:anchor-type="page" text:anchor-page-number="9" draw:z-index="430" draw:name="Shape3279" draw:style-name="gr3" draw:text-style-name="P4" svg:width="0.0098in" svg:height="0.1917in" svg:x="7.9965in" svg:y="0.678in" svg:viewBox="0 0 26 488" draw:points="0,0 26,0 26,488 0,488">
        <text:p/>
      </draw:polygon>
      <draw:polygon text:anchor-type="page" text:anchor-page-number="6" draw:z-index="429" draw:name="Shape1775" draw:style-name="gr3" draw:text-style-name="P4" svg:width="0.0098in" svg:height="0.1917in" svg:x="7.9965in" svg:y="0.678in" svg:viewBox="0 0 26 488" draw:points="0,0 26,0 26,488 0,488">
        <text:p/>
      </draw:polygon>
      <draw:polygon text:anchor-type="page" text:anchor-page-number="3" draw:z-index="428" draw:name="Shape687" draw:style-name="gr3" draw:text-style-name="P4" svg:width="0.0098in" svg:height="0.1917in" svg:x="7.9965in" svg:y="0.678in" svg:viewBox="0 0 26 488" draw:points="0,0 26,0 26,488 0,488">
        <text:p/>
      </draw:polygon>
      <draw:polygon text:anchor-type="page" text:anchor-page-number="10" draw:z-index="427" draw:name="Shape3511" draw:style-name="gr3" draw:text-style-name="P4" svg:width="0.0098in" svg:height="0.1917in" svg:x="7.9965in" svg:y="0.678in" svg:viewBox="0 0 26 488" draw:points="0,0 26,0 26,488 0,488">
        <text:p/>
      </draw:polygon>
      <draw:polygon text:anchor-type="page" text:anchor-page-number="7" draw:z-index="426" draw:name="Shape2747" draw:style-name="gr3" draw:text-style-name="P4" svg:width="0.0098in" svg:height="0.1917in" svg:x="7.9965in" svg:y="0.678in" svg:viewBox="0 0 26 488" draw:points="0,0 26,0 26,488 0,488">
        <text:p/>
      </draw:polygon>
      <draw:polygon text:anchor-type="page" text:anchor-page-number="14" draw:z-index="425" draw:name="Shape4336" draw:style-name="gr3" draw:text-style-name="P4" svg:width="0.0098in" svg:height="0.1917in" svg:x="7.9965in" svg:y="0.678in" svg:viewBox="0 0 26 488" draw:points="0,0 26,0 26,488 0,488">
        <text:p/>
      </draw:polygon>
      <draw:polygon text:anchor-type="page" text:anchor-page-number="16" draw:z-index="424" draw:name="Shape5091" draw:style-name="gr3" draw:text-style-name="P4" svg:width="0.0098in" svg:height="0.1917in" svg:x="7.9965in" svg:y="0.678in" svg:viewBox="0 0 26 488" draw:points="0,0 26,0 26,488 0,488">
        <text:p/>
      </draw:polygon>
      <draw:polygon text:anchor-type="page" text:anchor-page-number="4" draw:z-index="423" draw:name="Shape988" draw:style-name="gr3" draw:text-style-name="P4" svg:width="0.0098in" svg:height="0.1917in" svg:x="7.9965in" svg:y="0.678in" svg:viewBox="0 0 26 488" draw:points="0,0 26,0 26,488 0,488">
        <text:p/>
      </draw:polygon>
      <draw:polygon text:anchor-type="page" text:anchor-page-number="2" draw:z-index="422" draw:name="Shape362" draw:style-name="gr3" draw:text-style-name="P4" svg:width="0.0098in" svg:height="0.1917in" svg:x="7.9965in" svg:y="0.678in" svg:viewBox="0 0 26 488" draw:points="0,0 26,0 26,488 0,488">
        <text:p/>
      </draw:polygon>
      <draw:polygon text:anchor-type="page" text:anchor-page-number="13" draw:z-index="421" draw:name="Shape4135" draw:style-name="gr3" draw:text-style-name="P4" svg:width="0.0098in" svg:height="0.1917in" svg:x="7.9965in" svg:y="0.678in" svg:viewBox="0 0 26 488" draw:points="0,0 26,0 26,488 0,488">
        <text:p/>
      </draw:polygon>
      <draw:polygon text:anchor-type="page" text:anchor-page-number="12" draw:z-index="420" draw:name="Shape3998" draw:style-name="gr3" draw:text-style-name="P4" svg:width="0.0098in" svg:height="0.1917in" svg:x="7.9965in" svg:y="0.678in" svg:viewBox="0 0 26 488" draw:points="0,0 26,0 26,488 0,488">
        <text:p/>
      </draw:polygon>
      <draw:polygon text:anchor-type="page" text:anchor-page-number="11" draw:z-index="419" draw:name="Shape3780" draw:style-name="gr3" draw:text-style-name="P4" svg:width="0.0098in" svg:height="0.1917in" svg:x="7.9965in" svg:y="0.678in" svg:viewBox="0 0 26 488" draw:points="0,0 26,0 26,488 0,488">
        <text:p/>
      </draw:polygon>
      <draw:polygon text:anchor-type="page" text:anchor-page-number="1" draw:z-index="418" draw:name="Shape29" draw:style-name="gr3" draw:text-style-name="P4" svg:width="0.0098in" svg:height="0.1917in" svg:x="7.9965in" svg:y="0.678in" svg:viewBox="0 0 26 488" draw:points="0,0 26,0 26,488 0,488">
        <text:p/>
      </draw:polygon>
      <draw:polygon text:anchor-type="page" text:anchor-page-number="15" draw:z-index="417" draw:name="Shape4931" draw:style-name="gr3" draw:text-style-name="P4" svg:width="0.0098in" svg:height="0.1917in" svg:x="7.9965in" svg:y="0.678in" svg:viewBox="0 0 26 488" draw:points="0,0 26,0 26,488 0,488">
        <text:p/>
      </draw:polygon>
      <draw:polygon text:anchor-type="page" text:anchor-page-number="8" draw:z-index="416" draw:name="Shape3123" draw:style-name="gr3" draw:text-style-name="P4" svg:width="0.0098in" svg:height="0.1917in" svg:x="7.9965in" svg:y="0.678in" svg:viewBox="0 0 26 488" draw:points="0,0 26,0 26,488 0,488">
        <text:p/>
      </draw:polygon>
      <draw:polygon text:anchor-type="page" text:anchor-page-number="14" draw:z-index="415" draw:name="Shape4332" draw:style-name="gr3" draw:text-style-name="P4" svg:width="0.0102in" svg:height="0.1917in" svg:x="6.1063in" svg:y="0.678in" svg:viewBox="0 0 27 488" draw:points="0,0 27,0 27,488 0,488">
        <text:p/>
      </draw:polygon>
      <draw:polygon text:anchor-type="page" text:anchor-page-number="5" draw:z-index="414" draw:name="Shape1127" draw:style-name="gr3" draw:text-style-name="P4" svg:width="0.0102in" svg:height="0.1917in" svg:x="6.1063in" svg:y="0.678in" svg:viewBox="0 0 27 488" draw:points="0,0 27,0 27,488 0,488">
        <text:p/>
      </draw:polygon>
      <draw:polygon text:anchor-type="page" text:anchor-page-number="2" draw:z-index="413" draw:name="Shape358" draw:style-name="gr3" draw:text-style-name="P4" svg:width="0.0102in" svg:height="0.1917in" svg:x="6.1063in" svg:y="0.678in" svg:viewBox="0 0 27 488" draw:points="0,0 27,0 27,488 0,488">
        <text:p/>
      </draw:polygon>
      <draw:polygon text:anchor-type="page" text:anchor-page-number="10" draw:z-index="412" draw:name="Shape3507" draw:style-name="gr3" draw:text-style-name="P4" svg:width="0.0102in" svg:height="0.1917in" svg:x="6.1063in" svg:y="0.678in" svg:viewBox="0 0 27 488" draw:points="0,0 27,0 27,488 0,488">
        <text:p/>
      </draw:polygon>
      <draw:polygon text:anchor-type="page" text:anchor-page-number="6" draw:z-index="411" draw:name="Shape1771" draw:style-name="gr3" draw:text-style-name="P4" svg:width="0.0102in" svg:height="0.1917in" svg:x="6.1063in" svg:y="0.678in" svg:viewBox="0 0 27 488" draw:points="0,0 27,0 27,488 0,488">
        <text:p/>
      </draw:polygon>
      <draw:polygon text:anchor-type="page" text:anchor-page-number="13" draw:z-index="410" draw:name="Shape4131" draw:style-name="gr3" draw:text-style-name="P4" svg:width="0.0102in" svg:height="0.1917in" svg:x="6.1063in" svg:y="0.678in" svg:viewBox="0 0 27 488" draw:points="0,0 27,0 27,488 0,488">
        <text:p/>
      </draw:polygon>
      <draw:polygon text:anchor-type="page" text:anchor-page-number="15" draw:z-index="409" draw:name="Shape4927" draw:style-name="gr3" draw:text-style-name="P4" svg:width="0.0102in" svg:height="0.1917in" svg:x="6.1063in" svg:y="0.678in" svg:viewBox="0 0 27 488" draw:points="0,0 27,0 27,488 0,488">
        <text:p/>
      </draw:polygon>
      <draw:polygon text:anchor-type="page" text:anchor-page-number="4" draw:z-index="408" draw:name="Shape984" draw:style-name="gr3" draw:text-style-name="P4" svg:width="0.0102in" svg:height="0.1917in" svg:x="6.1063in" svg:y="0.678in" svg:viewBox="0 0 27 488" draw:points="0,0 27,0 27,488 0,488">
        <text:p/>
      </draw:polygon>
      <draw:polygon text:anchor-type="page" text:anchor-page-number="7" draw:z-index="407" draw:name="Shape2743" draw:style-name="gr3" draw:text-style-name="P4" svg:width="0.0102in" svg:height="0.1917in" svg:x="6.1063in" svg:y="0.678in" svg:viewBox="0 0 27 488" draw:points="0,0 27,0 27,488 0,488">
        <text:p/>
      </draw:polygon>
      <draw:polygon text:anchor-type="page" text:anchor-page-number="16" draw:z-index="406" draw:name="Shape5087" draw:style-name="gr3" draw:text-style-name="P4" svg:width="0.0102in" svg:height="0.1917in" svg:x="6.1063in" svg:y="0.678in" svg:viewBox="0 0 27 488" draw:points="0,0 27,0 27,488 0,488">
        <text:p/>
      </draw:polygon>
      <draw:polygon text:anchor-type="page" text:anchor-page-number="12" draw:z-index="405" draw:name="Shape3994" draw:style-name="gr3" draw:text-style-name="P4" svg:width="0.0102in" svg:height="0.1917in" svg:x="6.1063in" svg:y="0.678in" svg:viewBox="0 0 27 488" draw:points="0,0 27,0 27,488 0,488">
        <text:p/>
      </draw:polygon>
      <draw:polygon text:anchor-type="page" text:anchor-page-number="9" draw:z-index="404" draw:name="Shape3275" draw:style-name="gr3" draw:text-style-name="P4" svg:width="0.0102in" svg:height="0.1917in" svg:x="6.1063in" svg:y="0.678in" svg:viewBox="0 0 27 488" draw:points="0,0 27,0 27,488 0,488">
        <text:p/>
      </draw:polygon>
      <draw:polygon text:anchor-type="page" text:anchor-page-number="3" draw:z-index="403" draw:name="Shape683" draw:style-name="gr3" draw:text-style-name="P4" svg:width="0.0102in" svg:height="0.1917in" svg:x="6.1063in" svg:y="0.678in" svg:viewBox="0 0 27 488" draw:points="0,0 27,0 27,488 0,488">
        <text:p/>
      </draw:polygon>
      <draw:polygon text:anchor-type="page" text:anchor-page-number="1" draw:z-index="402" draw:name="Shape25" draw:style-name="gr3" draw:text-style-name="P4" svg:width="0.0102in" svg:height="0.1917in" svg:x="6.1063in" svg:y="0.678in" svg:viewBox="0 0 27 488" draw:points="0,0 27,0 27,488 0,488">
        <text:p/>
      </draw:polygon>
      <draw:polygon text:anchor-type="page" text:anchor-page-number="8" draw:z-index="401" draw:name="Shape3119" draw:style-name="gr3" draw:text-style-name="P4" svg:width="0.0102in" svg:height="0.1917in" svg:x="6.1063in" svg:y="0.678in" svg:viewBox="0 0 27 488" draw:points="0,0 27,0 27,488 0,488">
        <text:p/>
      </draw:polygon>
      <draw:polygon text:anchor-type="page" text:anchor-page-number="11" draw:z-index="400" draw:name="Shape3776" draw:style-name="gr3" draw:text-style-name="P4" svg:width="0.0102in" svg:height="0.1917in" svg:x="6.1063in" svg:y="0.678in" svg:viewBox="0 0 27 488" draw:points="0,0 27,0 27,488 0,488">
        <text:p/>
      </draw:polygon>
      <draw:polygon text:anchor-type="page" text:anchor-page-number="4" draw:z-index="399" draw:name="Shape980" draw:style-name="gr3" draw:text-style-name="P4" svg:width="0.0098in" svg:height="0.1917in" svg:x="0.3583in" svg:y="0.678in" svg:viewBox="0 0 26 488" draw:points="0,0 26,0 26,488 0,488">
        <text:p/>
      </draw:polygon>
      <draw:polygon text:anchor-type="page" text:anchor-page-number="7" draw:z-index="398" draw:name="Shape2739" draw:style-name="gr3" draw:text-style-name="P4" svg:width="0.0098in" svg:height="0.1917in" svg:x="0.3583in" svg:y="0.678in" svg:viewBox="0 0 26 488" draw:points="0,0 26,0 26,488 0,488">
        <text:p/>
      </draw:polygon>
      <draw:polygon text:anchor-type="page" text:anchor-page-number="1" draw:z-index="397" draw:name="Shape21" draw:style-name="gr3" draw:text-style-name="P4" svg:width="0.0098in" svg:height="0.1917in" svg:x="0.3583in" svg:y="0.678in" svg:viewBox="0 0 26 488" draw:points="0,0 26,0 26,488 0,488">
        <text:p/>
      </draw:polygon>
      <draw:polygon text:anchor-type="page" text:anchor-page-number="9" draw:z-index="396" draw:name="Shape3271" draw:style-name="gr3" draw:text-style-name="P4" svg:width="0.0098in" svg:height="0.1917in" svg:x="0.3583in" svg:y="0.678in" svg:viewBox="0 0 26 488" draw:points="0,0 26,0 26,488 0,488">
        <text:p/>
      </draw:polygon>
      <draw:polygon text:anchor-type="page" text:anchor-page-number="5" draw:z-index="395" draw:name="Shape1123" draw:style-name="gr3" draw:text-style-name="P4" svg:width="0.0098in" svg:height="0.1917in" svg:x="0.3583in" svg:y="0.678in" svg:viewBox="0 0 26 488" draw:points="0,0 26,0 26,488 0,488">
        <text:p/>
      </draw:polygon>
      <draw:polygon text:anchor-type="page" text:anchor-page-number="14" draw:z-index="394" draw:name="Shape4328" draw:style-name="gr3" draw:text-style-name="P4" svg:width="0.0098in" svg:height="0.1917in" svg:x="0.3583in" svg:y="0.678in" svg:viewBox="0 0 26 488" draw:points="0,0 26,0 26,488 0,488">
        <text:p/>
      </draw:polygon>
      <draw:polygon text:anchor-type="page" text:anchor-page-number="8" draw:z-index="393" draw:name="Shape3115" draw:style-name="gr3" draw:text-style-name="P4" svg:width="0.0098in" svg:height="0.1917in" svg:x="0.3583in" svg:y="0.678in" svg:viewBox="0 0 26 488" draw:points="0,0 26,0 26,488 0,488">
        <text:p/>
      </draw:polygon>
      <draw:polygon text:anchor-type="page" text:anchor-page-number="2" draw:z-index="392" draw:name="Shape354" draw:style-name="gr3" draw:text-style-name="P4" svg:width="0.0098in" svg:height="0.1917in" svg:x="0.3583in" svg:y="0.678in" svg:viewBox="0 0 26 488" draw:points="0,0 26,0 26,488 0,488">
        <text:p/>
      </draw:polygon>
      <draw:polygon text:anchor-type="page" text:anchor-page-number="10" draw:z-index="391" draw:name="Shape3503" draw:style-name="gr3" draw:text-style-name="P4" svg:width="0.0098in" svg:height="0.1917in" svg:x="0.3583in" svg:y="0.678in" svg:viewBox="0 0 26 488" draw:points="0,0 26,0 26,488 0,488">
        <text:p/>
      </draw:polygon>
      <draw:polygon text:anchor-type="page" text:anchor-page-number="6" draw:z-index="390" draw:name="Shape1767" draw:style-name="gr3" draw:text-style-name="P4" svg:width="0.0098in" svg:height="0.1917in" svg:x="0.3583in" svg:y="0.678in" svg:viewBox="0 0 26 488" draw:points="0,0 26,0 26,488 0,488">
        <text:p/>
      </draw:polygon>
      <draw:polygon text:anchor-type="page" text:anchor-page-number="15" draw:z-index="389" draw:name="Shape4923" draw:style-name="gr3" draw:text-style-name="P4" svg:width="0.0098in" svg:height="0.1917in" svg:x="0.3583in" svg:y="0.678in" svg:viewBox="0 0 26 488" draw:points="0,0 26,0 26,488 0,488">
        <text:p/>
      </draw:polygon>
      <draw:polygon text:anchor-type="page" text:anchor-page-number="12" draw:z-index="388" draw:name="Shape3990" draw:style-name="gr3" draw:text-style-name="P4" svg:width="0.0098in" svg:height="0.1917in" svg:x="0.3583in" svg:y="0.678in" svg:viewBox="0 0 26 488" draw:points="0,0 26,0 26,488 0,488">
        <text:p/>
      </draw:polygon>
      <draw:polygon text:anchor-type="page" text:anchor-page-number="3" draw:z-index="387" draw:name="Shape679" draw:style-name="gr3" draw:text-style-name="P4" svg:width="0.0098in" svg:height="0.1917in" svg:x="0.3583in" svg:y="0.678in" svg:viewBox="0 0 26 488" draw:points="0,0 26,0 26,488 0,488">
        <text:p/>
      </draw:polygon>
      <draw:polygon text:anchor-type="page" text:anchor-page-number="11" draw:z-index="386" draw:name="Shape3772" draw:style-name="gr3" draw:text-style-name="P4" svg:width="0.0098in" svg:height="0.1917in" svg:x="0.3583in" svg:y="0.678in" svg:viewBox="0 0 26 488" draw:points="0,0 26,0 26,488 0,488">
        <text:p/>
      </draw:polygon>
      <draw:polygon text:anchor-type="page" text:anchor-page-number="13" draw:z-index="385" draw:name="Shape4127" draw:style-name="gr3" draw:text-style-name="P4" svg:width="0.0098in" svg:height="0.1917in" svg:x="0.3583in" svg:y="0.678in" svg:viewBox="0 0 26 488" draw:points="0,0 26,0 26,488 0,488">
        <text:p/>
      </draw:polygon>
      <draw:polygon text:anchor-type="page" text:anchor-page-number="16" draw:z-index="384" draw:name="Shape5083" draw:style-name="gr3" draw:text-style-name="P4" svg:width="0.0098in" svg:height="0.1917in" svg:x="0.3583in" svg:y="0.678in" svg:viewBox="0 0 26 488" draw:points="0,0 26,0 26,488 0,488">
        <text:p/>
      </draw:polygon>
      <draw:frame text:anchor-type="page" text:anchor-page-number="2" draw:z-index="383" draw:name="Shape361" draw:style-name="gr1" draw:text-style-name="P2" svg:width="0.9748in" svg:height="0.0976in" svg:x="6.1598in" svg:y="0.6799in">
        <draw:text-box>
          <text:p><text:span text:style-name="T9">Data revisione 21/02/2025</text:span></text:p>
        </draw:text-box>
      </draw:frame>
      <draw:frame text:anchor-type="page" text:anchor-page-number="4" draw:z-index="382" draw:name="Shape987" draw:style-name="gr1" draw:text-style-name="P2" svg:width="0.9748in" svg:height="0.0976in" svg:x="6.1598in" svg:y="0.6799in">
        <draw:text-box>
          <text:p><text:span text:style-name="T9">Data revisione 21/02/2025</text:span></text:p>
        </draw:text-box>
      </draw:frame>
      <draw:frame text:anchor-type="page" text:anchor-page-number="13" draw:z-index="381" draw:name="Shape4134" draw:style-name="gr1" draw:text-style-name="P2" svg:width="0.9748in" svg:height="0.0976in" svg:x="6.1598in" svg:y="0.6799in">
        <draw:text-box>
          <text:p><text:span text:style-name="T9">Data revisione 21/02/2025</text:span></text:p>
        </draw:text-box>
      </draw:frame>
      <draw:frame text:anchor-type="page" text:anchor-page-number="12" draw:z-index="380" draw:name="Shape3997" draw:style-name="gr1" draw:text-style-name="P2" svg:width="0.9748in" svg:height="0.0976in" svg:x="6.1598in" svg:y="0.6799in">
        <draw:text-box>
          <text:p><text:span text:style-name="T9">Data revisione 21/02/2025</text:span></text:p>
        </draw:text-box>
      </draw:frame>
      <draw:frame text:anchor-type="page" text:anchor-page-number="11" draw:z-index="379" draw:name="Shape3779" draw:style-name="gr1" draw:text-style-name="P2" svg:width="0.9748in" svg:height="0.0976in" svg:x="6.1598in" svg:y="0.6799in">
        <draw:text-box>
          <text:p><text:span text:style-name="T9">Data revisione 21/02/2025</text:span></text:p>
        </draw:text-box>
      </draw:frame>
      <draw:frame text:anchor-type="page" text:anchor-page-number="8" draw:z-index="378" draw:name="Shape3122" draw:style-name="gr1" draw:text-style-name="P2" svg:width="0.9748in" svg:height="0.0976in" svg:x="6.1598in" svg:y="0.6799in">
        <draw:text-box>
          <text:p><text:span text:style-name="T9">Data revisione 21/02/2025</text:span></text:p>
        </draw:text-box>
      </draw:frame>
      <draw:frame text:anchor-type="page" text:anchor-page-number="15" draw:z-index="377" draw:name="Shape4930" draw:style-name="gr1" draw:text-style-name="P2" svg:width="0.9748in" svg:height="0.0976in" svg:x="6.1598in" svg:y="0.6799in">
        <draw:text-box>
          <text:p><text:span text:style-name="T9">Data revisione 21/02/2025</text:span></text:p>
        </draw:text-box>
      </draw:frame>
      <draw:frame text:anchor-type="page" text:anchor-page-number="1" draw:z-index="376" draw:name="Shape28" draw:style-name="gr1" draw:text-style-name="P2" svg:width="0.9748in" svg:height="0.0976in" svg:x="6.1598in" svg:y="0.6799in">
        <draw:text-box>
          <text:p><text:span text:style-name="T9">Data revisione 21/02/2025</text:span></text:p>
        </draw:text-box>
      </draw:frame>
      <draw:frame text:anchor-type="page" text:anchor-page-number="3" draw:z-index="375" draw:name="Shape686" draw:style-name="gr1" draw:text-style-name="P2" svg:width="0.9748in" svg:height="0.0976in" svg:x="6.1598in" svg:y="0.6799in">
        <draw:text-box>
          <text:p><text:span text:style-name="T9">Data revisione 21/02/2025</text:span></text:p>
        </draw:text-box>
      </draw:frame>
      <draw:frame text:anchor-type="page" text:anchor-page-number="9" draw:z-index="374" draw:name="Shape3278" draw:style-name="gr1" draw:text-style-name="P2" svg:width="0.9748in" svg:height="0.0976in" svg:x="6.1598in" svg:y="0.6799in">
        <draw:text-box>
          <text:p><text:span text:style-name="T9">Data revisione 21/02/2025</text:span></text:p>
        </draw:text-box>
      </draw:frame>
      <draw:frame text:anchor-type="page" text:anchor-page-number="7" draw:z-index="373" draw:name="Shape2746" draw:style-name="gr1" draw:text-style-name="P2" svg:width="0.9748in" svg:height="0.0976in" svg:x="6.1598in" svg:y="0.6799in">
        <draw:text-box>
          <text:p><text:span text:style-name="T9">Data revisione 21/02/2025</text:span></text:p>
        </draw:text-box>
      </draw:frame>
      <draw:frame text:anchor-type="page" text:anchor-page-number="6" draw:z-index="372" draw:name="Shape1774" draw:style-name="gr1" draw:text-style-name="P2" svg:width="0.9748in" svg:height="0.0976in" svg:x="6.1598in" svg:y="0.6799in">
        <draw:text-box>
          <text:p><text:span text:style-name="T9">Data revisione 21/02/2025</text:span></text:p>
        </draw:text-box>
      </draw:frame>
      <draw:frame text:anchor-type="page" text:anchor-page-number="10" draw:z-index="371" draw:name="Shape3510" draw:style-name="gr1" draw:text-style-name="P2" svg:width="0.9748in" svg:height="0.0976in" svg:x="6.1598in" svg:y="0.6799in">
        <draw:text-box>
          <text:p><text:span text:style-name="T9">Data revisione 21/02/2025</text:span></text:p>
        </draw:text-box>
      </draw:frame>
      <draw:frame text:anchor-type="page" text:anchor-page-number="14" draw:z-index="370" draw:name="Shape4335" draw:style-name="gr1" draw:text-style-name="P2" svg:width="0.9748in" svg:height="0.0976in" svg:x="6.1598in" svg:y="0.6799in">
        <draw:text-box>
          <text:p><text:span text:style-name="T9">Data revisione 21/02/2025</text:span></text:p>
        </draw:text-box>
      </draw:frame>
      <draw:frame text:anchor-type="page" text:anchor-page-number="5" draw:z-index="369" draw:name="Shape1130" draw:style-name="gr1" draw:text-style-name="P2" svg:width="0.9748in" svg:height="0.0976in" svg:x="6.1598in" svg:y="0.6799in">
        <draw:text-box>
          <text:p><text:span text:style-name="T9">Data revisione 21/02/2025</text:span></text:p>
        </draw:text-box>
      </draw:frame>
      <draw:frame text:anchor-type="page" text:anchor-page-number="16" draw:z-index="368" draw:name="Shape5090" draw:style-name="gr1" draw:text-style-name="P2" svg:width="0.9748in" svg:height="0.0976in" svg:x="6.1598in" svg:y="0.6799in">
        <draw:text-box>
          <text:p><text:span text:style-name="T9">Data revisione 21/02/2025</text:span></text:p>
        </draw:text-box>
      </draw:frame>
      <draw:frame text:anchor-type="page" text:anchor-page-number="6" draw:z-index="367" draw:name="Shape1776" draw:style-name="gr1" draw:text-style-name="P2" svg:width="0.0398in" svg:height="0.1776in" svg:x="3.9264in" svg:y="0.6965in">
        <draw:text-box>
          <text:p><text:span text:style-name="T8"><text:s/></text:span></text:p>
        </draw:text-box>
      </draw:frame>
      <draw:frame text:anchor-type="page" text:anchor-page-number="15" draw:z-index="366" draw:name="Shape4932" draw:style-name="gr1" draw:text-style-name="P2" svg:width="0.0398in" svg:height="0.1776in" svg:x="3.9264in" svg:y="0.6965in">
        <draw:text-box>
          <text:p><text:span text:style-name="T8"><text:s/></text:span></text:p>
        </draw:text-box>
      </draw:frame>
      <draw:frame text:anchor-type="page" text:anchor-page-number="2" draw:z-index="365" draw:name="Shape363" draw:style-name="gr1" draw:text-style-name="P2" svg:width="0.0398in" svg:height="0.1776in" svg:x="3.9264in" svg:y="0.6965in">
        <draw:text-box>
          <text:p><text:span text:style-name="T8"><text:s/></text:span></text:p>
        </draw:text-box>
      </draw:frame>
      <draw:frame text:anchor-type="page" text:anchor-page-number="14" draw:z-index="364" draw:name="Shape4337" draw:style-name="gr1" draw:text-style-name="P2" svg:width="0.0398in" svg:height="0.1776in" svg:x="3.9264in" svg:y="0.6965in">
        <draw:text-box>
          <text:p><text:span text:style-name="T8"><text:s/></text:span></text:p>
        </draw:text-box>
      </draw:frame>
      <draw:frame text:anchor-type="page" text:anchor-page-number="5" draw:z-index="363" draw:name="Shape1132" draw:style-name="gr1" draw:text-style-name="P2" svg:width="0.0398in" svg:height="0.1776in" svg:x="3.9264in" svg:y="0.6965in">
        <draw:text-box>
          <text:p><text:span text:style-name="T8"><text:s/></text:span></text:p>
        </draw:text-box>
      </draw:frame>
      <draw:frame text:anchor-type="page" text:anchor-page-number="3" draw:z-index="362" draw:name="Shape688" draw:style-name="gr1" draw:text-style-name="P2" svg:width="0.0398in" svg:height="0.1776in" svg:x="3.9264in" svg:y="0.6965in">
        <draw:text-box>
          <text:p><text:span text:style-name="T8"><text:s/></text:span></text:p>
        </draw:text-box>
      </draw:frame>
      <draw:frame text:anchor-type="page" text:anchor-page-number="10" draw:z-index="361" draw:name="Shape3512" draw:style-name="gr1" draw:text-style-name="P2" svg:width="0.0398in" svg:height="0.1776in" svg:x="3.9264in" svg:y="0.6965in">
        <draw:text-box>
          <text:p><text:span text:style-name="T8"><text:s/></text:span></text:p>
        </draw:text-box>
      </draw:frame>
      <draw:frame text:anchor-type="page" text:anchor-page-number="16" draw:z-index="360" draw:name="Shape5092" draw:style-name="gr1" draw:text-style-name="P2" svg:width="0.0398in" svg:height="0.1776in" svg:x="3.9264in" svg:y="0.6965in">
        <draw:text-box>
          <text:p><text:span text:style-name="T8"><text:s/></text:span></text:p>
        </draw:text-box>
      </draw:frame>
      <draw:frame text:anchor-type="page" text:anchor-page-number="7" draw:z-index="359" draw:name="Shape2748" draw:style-name="gr1" draw:text-style-name="P2" svg:width="0.0398in" svg:height="0.1776in" svg:x="3.9264in" svg:y="0.6965in">
        <draw:text-box>
          <text:p><text:span text:style-name="T8"><text:s/></text:span></text:p>
        </draw:text-box>
      </draw:frame>
      <draw:frame text:anchor-type="page" text:anchor-page-number="9" draw:z-index="358" draw:name="Shape3280" draw:style-name="gr1" draw:text-style-name="P2" svg:width="0.0398in" svg:height="0.1776in" svg:x="3.9264in" svg:y="0.6965in">
        <draw:text-box>
          <text:p><text:span text:style-name="T8"><text:s/></text:span></text:p>
        </draw:text-box>
      </draw:frame>
      <draw:frame text:anchor-type="page" text:anchor-page-number="11" draw:z-index="357" draw:name="Shape3781" draw:style-name="gr1" draw:text-style-name="P2" svg:width="0.0398in" svg:height="0.1776in" svg:x="3.9264in" svg:y="0.6965in">
        <draw:text-box>
          <text:p><text:span text:style-name="T8"><text:s/></text:span></text:p>
        </draw:text-box>
      </draw:frame>
      <draw:frame text:anchor-type="page" text:anchor-page-number="1" draw:z-index="356" draw:name="Shape30" draw:style-name="gr1" draw:text-style-name="P2" svg:width="0.0398in" svg:height="0.1776in" svg:x="3.9264in" svg:y="0.6965in">
        <draw:text-box>
          <text:p><text:span text:style-name="T8"><text:s/></text:span></text:p>
        </draw:text-box>
      </draw:frame>
      <draw:frame text:anchor-type="page" text:anchor-page-number="12" draw:z-index="355" draw:name="Shape3999" draw:style-name="gr1" draw:text-style-name="P2" svg:width="0.0398in" svg:height="0.1776in" svg:x="3.9264in" svg:y="0.6965in">
        <draw:text-box>
          <text:p><text:span text:style-name="T8"><text:s/></text:span></text:p>
        </draw:text-box>
      </draw:frame>
      <draw:frame text:anchor-type="page" text:anchor-page-number="8" draw:z-index="354" draw:name="Shape3124" draw:style-name="gr1" draw:text-style-name="P2" svg:width="0.0398in" svg:height="0.1776in" svg:x="3.9264in" svg:y="0.6965in">
        <draw:text-box>
          <text:p><text:span text:style-name="T8"><text:s/></text:span></text:p>
        </draw:text-box>
      </draw:frame>
      <draw:frame text:anchor-type="page" text:anchor-page-number="13" draw:z-index="353" draw:name="Shape4136" draw:style-name="gr1" draw:text-style-name="P2" svg:width="0.0398in" svg:height="0.1776in" svg:x="3.9264in" svg:y="0.6965in">
        <draw:text-box>
          <text:p><text:span text:style-name="T8"><text:s/></text:span></text:p>
        </draw:text-box>
      </draw:frame>
      <draw:frame text:anchor-type="page" text:anchor-page-number="4" draw:z-index="352" draw:name="Shape989" draw:style-name="gr1" draw:text-style-name="P2" svg:width="0.0398in" svg:height="0.1776in" svg:x="3.9264in" svg:y="0.6965in">
        <draw:text-box>
          <text:p><text:span text:style-name="T8"><text:s/></text:span></text:p>
        </draw:text-box>
      </draw:frame>
      <draw:polygon text:anchor-type="page" text:anchor-page-number="6" draw:z-index="351" draw:name="Shape1773" draw:style-name="gr2" draw:text-style-name="P3" svg:width="1.7917in" svg:height="0.0953in" svg:x="6.1598in" svg:y="0.678in" svg:viewBox="0 0 4552 243" draw:points="0,0 4552,0 4552,243 0,243">
        <text:p/>
      </draw:polygon>
      <draw:polygon text:anchor-type="page" text:anchor-page-number="13" draw:z-index="350" draw:name="Shape4133" draw:style-name="gr2" draw:text-style-name="P3" svg:width="1.7917in" svg:height="0.0953in" svg:x="6.1598in" svg:y="0.678in" svg:viewBox="0 0 4552 243" draw:points="0,0 4552,0 4552,243 0,243">
        <text:p/>
      </draw:polygon>
      <draw:polygon text:anchor-type="page" text:anchor-page-number="3" draw:z-index="349" draw:name="Shape685" draw:style-name="gr2" draw:text-style-name="P3" svg:width="1.7917in" svg:height="0.0953in" svg:x="6.1598in" svg:y="0.678in" svg:viewBox="0 0 4552 243" draw:points="0,0 4552,0 4552,243 0,243">
        <text:p/>
      </draw:polygon>
      <draw:polygon text:anchor-type="page" text:anchor-page-number="10" draw:z-index="348" draw:name="Shape3509" draw:style-name="gr2" draw:text-style-name="P3" svg:width="1.7917in" svg:height="0.0953in" svg:x="6.1598in" svg:y="0.678in" svg:viewBox="0 0 4552 243" draw:points="0,0 4552,0 4552,243 0,243">
        <text:p/>
      </draw:polygon>
      <draw:polygon text:anchor-type="page" text:anchor-page-number="16" draw:z-index="347" draw:name="Shape5089" draw:style-name="gr2" draw:text-style-name="P3" svg:width="1.7917in" svg:height="0.0953in" svg:x="6.1598in" svg:y="0.678in" svg:viewBox="0 0 4552 243" draw:points="0,0 4552,0 4552,243 0,243">
        <text:p/>
      </draw:polygon>
      <draw:polygon text:anchor-type="page" text:anchor-page-number="7" draw:z-index="346" draw:name="Shape2745" draw:style-name="gr2" draw:text-style-name="P3" svg:width="1.7917in" svg:height="0.0953in" svg:x="6.1598in" svg:y="0.678in" svg:viewBox="0 0 4552 243" draw:points="0,0 4552,0 4552,243 0,243">
        <text:p/>
      </draw:polygon>
      <draw:polygon text:anchor-type="page" text:anchor-page-number="5" draw:z-index="345" draw:name="Shape1129" draw:style-name="gr2" draw:text-style-name="P3" svg:width="1.7917in" svg:height="0.0953in" svg:x="6.1598in" svg:y="0.678in" svg:viewBox="0 0 4552 243" draw:points="0,0 4552,0 4552,243 0,243">
        <text:p/>
      </draw:polygon>
      <draw:polygon text:anchor-type="page" text:anchor-page-number="2" draw:z-index="344" draw:name="Shape360" draw:style-name="gr2" draw:text-style-name="P3" svg:width="1.7917in" svg:height="0.0953in" svg:x="6.1598in" svg:y="0.678in" svg:viewBox="0 0 4552 243" draw:points="0,0 4552,0 4552,243 0,243">
        <text:p/>
      </draw:polygon>
      <draw:polygon text:anchor-type="page" text:anchor-page-number="15" draw:z-index="343" draw:name="Shape4929" draw:style-name="gr2" draw:text-style-name="P3" svg:width="1.7917in" svg:height="0.0953in" svg:x="6.1598in" svg:y="0.678in" svg:viewBox="0 0 4552 243" draw:points="0,0 4552,0 4552,243 0,243">
        <text:p/>
      </draw:polygon>
      <draw:polygon text:anchor-type="page" text:anchor-page-number="9" draw:z-index="342" draw:name="Shape3277" draw:style-name="gr2" draw:text-style-name="P3" svg:width="1.7917in" svg:height="0.0953in" svg:x="6.1598in" svg:y="0.678in" svg:viewBox="0 0 4552 243" draw:points="0,0 4552,0 4552,243 0,243">
        <text:p/>
      </draw:polygon>
      <draw:polygon text:anchor-type="page" text:anchor-page-number="11" draw:z-index="341" draw:name="Shape3778" draw:style-name="gr2" draw:text-style-name="P3" svg:width="1.7917in" svg:height="0.0953in" svg:x="6.1598in" svg:y="0.678in" svg:viewBox="0 0 4552 243" draw:points="0,0 4552,0 4552,243 0,243">
        <text:p/>
      </draw:polygon>
      <draw:polygon text:anchor-type="page" text:anchor-page-number="14" draw:z-index="340" draw:name="Shape4334" draw:style-name="gr2" draw:text-style-name="P3" svg:width="1.7917in" svg:height="0.0953in" svg:x="6.1598in" svg:y="0.678in" svg:viewBox="0 0 4552 243" draw:points="0,0 4552,0 4552,243 0,243">
        <text:p/>
      </draw:polygon>
      <draw:polygon text:anchor-type="page" text:anchor-page-number="8" draw:z-index="339" draw:name="Shape3121" draw:style-name="gr2" draw:text-style-name="P3" svg:width="1.7917in" svg:height="0.0953in" svg:x="6.1598in" svg:y="0.678in" svg:viewBox="0 0 4552 243" draw:points="0,0 4552,0 4552,243 0,243">
        <text:p/>
      </draw:polygon>
      <draw:polygon text:anchor-type="page" text:anchor-page-number="1" draw:z-index="338" draw:name="Shape27" draw:style-name="gr2" draw:text-style-name="P3" svg:width="1.7917in" svg:height="0.0953in" svg:x="6.1598in" svg:y="0.678in" svg:viewBox="0 0 4552 243" draw:points="0,0 4552,0 4552,243 0,243">
        <text:p/>
      </draw:polygon>
      <draw:polygon text:anchor-type="page" text:anchor-page-number="4" draw:z-index="337" draw:name="Shape986" draw:style-name="gr2" draw:text-style-name="P3" svg:width="1.7917in" svg:height="0.0953in" svg:x="6.1598in" svg:y="0.678in" svg:viewBox="0 0 4552 243" draw:points="0,0 4552,0 4552,243 0,243">
        <text:p/>
      </draw:polygon>
      <draw:polygon text:anchor-type="page" text:anchor-page-number="12" draw:z-index="336" draw:name="Shape3996" draw:style-name="gr2" draw:text-style-name="P3" svg:width="1.7917in" svg:height="0.0953in" svg:x="6.1598in" svg:y="0.678in" svg:viewBox="0 0 4552 243" draw:points="0,0 4552,0 4552,243 0,243">
        <text:p/>
      </draw:polygon>
      <draw:polygon text:anchor-type="page" text:anchor-page-number="6" draw:z-index="335" draw:name="Shape1772" draw:style-name="gr2" draw:text-style-name="P3" svg:width="1.8799in" svg:height="0.1917in" svg:x="6.1165in" svg:y="0.678in" svg:viewBox="0 0 4776 488" draw:points="0,0 4776,0 4776,488 0,488">
        <text:p/>
      </draw:polygon>
      <draw:polygon text:anchor-type="page" text:anchor-page-number="8" draw:z-index="334" draw:name="Shape3120" draw:style-name="gr2" draw:text-style-name="P3" svg:width="1.8799in" svg:height="0.1917in" svg:x="6.1165in" svg:y="0.678in" svg:viewBox="0 0 4776 488" draw:points="0,0 4776,0 4776,488 0,488">
        <text:p/>
      </draw:polygon>
      <draw:polygon text:anchor-type="page" text:anchor-page-number="3" draw:z-index="333" draw:name="Shape684" draw:style-name="gr2" draw:text-style-name="P3" svg:width="1.8799in" svg:height="0.1917in" svg:x="6.1165in" svg:y="0.678in" svg:viewBox="0 0 4776 488" draw:points="0,0 4776,0 4776,488 0,488">
        <text:p/>
      </draw:polygon>
      <draw:polygon text:anchor-type="page" text:anchor-page-number="13" draw:z-index="332" draw:name="Shape4132" draw:style-name="gr2" draw:text-style-name="P3" svg:width="1.8799in" svg:height="0.1917in" svg:x="6.1165in" svg:y="0.678in" svg:viewBox="0 0 4776 488" draw:points="0,0 4776,0 4776,488 0,488">
        <text:p/>
      </draw:polygon>
      <draw:polygon text:anchor-type="page" text:anchor-page-number="10" draw:z-index="331" draw:name="Shape3508" draw:style-name="gr2" draw:text-style-name="P3" svg:width="1.8799in" svg:height="0.1917in" svg:x="6.1165in" svg:y="0.678in" svg:viewBox="0 0 4776 488" draw:points="0,0 4776,0 4776,488 0,488">
        <text:p/>
      </draw:polygon>
      <draw:polygon text:anchor-type="page" text:anchor-page-number="4" draw:z-index="330" draw:name="Shape985" draw:style-name="gr2" draw:text-style-name="P3" svg:width="1.8799in" svg:height="0.1917in" svg:x="6.1165in" svg:y="0.678in" svg:viewBox="0 0 4776 488" draw:points="0,0 4776,0 4776,488 0,488">
        <text:p/>
      </draw:polygon>
      <draw:polygon text:anchor-type="page" text:anchor-page-number="16" draw:z-index="329" draw:name="Shape5088" draw:style-name="gr2" draw:text-style-name="P3" svg:width="1.8799in" svg:height="0.1917in" svg:x="6.1165in" svg:y="0.678in" svg:viewBox="0 0 4776 488" draw:points="0,0 4776,0 4776,488 0,488">
        <text:p/>
      </draw:polygon>
      <draw:polygon text:anchor-type="page" text:anchor-page-number="7" draw:z-index="328" draw:name="Shape2744" draw:style-name="gr2" draw:text-style-name="P3" svg:width="1.8799in" svg:height="0.1917in" svg:x="6.1165in" svg:y="0.678in" svg:viewBox="0 0 4776 488" draw:points="0,0 4776,0 4776,488 0,488">
        <text:p/>
      </draw:polygon>
      <draw:polygon text:anchor-type="page" text:anchor-page-number="12" draw:z-index="327" draw:name="Shape3995" draw:style-name="gr2" draw:text-style-name="P3" svg:width="1.8799in" svg:height="0.1917in" svg:x="6.1165in" svg:y="0.678in" svg:viewBox="0 0 4776 488" draw:points="0,0 4776,0 4776,488 0,488">
        <text:p/>
      </draw:polygon>
      <draw:polygon text:anchor-type="page" text:anchor-page-number="5" draw:z-index="326" draw:name="Shape1128" draw:style-name="gr2" draw:text-style-name="P3" svg:width="1.8799in" svg:height="0.1917in" svg:x="6.1165in" svg:y="0.678in" svg:viewBox="0 0 4776 488" draw:points="0,0 4776,0 4776,488 0,488">
        <text:p/>
      </draw:polygon>
      <draw:polygon text:anchor-type="page" text:anchor-page-number="14" draw:z-index="325" draw:name="Shape4333" draw:style-name="gr2" draw:text-style-name="P3" svg:width="1.8799in" svg:height="0.1917in" svg:x="6.1165in" svg:y="0.678in" svg:viewBox="0 0 4776 488" draw:points="0,0 4776,0 4776,488 0,488">
        <text:p/>
      </draw:polygon>
      <draw:polygon text:anchor-type="page" text:anchor-page-number="15" draw:z-index="324" draw:name="Shape4928" draw:style-name="gr2" draw:text-style-name="P3" svg:width="1.8799in" svg:height="0.1917in" svg:x="6.1165in" svg:y="0.678in" svg:viewBox="0 0 4776 488" draw:points="0,0 4776,0 4776,488 0,488">
        <text:p/>
      </draw:polygon>
      <draw:polygon text:anchor-type="page" text:anchor-page-number="1" draw:z-index="323" draw:name="Shape26" draw:style-name="gr2" draw:text-style-name="P3" svg:width="1.8799in" svg:height="0.1917in" svg:x="6.1165in" svg:y="0.678in" svg:viewBox="0 0 4776 488" draw:points="0,0 4776,0 4776,488 0,488">
        <text:p/>
      </draw:polygon>
      <draw:polygon text:anchor-type="page" text:anchor-page-number="2" draw:z-index="322" draw:name="Shape359" draw:style-name="gr2" draw:text-style-name="P3" svg:width="1.8799in" svg:height="0.1917in" svg:x="6.1165in" svg:y="0.678in" svg:viewBox="0 0 4776 488" draw:points="0,0 4776,0 4776,488 0,488">
        <text:p/>
      </draw:polygon>
      <draw:polygon text:anchor-type="page" text:anchor-page-number="11" draw:z-index="321" draw:name="Shape3777" draw:style-name="gr2" draw:text-style-name="P3" svg:width="1.8799in" svg:height="0.1917in" svg:x="6.1165in" svg:y="0.678in" svg:viewBox="0 0 4776 488" draw:points="0,0 4776,0 4776,488 0,488">
        <text:p/>
      </draw:polygon>
      <draw:polygon text:anchor-type="page" text:anchor-page-number="9" draw:z-index="320" draw:name="Shape3276" draw:style-name="gr2" draw:text-style-name="P3" svg:width="1.8799in" svg:height="0.1917in" svg:x="6.1165in" svg:y="0.678in" svg:viewBox="0 0 4776 488" draw:points="0,0 4776,0 4776,488 0,488">
        <text:p/>
      </draw:polygon>
      <draw:frame text:anchor-type="page" text:anchor-page-number="14" draw:z-index="319" draw:name="Shape4331" draw:style-name="gr1" draw:text-style-name="P2" svg:width="1.3689in" svg:height="0.1925in" svg:x="2.5465in" svg:y="0.6819in">
        <draw:text-box>
          <text:p><text:span text:style-name="T10">ITALMONT S.R.L.</text:span></text:p>
        </draw:text-box>
      </draw:frame>
      <draw:frame text:anchor-type="page" text:anchor-page-number="6" draw:z-index="318" draw:name="Shape1770" draw:style-name="gr1" draw:text-style-name="P2" svg:width="1.3689in" svg:height="0.1925in" svg:x="2.5465in" svg:y="0.6819in">
        <draw:text-box>
          <text:p><text:span text:style-name="T10">ITALMONT S.R.L.</text:span></text:p>
        </draw:text-box>
      </draw:frame>
      <draw:frame text:anchor-type="page" text:anchor-page-number="5" draw:z-index="317" draw:name="Shape1126" draw:style-name="gr1" draw:text-style-name="P2" svg:width="1.3689in" svg:height="0.1925in" svg:x="2.5465in" svg:y="0.6819in">
        <draw:text-box>
          <text:p><text:span text:style-name="T10">ITALMONT S.R.L.</text:span></text:p>
        </draw:text-box>
      </draw:frame>
      <draw:frame text:anchor-type="page" text:anchor-page-number="7" draw:z-index="316" draw:name="Shape2742" draw:style-name="gr1" draw:text-style-name="P2" svg:width="1.3689in" svg:height="0.1925in" svg:x="2.5465in" svg:y="0.6819in">
        <draw:text-box>
          <text:p><text:span text:style-name="T10">ITALMONT S.R.L.</text:span></text:p>
        </draw:text-box>
      </draw:frame>
      <draw:frame text:anchor-type="page" text:anchor-page-number="4" draw:z-index="315" draw:name="Shape983" draw:style-name="gr1" draw:text-style-name="P2" svg:width="1.3689in" svg:height="0.1925in" svg:x="2.5465in" svg:y="0.6819in">
        <draw:text-box>
          <text:p><text:span text:style-name="T10">ITALMONT S.R.L.</text:span></text:p>
        </draw:text-box>
      </draw:frame>
      <draw:frame text:anchor-type="page" text:anchor-page-number="15" draw:z-index="314" draw:name="Shape4926" draw:style-name="gr1" draw:text-style-name="P2" svg:width="1.3689in" svg:height="0.1925in" svg:x="2.5465in" svg:y="0.6819in">
        <draw:text-box>
          <text:p><text:span text:style-name="T10">ITALMONT S.R.L.</text:span></text:p>
        </draw:text-box>
      </draw:frame>
      <draw:frame text:anchor-type="page" text:anchor-page-number="1" draw:z-index="313" draw:name="Shape24" draw:style-name="gr1" draw:text-style-name="P2" svg:width="1.3689in" svg:height="0.1925in" svg:x="2.5465in" svg:y="0.6819in">
        <draw:text-box>
          <text:p><text:span text:style-name="T10">ITALMONT S.R.L.</text:span></text:p>
        </draw:text-box>
      </draw:frame>
      <draw:frame text:anchor-type="page" text:anchor-page-number="9" draw:z-index="312" draw:name="Shape3274" draw:style-name="gr1" draw:text-style-name="P2" svg:width="1.3689in" svg:height="0.1925in" svg:x="2.5465in" svg:y="0.6819in">
        <draw:text-box>
          <text:p><text:span text:style-name="T10">ITALMONT S.R.L.</text:span></text:p>
        </draw:text-box>
      </draw:frame>
      <draw:frame text:anchor-type="page" text:anchor-page-number="8" draw:z-index="311" draw:name="Shape3118" draw:style-name="gr1" draw:text-style-name="P2" svg:width="1.3689in" svg:height="0.1925in" svg:x="2.5465in" svg:y="0.6819in">
        <draw:text-box>
          <text:p><text:span text:style-name="T10">ITALMONT S.R.L.</text:span></text:p>
        </draw:text-box>
      </draw:frame>
      <draw:frame text:anchor-type="page" text:anchor-page-number="3" draw:z-index="310" draw:name="Shape682" draw:style-name="gr1" draw:text-style-name="P2" svg:width="1.3689in" svg:height="0.1925in" svg:x="2.5465in" svg:y="0.6819in">
        <draw:text-box>
          <text:p><text:span text:style-name="T10">ITALMONT S.R.L.</text:span></text:p>
        </draw:text-box>
      </draw:frame>
      <draw:frame text:anchor-type="page" text:anchor-page-number="13" draw:z-index="309" draw:name="Shape4130" draw:style-name="gr1" draw:text-style-name="P2" svg:width="1.3689in" svg:height="0.1925in" svg:x="2.5465in" svg:y="0.6819in">
        <draw:text-box>
          <text:p><text:span text:style-name="T10">ITALMONT S.R.L.</text:span></text:p>
        </draw:text-box>
      </draw:frame>
      <draw:frame text:anchor-type="page" text:anchor-page-number="10" draw:z-index="308" draw:name="Shape3506" draw:style-name="gr1" draw:text-style-name="P2" svg:width="1.3689in" svg:height="0.1925in" svg:x="2.5465in" svg:y="0.6819in">
        <draw:text-box>
          <text:p><text:span text:style-name="T10">ITALMONT S.R.L.</text:span></text:p>
        </draw:text-box>
      </draw:frame>
      <draw:frame text:anchor-type="page" text:anchor-page-number="2" draw:z-index="307" draw:name="Shape357" draw:style-name="gr1" draw:text-style-name="P2" svg:width="1.3689in" svg:height="0.1925in" svg:x="2.5465in" svg:y="0.6819in">
        <draw:text-box>
          <text:p><text:span text:style-name="T10">ITALMONT S.R.L.</text:span></text:p>
        </draw:text-box>
      </draw:frame>
      <draw:frame text:anchor-type="page" text:anchor-page-number="11" draw:z-index="306" draw:name="Shape3775" draw:style-name="gr1" draw:text-style-name="P2" svg:width="1.3689in" svg:height="0.1925in" svg:x="2.5465in" svg:y="0.6819in">
        <draw:text-box>
          <text:p><text:span text:style-name="T10">ITALMONT S.R.L.</text:span></text:p>
        </draw:text-box>
      </draw:frame>
      <draw:frame text:anchor-type="page" text:anchor-page-number="16" draw:z-index="305" draw:name="Shape5086" draw:style-name="gr1" draw:text-style-name="P2" svg:width="1.3689in" svg:height="0.1925in" svg:x="2.5465in" svg:y="0.6819in">
        <draw:text-box>
          <text:p><text:span text:style-name="T10">ITALMONT S.R.L.</text:span></text:p>
        </draw:text-box>
      </draw:frame>
      <draw:frame text:anchor-type="page" text:anchor-page-number="12" draw:z-index="304" draw:name="Shape3993" draw:style-name="gr1" draw:text-style-name="P2" svg:width="1.3689in" svg:height="0.1925in" svg:x="2.5465in" svg:y="0.6819in">
        <draw:text-box>
          <text:p><text:span text:style-name="T10">ITALMONT S.R.L.</text:span></text:p>
        </draw:text-box>
      </draw:frame>
      <draw:frame text:anchor-type="page" text:anchor-page-number="10" draw:z-index="303" draw:name="Shape3483" draw:style-name="gr1" draw:text-style-name="P2" svg:width="0.0398in" svg:height="0.1776in" svg:x="6.6882in" svg:y="0.4417in">
        <draw:text-box>
          <text:p><text:span text:style-name="T8"><text:s/></text:span></text:p>
        </draw:text-box>
      </draw:frame>
      <draw:frame text:anchor-type="page" text:anchor-page-number="16" draw:z-index="302" draw:name="Shape5063" draw:style-name="gr1" draw:text-style-name="P2" svg:width="0.0398in" svg:height="0.1776in" svg:x="6.6882in" svg:y="0.4417in">
        <draw:text-box>
          <text:p><text:span text:style-name="T8"><text:s/></text:span></text:p>
        </draw:text-box>
      </draw:frame>
      <draw:frame text:anchor-type="page" text:anchor-page-number="12" draw:z-index="301" draw:name="Shape3970" draw:style-name="gr1" draw:text-style-name="P2" svg:width="0.0398in" svg:height="0.1776in" svg:x="6.6882in" svg:y="0.4417in">
        <draw:text-box>
          <text:p><text:span text:style-name="T8"><text:s/></text:span></text:p>
        </draw:text-box>
      </draw:frame>
      <draw:frame text:anchor-type="page" text:anchor-page-number="9" draw:z-index="300" draw:name="Shape3251" draw:style-name="gr1" draw:text-style-name="P2" svg:width="0.0398in" svg:height="0.1776in" svg:x="6.6882in" svg:y="0.4417in">
        <draw:text-box>
          <text:p><text:span text:style-name="T8"><text:s/></text:span></text:p>
        </draw:text-box>
      </draw:frame>
      <draw:frame text:anchor-type="page" text:anchor-page-number="13" draw:z-index="299" draw:name="Shape4107" draw:style-name="gr1" draw:text-style-name="P2" svg:width="0.0398in" svg:height="0.1776in" svg:x="6.6882in" svg:y="0.4417in">
        <draw:text-box>
          <text:p><text:span text:style-name="T8"><text:s/></text:span></text:p>
        </draw:text-box>
      </draw:frame>
      <draw:frame text:anchor-type="page" text:anchor-page-number="5" draw:z-index="298" draw:name="Shape1103" draw:style-name="gr1" draw:text-style-name="P2" svg:width="0.0398in" svg:height="0.1776in" svg:x="6.6882in" svg:y="0.4417in">
        <draw:text-box>
          <text:p><text:span text:style-name="T8"><text:s/></text:span></text:p>
        </draw:text-box>
      </draw:frame>
      <draw:frame text:anchor-type="page" text:anchor-page-number="1" draw:z-index="297" draw:name="Shape1" draw:style-name="gr1" draw:text-style-name="P2" svg:width="0.0398in" svg:height="0.1776in" svg:x="6.6882in" svg:y="0.4417in">
        <draw:text-box>
          <text:p><text:span text:style-name="T8"><text:s/></text:span></text:p>
        </draw:text-box>
      </draw:frame>
      <draw:frame text:anchor-type="page" text:anchor-page-number="7" draw:z-index="296" draw:name="Shape2719" draw:style-name="gr1" draw:text-style-name="P2" svg:width="0.0398in" svg:height="0.1776in" svg:x="6.6882in" svg:y="0.4417in">
        <draw:text-box>
          <text:p><text:span text:style-name="T8"><text:s/></text:span></text:p>
        </draw:text-box>
      </draw:frame>
      <draw:frame text:anchor-type="page" text:anchor-page-number="8" draw:z-index="295" draw:name="Shape3095" draw:style-name="gr1" draw:text-style-name="P2" svg:width="0.0398in" svg:height="0.1776in" svg:x="6.6882in" svg:y="0.4417in">
        <draw:text-box>
          <text:p><text:span text:style-name="T8"><text:s/></text:span></text:p>
        </draw:text-box>
      </draw:frame>
      <draw:frame text:anchor-type="page" text:anchor-page-number="6" draw:z-index="294" draw:name="Shape1747" draw:style-name="gr1" draw:text-style-name="P2" svg:width="0.0398in" svg:height="0.1776in" svg:x="6.6882in" svg:y="0.4417in">
        <draw:text-box>
          <text:p><text:span text:style-name="T8"><text:s/></text:span></text:p>
        </draw:text-box>
      </draw:frame>
      <draw:frame text:anchor-type="page" text:anchor-page-number="15" draw:z-index="293" draw:name="Shape4903" draw:style-name="gr1" draw:text-style-name="P2" svg:width="0.0398in" svg:height="0.1776in" svg:x="6.6882in" svg:y="0.4417in">
        <draw:text-box>
          <text:p><text:span text:style-name="T8"><text:s/></text:span></text:p>
        </draw:text-box>
      </draw:frame>
      <draw:frame text:anchor-type="page" text:anchor-page-number="4" draw:z-index="292" draw:name="Shape960" draw:style-name="gr1" draw:text-style-name="P2" svg:width="0.0398in" svg:height="0.1776in" svg:x="6.6882in" svg:y="0.4417in">
        <draw:text-box>
          <text:p><text:span text:style-name="T8"><text:s/></text:span></text:p>
        </draw:text-box>
      </draw:frame>
      <draw:frame text:anchor-type="page" text:anchor-page-number="11" draw:z-index="291" draw:name="Shape3752" draw:style-name="gr1" draw:text-style-name="P2" svg:width="0.0398in" svg:height="0.1776in" svg:x="6.6882in" svg:y="0.4417in">
        <draw:text-box>
          <text:p><text:span text:style-name="T8"><text:s/></text:span></text:p>
        </draw:text-box>
      </draw:frame>
      <draw:frame text:anchor-type="page" text:anchor-page-number="3" draw:z-index="290" draw:name="Shape659" draw:style-name="gr1" draw:text-style-name="P2" svg:width="0.0398in" svg:height="0.1776in" svg:x="6.6882in" svg:y="0.4417in">
        <draw:text-box>
          <text:p><text:span text:style-name="T8"><text:s/></text:span></text:p>
        </draw:text-box>
      </draw:frame>
      <draw:frame text:anchor-type="page" text:anchor-page-number="14" draw:z-index="289" draw:name="Shape4308" draw:style-name="gr1" draw:text-style-name="P2" svg:width="0.0398in" svg:height="0.1776in" svg:x="6.6882in" svg:y="0.4417in">
        <draw:text-box>
          <text:p><text:span text:style-name="T8"><text:s/></text:span></text:p>
        </draw:text-box>
      </draw:frame>
      <draw:frame text:anchor-type="page" text:anchor-page-number="2" draw:z-index="288" draw:name="Shape334" draw:style-name="gr1" draw:text-style-name="P2" svg:width="0.0398in" svg:height="0.1776in" svg:x="6.6882in" svg:y="0.4417in">
        <draw:text-box>
          <text:p><text:span text:style-name="T8"><text:s/></text:span></text:p>
        </draw:text-box>
      </draw:frame>
      <draw:polygon text:anchor-type="page" text:anchor-page-number="8" draw:z-index="287" draw:name="Shape3117" draw:style-name="gr2" draw:text-style-name="P3" svg:width="5.6516in" svg:height="0.1917in" svg:x="0.4114in" svg:y="0.678in" svg:viewBox="0 0 14356 488" draw:points="0,0 14356,0 14356,488 0,488">
        <text:p/>
      </draw:polygon>
      <draw:polygon text:anchor-type="page" text:anchor-page-number="4" draw:z-index="286" draw:name="Shape982" draw:style-name="gr2" draw:text-style-name="P3" svg:width="5.6516in" svg:height="0.1917in" svg:x="0.4114in" svg:y="0.678in" svg:viewBox="0 0 14356 488" draw:points="0,0 14356,0 14356,488 0,488">
        <text:p/>
      </draw:polygon>
      <draw:polygon text:anchor-type="page" text:anchor-page-number="12" draw:z-index="285" draw:name="Shape3992" draw:style-name="gr2" draw:text-style-name="P3" svg:width="5.6516in" svg:height="0.1917in" svg:x="0.4114in" svg:y="0.678in" svg:viewBox="0 0 14356 488" draw:points="0,0 14356,0 14356,488 0,488">
        <text:p/>
      </draw:polygon>
      <draw:polygon text:anchor-type="page" text:anchor-page-number="9" draw:z-index="284" draw:name="Shape3273" draw:style-name="gr2" draw:text-style-name="P3" svg:width="5.6516in" svg:height="0.1917in" svg:x="0.4114in" svg:y="0.678in" svg:viewBox="0 0 14356 488" draw:points="0,0 14356,0 14356,488 0,488">
        <text:p/>
      </draw:polygon>
      <draw:polygon text:anchor-type="page" text:anchor-page-number="2" draw:z-index="283" draw:name="Shape356" draw:style-name="gr2" draw:text-style-name="P3" svg:width="5.6516in" svg:height="0.1917in" svg:x="0.4114in" svg:y="0.678in" svg:viewBox="0 0 14356 488" draw:points="0,0 14356,0 14356,488 0,488">
        <text:p/>
      </draw:polygon>
      <draw:polygon text:anchor-type="page" text:anchor-page-number="13" draw:z-index="282" draw:name="Shape4129" draw:style-name="gr2" draw:text-style-name="P3" svg:width="5.6516in" svg:height="0.1917in" svg:x="0.4114in" svg:y="0.678in" svg:viewBox="0 0 14356 488" draw:points="0,0 14356,0 14356,488 0,488">
        <text:p/>
      </draw:polygon>
      <draw:polygon text:anchor-type="page" text:anchor-page-number="7" draw:z-index="281" draw:name="Shape2741" draw:style-name="gr2" draw:text-style-name="P3" svg:width="5.6516in" svg:height="0.1917in" svg:x="0.4114in" svg:y="0.678in" svg:viewBox="0 0 14356 488" draw:points="0,0 14356,0 14356,488 0,488">
        <text:p/>
      </draw:polygon>
      <draw:polygon text:anchor-type="page" text:anchor-page-number="1" draw:z-index="280" draw:name="Shape23" draw:style-name="gr2" draw:text-style-name="P3" svg:width="5.6516in" svg:height="0.1917in" svg:x="0.4114in" svg:y="0.678in" svg:viewBox="0 0 14356 488" draw:points="0,0 14356,0 14356,488 0,488">
        <text:p/>
      </draw:polygon>
      <draw:polygon text:anchor-type="page" text:anchor-page-number="6" draw:z-index="279" draw:name="Shape1769" draw:style-name="gr2" draw:text-style-name="P3" svg:width="5.6516in" svg:height="0.1917in" svg:x="0.4114in" svg:y="0.678in" svg:viewBox="0 0 14356 488" draw:points="0,0 14356,0 14356,488 0,488">
        <text:p/>
      </draw:polygon>
      <draw:polygon text:anchor-type="page" text:anchor-page-number="10" draw:z-index="278" draw:name="Shape3505" draw:style-name="gr2" draw:text-style-name="P3" svg:width="5.6516in" svg:height="0.1917in" svg:x="0.4114in" svg:y="0.678in" svg:viewBox="0 0 14356 488" draw:points="0,0 14356,0 14356,488 0,488">
        <text:p/>
      </draw:polygon>
      <draw:polygon text:anchor-type="page" text:anchor-page-number="14" draw:z-index="277" draw:name="Shape4330" draw:style-name="gr2" draw:text-style-name="P3" svg:width="5.6516in" svg:height="0.1917in" svg:x="0.4114in" svg:y="0.678in" svg:viewBox="0 0 14356 488" draw:points="0,0 14356,0 14356,488 0,488">
        <text:p/>
      </draw:polygon>
      <draw:polygon text:anchor-type="page" text:anchor-page-number="15" draw:z-index="276" draw:name="Shape4925" draw:style-name="gr2" draw:text-style-name="P3" svg:width="5.6516in" svg:height="0.1917in" svg:x="0.4114in" svg:y="0.678in" svg:viewBox="0 0 14356 488" draw:points="0,0 14356,0 14356,488 0,488">
        <text:p/>
      </draw:polygon>
      <draw:polygon text:anchor-type="page" text:anchor-page-number="3" draw:z-index="275" draw:name="Shape681" draw:style-name="gr2" draw:text-style-name="P3" svg:width="5.6516in" svg:height="0.1917in" svg:x="0.4114in" svg:y="0.678in" svg:viewBox="0 0 14356 488" draw:points="0,0 14356,0 14356,488 0,488">
        <text:p/>
      </draw:polygon>
      <draw:polygon text:anchor-type="page" text:anchor-page-number="16" draw:z-index="274" draw:name="Shape5085" draw:style-name="gr2" draw:text-style-name="P3" svg:width="5.6516in" svg:height="0.1917in" svg:x="0.4114in" svg:y="0.678in" svg:viewBox="0 0 14356 488" draw:points="0,0 14356,0 14356,488 0,488">
        <text:p/>
      </draw:polygon>
      <draw:polygon text:anchor-type="page" text:anchor-page-number="5" draw:z-index="273" draw:name="Shape1125" draw:style-name="gr2" draw:text-style-name="P3" svg:width="5.6516in" svg:height="0.1917in" svg:x="0.4114in" svg:y="0.678in" svg:viewBox="0 0 14356 488" draw:points="0,0 14356,0 14356,488 0,488">
        <text:p/>
      </draw:polygon>
      <draw:polygon text:anchor-type="page" text:anchor-page-number="11" draw:z-index="272" draw:name="Shape3774" draw:style-name="gr2" draw:text-style-name="P3" svg:width="5.6516in" svg:height="0.1917in" svg:x="0.4114in" svg:y="0.678in" svg:viewBox="0 0 14356 488" draw:points="0,0 14356,0 14356,488 0,488">
        <text:p/>
      </draw:polygon>
      <draw:polygon text:anchor-type="page" text:anchor-page-number="5" draw:z-index="271" draw:name="Shape1124" draw:style-name="gr2" draw:text-style-name="P3" svg:width="5.7449in" svg:height="0.1917in" svg:x="0.3665in" svg:y="0.678in" svg:viewBox="0 0 14593 488" draw:points="0,0 14593,0 14593,488 0,488">
        <text:p/>
      </draw:polygon>
      <draw:polygon text:anchor-type="page" text:anchor-page-number="6" draw:z-index="270" draw:name="Shape1768" draw:style-name="gr2" draw:text-style-name="P3" svg:width="5.7449in" svg:height="0.1917in" svg:x="0.3665in" svg:y="0.678in" svg:viewBox="0 0 14593 488" draw:points="0,0 14593,0 14593,488 0,488">
        <text:p/>
      </draw:polygon>
      <draw:polygon text:anchor-type="page" text:anchor-page-number="10" draw:z-index="269" draw:name="Shape3504" draw:style-name="gr2" draw:text-style-name="P3" svg:width="5.7449in" svg:height="0.1917in" svg:x="0.3665in" svg:y="0.678in" svg:viewBox="0 0 14593 488" draw:points="0,0 14593,0 14593,488 0,488">
        <text:p/>
      </draw:polygon>
      <draw:polygon text:anchor-type="page" text:anchor-page-number="4" draw:z-index="268" draw:name="Shape981" draw:style-name="gr2" draw:text-style-name="P3" svg:width="5.7449in" svg:height="0.1917in" svg:x="0.3665in" svg:y="0.678in" svg:viewBox="0 0 14593 488" draw:points="0,0 14593,0 14593,488 0,488">
        <text:p/>
      </draw:polygon>
      <draw:polygon text:anchor-type="page" text:anchor-page-number="8" draw:z-index="267" draw:name="Shape3116" draw:style-name="gr2" draw:text-style-name="P3" svg:width="5.7449in" svg:height="0.1917in" svg:x="0.3665in" svg:y="0.678in" svg:viewBox="0 0 14593 488" draw:points="0,0 14593,0 14593,488 0,488">
        <text:p/>
      </draw:polygon>
      <draw:polygon text:anchor-type="page" text:anchor-page-number="13" draw:z-index="266" draw:name="Shape4128" draw:style-name="gr2" draw:text-style-name="P3" svg:width="5.7449in" svg:height="0.1917in" svg:x="0.3665in" svg:y="0.678in" svg:viewBox="0 0 14593 488" draw:points="0,0 14593,0 14593,488 0,488">
        <text:p/>
      </draw:polygon>
      <draw:polygon text:anchor-type="page" text:anchor-page-number="2" draw:z-index="265" draw:name="Shape355" draw:style-name="gr2" draw:text-style-name="P3" svg:width="5.7449in" svg:height="0.1917in" svg:x="0.3665in" svg:y="0.678in" svg:viewBox="0 0 14593 488" draw:points="0,0 14593,0 14593,488 0,488">
        <text:p/>
      </draw:polygon>
      <draw:polygon text:anchor-type="page" text:anchor-page-number="3" draw:z-index="264" draw:name="Shape680" draw:style-name="gr2" draw:text-style-name="P3" svg:width="5.7449in" svg:height="0.1917in" svg:x="0.3665in" svg:y="0.678in" svg:viewBox="0 0 14593 488" draw:points="0,0 14593,0 14593,488 0,488">
        <text:p/>
      </draw:polygon>
      <draw:polygon text:anchor-type="page" text:anchor-page-number="1" draw:z-index="263" draw:name="Shape22" draw:style-name="gr2" draw:text-style-name="P3" svg:width="5.7449in" svg:height="0.1917in" svg:x="0.3665in" svg:y="0.678in" svg:viewBox="0 0 14593 488" draw:points="0,0 14593,0 14593,488 0,488">
        <text:p/>
      </draw:polygon>
      <draw:polygon text:anchor-type="page" text:anchor-page-number="14" draw:z-index="262" draw:name="Shape4329" draw:style-name="gr2" draw:text-style-name="P3" svg:width="5.7449in" svg:height="0.1917in" svg:x="0.3665in" svg:y="0.678in" svg:viewBox="0 0 14593 488" draw:points="0,0 14593,0 14593,488 0,488">
        <text:p/>
      </draw:polygon>
      <draw:polygon text:anchor-type="page" text:anchor-page-number="12" draw:z-index="261" draw:name="Shape3991" draw:style-name="gr2" draw:text-style-name="P3" svg:width="5.7449in" svg:height="0.1917in" svg:x="0.3665in" svg:y="0.678in" svg:viewBox="0 0 14593 488" draw:points="0,0 14593,0 14593,488 0,488">
        <text:p/>
      </draw:polygon>
      <draw:polygon text:anchor-type="page" text:anchor-page-number="15" draw:z-index="260" draw:name="Shape4924" draw:style-name="gr2" draw:text-style-name="P3" svg:width="5.7449in" svg:height="0.1917in" svg:x="0.3665in" svg:y="0.678in" svg:viewBox="0 0 14593 488" draw:points="0,0 14593,0 14593,488 0,488">
        <text:p/>
      </draw:polygon>
      <draw:polygon text:anchor-type="page" text:anchor-page-number="9" draw:z-index="259" draw:name="Shape3272" draw:style-name="gr2" draw:text-style-name="P3" svg:width="5.7449in" svg:height="0.1917in" svg:x="0.3665in" svg:y="0.678in" svg:viewBox="0 0 14593 488" draw:points="0,0 14593,0 14593,488 0,488">
        <text:p/>
      </draw:polygon>
      <draw:polygon text:anchor-type="page" text:anchor-page-number="7" draw:z-index="258" draw:name="Shape2740" draw:style-name="gr2" draw:text-style-name="P3" svg:width="5.7449in" svg:height="0.1917in" svg:x="0.3665in" svg:y="0.678in" svg:viewBox="0 0 14593 488" draw:points="0,0 14593,0 14593,488 0,488">
        <text:p/>
      </draw:polygon>
      <draw:polygon text:anchor-type="page" text:anchor-page-number="16" draw:z-index="257" draw:name="Shape5084" draw:style-name="gr2" draw:text-style-name="P3" svg:width="5.7449in" svg:height="0.1917in" svg:x="0.3665in" svg:y="0.678in" svg:viewBox="0 0 14593 488" draw:points="0,0 14593,0 14593,488 0,488">
        <text:p/>
      </draw:polygon>
      <draw:polygon text:anchor-type="page" text:anchor-page-number="11" draw:z-index="256" draw:name="Shape3773" draw:style-name="gr2" draw:text-style-name="P3" svg:width="5.7449in" svg:height="0.1917in" svg:x="0.3665in" svg:y="0.678in" svg:viewBox="0 0 14593 488" draw:points="0,0 14593,0 14593,488 0,488">
        <text:p/>
      </draw:polygon>
      <draw:polygon text:anchor-type="page" text:anchor-page-number="3" draw:z-index="255" draw:name="Shape676" draw:style-name="gr3" draw:text-style-name="P4" svg:width="0.0098in" svg:height="0.1764in" svg:x="7.9965in" svg:y="0.5016in" svg:viewBox="0 0 26 449" draw:points="0,0 26,0 26,449 0,449">
        <text:p/>
      </draw:polygon>
      <draw:polygon text:anchor-type="page" text:anchor-page-number="7" draw:z-index="254" draw:name="Shape2736" draw:style-name="gr3" draw:text-style-name="P4" svg:width="0.0098in" svg:height="0.1764in" svg:x="7.9965in" svg:y="0.5016in" svg:viewBox="0 0 26 449" draw:points="0,0 26,0 26,449 0,449">
        <text:p/>
      </draw:polygon>
      <draw:polygon text:anchor-type="page" text:anchor-page-number="15" draw:z-index="253" draw:name="Shape4920" draw:style-name="gr3" draw:text-style-name="P4" svg:width="0.0098in" svg:height="0.1764in" svg:x="7.9965in" svg:y="0.5016in" svg:viewBox="0 0 26 449" draw:points="0,0 26,0 26,449 0,449">
        <text:p/>
      </draw:polygon>
      <draw:polygon text:anchor-type="page" text:anchor-page-number="4" draw:z-index="252" draw:name="Shape977" draw:style-name="gr3" draw:text-style-name="P4" svg:width="0.0098in" svg:height="0.1764in" svg:x="7.9965in" svg:y="0.5016in" svg:viewBox="0 0 26 449" draw:points="0,0 26,0 26,449 0,449">
        <text:p/>
      </draw:polygon>
      <draw:polygon text:anchor-type="page" text:anchor-page-number="8" draw:z-index="251" draw:name="Shape3112" draw:style-name="gr3" draw:text-style-name="P4" svg:width="0.0098in" svg:height="0.1764in" svg:x="7.9965in" svg:y="0.5016in" svg:viewBox="0 0 26 449" draw:points="0,0 26,0 26,449 0,449">
        <text:p/>
      </draw:polygon>
      <draw:polygon text:anchor-type="page" text:anchor-page-number="6" draw:z-index="250" draw:name="Shape1764" draw:style-name="gr3" draw:text-style-name="P4" svg:width="0.0098in" svg:height="0.1764in" svg:x="7.9965in" svg:y="0.5016in" svg:viewBox="0 0 26 449" draw:points="0,0 26,0 26,449 0,449">
        <text:p/>
      </draw:polygon>
      <draw:polygon text:anchor-type="page" text:anchor-page-number="14" draw:z-index="249" draw:name="Shape4325" draw:style-name="gr3" draw:text-style-name="P4" svg:width="0.0098in" svg:height="0.1764in" svg:x="7.9965in" svg:y="0.5016in" svg:viewBox="0 0 26 449" draw:points="0,0 26,0 26,449 0,449">
        <text:p/>
      </draw:polygon>
      <draw:polygon text:anchor-type="page" text:anchor-page-number="13" draw:z-index="248" draw:name="Shape4124" draw:style-name="gr3" draw:text-style-name="P4" svg:width="0.0098in" svg:height="0.1764in" svg:x="7.9965in" svg:y="0.5016in" svg:viewBox="0 0 26 449" draw:points="0,0 26,0 26,449 0,449">
        <text:p/>
      </draw:polygon>
      <draw:polygon text:anchor-type="page" text:anchor-page-number="10" draw:z-index="247" draw:name="Shape3500" draw:style-name="gr3" draw:text-style-name="P4" svg:width="0.0098in" svg:height="0.1764in" svg:x="7.9965in" svg:y="0.5016in" svg:viewBox="0 0 26 449" draw:points="0,0 26,0 26,449 0,449">
        <text:p/>
      </draw:polygon>
      <draw:polygon text:anchor-type="page" text:anchor-page-number="2" draw:z-index="246" draw:name="Shape351" draw:style-name="gr3" draw:text-style-name="P4" svg:width="0.0098in" svg:height="0.1764in" svg:x="7.9965in" svg:y="0.5016in" svg:viewBox="0 0 26 449" draw:points="0,0 26,0 26,449 0,449">
        <text:p/>
      </draw:polygon>
      <draw:polygon text:anchor-type="page" text:anchor-page-number="9" draw:z-index="245" draw:name="Shape3268" draw:style-name="gr3" draw:text-style-name="P4" svg:width="0.0098in" svg:height="0.1764in" svg:x="7.9965in" svg:y="0.5016in" svg:viewBox="0 0 26 449" draw:points="0,0 26,0 26,449 0,449">
        <text:p/>
      </draw:polygon>
      <draw:polygon text:anchor-type="page" text:anchor-page-number="12" draw:z-index="244" draw:name="Shape3987" draw:style-name="gr3" draw:text-style-name="P4" svg:width="0.0098in" svg:height="0.1764in" svg:x="7.9965in" svg:y="0.5016in" svg:viewBox="0 0 26 449" draw:points="0,0 26,0 26,449 0,449">
        <text:p/>
      </draw:polygon>
      <draw:polygon text:anchor-type="page" text:anchor-page-number="16" draw:z-index="243" draw:name="Shape5080" draw:style-name="gr3" draw:text-style-name="P4" svg:width="0.0098in" svg:height="0.1764in" svg:x="7.9965in" svg:y="0.5016in" svg:viewBox="0 0 26 449" draw:points="0,0 26,0 26,449 0,449">
        <text:p/>
      </draw:polygon>
      <draw:polygon text:anchor-type="page" text:anchor-page-number="11" draw:z-index="242" draw:name="Shape3769" draw:style-name="gr3" draw:text-style-name="P4" svg:width="0.0098in" svg:height="0.1764in" svg:x="7.9965in" svg:y="0.5016in" svg:viewBox="0 0 26 449" draw:points="0,0 26,0 26,449 0,449">
        <text:p/>
      </draw:polygon>
      <draw:polygon text:anchor-type="page" text:anchor-page-number="5" draw:z-index="241" draw:name="Shape1120" draw:style-name="gr3" draw:text-style-name="P4" svg:width="0.0098in" svg:height="0.1764in" svg:x="7.9965in" svg:y="0.5016in" svg:viewBox="0 0 26 449" draw:points="0,0 26,0 26,449 0,449">
        <text:p/>
      </draw:polygon>
      <draw:polygon text:anchor-type="page" text:anchor-page-number="1" draw:z-index="240" draw:name="Shape18" draw:style-name="gr3" draw:text-style-name="P4" svg:width="0.0098in" svg:height="0.1764in" svg:x="7.9965in" svg:y="0.5016in" svg:viewBox="0 0 26 449" draw:points="0,0 26,0 26,449 0,449">
        <text:p/>
      </draw:polygon>
      <draw:polygon text:anchor-type="page" text:anchor-page-number="15" draw:z-index="239" draw:name="Shape4912" draw:style-name="gr3" draw:text-style-name="P4" svg:width="0.0102in" svg:height="0.1764in" svg:x="6.1063in" svg:y="0.5016in" svg:viewBox="0 0 27 449" draw:points="0,0 27,0 27,449 0,449">
        <text:p/>
      </draw:polygon>
      <draw:polygon text:anchor-type="page" text:anchor-page-number="16" draw:z-index="238" draw:name="Shape5072" draw:style-name="gr3" draw:text-style-name="P4" svg:width="0.0102in" svg:height="0.1764in" svg:x="6.1063in" svg:y="0.5016in" svg:viewBox="0 0 27 449" draw:points="0,0 27,0 27,449 0,449">
        <text:p/>
      </draw:polygon>
      <draw:polygon text:anchor-type="page" text:anchor-page-number="1" draw:z-index="237" draw:name="Shape10" draw:style-name="gr3" draw:text-style-name="P4" svg:width="0.0102in" svg:height="0.1764in" svg:x="6.1063in" svg:y="0.5016in" svg:viewBox="0 0 27 449" draw:points="0,0 27,0 27,449 0,449">
        <text:p/>
      </draw:polygon>
      <draw:polygon text:anchor-type="page" text:anchor-page-number="7" draw:z-index="236" draw:name="Shape2728" draw:style-name="gr3" draw:text-style-name="P4" svg:width="0.0102in" svg:height="0.1764in" svg:x="6.1063in" svg:y="0.5016in" svg:viewBox="0 0 27 449" draw:points="0,0 27,0 27,449 0,449">
        <text:p/>
      </draw:polygon>
      <draw:polygon text:anchor-type="page" text:anchor-page-number="12" draw:z-index="235" draw:name="Shape3979" draw:style-name="gr3" draw:text-style-name="P4" svg:width="0.0102in" svg:height="0.1764in" svg:x="6.1063in" svg:y="0.5016in" svg:viewBox="0 0 27 449" draw:points="0,0 27,0 27,449 0,449">
        <text:p/>
      </draw:polygon>
      <draw:polygon text:anchor-type="page" text:anchor-page-number="4" draw:z-index="234" draw:name="Shape969" draw:style-name="gr3" draw:text-style-name="P4" svg:width="0.0102in" svg:height="0.1764in" svg:x="6.1063in" svg:y="0.5016in" svg:viewBox="0 0 27 449" draw:points="0,0 27,0 27,449 0,449">
        <text:p/>
      </draw:polygon>
      <draw:polygon text:anchor-type="page" text:anchor-page-number="2" draw:z-index="233" draw:name="Shape343" draw:style-name="gr3" draw:text-style-name="P4" svg:width="0.0102in" svg:height="0.1764in" svg:x="6.1063in" svg:y="0.5016in" svg:viewBox="0 0 27 449" draw:points="0,0 27,0 27,449 0,449">
        <text:p/>
      </draw:polygon>
      <draw:polygon text:anchor-type="page" text:anchor-page-number="11" draw:z-index="232" draw:name="Shape3761" draw:style-name="gr3" draw:text-style-name="P4" svg:width="0.0102in" svg:height="0.1764in" svg:x="6.1063in" svg:y="0.5016in" svg:viewBox="0 0 27 449" draw:points="0,0 27,0 27,449 0,449">
        <text:p/>
      </draw:polygon>
      <draw:polygon text:anchor-type="page" text:anchor-page-number="5" draw:z-index="231" draw:name="Shape1112" draw:style-name="gr3" draw:text-style-name="P4" svg:width="0.0102in" svg:height="0.1764in" svg:x="6.1063in" svg:y="0.5016in" svg:viewBox="0 0 27 449" draw:points="0,0 27,0 27,449 0,449">
        <text:p/>
      </draw:polygon>
      <draw:polygon text:anchor-type="page" text:anchor-page-number="8" draw:z-index="230" draw:name="Shape3104" draw:style-name="gr3" draw:text-style-name="P4" svg:width="0.0102in" svg:height="0.1764in" svg:x="6.1063in" svg:y="0.5016in" svg:viewBox="0 0 27 449" draw:points="0,0 27,0 27,449 0,449">
        <text:p/>
      </draw:polygon>
      <draw:polygon text:anchor-type="page" text:anchor-page-number="14" draw:z-index="229" draw:name="Shape4317" draw:style-name="gr3" draw:text-style-name="P4" svg:width="0.0102in" svg:height="0.1764in" svg:x="6.1063in" svg:y="0.5016in" svg:viewBox="0 0 27 449" draw:points="0,0 27,0 27,449 0,449">
        <text:p/>
      </draw:polygon>
      <draw:polygon text:anchor-type="page" text:anchor-page-number="3" draw:z-index="228" draw:name="Shape668" draw:style-name="gr3" draw:text-style-name="P4" svg:width="0.0102in" svg:height="0.1764in" svg:x="6.1063in" svg:y="0.5016in" svg:viewBox="0 0 27 449" draw:points="0,0 27,0 27,449 0,449">
        <text:p/>
      </draw:polygon>
      <draw:polygon text:anchor-type="page" text:anchor-page-number="9" draw:z-index="227" draw:name="Shape3260" draw:style-name="gr3" draw:text-style-name="P4" svg:width="0.0102in" svg:height="0.1764in" svg:x="6.1063in" svg:y="0.5016in" svg:viewBox="0 0 27 449" draw:points="0,0 27,0 27,449 0,449">
        <text:p/>
      </draw:polygon>
      <draw:polygon text:anchor-type="page" text:anchor-page-number="13" draw:z-index="226" draw:name="Shape4116" draw:style-name="gr3" draw:text-style-name="P4" svg:width="0.0102in" svg:height="0.1764in" svg:x="6.1063in" svg:y="0.5016in" svg:viewBox="0 0 27 449" draw:points="0,0 27,0 27,449 0,449">
        <text:p/>
      </draw:polygon>
      <draw:polygon text:anchor-type="page" text:anchor-page-number="10" draw:z-index="225" draw:name="Shape3492" draw:style-name="gr3" draw:text-style-name="P4" svg:width="0.0102in" svg:height="0.1764in" svg:x="6.1063in" svg:y="0.5016in" svg:viewBox="0 0 27 449" draw:points="0,0 27,0 27,449 0,449">
        <text:p/>
      </draw:polygon>
      <draw:polygon text:anchor-type="page" text:anchor-page-number="6" draw:z-index="224" draw:name="Shape1756" draw:style-name="gr3" draw:text-style-name="P4" svg:width="0.0102in" svg:height="0.1764in" svg:x="6.1063in" svg:y="0.5016in" svg:viewBox="0 0 27 449" draw:points="0,0 27,0 27,449 0,449">
        <text:p/>
      </draw:polygon>
      <draw:polygon text:anchor-type="page" text:anchor-page-number="13" draw:z-index="223" draw:name="Shape4110" draw:style-name="gr3" draw:text-style-name="P4" svg:width="0.0098in" svg:height="0.1764in" svg:x="0.3583in" svg:y="0.5016in" svg:viewBox="0 0 26 449" draw:points="0,0 26,0 26,449 0,449">
        <text:p/>
      </draw:polygon>
      <draw:polygon text:anchor-type="page" text:anchor-page-number="7" draw:z-index="222" draw:name="Shape2722" draw:style-name="gr3" draw:text-style-name="P4" svg:width="0.0098in" svg:height="0.1764in" svg:x="0.3583in" svg:y="0.5016in" svg:viewBox="0 0 26 449" draw:points="0,0 26,0 26,449 0,449">
        <text:p/>
      </draw:polygon>
      <draw:polygon text:anchor-type="page" text:anchor-page-number="12" draw:z-index="221" draw:name="Shape3973" draw:style-name="gr3" draw:text-style-name="P4" svg:width="0.0098in" svg:height="0.1764in" svg:x="0.3583in" svg:y="0.5016in" svg:viewBox="0 0 26 449" draw:points="0,0 26,0 26,449 0,449">
        <text:p/>
      </draw:polygon>
      <draw:polygon text:anchor-type="page" text:anchor-page-number="6" draw:z-index="220" draw:name="Shape1750" draw:style-name="gr3" draw:text-style-name="P4" svg:width="0.0098in" svg:height="0.1764in" svg:x="0.3583in" svg:y="0.5016in" svg:viewBox="0 0 26 449" draw:points="0,0 26,0 26,449 0,449">
        <text:p/>
      </draw:polygon>
      <draw:polygon text:anchor-type="page" text:anchor-page-number="10" draw:z-index="219" draw:name="Shape3486" draw:style-name="gr3" draw:text-style-name="P4" svg:width="0.0098in" svg:height="0.1764in" svg:x="0.3583in" svg:y="0.5016in" svg:viewBox="0 0 26 449" draw:points="0,0 26,0 26,449 0,449">
        <text:p/>
      </draw:polygon>
      <draw:polygon text:anchor-type="page" text:anchor-page-number="4" draw:z-index="218" draw:name="Shape963" draw:style-name="gr3" draw:text-style-name="P4" svg:width="0.0098in" svg:height="0.1764in" svg:x="0.3583in" svg:y="0.5016in" svg:viewBox="0 0 26 449" draw:points="0,0 26,0 26,449 0,449">
        <text:p/>
      </draw:polygon>
      <draw:polygon text:anchor-type="page" text:anchor-page-number="5" draw:z-index="217" draw:name="Shape1106" draw:style-name="gr3" draw:text-style-name="P4" svg:width="0.0098in" svg:height="0.1764in" svg:x="0.3583in" svg:y="0.5016in" svg:viewBox="0 0 26 449" draw:points="0,0 26,0 26,449 0,449">
        <text:p/>
      </draw:polygon>
      <draw:polygon text:anchor-type="page" text:anchor-page-number="2" draw:z-index="216" draw:name="Shape337" draw:style-name="gr3" draw:text-style-name="P4" svg:width="0.0098in" svg:height="0.1764in" svg:x="0.3583in" svg:y="0.5016in" svg:viewBox="0 0 26 449" draw:points="0,0 26,0 26,449 0,449">
        <text:p/>
      </draw:polygon>
      <draw:polygon text:anchor-type="page" text:anchor-page-number="1" draw:z-index="215" draw:name="Shape4" draw:style-name="gr3" draw:text-style-name="P4" svg:width="0.0098in" svg:height="0.1764in" svg:x="0.3583in" svg:y="0.5016in" svg:viewBox="0 0 26 449" draw:points="0,0 26,0 26,449 0,449">
        <text:p/>
      </draw:polygon>
      <draw:polygon text:anchor-type="page" text:anchor-page-number="8" draw:z-index="214" draw:name="Shape3098" draw:style-name="gr3" draw:text-style-name="P4" svg:width="0.0098in" svg:height="0.1764in" svg:x="0.3583in" svg:y="0.5016in" svg:viewBox="0 0 26 449" draw:points="0,0 26,0 26,449 0,449">
        <text:p/>
      </draw:polygon>
      <draw:polygon text:anchor-type="page" text:anchor-page-number="14" draw:z-index="213" draw:name="Shape4311" draw:style-name="gr3" draw:text-style-name="P4" svg:width="0.0098in" svg:height="0.1764in" svg:x="0.3583in" svg:y="0.5016in" svg:viewBox="0 0 26 449" draw:points="0,0 26,0 26,449 0,449">
        <text:p/>
      </draw:polygon>
      <draw:polygon text:anchor-type="page" text:anchor-page-number="16" draw:z-index="212" draw:name="Shape5066" draw:style-name="gr3" draw:text-style-name="P4" svg:width="0.0098in" svg:height="0.1764in" svg:x="0.3583in" svg:y="0.5016in" svg:viewBox="0 0 26 449" draw:points="0,0 26,0 26,449 0,449">
        <text:p/>
      </draw:polygon>
      <draw:polygon text:anchor-type="page" text:anchor-page-number="15" draw:z-index="211" draw:name="Shape4906" draw:style-name="gr3" draw:text-style-name="P4" svg:width="0.0098in" svg:height="0.1764in" svg:x="0.3583in" svg:y="0.5016in" svg:viewBox="0 0 26 449" draw:points="0,0 26,0 26,449 0,449">
        <text:p/>
      </draw:polygon>
      <draw:polygon text:anchor-type="page" text:anchor-page-number="9" draw:z-index="210" draw:name="Shape3254" draw:style-name="gr3" draw:text-style-name="P4" svg:width="0.0098in" svg:height="0.1764in" svg:x="0.3583in" svg:y="0.5016in" svg:viewBox="0 0 26 449" draw:points="0,0 26,0 26,449 0,449">
        <text:p/>
      </draw:polygon>
      <draw:polygon text:anchor-type="page" text:anchor-page-number="3" draw:z-index="209" draw:name="Shape662" draw:style-name="gr3" draw:text-style-name="P4" svg:width="0.0098in" svg:height="0.1764in" svg:x="0.3583in" svg:y="0.5016in" svg:viewBox="0 0 26 449" draw:points="0,0 26,0 26,449 0,449">
        <text:p/>
      </draw:polygon>
      <draw:polygon text:anchor-type="page" text:anchor-page-number="11" draw:z-index="208" draw:name="Shape3755" draw:style-name="gr3" draw:text-style-name="P4" svg:width="0.0098in" svg:height="0.1764in" svg:x="0.3583in" svg:y="0.5016in" svg:viewBox="0 0 26 449" draw:points="0,0 26,0 26,449 0,449">
        <text:p/>
      </draw:polygon>
      <draw:polygon text:anchor-type="page" text:anchor-page-number="7" draw:z-index="207" draw:name="Shape2733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13" draw:z-index="206" draw:name="Shape4121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4" draw:z-index="205" draw:name="Shape974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12" draw:z-index="204" draw:name="Shape3984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2" draw:z-index="203" draw:name="Shape348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14" draw:z-index="202" draw:name="Shape4322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9" draw:z-index="201" draw:name="Shape3265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1" draw:z-index="200" draw:name="Shape15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11" draw:z-index="199" draw:name="Shape3766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15" draw:z-index="198" draw:name="Shape4917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8" draw:z-index="197" draw:name="Shape3109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6" draw:z-index="196" draw:name="Shape1761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10" draw:z-index="195" draw:name="Shape3497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5" draw:z-index="194" draw:name="Shape1117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16" draw:z-index="193" draw:name="Shape5077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3" draw:z-index="192" draw:name="Shape673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11" draw:z-index="191" draw:name="Shape3765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10" draw:z-index="190" draw:name="Shape3496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12" draw:z-index="189" draw:name="Shape3983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8" draw:z-index="188" draw:name="Shape3108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9" draw:z-index="187" draw:name="Shape3264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16" draw:z-index="186" draw:name="Shape5076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7" draw:z-index="185" draw:name="Shape2732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3" draw:z-index="184" draw:name="Shape672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6" draw:z-index="183" draw:name="Shape1760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15" draw:z-index="182" draw:name="Shape4916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14" draw:z-index="181" draw:name="Shape4321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1" draw:z-index="180" draw:name="Shape14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13" draw:z-index="179" draw:name="Shape4120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2" draw:z-index="178" draw:name="Shape347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4" draw:z-index="177" draw:name="Shape973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5" draw:z-index="176" draw:name="Shape1116" draw:style-name="gr3" draw:text-style-name="P4" svg:width="0.0098in" svg:height="0.0102in" svg:x="7.9965in" svg:y="0.4913in" svg:viewBox="0 0 26 27" draw:points="0,0 26,0 26,27 0,27">
        <text:p/>
      </draw:polygon>
      <draw:polygon text:anchor-type="page" text:anchor-page-number="8" draw:z-index="175" draw:name="Shape3105" draw:style-name="gr3" draw:text-style-name="P4" svg:width="1.8799in" svg:height="0.0102in" svg:x="6.1165in" svg:y="0.4913in" svg:viewBox="0 0 4776 27" draw:points="0,0 4776,0 4776,27 0,27">
        <text:p/>
      </draw:polygon>
      <draw:polygon text:anchor-type="page" text:anchor-page-number="2" draw:z-index="174" draw:name="Shape344" draw:style-name="gr3" draw:text-style-name="P4" svg:width="1.8799in" svg:height="0.0102in" svg:x="6.1165in" svg:y="0.4913in" svg:viewBox="0 0 4776 27" draw:points="0,0 4776,0 4776,27 0,27">
        <text:p/>
      </draw:polygon>
      <draw:polygon text:anchor-type="page" text:anchor-page-number="15" draw:z-index="173" draw:name="Shape4913" draw:style-name="gr3" draw:text-style-name="P4" svg:width="1.8799in" svg:height="0.0102in" svg:x="6.1165in" svg:y="0.4913in" svg:viewBox="0 0 4776 27" draw:points="0,0 4776,0 4776,27 0,27">
        <text:p/>
      </draw:polygon>
      <draw:polygon text:anchor-type="page" text:anchor-page-number="16" draw:z-index="172" draw:name="Shape5073" draw:style-name="gr3" draw:text-style-name="P4" svg:width="1.8799in" svg:height="0.0102in" svg:x="6.1165in" svg:y="0.4913in" svg:viewBox="0 0 4776 27" draw:points="0,0 4776,0 4776,27 0,27">
        <text:p/>
      </draw:polygon>
      <draw:polygon text:anchor-type="page" text:anchor-page-number="12" draw:z-index="171" draw:name="Shape3980" draw:style-name="gr3" draw:text-style-name="P4" svg:width="1.8799in" svg:height="0.0102in" svg:x="6.1165in" svg:y="0.4913in" svg:viewBox="0 0 4776 27" draw:points="0,0 4776,0 4776,27 0,27">
        <text:p/>
      </draw:polygon>
      <draw:polygon text:anchor-type="page" text:anchor-page-number="4" draw:z-index="170" draw:name="Shape970" draw:style-name="gr3" draw:text-style-name="P4" svg:width="1.8799in" svg:height="0.0102in" svg:x="6.1165in" svg:y="0.4913in" svg:viewBox="0 0 4776 27" draw:points="0,0 4776,0 4776,27 0,27">
        <text:p/>
      </draw:polygon>
      <draw:polygon text:anchor-type="page" text:anchor-page-number="1" draw:z-index="169" draw:name="Shape11" draw:style-name="gr3" draw:text-style-name="P4" svg:width="1.8799in" svg:height="0.0102in" svg:x="6.1165in" svg:y="0.4913in" svg:viewBox="0 0 4776 27" draw:points="0,0 4776,0 4776,27 0,27">
        <text:p/>
      </draw:polygon>
      <draw:polygon text:anchor-type="page" text:anchor-page-number="11" draw:z-index="168" draw:name="Shape3762" draw:style-name="gr3" draw:text-style-name="P4" svg:width="1.8799in" svg:height="0.0102in" svg:x="6.1165in" svg:y="0.4913in" svg:viewBox="0 0 4776 27" draw:points="0,0 4776,0 4776,27 0,27">
        <text:p/>
      </draw:polygon>
      <draw:polygon text:anchor-type="page" text:anchor-page-number="9" draw:z-index="167" draw:name="Shape3261" draw:style-name="gr3" draw:text-style-name="P4" svg:width="1.8799in" svg:height="0.0102in" svg:x="6.1165in" svg:y="0.4913in" svg:viewBox="0 0 4776 27" draw:points="0,0 4776,0 4776,27 0,27">
        <text:p/>
      </draw:polygon>
      <draw:polygon text:anchor-type="page" text:anchor-page-number="14" draw:z-index="166" draw:name="Shape4318" draw:style-name="gr3" draw:text-style-name="P4" svg:width="1.8799in" svg:height="0.0102in" svg:x="6.1165in" svg:y="0.4913in" svg:viewBox="0 0 4776 27" draw:points="0,0 4776,0 4776,27 0,27">
        <text:p/>
      </draw:polygon>
      <draw:polygon text:anchor-type="page" text:anchor-page-number="6" draw:z-index="165" draw:name="Shape1757" draw:style-name="gr3" draw:text-style-name="P4" svg:width="1.8799in" svg:height="0.0102in" svg:x="6.1165in" svg:y="0.4913in" svg:viewBox="0 0 4776 27" draw:points="0,0 4776,0 4776,27 0,27">
        <text:p/>
      </draw:polygon>
      <draw:polygon text:anchor-type="page" text:anchor-page-number="7" draw:z-index="164" draw:name="Shape2729" draw:style-name="gr3" draw:text-style-name="P4" svg:width="1.8799in" svg:height="0.0102in" svg:x="6.1165in" svg:y="0.4913in" svg:viewBox="0 0 4776 27" draw:points="0,0 4776,0 4776,27 0,27">
        <text:p/>
      </draw:polygon>
      <draw:polygon text:anchor-type="page" text:anchor-page-number="10" draw:z-index="163" draw:name="Shape3493" draw:style-name="gr3" draw:text-style-name="P4" svg:width="1.8799in" svg:height="0.0102in" svg:x="6.1165in" svg:y="0.4913in" svg:viewBox="0 0 4776 27" draw:points="0,0 4776,0 4776,27 0,27">
        <text:p/>
      </draw:polygon>
      <draw:polygon text:anchor-type="page" text:anchor-page-number="13" draw:z-index="162" draw:name="Shape4117" draw:style-name="gr3" draw:text-style-name="P4" svg:width="1.8799in" svg:height="0.0102in" svg:x="6.1165in" svg:y="0.4913in" svg:viewBox="0 0 4776 27" draw:points="0,0 4776,0 4776,27 0,27">
        <text:p/>
      </draw:polygon>
      <draw:polygon text:anchor-type="page" text:anchor-page-number="5" draw:z-index="161" draw:name="Shape1113" draw:style-name="gr3" draw:text-style-name="P4" svg:width="1.8799in" svg:height="0.0102in" svg:x="6.1165in" svg:y="0.4913in" svg:viewBox="0 0 4776 27" draw:points="0,0 4776,0 4776,27 0,27">
        <text:p/>
      </draw:polygon>
      <draw:polygon text:anchor-type="page" text:anchor-page-number="3" draw:z-index="160" draw:name="Shape669" draw:style-name="gr3" draw:text-style-name="P4" svg:width="1.8799in" svg:height="0.0102in" svg:x="6.1165in" svg:y="0.4913in" svg:viewBox="0 0 4776 27" draw:points="0,0 4776,0 4776,27 0,27">
        <text:p/>
      </draw:polygon>
      <draw:polygon text:anchor-type="page" text:anchor-page-number="11" draw:z-index="159" draw:name="Shape3760" draw:style-name="gr3" draw:text-style-name="P4" svg:width="0.0102in" svg:height="0.0102in" svg:x="6.1063in" svg:y="0.4913in" svg:viewBox="0 0 27 27" draw:points="0,0 27,0 27,27 0,27">
        <text:p/>
      </draw:polygon>
      <draw:polygon text:anchor-type="page" text:anchor-page-number="8" draw:z-index="158" draw:name="Shape3103" draw:style-name="gr3" draw:text-style-name="P4" svg:width="0.0102in" svg:height="0.0102in" svg:x="6.1063in" svg:y="0.4913in" svg:viewBox="0 0 27 27" draw:points="0,0 27,0 27,27 0,27">
        <text:p/>
      </draw:polygon>
      <draw:polygon text:anchor-type="page" text:anchor-page-number="14" draw:z-index="157" draw:name="Shape4316" draw:style-name="gr3" draw:text-style-name="P4" svg:width="0.0102in" svg:height="0.0102in" svg:x="6.1063in" svg:y="0.4913in" svg:viewBox="0 0 27 27" draw:points="0,0 27,0 27,27 0,27">
        <text:p/>
      </draw:polygon>
      <draw:polygon text:anchor-type="page" text:anchor-page-number="3" draw:z-index="156" draw:name="Shape667" draw:style-name="gr3" draw:text-style-name="P4" svg:width="0.0102in" svg:height="0.0102in" svg:x="6.1063in" svg:y="0.4913in" svg:viewBox="0 0 27 27" draw:points="0,0 27,0 27,27 0,27">
        <text:p/>
      </draw:polygon>
      <draw:polygon text:anchor-type="page" text:anchor-page-number="5" draw:z-index="155" draw:name="Shape1111" draw:style-name="gr3" draw:text-style-name="P4" svg:width="0.0102in" svg:height="0.0102in" svg:x="6.1063in" svg:y="0.4913in" svg:viewBox="0 0 27 27" draw:points="0,0 27,0 27,27 0,27">
        <text:p/>
      </draw:polygon>
      <draw:polygon text:anchor-type="page" text:anchor-page-number="9" draw:z-index="154" draw:name="Shape3259" draw:style-name="gr3" draw:text-style-name="P4" svg:width="0.0102in" svg:height="0.0102in" svg:x="6.1063in" svg:y="0.4913in" svg:viewBox="0 0 27 27" draw:points="0,0 27,0 27,27 0,27">
        <text:p/>
      </draw:polygon>
      <draw:polygon text:anchor-type="page" text:anchor-page-number="1" draw:z-index="153" draw:name="Shape9" draw:style-name="gr3" draw:text-style-name="P4" svg:width="0.0102in" svg:height="0.0102in" svg:x="6.1063in" svg:y="0.4913in" svg:viewBox="0 0 27 27" draw:points="0,0 27,0 27,27 0,27">
        <text:p/>
      </draw:polygon>
      <draw:polygon text:anchor-type="page" text:anchor-page-number="10" draw:z-index="152" draw:name="Shape3491" draw:style-name="gr3" draw:text-style-name="P4" svg:width="0.0102in" svg:height="0.0102in" svg:x="6.1063in" svg:y="0.4913in" svg:viewBox="0 0 27 27" draw:points="0,0 27,0 27,27 0,27">
        <text:p/>
      </draw:polygon>
      <draw:polygon text:anchor-type="page" text:anchor-page-number="15" draw:z-index="151" draw:name="Shape4911" draw:style-name="gr3" draw:text-style-name="P4" svg:width="0.0102in" svg:height="0.0102in" svg:x="6.1063in" svg:y="0.4913in" svg:viewBox="0 0 27 27" draw:points="0,0 27,0 27,27 0,27">
        <text:p/>
      </draw:polygon>
      <draw:polygon text:anchor-type="page" text:anchor-page-number="13" draw:z-index="150" draw:name="Shape4115" draw:style-name="gr3" draw:text-style-name="P4" svg:width="0.0102in" svg:height="0.0102in" svg:x="6.1063in" svg:y="0.4913in" svg:viewBox="0 0 27 27" draw:points="0,0 27,0 27,27 0,27">
        <text:p/>
      </draw:polygon>
      <draw:polygon text:anchor-type="page" text:anchor-page-number="7" draw:z-index="149" draw:name="Shape2727" draw:style-name="gr3" draw:text-style-name="P4" svg:width="0.0102in" svg:height="0.0102in" svg:x="6.1063in" svg:y="0.4913in" svg:viewBox="0 0 27 27" draw:points="0,0 27,0 27,27 0,27">
        <text:p/>
      </draw:polygon>
      <draw:polygon text:anchor-type="page" text:anchor-page-number="6" draw:z-index="148" draw:name="Shape1755" draw:style-name="gr3" draw:text-style-name="P4" svg:width="0.0102in" svg:height="0.0102in" svg:x="6.1063in" svg:y="0.4913in" svg:viewBox="0 0 27 27" draw:points="0,0 27,0 27,27 0,27">
        <text:p/>
      </draw:polygon>
      <draw:polygon text:anchor-type="page" text:anchor-page-number="12" draw:z-index="147" draw:name="Shape3978" draw:style-name="gr3" draw:text-style-name="P4" svg:width="0.0102in" svg:height="0.0102in" svg:x="6.1063in" svg:y="0.4913in" svg:viewBox="0 0 27 27" draw:points="0,0 27,0 27,27 0,27">
        <text:p/>
      </draw:polygon>
      <draw:polygon text:anchor-type="page" text:anchor-page-number="16" draw:z-index="146" draw:name="Shape5071" draw:style-name="gr3" draw:text-style-name="P4" svg:width="0.0102in" svg:height="0.0102in" svg:x="6.1063in" svg:y="0.4913in" svg:viewBox="0 0 27 27" draw:points="0,0 27,0 27,27 0,27">
        <text:p/>
      </draw:polygon>
      <draw:polygon text:anchor-type="page" text:anchor-page-number="2" draw:z-index="145" draw:name="Shape342" draw:style-name="gr3" draw:text-style-name="P4" svg:width="0.0102in" svg:height="0.0102in" svg:x="6.1063in" svg:y="0.4913in" svg:viewBox="0 0 27 27" draw:points="0,0 27,0 27,27 0,27">
        <text:p/>
      </draw:polygon>
      <draw:polygon text:anchor-type="page" text:anchor-page-number="4" draw:z-index="144" draw:name="Shape968" draw:style-name="gr3" draw:text-style-name="P4" svg:width="0.0102in" svg:height="0.0102in" svg:x="6.1063in" svg:y="0.4913in" svg:viewBox="0 0 27 27" draw:points="0,0 27,0 27,27 0,27">
        <text:p/>
      </draw:polygon>
      <draw:polygon text:anchor-type="page" text:anchor-page-number="15" draw:z-index="143" draw:name="Shape4909" draw:style-name="gr3" draw:text-style-name="P4" svg:width="5.7382in" svg:height="0.0102in" svg:x="0.3681in" svg:y="0.4913in" svg:viewBox="0 0 14576 27" draw:points="0,0 14576,0 14576,27 0,27">
        <text:p/>
      </draw:polygon>
      <draw:polygon text:anchor-type="page" text:anchor-page-number="16" draw:z-index="142" draw:name="Shape5069" draw:style-name="gr3" draw:text-style-name="P4" svg:width="5.7382in" svg:height="0.0102in" svg:x="0.3681in" svg:y="0.4913in" svg:viewBox="0 0 14576 27" draw:points="0,0 14576,0 14576,27 0,27">
        <text:p/>
      </draw:polygon>
      <draw:polygon text:anchor-type="page" text:anchor-page-number="9" draw:z-index="141" draw:name="Shape3257" draw:style-name="gr3" draw:text-style-name="P4" svg:width="5.7382in" svg:height="0.0102in" svg:x="0.3681in" svg:y="0.4913in" svg:viewBox="0 0 14576 27" draw:points="0,0 14576,0 14576,27 0,27">
        <text:p/>
      </draw:polygon>
      <draw:polygon text:anchor-type="page" text:anchor-page-number="3" draw:z-index="140" draw:name="Shape665" draw:style-name="gr3" draw:text-style-name="P4" svg:width="5.7382in" svg:height="0.0102in" svg:x="0.3681in" svg:y="0.4913in" svg:viewBox="0 0 14576 27" draw:points="0,0 14576,0 14576,27 0,27">
        <text:p/>
      </draw:polygon>
      <draw:polygon text:anchor-type="page" text:anchor-page-number="12" draw:z-index="139" draw:name="Shape3976" draw:style-name="gr3" draw:text-style-name="P4" svg:width="5.7382in" svg:height="0.0102in" svg:x="0.3681in" svg:y="0.4913in" svg:viewBox="0 0 14576 27" draw:points="0,0 14576,0 14576,27 0,27">
        <text:p/>
      </draw:polygon>
      <draw:polygon text:anchor-type="page" text:anchor-page-number="8" draw:z-index="138" draw:name="Shape3101" draw:style-name="gr3" draw:text-style-name="P4" svg:width="5.7382in" svg:height="0.0102in" svg:x="0.3681in" svg:y="0.4913in" svg:viewBox="0 0 14576 27" draw:points="0,0 14576,0 14576,27 0,27">
        <text:p/>
      </draw:polygon>
      <draw:polygon text:anchor-type="page" text:anchor-page-number="7" draw:z-index="137" draw:name="Shape2725" draw:style-name="gr3" draw:text-style-name="P4" svg:width="5.7382in" svg:height="0.0102in" svg:x="0.3681in" svg:y="0.4913in" svg:viewBox="0 0 14576 27" draw:points="0,0 14576,0 14576,27 0,27">
        <text:p/>
      </draw:polygon>
      <draw:polygon text:anchor-type="page" text:anchor-page-number="1" draw:z-index="136" draw:name="Shape7" draw:style-name="gr3" draw:text-style-name="P4" svg:width="5.7382in" svg:height="0.0102in" svg:x="0.3681in" svg:y="0.4913in" svg:viewBox="0 0 14576 27" draw:points="0,0 14576,0 14576,27 0,27">
        <text:p/>
      </draw:polygon>
      <draw:polygon text:anchor-type="page" text:anchor-page-number="6" draw:z-index="135" draw:name="Shape1753" draw:style-name="gr3" draw:text-style-name="P4" svg:width="5.7382in" svg:height="0.0102in" svg:x="0.3681in" svg:y="0.4913in" svg:viewBox="0 0 14576 27" draw:points="0,0 14576,0 14576,27 0,27">
        <text:p/>
      </draw:polygon>
      <draw:polygon text:anchor-type="page" text:anchor-page-number="11" draw:z-index="134" draw:name="Shape3758" draw:style-name="gr3" draw:text-style-name="P4" svg:width="5.7382in" svg:height="0.0102in" svg:x="0.3681in" svg:y="0.4913in" svg:viewBox="0 0 14576 27" draw:points="0,0 14576,0 14576,27 0,27">
        <text:p/>
      </draw:polygon>
      <draw:polygon text:anchor-type="page" text:anchor-page-number="4" draw:z-index="133" draw:name="Shape966" draw:style-name="gr3" draw:text-style-name="P4" svg:width="5.7382in" svg:height="0.0102in" svg:x="0.3681in" svg:y="0.4913in" svg:viewBox="0 0 14576 27" draw:points="0,0 14576,0 14576,27 0,27">
        <text:p/>
      </draw:polygon>
      <draw:polygon text:anchor-type="page" text:anchor-page-number="14" draw:z-index="132" draw:name="Shape4314" draw:style-name="gr3" draw:text-style-name="P4" svg:width="5.7382in" svg:height="0.0102in" svg:x="0.3681in" svg:y="0.4913in" svg:viewBox="0 0 14576 27" draw:points="0,0 14576,0 14576,27 0,27">
        <text:p/>
      </draw:polygon>
      <draw:polygon text:anchor-type="page" text:anchor-page-number="13" draw:z-index="131" draw:name="Shape4113" draw:style-name="gr3" draw:text-style-name="P4" svg:width="5.7382in" svg:height="0.0102in" svg:x="0.3681in" svg:y="0.4913in" svg:viewBox="0 0 14576 27" draw:points="0,0 14576,0 14576,27 0,27">
        <text:p/>
      </draw:polygon>
      <draw:polygon text:anchor-type="page" text:anchor-page-number="2" draw:z-index="130" draw:name="Shape340" draw:style-name="gr3" draw:text-style-name="P4" svg:width="5.7382in" svg:height="0.0102in" svg:x="0.3681in" svg:y="0.4913in" svg:viewBox="0 0 14576 27" draw:points="0,0 14576,0 14576,27 0,27">
        <text:p/>
      </draw:polygon>
      <draw:polygon text:anchor-type="page" text:anchor-page-number="5" draw:z-index="129" draw:name="Shape1109" draw:style-name="gr3" draw:text-style-name="P4" svg:width="5.7382in" svg:height="0.0102in" svg:x="0.3681in" svg:y="0.4913in" svg:viewBox="0 0 14576 27" draw:points="0,0 14576,0 14576,27 0,27">
        <text:p/>
      </draw:polygon>
      <draw:polygon text:anchor-type="page" text:anchor-page-number="10" draw:z-index="128" draw:name="Shape3489" draw:style-name="gr3" draw:text-style-name="P4" svg:width="5.7382in" svg:height="0.0102in" svg:x="0.3681in" svg:y="0.4913in" svg:viewBox="0 0 14576 27" draw:points="0,0 14576,0 14576,27 0,27">
        <text:p/>
      </draw:polygon>
      <draw:polygon text:anchor-type="page" text:anchor-page-number="13" draw:z-index="127" draw:name="Shape4109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10" draw:z-index="126" draw:name="Shape3485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15" draw:z-index="125" draw:name="Shape4905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6" draw:z-index="124" draw:name="Shape1749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16" draw:z-index="123" draw:name="Shape5065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1" draw:z-index="122" draw:name="Shape3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7" draw:z-index="121" draw:name="Shape2721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8" draw:z-index="120" draw:name="Shape3097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3" draw:z-index="119" draw:name="Shape661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9" draw:z-index="118" draw:name="Shape3253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11" draw:z-index="117" draw:name="Shape3754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5" draw:z-index="116" draw:name="Shape1105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12" draw:z-index="115" draw:name="Shape3972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4" draw:z-index="114" draw:name="Shape962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14" draw:z-index="113" draw:name="Shape4310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2" draw:z-index="112" draw:name="Shape336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7" draw:z-index="111" draw:name="Shape2720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5" draw:z-index="110" draw:name="Shape1104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9" draw:z-index="109" draw:name="Shape3252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10" draw:z-index="108" draw:name="Shape3484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8" draw:z-index="107" draw:name="Shape3096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4" draw:z-index="106" draw:name="Shape961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6" draw:z-index="105" draw:name="Shape1748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14" draw:z-index="104" draw:name="Shape4309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16" draw:z-index="103" draw:name="Shape5064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3" draw:z-index="102" draw:name="Shape660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11" draw:z-index="101" draw:name="Shape3753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2" draw:z-index="100" draw:name="Shape335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1" draw:z-index="99" draw:name="Shape2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15" draw:z-index="98" draw:name="Shape4904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12" draw:z-index="97" draw:name="Shape3971" draw:style-name="gr3" draw:text-style-name="P4" svg:width="0.0098in" svg:height="0.0102in" svg:x="0.3583in" svg:y="0.4913in" svg:viewBox="0 0 26 27" draw:points="0,0 26,0 26,27 0,27">
        <text:p/>
      </draw:polygon>
      <draw:polygon text:anchor-type="page" text:anchor-page-number="13" draw:z-index="96" draw:name="Shape4108" draw:style-name="gr3" draw:text-style-name="P4" svg:width="0.0098in" svg:height="0.0102in" svg:x="0.3583in" svg:y="0.4913in" svg:viewBox="0 0 26 27" draw:points="0,0 26,0 26,27 0,27">
        <text:p/>
      </draw:polygon>
      <draw:frame text:anchor-type="page" text:anchor-page-number="16" draw:z-index="95" draw:name="Shape5078" draw:style-name="gr1" draw:text-style-name="P2" svg:width="0.5295in" svg:height="0.0976in" svg:x="6.1598in" svg:y="0.5028in">
        <draw:text-box>
          <text:p><text:span text:style-name="T9">Revisione n. 1</text:span></text:p>
        </draw:text-box>
      </draw:frame>
      <draw:frame text:anchor-type="page" text:anchor-page-number="7" draw:z-index="94" draw:name="Shape2734" draw:style-name="gr1" draw:text-style-name="P2" svg:width="0.5295in" svg:height="0.0976in" svg:x="6.1598in" svg:y="0.5028in">
        <draw:text-box>
          <text:p><text:span text:style-name="T9">Revisione n. 1</text:span></text:p>
        </draw:text-box>
      </draw:frame>
      <draw:frame text:anchor-type="page" text:anchor-page-number="8" draw:z-index="93" draw:name="Shape3110" draw:style-name="gr1" draw:text-style-name="P2" svg:width="0.5295in" svg:height="0.0976in" svg:x="6.1598in" svg:y="0.5028in">
        <draw:text-box>
          <text:p><text:span text:style-name="T9">Revisione n. 1</text:span></text:p>
        </draw:text-box>
      </draw:frame>
      <draw:frame text:anchor-type="page" text:anchor-page-number="13" draw:z-index="92" draw:name="Shape4122" draw:style-name="gr1" draw:text-style-name="P2" svg:width="0.5295in" svg:height="0.0976in" svg:x="6.1598in" svg:y="0.5028in">
        <draw:text-box>
          <text:p><text:span text:style-name="T9">Revisione n. 1</text:span></text:p>
        </draw:text-box>
      </draw:frame>
      <draw:frame text:anchor-type="page" text:anchor-page-number="4" draw:z-index="91" draw:name="Shape975" draw:style-name="gr1" draw:text-style-name="P2" svg:width="0.5295in" svg:height="0.0976in" svg:x="6.1598in" svg:y="0.5028in">
        <draw:text-box>
          <text:p><text:span text:style-name="T9">Revisione n. 1</text:span></text:p>
        </draw:text-box>
      </draw:frame>
      <draw:frame text:anchor-type="page" text:anchor-page-number="12" draw:z-index="90" draw:name="Shape3985" draw:style-name="gr1" draw:text-style-name="P2" svg:width="0.5295in" svg:height="0.0976in" svg:x="6.1598in" svg:y="0.5028in">
        <draw:text-box>
          <text:p><text:span text:style-name="T9">Revisione n. 1</text:span></text:p>
        </draw:text-box>
      </draw:frame>
      <draw:frame text:anchor-type="page" text:anchor-page-number="11" draw:z-index="89" draw:name="Shape3767" draw:style-name="gr1" draw:text-style-name="P2" svg:width="0.5295in" svg:height="0.0976in" svg:x="6.1598in" svg:y="0.5028in">
        <draw:text-box>
          <text:p><text:span text:style-name="T9">Revisione n. 1</text:span></text:p>
        </draw:text-box>
      </draw:frame>
      <draw:frame text:anchor-type="page" text:anchor-page-number="14" draw:z-index="88" draw:name="Shape4323" draw:style-name="gr1" draw:text-style-name="P2" svg:width="0.5295in" svg:height="0.0976in" svg:x="6.1598in" svg:y="0.5028in">
        <draw:text-box>
          <text:p><text:span text:style-name="T9">Revisione n. 1</text:span></text:p>
        </draw:text-box>
      </draw:frame>
      <draw:frame text:anchor-type="page" text:anchor-page-number="1" draw:z-index="87" draw:name="Shape16" draw:style-name="gr1" draw:text-style-name="P2" svg:width="0.5295in" svg:height="0.0976in" svg:x="6.1598in" svg:y="0.5028in">
        <draw:text-box>
          <text:p><text:span text:style-name="T9">Revisione n. 1</text:span></text:p>
        </draw:text-box>
      </draw:frame>
      <draw:frame text:anchor-type="page" text:anchor-page-number="10" draw:z-index="86" draw:name="Shape3498" draw:style-name="gr1" draw:text-style-name="P2" svg:width="0.5295in" svg:height="0.0976in" svg:x="6.1598in" svg:y="0.5028in">
        <draw:text-box>
          <text:p><text:span text:style-name="T9">Revisione n. 1</text:span></text:p>
        </draw:text-box>
      </draw:frame>
      <draw:frame text:anchor-type="page" text:anchor-page-number="15" draw:z-index="85" draw:name="Shape4918" draw:style-name="gr1" draw:text-style-name="P2" svg:width="0.5295in" svg:height="0.0976in" svg:x="6.1598in" svg:y="0.5028in">
        <draw:text-box>
          <text:p><text:span text:style-name="T9">Revisione n. 1</text:span></text:p>
        </draw:text-box>
      </draw:frame>
      <draw:frame text:anchor-type="page" text:anchor-page-number="9" draw:z-index="84" draw:name="Shape3266" draw:style-name="gr1" draw:text-style-name="P2" svg:width="0.5295in" svg:height="0.0976in" svg:x="6.1598in" svg:y="0.5028in">
        <draw:text-box>
          <text:p><text:span text:style-name="T9">Revisione n. 1</text:span></text:p>
        </draw:text-box>
      </draw:frame>
      <draw:frame text:anchor-type="page" text:anchor-page-number="6" draw:z-index="83" draw:name="Shape1762" draw:style-name="gr1" draw:text-style-name="P2" svg:width="0.5295in" svg:height="0.0976in" svg:x="6.1598in" svg:y="0.5028in">
        <draw:text-box>
          <text:p><text:span text:style-name="T9">Revisione n. 1</text:span></text:p>
        </draw:text-box>
      </draw:frame>
      <draw:frame text:anchor-type="page" text:anchor-page-number="3" draw:z-index="82" draw:name="Shape674" draw:style-name="gr1" draw:text-style-name="P2" svg:width="0.5295in" svg:height="0.0976in" svg:x="6.1598in" svg:y="0.5028in">
        <draw:text-box>
          <text:p><text:span text:style-name="T9">Revisione n. 1</text:span></text:p>
        </draw:text-box>
      </draw:frame>
      <draw:frame text:anchor-type="page" text:anchor-page-number="2" draw:z-index="81" draw:name="Shape349" draw:style-name="gr1" draw:text-style-name="P2" svg:width="0.5295in" svg:height="0.0976in" svg:x="6.1598in" svg:y="0.5028in">
        <draw:text-box>
          <text:p><text:span text:style-name="T9">Revisione n. 1</text:span></text:p>
        </draw:text-box>
      </draw:frame>
      <draw:frame text:anchor-type="page" text:anchor-page-number="5" draw:z-index="80" draw:name="Shape1118" draw:style-name="gr1" draw:text-style-name="P2" svg:width="0.5295in" svg:height="0.0976in" svg:x="6.1598in" svg:y="0.5028in">
        <draw:text-box>
          <text:p><text:span text:style-name="T9">Revisione n. 1</text:span></text:p>
        </draw:text-box>
      </draw:frame>
      <draw:frame text:anchor-type="page" text:anchor-page-number="6" draw:z-index="79" draw:name="Shape1763" draw:style-name="gr1" draw:text-style-name="P2" svg:width="0.0787in" svg:height="0.1776in" svg:x="3.2366in" svg:y="0.5035in">
        <draw:text-box>
          <text:p><text:span text:style-name="T8"><text:s text:c="2"/></text:span></text:p>
        </draw:text-box>
      </draw:frame>
      <draw:frame text:anchor-type="page" text:anchor-page-number="15" draw:z-index="78" draw:name="Shape4919" draw:style-name="gr1" draw:text-style-name="P2" svg:width="0.0787in" svg:height="0.1776in" svg:x="3.2366in" svg:y="0.5035in">
        <draw:text-box>
          <text:p><text:span text:style-name="T8"><text:s text:c="2"/></text:span></text:p>
        </draw:text-box>
      </draw:frame>
      <draw:frame text:anchor-type="page" text:anchor-page-number="12" draw:z-index="77" draw:name="Shape3986" draw:style-name="gr1" draw:text-style-name="P2" svg:width="0.0787in" svg:height="0.1776in" svg:x="3.2366in" svg:y="0.5035in">
        <draw:text-box>
          <text:p><text:span text:style-name="T8"><text:s text:c="2"/></text:span></text:p>
        </draw:text-box>
      </draw:frame>
      <draw:frame text:anchor-type="page" text:anchor-page-number="13" draw:z-index="76" draw:name="Shape4123" draw:style-name="gr1" draw:text-style-name="P2" svg:width="0.0787in" svg:height="0.1776in" svg:x="3.2366in" svg:y="0.5035in">
        <draw:text-box>
          <text:p><text:span text:style-name="T8"><text:s text:c="2"/></text:span></text:p>
        </draw:text-box>
      </draw:frame>
      <draw:frame text:anchor-type="page" text:anchor-page-number="7" draw:z-index="75" draw:name="Shape2735" draw:style-name="gr1" draw:text-style-name="P2" svg:width="0.0787in" svg:height="0.1776in" svg:x="3.2366in" svg:y="0.5035in">
        <draw:text-box>
          <text:p><text:span text:style-name="T8"><text:s text:c="2"/></text:span></text:p>
        </draw:text-box>
      </draw:frame>
      <draw:frame text:anchor-type="page" text:anchor-page-number="5" draw:z-index="74" draw:name="Shape1119" draw:style-name="gr1" draw:text-style-name="P2" svg:width="0.0787in" svg:height="0.1776in" svg:x="3.2366in" svg:y="0.5035in">
        <draw:text-box>
          <text:p><text:span text:style-name="T8"><text:s text:c="2"/></text:span></text:p>
        </draw:text-box>
      </draw:frame>
      <draw:frame text:anchor-type="page" text:anchor-page-number="1" draw:z-index="73" draw:name="Shape17" draw:style-name="gr1" draw:text-style-name="P2" svg:width="0.0787in" svg:height="0.1776in" svg:x="3.2366in" svg:y="0.5035in">
        <draw:text-box>
          <text:p><text:span text:style-name="T8"><text:s text:c="2"/></text:span></text:p>
        </draw:text-box>
      </draw:frame>
      <draw:frame text:anchor-type="page" text:anchor-page-number="2" draw:z-index="72" draw:name="Shape350" draw:style-name="gr1" draw:text-style-name="P2" svg:width="0.0787in" svg:height="0.1776in" svg:x="3.2366in" svg:y="0.5035in">
        <draw:text-box>
          <text:p><text:span text:style-name="T8"><text:s text:c="2"/></text:span></text:p>
        </draw:text-box>
      </draw:frame>
      <draw:frame text:anchor-type="page" text:anchor-page-number="11" draw:z-index="71" draw:name="Shape3768" draw:style-name="gr1" draw:text-style-name="P2" svg:width="0.0787in" svg:height="0.1776in" svg:x="3.2366in" svg:y="0.5035in">
        <draw:text-box>
          <text:p><text:span text:style-name="T8"><text:s text:c="2"/></text:span></text:p>
        </draw:text-box>
      </draw:frame>
      <draw:frame text:anchor-type="page" text:anchor-page-number="14" draw:z-index="70" draw:name="Shape4324" draw:style-name="gr1" draw:text-style-name="P2" svg:width="0.0787in" svg:height="0.1776in" svg:x="3.2366in" svg:y="0.5035in">
        <draw:text-box>
          <text:p><text:span text:style-name="T8"><text:s text:c="2"/></text:span></text:p>
        </draw:text-box>
      </draw:frame>
      <draw:frame text:anchor-type="page" text:anchor-page-number="8" draw:z-index="69" draw:name="Shape3111" draw:style-name="gr1" draw:text-style-name="P2" svg:width="0.0787in" svg:height="0.1776in" svg:x="3.2366in" svg:y="0.5035in">
        <draw:text-box>
          <text:p><text:span text:style-name="T8"><text:s text:c="2"/></text:span></text:p>
        </draw:text-box>
      </draw:frame>
      <draw:frame text:anchor-type="page" text:anchor-page-number="16" draw:z-index="68" draw:name="Shape5079" draw:style-name="gr1" draw:text-style-name="P2" svg:width="0.0787in" svg:height="0.1776in" svg:x="3.2366in" svg:y="0.5035in">
        <draw:text-box>
          <text:p><text:span text:style-name="T8"><text:s text:c="2"/></text:span></text:p>
        </draw:text-box>
      </draw:frame>
      <draw:frame text:anchor-type="page" text:anchor-page-number="3" draw:z-index="67" draw:name="Shape675" draw:style-name="gr1" draw:text-style-name="P2" svg:width="0.0787in" svg:height="0.1776in" svg:x="3.2366in" svg:y="0.5035in">
        <draw:text-box>
          <text:p><text:span text:style-name="T8"><text:s text:c="2"/></text:span></text:p>
        </draw:text-box>
      </draw:frame>
      <draw:frame text:anchor-type="page" text:anchor-page-number="9" draw:z-index="66" draw:name="Shape3267" draw:style-name="gr1" draw:text-style-name="P2" svg:width="0.0787in" svg:height="0.1776in" svg:x="3.2366in" svg:y="0.5035in">
        <draw:text-box>
          <text:p><text:span text:style-name="T8"><text:s text:c="2"/></text:span></text:p>
        </draw:text-box>
      </draw:frame>
      <draw:frame text:anchor-type="page" text:anchor-page-number="4" draw:z-index="65" draw:name="Shape976" draw:style-name="gr1" draw:text-style-name="P2" svg:width="0.0787in" svg:height="0.1776in" svg:x="3.2366in" svg:y="0.5035in">
        <draw:text-box>
          <text:p><text:span text:style-name="T8"><text:s text:c="2"/></text:span></text:p>
        </draw:text-box>
      </draw:frame>
      <draw:frame text:anchor-type="page" text:anchor-page-number="10" draw:z-index="64" draw:name="Shape3499" draw:style-name="gr1" draw:text-style-name="P2" svg:width="0.0787in" svg:height="0.1776in" svg:x="3.2366in" svg:y="0.5035in">
        <draw:text-box>
          <text:p><text:span text:style-name="T8"><text:s text:c="2"/></text:span></text:p>
        </draw:text-box>
      </draw:frame>
      <draw:polygon text:anchor-type="page" text:anchor-page-number="13" draw:z-index="63" draw:name="Shape4119" draw:style-name="gr2" draw:text-style-name="P3" svg:width="1.7917in" svg:height="0.0965in" svg:x="6.1598in" svg:y="0.5016in" svg:viewBox="0 0 4552 246" draw:points="0,0 4552,0 4552,246 0,246">
        <text:p/>
      </draw:polygon>
      <draw:polygon text:anchor-type="page" text:anchor-page-number="5" draw:z-index="62" draw:name="Shape1115" draw:style-name="gr2" draw:text-style-name="P3" svg:width="1.7917in" svg:height="0.0965in" svg:x="6.1598in" svg:y="0.5016in" svg:viewBox="0 0 4552 246" draw:points="0,0 4552,0 4552,246 0,246">
        <text:p/>
      </draw:polygon>
      <draw:polygon text:anchor-type="page" text:anchor-page-number="3" draw:z-index="61" draw:name="Shape671" draw:style-name="gr2" draw:text-style-name="P3" svg:width="1.7917in" svg:height="0.0965in" svg:x="6.1598in" svg:y="0.5016in" svg:viewBox="0 0 4552 246" draw:points="0,0 4552,0 4552,246 0,246">
        <text:p/>
      </draw:polygon>
      <draw:polygon text:anchor-type="page" text:anchor-page-number="7" draw:z-index="60" draw:name="Shape2731" draw:style-name="gr2" draw:text-style-name="P3" svg:width="1.7917in" svg:height="0.0965in" svg:x="6.1598in" svg:y="0.5016in" svg:viewBox="0 0 4552 246" draw:points="0,0 4552,0 4552,246 0,246">
        <text:p/>
      </draw:polygon>
      <draw:polygon text:anchor-type="page" text:anchor-page-number="9" draw:z-index="59" draw:name="Shape3263" draw:style-name="gr2" draw:text-style-name="P3" svg:width="1.7917in" svg:height="0.0965in" svg:x="6.1598in" svg:y="0.5016in" svg:viewBox="0 0 4552 246" draw:points="0,0 4552,0 4552,246 0,246">
        <text:p/>
      </draw:polygon>
      <draw:polygon text:anchor-type="page" text:anchor-page-number="14" draw:z-index="58" draw:name="Shape4320" draw:style-name="gr2" draw:text-style-name="P3" svg:width="1.7917in" svg:height="0.0965in" svg:x="6.1598in" svg:y="0.5016in" svg:viewBox="0 0 4552 246" draw:points="0,0 4552,0 4552,246 0,246">
        <text:p/>
      </draw:polygon>
      <draw:polygon text:anchor-type="page" text:anchor-page-number="8" draw:z-index="57" draw:name="Shape3107" draw:style-name="gr2" draw:text-style-name="P3" svg:width="1.7917in" svg:height="0.0965in" svg:x="6.1598in" svg:y="0.5016in" svg:viewBox="0 0 4552 246" draw:points="0,0 4552,0 4552,246 0,246">
        <text:p/>
      </draw:polygon>
      <draw:polygon text:anchor-type="page" text:anchor-page-number="16" draw:z-index="56" draw:name="Shape5075" draw:style-name="gr2" draw:text-style-name="P3" svg:width="1.7917in" svg:height="0.0965in" svg:x="6.1598in" svg:y="0.5016in" svg:viewBox="0 0 4552 246" draw:points="0,0 4552,0 4552,246 0,246">
        <text:p/>
      </draw:polygon>
      <draw:polygon text:anchor-type="page" text:anchor-page-number="2" draw:z-index="55" draw:name="Shape346" draw:style-name="gr2" draw:text-style-name="P3" svg:width="1.7917in" svg:height="0.0965in" svg:x="6.1598in" svg:y="0.5016in" svg:viewBox="0 0 4552 246" draw:points="0,0 4552,0 4552,246 0,246">
        <text:p/>
      </draw:polygon>
      <draw:polygon text:anchor-type="page" text:anchor-page-number="12" draw:z-index="54" draw:name="Shape3982" draw:style-name="gr2" draw:text-style-name="P3" svg:width="1.7917in" svg:height="0.0965in" svg:x="6.1598in" svg:y="0.5016in" svg:viewBox="0 0 4552 246" draw:points="0,0 4552,0 4552,246 0,246">
        <text:p/>
      </draw:polygon>
      <draw:polygon text:anchor-type="page" text:anchor-page-number="4" draw:z-index="53" draw:name="Shape972" draw:style-name="gr2" draw:text-style-name="P3" svg:width="1.7917in" svg:height="0.0965in" svg:x="6.1598in" svg:y="0.5016in" svg:viewBox="0 0 4552 246" draw:points="0,0 4552,0 4552,246 0,246">
        <text:p/>
      </draw:polygon>
      <draw:polygon text:anchor-type="page" text:anchor-page-number="6" draw:z-index="52" draw:name="Shape1759" draw:style-name="gr2" draw:text-style-name="P3" svg:width="1.7917in" svg:height="0.0965in" svg:x="6.1598in" svg:y="0.5016in" svg:viewBox="0 0 4552 246" draw:points="0,0 4552,0 4552,246 0,246">
        <text:p/>
      </draw:polygon>
      <draw:polygon text:anchor-type="page" text:anchor-page-number="10" draw:z-index="51" draw:name="Shape3495" draw:style-name="gr2" draw:text-style-name="P3" svg:width="1.7917in" svg:height="0.0965in" svg:x="6.1598in" svg:y="0.5016in" svg:viewBox="0 0 4552 246" draw:points="0,0 4552,0 4552,246 0,246">
        <text:p/>
      </draw:polygon>
      <draw:polygon text:anchor-type="page" text:anchor-page-number="15" draw:z-index="50" draw:name="Shape4915" draw:style-name="gr2" draw:text-style-name="P3" svg:width="1.7917in" svg:height="0.0965in" svg:x="6.1598in" svg:y="0.5016in" svg:viewBox="0 0 4552 246" draw:points="0,0 4552,0 4552,246 0,246">
        <text:p/>
      </draw:polygon>
      <draw:polygon text:anchor-type="page" text:anchor-page-number="1" draw:z-index="49" draw:name="Shape13" draw:style-name="gr2" draw:text-style-name="P3" svg:width="1.7917in" svg:height="0.0965in" svg:x="6.1598in" svg:y="0.5016in" svg:viewBox="0 0 4552 246" draw:points="0,0 4552,0 4552,246 0,246">
        <text:p/>
      </draw:polygon>
      <draw:polygon text:anchor-type="page" text:anchor-page-number="11" draw:z-index="48" draw:name="Shape3764" draw:style-name="gr2" draw:text-style-name="P3" svg:width="1.7917in" svg:height="0.0965in" svg:x="6.1598in" svg:y="0.5016in" svg:viewBox="0 0 4552 246" draw:points="0,0 4552,0 4552,246 0,246">
        <text:p/>
      </draw:polygon>
      <draw:polygon text:anchor-type="page" text:anchor-page-number="14" draw:z-index="47" draw:name="Shape4319" draw:style-name="gr2" draw:text-style-name="P3" svg:width="1.8799in" svg:height="0.1764in" svg:x="6.1165in" svg:y="0.5016in" svg:viewBox="0 0 4776 449" draw:points="0,0 4776,0 4776,449 0,449">
        <text:p/>
      </draw:polygon>
      <draw:polygon text:anchor-type="page" text:anchor-page-number="15" draw:z-index="46" draw:name="Shape4914" draw:style-name="gr2" draw:text-style-name="P3" svg:width="1.8799in" svg:height="0.1764in" svg:x="6.1165in" svg:y="0.5016in" svg:viewBox="0 0 4776 449" draw:points="0,0 4776,0 4776,449 0,449">
        <text:p/>
      </draw:polygon>
      <draw:polygon text:anchor-type="page" text:anchor-page-number="9" draw:z-index="45" draw:name="Shape3262" draw:style-name="gr2" draw:text-style-name="P3" svg:width="1.8799in" svg:height="0.1764in" svg:x="6.1165in" svg:y="0.5016in" svg:viewBox="0 0 4776 449" draw:points="0,0 4776,0 4776,449 0,449">
        <text:p/>
      </draw:polygon>
      <draw:polygon text:anchor-type="page" text:anchor-page-number="1" draw:z-index="44" draw:name="Shape12" draw:style-name="gr2" draw:text-style-name="P3" svg:width="1.8799in" svg:height="0.1764in" svg:x="6.1165in" svg:y="0.5016in" svg:viewBox="0 0 4776 449" draw:points="0,0 4776,0 4776,449 0,449">
        <text:p/>
      </draw:polygon>
      <draw:polygon text:anchor-type="page" text:anchor-page-number="5" draw:z-index="43" draw:name="Shape1114" draw:style-name="gr2" draw:text-style-name="P3" svg:width="1.8799in" svg:height="0.1764in" svg:x="6.1165in" svg:y="0.5016in" svg:viewBox="0 0 4776 449" draw:points="0,0 4776,0 4776,449 0,449">
        <text:p/>
      </draw:polygon>
      <draw:polygon text:anchor-type="page" text:anchor-page-number="3" draw:z-index="42" draw:name="Shape670" draw:style-name="gr2" draw:text-style-name="P3" svg:width="1.8799in" svg:height="0.1764in" svg:x="6.1165in" svg:y="0.5016in" svg:viewBox="0 0 4776 449" draw:points="0,0 4776,0 4776,449 0,449">
        <text:p/>
      </draw:polygon>
      <draw:polygon text:anchor-type="page" text:anchor-page-number="6" draw:z-index="41" draw:name="Shape1758" draw:style-name="gr2" draw:text-style-name="P3" svg:width="1.8799in" svg:height="0.1764in" svg:x="6.1165in" svg:y="0.5016in" svg:viewBox="0 0 4776 449" draw:points="0,0 4776,0 4776,449 0,449">
        <text:p/>
      </draw:polygon>
      <draw:polygon text:anchor-type="page" text:anchor-page-number="2" draw:z-index="40" draw:name="Shape345" draw:style-name="gr2" draw:text-style-name="P3" svg:width="1.8799in" svg:height="0.1764in" svg:x="6.1165in" svg:y="0.5016in" svg:viewBox="0 0 4776 449" draw:points="0,0 4776,0 4776,449 0,449">
        <text:p/>
      </draw:polygon>
      <draw:polygon text:anchor-type="page" text:anchor-page-number="10" draw:z-index="39" draw:name="Shape3494" draw:style-name="gr2" draw:text-style-name="P3" svg:width="1.8799in" svg:height="0.1764in" svg:x="6.1165in" svg:y="0.5016in" svg:viewBox="0 0 4776 449" draw:points="0,0 4776,0 4776,449 0,449">
        <text:p/>
      </draw:polygon>
      <draw:polygon text:anchor-type="page" text:anchor-page-number="11" draw:z-index="38" draw:name="Shape3763" draw:style-name="gr2" draw:text-style-name="P3" svg:width="1.8799in" svg:height="0.1764in" svg:x="6.1165in" svg:y="0.5016in" svg:viewBox="0 0 4776 449" draw:points="0,0 4776,0 4776,449 0,449">
        <text:p/>
      </draw:polygon>
      <draw:polygon text:anchor-type="page" text:anchor-page-number="12" draw:z-index="37" draw:name="Shape3981" draw:style-name="gr2" draw:text-style-name="P3" svg:width="1.8799in" svg:height="0.1764in" svg:x="6.1165in" svg:y="0.5016in" svg:viewBox="0 0 4776 449" draw:points="0,0 4776,0 4776,449 0,449">
        <text:p/>
      </draw:polygon>
      <draw:polygon text:anchor-type="page" text:anchor-page-number="4" draw:z-index="36" draw:name="Shape971" draw:style-name="gr2" draw:text-style-name="P3" svg:width="1.8799in" svg:height="0.1764in" svg:x="6.1165in" svg:y="0.5016in" svg:viewBox="0 0 4776 449" draw:points="0,0 4776,0 4776,449 0,449">
        <text:p/>
      </draw:polygon>
      <draw:polygon text:anchor-type="page" text:anchor-page-number="16" draw:z-index="35" draw:name="Shape5074" draw:style-name="gr2" draw:text-style-name="P3" svg:width="1.8799in" svg:height="0.1764in" svg:x="6.1165in" svg:y="0.5016in" svg:viewBox="0 0 4776 449" draw:points="0,0 4776,0 4776,449 0,449">
        <text:p/>
      </draw:polygon>
      <draw:polygon text:anchor-type="page" text:anchor-page-number="13" draw:z-index="34" draw:name="Shape4118" draw:style-name="gr2" draw:text-style-name="P3" svg:width="1.8799in" svg:height="0.1764in" svg:x="6.1165in" svg:y="0.5016in" svg:viewBox="0 0 4776 449" draw:points="0,0 4776,0 4776,449 0,449">
        <text:p/>
      </draw:polygon>
      <draw:polygon text:anchor-type="page" text:anchor-page-number="8" draw:z-index="33" draw:name="Shape3106" draw:style-name="gr2" draw:text-style-name="P3" svg:width="1.8799in" svg:height="0.1764in" svg:x="6.1165in" svg:y="0.5016in" svg:viewBox="0 0 4776 449" draw:points="0,0 4776,0 4776,449 0,449">
        <text:p/>
      </draw:polygon>
      <draw:polygon text:anchor-type="page" text:anchor-page-number="7" draw:z-index="32" draw:name="Shape2730" draw:style-name="gr2" draw:text-style-name="P3" svg:width="1.8799in" svg:height="0.1764in" svg:x="6.1165in" svg:y="0.5016in" svg:viewBox="0 0 4776 449" draw:points="0,0 4776,0 4776,449 0,449">
        <text:p/>
      </draw:polygon>
      <draw:polygon text:anchor-type="page" text:anchor-page-number="6" draw:z-index="31" draw:name="Shape1754" draw:style-name="gr2" draw:text-style-name="P3" svg:width="5.6516in" svg:height="0.1764in" svg:x="0.4114in" svg:y="0.5016in" svg:viewBox="0 0 14356 449" draw:points="0,0 14356,0 14356,449 0,449">
        <text:p/>
      </draw:polygon>
      <draw:polygon text:anchor-type="page" text:anchor-page-number="1" draw:z-index="30" draw:name="Shape8" draw:style-name="gr2" draw:text-style-name="P3" svg:width="5.6516in" svg:height="0.1764in" svg:x="0.4114in" svg:y="0.5016in" svg:viewBox="0 0 14356 449" draw:points="0,0 14356,0 14356,449 0,449">
        <text:p/>
      </draw:polygon>
      <draw:polygon text:anchor-type="page" text:anchor-page-number="15" draw:z-index="29" draw:name="Shape4910" draw:style-name="gr2" draw:text-style-name="P3" svg:width="5.6516in" svg:height="0.1764in" svg:x="0.4114in" svg:y="0.5016in" svg:viewBox="0 0 14356 449" draw:points="0,0 14356,0 14356,449 0,449">
        <text:p/>
      </draw:polygon>
      <draw:polygon text:anchor-type="page" text:anchor-page-number="16" draw:z-index="28" draw:name="Shape5070" draw:style-name="gr2" draw:text-style-name="P3" svg:width="5.6516in" svg:height="0.1764in" svg:x="0.4114in" svg:y="0.5016in" svg:viewBox="0 0 14356 449" draw:points="0,0 14356,0 14356,449 0,449">
        <text:p/>
      </draw:polygon>
      <draw:polygon text:anchor-type="page" text:anchor-page-number="4" draw:z-index="27" draw:name="Shape967" draw:style-name="gr2" draw:text-style-name="P3" svg:width="5.6516in" svg:height="0.1764in" svg:x="0.4114in" svg:y="0.5016in" svg:viewBox="0 0 14356 449" draw:points="0,0 14356,0 14356,449 0,449">
        <text:p/>
      </draw:polygon>
      <draw:polygon text:anchor-type="page" text:anchor-page-number="12" draw:z-index="26" draw:name="Shape3977" draw:style-name="gr2" draw:text-style-name="P3" svg:width="5.6516in" svg:height="0.1764in" svg:x="0.4114in" svg:y="0.5016in" svg:viewBox="0 0 14356 449" draw:points="0,0 14356,0 14356,449 0,449">
        <text:p/>
      </draw:polygon>
      <draw:polygon text:anchor-type="page" text:anchor-page-number="8" draw:z-index="25" draw:name="Shape3102" draw:style-name="gr2" draw:text-style-name="P3" svg:width="5.6516in" svg:height="0.1764in" svg:x="0.4114in" svg:y="0.5016in" svg:viewBox="0 0 14356 449" draw:points="0,0 14356,0 14356,449 0,449">
        <text:p/>
      </draw:polygon>
      <draw:polygon text:anchor-type="page" text:anchor-page-number="11" draw:z-index="24" draw:name="Shape3759" draw:style-name="gr2" draw:text-style-name="P3" svg:width="5.6516in" svg:height="0.1764in" svg:x="0.4114in" svg:y="0.5016in" svg:viewBox="0 0 14356 449" draw:points="0,0 14356,0 14356,449 0,449">
        <text:p/>
      </draw:polygon>
      <draw:polygon text:anchor-type="page" text:anchor-page-number="14" draw:z-index="23" draw:name="Shape4315" draw:style-name="gr2" draw:text-style-name="P3" svg:width="5.6516in" svg:height="0.1764in" svg:x="0.4114in" svg:y="0.5016in" svg:viewBox="0 0 14356 449" draw:points="0,0 14356,0 14356,449 0,449">
        <text:p/>
      </draw:polygon>
      <draw:polygon text:anchor-type="page" text:anchor-page-number="13" draw:z-index="22" draw:name="Shape4114" draw:style-name="gr2" draw:text-style-name="P3" svg:width="5.6516in" svg:height="0.1764in" svg:x="0.4114in" svg:y="0.5016in" svg:viewBox="0 0 14356 449" draw:points="0,0 14356,0 14356,449 0,449">
        <text:p/>
      </draw:polygon>
      <draw:polygon text:anchor-type="page" text:anchor-page-number="7" draw:z-index="21" draw:name="Shape2726" draw:style-name="gr2" draw:text-style-name="P3" svg:width="5.6516in" svg:height="0.1764in" svg:x="0.4114in" svg:y="0.5016in" svg:viewBox="0 0 14356 449" draw:points="0,0 14356,0 14356,449 0,449">
        <text:p/>
      </draw:polygon>
      <draw:polygon text:anchor-type="page" text:anchor-page-number="9" draw:z-index="20" draw:name="Shape3258" draw:style-name="gr2" draw:text-style-name="P3" svg:width="5.6516in" svg:height="0.1764in" svg:x="0.4114in" svg:y="0.5016in" svg:viewBox="0 0 14356 449" draw:points="0,0 14356,0 14356,449 0,449">
        <text:p/>
      </draw:polygon>
      <draw:polygon text:anchor-type="page" text:anchor-page-number="3" draw:z-index="19" draw:name="Shape666" draw:style-name="gr2" draw:text-style-name="P3" svg:width="5.6516in" svg:height="0.1764in" svg:x="0.4114in" svg:y="0.5016in" svg:viewBox="0 0 14356 449" draw:points="0,0 14356,0 14356,449 0,449">
        <text:p/>
      </draw:polygon>
      <draw:polygon text:anchor-type="page" text:anchor-page-number="5" draw:z-index="18" draw:name="Shape1110" draw:style-name="gr2" draw:text-style-name="P3" svg:width="5.6516in" svg:height="0.1764in" svg:x="0.4114in" svg:y="0.5016in" svg:viewBox="0 0 14356 449" draw:points="0,0 14356,0 14356,449 0,449">
        <text:p/>
      </draw:polygon>
      <draw:polygon text:anchor-type="page" text:anchor-page-number="10" draw:z-index="17" draw:name="Shape3490" draw:style-name="gr2" draw:text-style-name="P3" svg:width="5.6516in" svg:height="0.1764in" svg:x="0.4114in" svg:y="0.5016in" svg:viewBox="0 0 14356 449" draw:points="0,0 14356,0 14356,449 0,449">
        <text:p/>
      </draw:polygon>
      <draw:polygon text:anchor-type="page" text:anchor-page-number="2" draw:z-index="16" draw:name="Shape341" draw:style-name="gr2" draw:text-style-name="P3" svg:width="5.6516in" svg:height="0.1764in" svg:x="0.4114in" svg:y="0.5016in" svg:viewBox="0 0 14356 449" draw:points="0,0 14356,0 14356,449 0,449">
        <text:p/>
      </draw:polygon>
      <draw:polygon text:anchor-type="page" text:anchor-page-number="3" draw:z-index="15" draw:name="Shape664" draw:style-name="gr2" draw:text-style-name="P3" svg:width="5.7449in" svg:height="0.1764in" svg:x="0.3665in" svg:y="0.5016in" svg:viewBox="0 0 14593 449" draw:points="0,0 14593,0 14593,449 0,449">
        <text:p/>
      </draw:polygon>
      <draw:polygon text:anchor-type="page" text:anchor-page-number="10" draw:z-index="14" draw:name="Shape3488" draw:style-name="gr2" draw:text-style-name="P3" svg:width="5.7449in" svg:height="0.1764in" svg:x="0.3665in" svg:y="0.5016in" svg:viewBox="0 0 14593 449" draw:points="0,0 14593,0 14593,449 0,449">
        <text:p/>
      </draw:polygon>
      <draw:polygon text:anchor-type="page" text:anchor-page-number="9" draw:z-index="13" draw:name="Shape3256" draw:style-name="gr2" draw:text-style-name="P3" svg:width="5.7449in" svg:height="0.1764in" svg:x="0.3665in" svg:y="0.5016in" svg:viewBox="0 0 14593 449" draw:points="0,0 14593,0 14593,449 0,449">
        <text:p/>
      </draw:polygon>
      <draw:polygon text:anchor-type="page" text:anchor-page-number="16" draw:z-index="12" draw:name="Shape5068" draw:style-name="gr2" draw:text-style-name="P3" svg:width="5.7449in" svg:height="0.1764in" svg:x="0.3665in" svg:y="0.5016in" svg:viewBox="0 0 14593 449" draw:points="0,0 14593,0 14593,449 0,449">
        <text:p/>
      </draw:polygon>
      <draw:polygon text:anchor-type="page" text:anchor-page-number="1" draw:z-index="11" draw:name="Shape6" draw:style-name="gr2" draw:text-style-name="P3" svg:width="5.7449in" svg:height="0.1764in" svg:x="0.3665in" svg:y="0.5016in" svg:viewBox="0 0 14593 449" draw:points="0,0 14593,0 14593,449 0,449">
        <text:p/>
      </draw:polygon>
      <draw:polygon text:anchor-type="page" text:anchor-page-number="8" draw:z-index="10" draw:name="Shape3100" draw:style-name="gr2" draw:text-style-name="P3" svg:width="5.7449in" svg:height="0.1764in" svg:x="0.3665in" svg:y="0.5016in" svg:viewBox="0 0 14593 449" draw:points="0,0 14593,0 14593,449 0,449">
        <text:p/>
      </draw:polygon>
      <draw:polygon text:anchor-type="page" text:anchor-page-number="11" draw:z-index="9" draw:name="Shape3757" draw:style-name="gr2" draw:text-style-name="P3" svg:width="5.7449in" svg:height="0.1764in" svg:x="0.3665in" svg:y="0.5016in" svg:viewBox="0 0 14593 449" draw:points="0,0 14593,0 14593,449 0,449">
        <text:p/>
      </draw:polygon>
      <draw:polygon text:anchor-type="page" text:anchor-page-number="15" draw:z-index="8" draw:name="Shape4908" draw:style-name="gr2" draw:text-style-name="P3" svg:width="5.7449in" svg:height="0.1764in" svg:x="0.3665in" svg:y="0.5016in" svg:viewBox="0 0 14593 449" draw:points="0,0 14593,0 14593,449 0,449">
        <text:p/>
      </draw:polygon>
      <draw:polygon text:anchor-type="page" text:anchor-page-number="4" draw:z-index="7" draw:name="Shape965" draw:style-name="gr2" draw:text-style-name="P3" svg:width="5.7449in" svg:height="0.1764in" svg:x="0.3665in" svg:y="0.5016in" svg:viewBox="0 0 14593 449" draw:points="0,0 14593,0 14593,449 0,449">
        <text:p/>
      </draw:polygon>
      <draw:polygon text:anchor-type="page" text:anchor-page-number="7" draw:z-index="6" draw:name="Shape2724" draw:style-name="gr2" draw:text-style-name="P3" svg:width="5.7449in" svg:height="0.1764in" svg:x="0.3665in" svg:y="0.5016in" svg:viewBox="0 0 14593 449" draw:points="0,0 14593,0 14593,449 0,449">
        <text:p/>
      </draw:polygon>
      <draw:polygon text:anchor-type="page" text:anchor-page-number="12" draw:z-index="5" draw:name="Shape3975" draw:style-name="gr2" draw:text-style-name="P3" svg:width="5.7449in" svg:height="0.1764in" svg:x="0.3665in" svg:y="0.5016in" svg:viewBox="0 0 14593 449" draw:points="0,0 14593,0 14593,449 0,449">
        <text:p/>
      </draw:polygon>
      <draw:polygon text:anchor-type="page" text:anchor-page-number="2" draw:z-index="4" draw:name="Shape339" draw:style-name="gr2" draw:text-style-name="P3" svg:width="5.7449in" svg:height="0.1764in" svg:x="0.3665in" svg:y="0.5016in" svg:viewBox="0 0 14593 449" draw:points="0,0 14593,0 14593,449 0,449">
        <text:p/>
      </draw:polygon>
      <draw:polygon text:anchor-type="page" text:anchor-page-number="6" draw:z-index="3" draw:name="Shape1752" draw:style-name="gr2" draw:text-style-name="P3" svg:width="5.7449in" svg:height="0.1764in" svg:x="0.3665in" svg:y="0.5016in" svg:viewBox="0 0 14593 449" draw:points="0,0 14593,0 14593,449 0,449">
        <text:p/>
      </draw:polygon>
      <draw:polygon text:anchor-type="page" text:anchor-page-number="14" draw:z-index="2" draw:name="Shape4313" draw:style-name="gr2" draw:text-style-name="P3" svg:width="5.7449in" svg:height="0.1764in" svg:x="0.3665in" svg:y="0.5016in" svg:viewBox="0 0 14593 449" draw:points="0,0 14593,0 14593,449 0,449">
        <text:p/>
      </draw:polygon>
      <draw:polygon text:anchor-type="page" text:anchor-page-number="13" draw:z-index="1" draw:name="Shape4112" draw:style-name="gr2" draw:text-style-name="P3" svg:width="5.7449in" svg:height="0.1764in" svg:x="0.3665in" svg:y="0.5016in" svg:viewBox="0 0 14593 449" draw:points="0,0 14593,0 14593,449 0,449">
        <text:p/>
      </draw:polygon>
      <draw:polygon text:anchor-type="page" text:anchor-page-number="5" draw:z-index="0" draw:name="Shape1108" draw:style-name="gr2" draw:text-style-name="P3" svg:width="5.7449in" svg:height="0.1764in" svg:x="0.3665in" svg:y="0.5016in" svg:viewBox="0 0 14593 449" draw:points="0,0 14593,0 14593,449 0,449">
        <text:p/>
      </draw:polyg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65in" fo:page-height="11.6898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aster-page3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6" meta:paragraph-count="0" meta:word-count="0" meta:character-count="0" meta:non-whitespace-character-count="0"/>
    <meta:generator>LibreOffice/25.8.5.2$Linux_X86_64 LibreOffice_project/580$Build-2</meta:generator>
  </office:meta>
</office:document-meta>
</file>